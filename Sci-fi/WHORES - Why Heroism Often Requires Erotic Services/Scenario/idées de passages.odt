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2e88" officeooo:paragraph-rsid="00192e88"/>
    </style:style>
    <style:style style:name="P2" style:family="paragraph" style:parent-style-name="Standard" style:list-style-name="L1">
      <style:paragraph-properties fo:margin-top="0.201cm" fo:margin-bottom="0.201cm" style:contextual-spacing="false"/>
      <style:text-properties officeooo:rsid="00192e88" officeooo:paragraph-rsid="00192e88"/>
    </style:style>
    <style:style style:name="P3" style:family="paragraph" style:parent-style-name="Standard" style:list-style-name="L1">
      <style:paragraph-properties fo:margin-top="0.201cm" fo:margin-bottom="0.201cm" style:contextual-spacing="false"/>
      <style:text-properties officeooo:rsid="001a78b3" officeooo:paragraph-rsid="001a78b3"/>
    </style:style>
    <style:style style:name="P4" style:family="paragraph" style:parent-style-name="Standard" style:list-style-name="L1">
      <style:paragraph-properties fo:margin-top="0.201cm" fo:margin-bottom="0.201cm" style:contextual-spacing="false"/>
      <style:text-properties officeooo:rsid="001b080d" officeooo:paragraph-rsid="001b080d"/>
    </style:style>
    <style:style style:name="P5" style:family="paragraph" style:parent-style-name="Standard" style:list-style-name="L1">
      <style:paragraph-properties fo:margin-top="0.201cm" fo:margin-bottom="0.201cm" style:contextual-spacing="false"/>
      <style:text-properties officeooo:rsid="001cf89c" officeooo:paragraph-rsid="001cf89c"/>
    </style:style>
    <style:style style:name="P6" style:family="paragraph" style:parent-style-name="Standard" style:list-style-name="L1">
      <style:paragraph-properties fo:margin-top="0.201cm" fo:margin-bottom="0.201cm" style:contextual-spacing="false"/>
      <style:text-properties officeooo:rsid="0021f60c" officeooo:paragraph-rsid="0021f60c"/>
    </style:style>
    <style:style style:name="P7" style:family="paragraph" style:parent-style-name="Standard">
      <style:paragraph-properties fo:margin-top="0.201cm" fo:margin-bottom="0.201cm" style:contextual-spacing="false"/>
      <style:text-properties officeooo:paragraph-rsid="00106f63"/>
    </style:style>
    <style:style style:name="T1" style:family="text">
      <style:text-properties officeooo:rsid="00230391"/>
    </style:style>
    <style:style style:name="T2" style:family="text">
      <style:text-properties officeooo:rsid="001e9d11"/>
    </style:style>
    <style:style style:name="T3" style:family="text">
      <style:text-properties officeooo:rsid="00235821"/>
    </style:style>
    <style:style style:name="T4" style:family="text">
      <style:text-properties officeooo:rsid="001bb02d"/>
    </style:style>
    <style:style style:name="T5" style:family="text">
      <style:text-properties officeooo:rsid="001c193a"/>
    </style:style>
    <style:style style:name="T6" style:family="text">
      <style:text-properties officeooo:rsid="0020bdd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passages :</text:p>
      <text:p text:style-name="P1"/>
      <text:list text:style-name="L1">
        <text:list-item>
          <text:p text:style-name="P2">Pour les nouvelles filles vierges passant leur 1er porno ou client, Cindy offre une session de « déflorage », qui consiste juste à prendre un strapon pour la baiser, ce qui surprendra Amelia, qui ne s’attendait pas à ce que Cindy soit bisexuelle. Elle découvrira alors qu’elle est elle aussi bisexuelle, ce qui mènera Cindy à l’inviter régulièrement à des soirées de sexe, seules ou avec des partenaires.</text:p>
        </text:list-item>
        <text:list-item>
          <text:p text:style-name="P3">Un jour, Léo se rend au club de strip-tease où travaille Amelia pour se décontracter après une journée stressante, pile le jour pour obtenir une danse privée de sa part. C’est juste <text:span text:style-name="T1">après</text:span> qu’Astro fait irruption, déclarant le chercher pour savoir ce qui n’allait pas, craignant de l’avoir contrarié. Léo, ne voulant surtout pas que l’on sache qu’il est associé à elle (pour éviter de dévoiler son identité d’<text:span text:style-name="T2">inspecteur</text:span>) prétexte une inspection surprise des locaux par Astro (offrant <text:span text:style-name="T3">a</text:span>n gérant une chance de la virer sans mandat) pendant qu’il s’échappe dans la rue en l’attendant. Navré de la voir aussi innocente sur les raisons de sa présence dans un strip-club, il lui explique que les hommes y vont souvent pour avoir du sexe et du bon temps après une mauvaise journée. Astro lui offre naïvement de le satisfaire sexuellement, ce qu’il refuse hâtivement, embarrassé ; il lui pointe qu’elle ne possède même pas les implants pour coucher avec lui, Astro ne possédant ni seins ni vagin.</text:p>
        </text:list-item>
        <text:list-item>
          <text:p text:style-name="P3">Quelques jours après, Astro rend visite à Rafale pour lui expliquer la situation avec Léo. Plus qu’enjouée à l’idée de caser les deux coéquipiers ensemble, Rafale lui trouve un châssis d’androïde-prostituée avec des récepteurs de plaisir, capables de la faire orgasmer. Astro, embarrassée, refuse, mais finira par l’installer pendant sa nuit avec Léo.</text:p>
        </text:list-item>
        <text:list-item>
          <text:p text:style-name="P4">Un jour où Amelia rencontre Astro alors que celle-ci a été endommagée, elle lui propose de la réparer, ce qu’elle accepte. Amelia découvre alors une région étrange dans le bloc mémoire d’Astro qu’elle tente de réparer, sans succès ; il s’agit d’une portion de sa mémoire qui semble verrouillé par l’androïde, mais qu’elle-même ne parvient pas à accéder. <text:span text:style-name="T4">Tandis qu’elle recouvre sa mémoire au fil de l’histoire, Astro finira par déverrouiller cet espace mémoire, malgré les protections qu’elle a mise en place. Il s’agit en réalité du souvenir de l’assassination de son créateur par son collègue de l’époque, devenu depuis le méchant de l’histoire. L’épisode a été si traumatisant pour Astro qu’elle l’a bloqué de sa mémoire. Amelia avait remarqué que sa mémoire n’était pas endommagée, et cela confirme qu’Astro avait simplement bloqué ses propres souvenirs, ne souhaitant pas revivre cet épisode douloureux de son passé </text:span><text:span text:style-name="T5">et se rappeler de ce qu’elle a perdu.</text:span></text:p>
        </text:list-item>
        <text:list-item>
          <text:p text:style-name="P5">Peu après avoir réparé Astro, Amélia se voit offert une place au sein de la NPRB en tant que médic pour paratechs. [Est-ce qu’on la fait accepter ? Refuser?] <text:span text:style-name="T6">Peu après, AM a vent des capacités d’Ingénieur d’Amélia, et tente de la recruter au sein de NextHuman Industries. Mais son arrogance et son dédain vis-à-vis du peuple et de ses compétiteurs (notamment le père d’Amélia) forcera celle-ci à refuser, ne voulant pas s’associer à quelqu’un d’aussi avide et déconnecté du peuple.</text:span></text:p>
        </text:list-item>
        <text:list-item>
          <text:p text:style-name="P6"><text:soft-page-break/>Un jour où la voiture de Cindy tombe en panne, Amélia lui propose une visite de son père pour qu’il la répare, ce qu’elle accepte. Cindy sera séduite par le charme naturel de son père et l’invitera à prendre un café, et ne manquera pas de taquiner Amélia à ce sujet. Plus tard, alors que la relation entre les deux parents se développera, Cindy tentera d’inciter Amélia à du sexe incestueux entre eux trois, ce qu’elle refusera, mais ne sera pas vraiment réticente à continuer de coucher avec elle, bien qu’elle soit partie pour devenir sa belle-mère.</text:p>
        </text:list-item>
      </text:list>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53M43S</meta:editing-duration>
    <meta:editing-cycles>14</meta:editing-cycles>
    <meta:generator>LibreOffice/25.2.4.3$Windows_X86_64 LibreOffice_project/33e196637044ead23f5c3226cde09b47731f7e27</meta:generator>
    <meta:creation-date>2025-12-13T13:11:20.867072800</meta:creation-date>
    <dc:title>Format de texte</dc:title>
    <dc:date>2026-04-08T00:51:13.654060900</dc:date>
    <meta:document-statistic meta:table-count="0" meta:image-count="0" meta:object-count="0" meta:page-count="2" meta:paragraph-count="7" meta:word-count="629" meta:character-count="3757" meta:non-whitespace-character-count="3141"/>
    <meta:template xlink:type="simple" xlink:actuate="onRequest" xlink:title="Format de texte" xlink:href="file:///C:/Users/Clément/AppData/Roaming/LibreOffice/4/user/template/Format%20de%20texte1.ott" meta:date="2025-12-13T13:11:20.210432000"/>
  </office:meta>
</office:document-meta>
</file>