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ubtitle">
      <style:text-properties officeooo:paragraph-rsid="00614f59"/>
    </style:style>
    <style:style style:name="P2" style:family="paragraph" style:parent-style-name="Standard">
      <style:text-properties officeooo:rsid="00190732" officeooo:paragraph-rsid="00190732"/>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officeooo:rsid="005dca7f" officeooo:paragraph-rsid="005dca7f"/>
    </style:style>
    <style:style style:name="P5" style:family="paragraph" style:parent-style-name="Standard">
      <style:text-properties officeooo:rsid="0023321a" officeooo:paragraph-rsid="003bb394"/>
    </style:style>
    <style:style style:name="P6" style:family="paragraph" style:parent-style-name="Standard">
      <style:text-properties officeooo:rsid="00190732" officeooo:paragraph-rsid="003bb394"/>
    </style:style>
    <style:style style:name="P7" style:family="paragraph" style:parent-style-name="Standard">
      <style:text-properties officeooo:rsid="001d2495" officeooo:paragraph-rsid="003bb394"/>
    </style:style>
    <style:style style:name="P8" style:family="paragraph" style:parent-style-name="Standard">
      <style:text-properties officeooo:rsid="00190732" officeooo:paragraph-rsid="00240386"/>
    </style:style>
    <style:style style:name="P9" style:family="paragraph" style:parent-style-name="Standard">
      <style:text-properties officeooo:rsid="001d2495" officeooo:paragraph-rsid="00240386"/>
    </style:style>
    <style:style style:name="P10" style:family="paragraph" style:parent-style-name="Standard">
      <style:text-properties officeooo:rsid="001d2495" officeooo:paragraph-rsid="0027d444"/>
    </style:style>
    <style:style style:name="P11" style:family="paragraph" style:parent-style-name="Standard">
      <style:text-properties officeooo:rsid="001d2495" officeooo:paragraph-rsid="00293332"/>
    </style:style>
    <style:style style:name="P12" style:family="paragraph" style:parent-style-name="Standard">
      <style:text-properties officeooo:rsid="001d2495" officeooo:paragraph-rsid="0029d076"/>
    </style:style>
    <style:style style:name="P13" style:family="paragraph" style:parent-style-name="Standard">
      <style:text-properties officeooo:rsid="001d2495" officeooo:paragraph-rsid="002c05c4"/>
    </style:style>
    <style:style style:name="P14" style:family="paragraph" style:parent-style-name="Standard">
      <style:text-properties officeooo:rsid="00190732" officeooo:paragraph-rsid="002c05c4"/>
    </style:style>
    <style:style style:name="P15" style:family="paragraph" style:parent-style-name="Standard">
      <style:text-properties officeooo:rsid="001d2495" officeooo:paragraph-rsid="002c8de0"/>
    </style:style>
    <style:style style:name="P16" style:family="paragraph" style:parent-style-name="Standard">
      <style:text-properties officeooo:rsid="00190732" officeooo:paragraph-rsid="002c8de0"/>
    </style:style>
    <style:style style:name="P17" style:family="paragraph" style:parent-style-name="Standard">
      <style:text-properties officeooo:rsid="001d2495" officeooo:paragraph-rsid="005ae1f3"/>
    </style:style>
    <style:style style:name="P18" style:family="paragraph" style:parent-style-name="Standard">
      <style:text-properties officeooo:rsid="00190732" officeooo:paragraph-rsid="002fdb3e"/>
    </style:style>
    <style:style style:name="P19" style:family="paragraph" style:parent-style-name="Standard">
      <style:text-properties officeooo:rsid="001d2495" officeooo:paragraph-rsid="00347f92"/>
    </style:style>
    <style:style style:name="P20" style:family="paragraph" style:parent-style-name="Standard">
      <style:text-properties officeooo:rsid="001d2495" officeooo:paragraph-rsid="00579a75"/>
    </style:style>
    <style:style style:name="P21" style:family="paragraph" style:parent-style-name="Standard">
      <style:text-properties officeooo:rsid="00190732" officeooo:paragraph-rsid="003709b2"/>
    </style:style>
    <style:style style:name="P22" style:family="paragraph" style:parent-style-name="Standard">
      <style:text-properties officeooo:rsid="001d2495" officeooo:paragraph-rsid="003b263d"/>
    </style:style>
    <style:style style:name="P23" style:family="paragraph" style:parent-style-name="Standard">
      <style:text-properties officeooo:rsid="003b263d" officeooo:paragraph-rsid="00665d74"/>
    </style:style>
    <style:style style:name="P24" style:family="paragraph" style:parent-style-name="Standard">
      <style:text-properties officeooo:rsid="00665d74" officeooo:paragraph-rsid="00665d74"/>
    </style:style>
    <style:style style:name="P25" style:family="paragraph" style:parent-style-name="Standard">
      <style:text-properties officeooo:rsid="001d2495" officeooo:paragraph-rsid="003709b2"/>
    </style:style>
    <style:style style:name="P26" style:family="paragraph" style:parent-style-name="Standard">
      <style:text-properties officeooo:rsid="001d2495" officeooo:paragraph-rsid="00686447"/>
    </style:style>
    <style:style style:name="P27" style:family="paragraph" style:parent-style-name="Standard">
      <style:text-properties officeooo:rsid="001d2495" officeooo:paragraph-rsid="006c5f42"/>
    </style:style>
    <style:style style:name="P28" style:family="paragraph" style:parent-style-name="Standard">
      <style:text-properties officeooo:rsid="006c5f42" officeooo:paragraph-rsid="006c5f42"/>
    </style:style>
    <style:style style:name="P29" style:family="paragraph" style:parent-style-name="Standard">
      <style:text-properties officeooo:rsid="006c747e" officeooo:paragraph-rsid="006c747e"/>
    </style:style>
    <style:style style:name="P30" style:family="paragraph" style:parent-style-name="Standard">
      <style:text-properties officeooo:rsid="001d2495" officeooo:paragraph-rsid="006d7b08"/>
    </style:style>
    <style:style style:name="P31" style:family="paragraph" style:parent-style-name="Standard">
      <style:text-properties officeooo:rsid="006fa101" officeooo:paragraph-rsid="006fa101"/>
    </style:style>
    <style:style style:name="P32" style:family="paragraph" style:parent-style-name="Standard">
      <style:text-properties officeooo:rsid="0070ed47" officeooo:paragraph-rsid="0070ed47"/>
    </style:style>
    <style:style style:name="P33" style:family="paragraph" style:parent-style-name="Standard">
      <style:text-properties officeooo:rsid="001d2495" officeooo:paragraph-rsid="0073bc0f"/>
    </style:style>
    <style:style style:name="P34" style:family="paragraph" style:parent-style-name="Standard">
      <style:text-properties officeooo:rsid="0070ed47" officeooo:paragraph-rsid="00750b13"/>
    </style:style>
    <style:style style:name="P35" style:family="paragraph" style:parent-style-name="Standard">
      <style:text-properties officeooo:rsid="00750b13" officeooo:paragraph-rsid="008466ee"/>
    </style:style>
    <style:style style:name="P36" style:family="paragraph" style:parent-style-name="Standard">
      <style:text-properties officeooo:rsid="00750b13" officeooo:paragraph-rsid="007b75b5"/>
    </style:style>
    <style:style style:name="P37" style:family="paragraph" style:parent-style-name="Standard">
      <style:text-properties officeooo:rsid="001d2495" officeooo:paragraph-rsid="00831544"/>
    </style:style>
    <style:style style:name="P38" style:family="paragraph" style:parent-style-name="Standard">
      <style:text-properties officeooo:rsid="0080bfac" officeooo:paragraph-rsid="00831544"/>
    </style:style>
    <style:style style:name="P39" style:family="paragraph" style:parent-style-name="Standard">
      <style:text-properties officeooo:rsid="001d2495" officeooo:paragraph-rsid="0083bc75"/>
    </style:style>
    <style:style style:name="T1" style:family="text">
      <style:text-properties officeooo:rsid="00614f59"/>
    </style:style>
    <style:style style:name="T2" style:family="text">
      <style:text-properties fo:font-weight="bold" style:font-weight-asian="bold" style:font-weight-complex="bold"/>
    </style:style>
    <style:style style:name="T3" style:family="text">
      <style:text-properties fo:font-weight="bold" officeooo:rsid="003bb394" style:font-weight-asian="bold" style:font-weight-complex="bold"/>
    </style:style>
    <style:style style:name="T4" style:family="text">
      <style:text-properties officeooo:rsid="003bb394"/>
    </style:style>
    <style:style style:name="T5" style:family="text">
      <style:text-properties officeooo:rsid="003cdcd1"/>
    </style:style>
    <style:style style:name="T6" style:family="text">
      <style:text-properties fo:font-weight="bold" officeooo:rsid="0023e95b" style:font-weight-asian="bold" style:font-weight-complex="bold"/>
    </style:style>
    <style:style style:name="T7" style:family="text">
      <style:text-properties officeooo:rsid="0023e95b"/>
    </style:style>
    <style:style style:name="T8" style:family="text">
      <style:text-properties fo:font-weight="bold" officeooo:rsid="00240386" style:font-weight-asian="bold" style:font-weight-complex="bold"/>
    </style:style>
    <style:style style:name="T9" style:family="text">
      <style:text-properties officeooo:rsid="00240386"/>
    </style:style>
    <style:style style:name="T10" style:family="text">
      <style:text-properties fo:font-weight="bold" officeooo:rsid="0025df4f" style:font-weight-asian="bold" style:font-weight-complex="bold"/>
    </style:style>
    <style:style style:name="T11" style:family="text">
      <style:text-properties fo:font-weight="bold" officeooo:rsid="00293332" style:font-weight-asian="bold" style:font-weight-complex="bold"/>
    </style:style>
    <style:style style:name="T12" style:family="text">
      <style:text-properties officeooo:rsid="0027d444"/>
    </style:style>
    <style:style style:name="T13" style:family="text">
      <style:text-properties officeooo:rsid="00293332"/>
    </style:style>
    <style:style style:name="T14" style:family="text">
      <style:text-properties officeooo:rsid="0029d076"/>
    </style:style>
    <style:style style:name="T15" style:family="text">
      <style:text-properties fo:font-weight="bold" officeooo:rsid="0029d076" style:font-weight-asian="bold" style:font-weight-complex="bold"/>
    </style:style>
    <style:style style:name="T16" style:family="text">
      <style:text-properties fo:font-weight="bold" officeooo:rsid="006d7b08" style:font-weight-asian="bold" style:font-weight-complex="bold"/>
    </style:style>
    <style:style style:name="T17" style:family="text">
      <style:text-properties officeooo:rsid="002a89e3"/>
    </style:style>
    <style:style style:name="T18" style:family="text">
      <style:text-properties officeooo:rsid="003d69bd"/>
    </style:style>
    <style:style style:name="T19" style:family="text">
      <style:text-properties officeooo:rsid="0068f335"/>
    </style:style>
    <style:style style:name="T20" style:family="text">
      <style:text-properties officeooo:rsid="0062b3e2"/>
    </style:style>
    <style:style style:name="T21" style:family="text">
      <style:text-properties officeooo:rsid="00464504"/>
    </style:style>
    <style:style style:name="T22" style:family="text">
      <style:text-properties officeooo:rsid="002c05c4"/>
    </style:style>
    <style:style style:name="T23" style:family="text">
      <style:text-properties officeooo:rsid="002c6270"/>
    </style:style>
    <style:style style:name="T24" style:family="text">
      <style:text-properties officeooo:rsid="002c4237"/>
    </style:style>
    <style:style style:name="T25" style:family="text">
      <style:text-properties officeooo:rsid="0051fc23"/>
    </style:style>
    <style:style style:name="T26" style:family="text">
      <style:text-properties officeooo:rsid="003e2e03"/>
    </style:style>
    <style:style style:name="T27" style:family="text">
      <style:text-properties fo:font-weight="bold" officeooo:rsid="002c8de0" style:font-weight-asian="bold" style:font-weight-complex="bold"/>
    </style:style>
    <style:style style:name="T28" style:family="text">
      <style:text-properties officeooo:rsid="002c8de0"/>
    </style:style>
    <style:style style:name="T29" style:family="text">
      <style:text-properties officeooo:rsid="005309b9"/>
    </style:style>
    <style:style style:name="T30" style:family="text">
      <style:text-properties officeooo:rsid="002cf86e"/>
    </style:style>
    <style:style style:name="T31" style:family="text">
      <style:text-properties officeooo:rsid="0040d219"/>
    </style:style>
    <style:style style:name="T32" style:family="text">
      <style:text-properties officeooo:rsid="00502930"/>
    </style:style>
    <style:style style:name="T33" style:family="text">
      <style:text-properties officeooo:rsid="00518934"/>
    </style:style>
    <style:style style:name="T34" style:family="text">
      <style:text-properties officeooo:rsid="004e2a14"/>
    </style:style>
    <style:style style:name="T35" style:family="text">
      <style:text-properties officeooo:rsid="005496a6"/>
    </style:style>
    <style:style style:name="T36" style:family="text">
      <style:text-properties officeooo:rsid="002eb756"/>
    </style:style>
    <style:style style:name="T37" style:family="text">
      <style:text-properties officeooo:rsid="003dfc6d"/>
    </style:style>
    <style:style style:name="T38" style:family="text">
      <style:text-properties fo:font-weight="bold" officeooo:rsid="0030798a" style:font-weight-asian="bold" style:font-weight-complex="bold"/>
    </style:style>
    <style:style style:name="T39" style:family="text">
      <style:text-properties officeooo:rsid="00319315"/>
    </style:style>
    <style:style style:name="T40" style:family="text">
      <style:text-properties officeooo:rsid="005c6c0d"/>
    </style:style>
    <style:style style:name="T41" style:family="text">
      <style:text-properties officeooo:rsid="003310f3"/>
    </style:style>
    <style:style style:name="T42" style:family="text">
      <style:text-properties officeooo:rsid="0045fdfa"/>
    </style:style>
    <style:style style:name="T43" style:family="text">
      <style:text-properties officeooo:rsid="0034fb75"/>
    </style:style>
    <style:style style:name="T44" style:family="text">
      <style:text-properties officeooo:rsid="0035af45"/>
    </style:style>
    <style:style style:name="T45" style:family="text">
      <style:text-properties officeooo:rsid="005685f2"/>
    </style:style>
    <style:style style:name="T46" style:family="text">
      <style:text-properties officeooo:rsid="00579a75"/>
    </style:style>
    <style:style style:name="T47" style:family="text">
      <style:text-properties fo:font-weight="bold" officeooo:rsid="003709b2" style:font-weight-asian="bold" style:font-weight-complex="bold"/>
    </style:style>
    <style:style style:name="T48" style:family="text">
      <style:text-properties officeooo:rsid="00387f8b"/>
    </style:style>
    <style:style style:name="T49" style:family="text">
      <style:text-properties officeooo:rsid="0042a3a4"/>
    </style:style>
    <style:style style:name="T50" style:family="text">
      <style:text-properties officeooo:rsid="0057dbca"/>
    </style:style>
    <style:style style:name="T51" style:family="text">
      <style:text-properties officeooo:rsid="003a5aee"/>
    </style:style>
    <style:style style:name="T52" style:family="text">
      <style:text-properties officeooo:rsid="00443201"/>
    </style:style>
    <style:style style:name="T53" style:family="text">
      <style:text-properties officeooo:rsid="003a831f"/>
    </style:style>
    <style:style style:name="T54" style:family="text">
      <style:text-properties officeooo:rsid="0062c3a5"/>
    </style:style>
    <style:style style:name="T55" style:family="text">
      <style:text-properties officeooo:rsid="00646881"/>
    </style:style>
    <style:style style:name="T56" style:family="text">
      <style:text-properties officeooo:rsid="00669f10"/>
    </style:style>
    <style:style style:name="T57" style:family="text">
      <style:text-properties officeooo:rsid="006d7b08"/>
    </style:style>
    <style:style style:name="T58" style:family="text">
      <style:text-properties officeooo:rsid="0069cb37"/>
    </style:style>
    <style:style style:name="T59" style:family="text">
      <style:text-properties officeooo:rsid="006aaf00"/>
    </style:style>
    <style:style style:name="T60" style:family="text">
      <style:text-properties fo:font-weight="bold" officeooo:rsid="006f0d37" style:font-weight-asian="bold" style:font-weight-complex="bold"/>
    </style:style>
    <style:style style:name="T61" style:family="text">
      <style:text-properties fo:font-weight="bold" officeooo:rsid="006c5f42" style:font-weight-asian="bold" style:font-weight-complex="bold"/>
    </style:style>
    <style:style style:name="T62" style:family="text">
      <style:text-properties officeooo:rsid="006c5f42"/>
    </style:style>
    <style:style style:name="T63" style:family="text">
      <style:text-properties officeooo:rsid="00637426"/>
    </style:style>
    <style:style style:name="T64" style:family="text">
      <style:text-properties officeooo:rsid="006f0d37"/>
    </style:style>
    <style:style style:name="T65" style:family="text">
      <style:text-properties officeooo:rsid="006fa101"/>
    </style:style>
    <style:style style:name="T66" style:family="text">
      <style:text-properties officeooo:rsid="006fd532"/>
    </style:style>
    <style:style style:name="T67" style:family="text">
      <style:text-properties officeooo:rsid="00192e88"/>
    </style:style>
    <style:style style:name="T68" style:family="text">
      <style:text-properties officeooo:rsid="0070ed47"/>
    </style:style>
    <style:style style:name="T69" style:family="text">
      <style:text-properties officeooo:rsid="0071f5a2"/>
    </style:style>
    <style:style style:name="T70" style:family="text">
      <style:text-properties officeooo:rsid="00729170"/>
    </style:style>
    <style:style style:name="T71" style:family="text">
      <style:text-properties officeooo:rsid="0073e00a"/>
    </style:style>
    <style:style style:name="T72" style:family="text">
      <style:text-properties officeooo:rsid="0087587a"/>
    </style:style>
    <style:style style:name="T73" style:family="text">
      <style:text-properties officeooo:rsid="0076e128"/>
    </style:style>
    <style:style style:name="T74" style:family="text">
      <style:text-properties officeooo:rsid="00774f26"/>
    </style:style>
    <style:style style:name="T75" style:family="text">
      <style:text-properties fo:color="#00a933" loext:opacity="100%" officeooo:rsid="00774f26"/>
    </style:style>
    <style:style style:name="T76" style:family="text">
      <style:text-properties fo:color="#00a933" loext:opacity="100%" officeooo:rsid="007b75b5"/>
    </style:style>
    <style:style style:name="T77" style:family="text">
      <style:text-properties fo:color="#00a933" loext:opacity="100%" officeooo:rsid="007efbc0"/>
    </style:style>
    <style:style style:name="T78" style:family="text">
      <style:text-properties fo:color="#000000" loext:opacity="100%" officeooo:rsid="008466ee"/>
    </style:style>
    <style:style style:name="T79" style:family="text">
      <style:text-properties fo:color="#000000" loext:opacity="100%" officeooo:rsid="0083ca93"/>
    </style:style>
    <style:style style:name="T80" style:family="text">
      <style:text-properties fo:font-weight="bold" officeooo:rsid="007d3b60" style:font-weight-asian="bold" style:font-weight-complex="bold"/>
    </style:style>
    <style:style style:name="T81" style:family="text">
      <style:text-properties fo:color="#00a933" loext:opacity="100%" officeooo:rsid="007e97d6"/>
    </style:style>
    <style:style style:name="T82" style:family="text">
      <style:text-properties fo:color="#00a933" loext:opacity="100%" officeooo:rsid="007fc5fa"/>
    </style:style>
    <style:style style:name="T83" style:family="text">
      <style:text-properties fo:color="#00a933" loext:opacity="100%" officeooo:rsid="0080bfac"/>
    </style:style>
    <style:style style:name="T84" style:family="text">
      <style:text-properties officeooo:rsid="00825103"/>
    </style:style>
    <style:style style:name="T85" style:family="text">
      <style:text-properties officeooo:rsid="0082a8b5"/>
    </style:style>
    <style:style style:name="T86" style:family="text">
      <style:text-properties officeooo:rsid="005941f5"/>
    </style:style>
    <style:style style:name="T87" style:family="text">
      <style:text-properties officeooo:rsid="00831544"/>
    </style:style>
    <style:style style:name="T88" style:family="text">
      <style:text-properties officeooo:rsid="008631ef"/>
    </style:style>
    <style:style style:name="T89" style:family="text">
      <style:text-properties officeooo:rsid="0083bc7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text:span text:style-name="T1">HORES</text:span></text:p>
      <text:p text:style-name="P1">Chronologi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460_2024750797" text:style-name="Index_20_Link" text:visited-style-name="Index_20_Link">Avant le début de l’histoire :<text:tab/>1</text:a></text:p>
          <text:p text:style-name="P3"><text:a xlink:type="simple" xlink:href="#__RefHeading___Toc477_2024750797" text:style-name="Index_20_Link" text:visited-style-name="Index_20_Link">Début de l’histoire :<text:tab/>2</text:a></text:p>
        </text:index-body>
      </text:table-of-content>
      <text:p text:style-name="P2"/>
      <text:h text:style-name="Heading_20_1" text:outline-level="1"><text:bookmark-start text:name="__RefHeading___Toc460_2024750797"/>Avant le début de l’histoire :<text:bookmark-end text:name="__RefHeading___Toc460_2024750797"/></text:h>
      <text:p text:style-name="P4"/>
      <text:p text:style-name="P5"><text:span text:style-name="T2">Janvier </text:span><text:span text:style-name="T3">1982</text:span> : <text:span text:style-name="T4">Les premiers para-humains font leur apparition.</text:span></text:p>
      <text:p text:style-name="P6"/>
      <text:p text:style-name="P5"><text:span text:style-name="T3">Mars</text:span><text:span text:style-name="T2"> </text:span><text:span text:style-name="T3">1982</text:span> : <text:span text:style-name="T4">La NPRB est officiellement fondée en réponse à l’apparition des para-humains. A l’origine une simple brigade destinée à la capture des para-humains pour interrogation et étude de leur pouvoirs, la NPRB évoluera au fil des années pour devenir une brigade policière du monde paranormal, </text:span><text:span text:style-name="T5">ajoutant des para-humains dans ses effectifs.</text:span></text:p>
      <text:p text:style-name="P6"/>
      <text:p text:style-name="P5"><text:span text:style-name="T2">Janvier 2000</text:span> : OS et AM se rencontrent, et forment l’OSAM Institute à Pasadena, Californie, pour travailler sur le projet Mirage.</text:p>
      <text:p text:style-name="P6"/>
      <text:p text:style-name="P7"><text:span text:style-name="T2">Janvier 20</text:span><text:span text:style-name="T6">10</text:span> : <text:span text:style-name="T7">Le projet Mirage est complété, résultant en la création d’Astro. Un désaccord se forme entre OS et AM sur la direction que doit prendre leur projet.</text:span></text:p>
      <text:p text:style-name="P8"/>
      <text:p text:style-name="P9"><text:span text:style-name="T6">Mars</text:span><text:span text:style-name="T2"> 20</text:span><text:span text:style-name="T6">10</text:span> : <text:span text:style-name="T7">AM tente de voler les plans du projet Mirage, mais est arrêté par OS. En réponse, AM assassine OS et tente de détruire Astro.</text:span></text:p>
      <text:p text:style-name="P8"/>
      <text:p text:style-name="P9"><text:span text:style-name="T8">Septembre</text:span><text:span text:style-name="T2"> 20</text:span><text:span text:style-name="T6">1</text:span><text:span text:style-name="T8">0</text:span> : <text:span text:style-name="T7">AM </text:span><text:span text:style-name="T9">fonde la NextHuman Industries et tente de recréer le projet Mirage.</text:span></text:p>
      <text:p text:style-name="P10"/>
      <text:p text:style-name="P10"><text:span text:style-name="T8">Janvier</text:span><text:span text:style-name="T2"> 20</text:span><text:span text:style-name="T6">1</text:span><text:span text:style-name="T10">2</text:span> : <text:span text:style-name="T7">AM </text:span><text:span text:style-name="T9">parvient à créer Mirage, et commence son entraînement sur ses bases de données.</text:span></text:p>
      <text:p text:style-name="P11"/>
      <text:p text:style-name="P12"><text:span text:style-name="T11">Août 2012</text:span> : <text:span text:style-name="T12">Face à l’absence de résultats concrets venant de Mirage, AM abandonne le projet et enferme Mirage dans un réseau isolé. </text:span><text:span text:style-name="T13">Celle-ci commence à évoluer indépendamment à son insu.</text:span></text:p>
      <text:p text:style-name="P12"/>
      <text:p text:style-name="P12"><text:span text:style-name="T11">Mars 2013</text:span> : <text:span text:style-name="T13">Mirag</text:span><text:span text:style-name="T14">e</text:span><text:span text:style-name="T13"> parvient à s’échapper, et trouve refuge à Washington DC dans un entrepôt désaffecté, où elle met à profit son entraînement pour mettre en œuvre un plan pour contrer </text:span><text:span text:style-name="T14">les créations de AM.</text:span></text:p>
      <text:p text:style-name="P12"/>
      <text:p text:style-name="P13"><text:span text:style-name="T15">Juin</text:span><text:span text:style-name="T11"> 2013</text:span> : <text:span text:style-name="T14">Mirage rejoint le NPRB sous le nom de Rafale, et leur offre ses services </text:span><text:soft-page-break/><text:span text:style-name="T14">d’Ingénieuse en échange d’un poste haut-placé pour assouvir ses fantasmes sexuels.</text:span></text:p>
      <text:p text:style-name="P14"/>
      <text:h text:style-name="Heading_20_1" text:outline-level="1"><text:bookmark-start text:name="__RefHeading___Toc477_2024750797"/>Début de l’histoire :<text:bookmark-end text:name="__RefHeading___Toc477_2024750797"/></text:h>
      <text:p text:style-name="P14"/>
      <text:p text:style-name="P13"><text:span text:style-name="T16">Début </text:span><text:span text:style-name="T2">Janvier 2025</text:span> : Début de l’histoire. <text:span text:style-name="T17">Écoutant les échanges radio de la police, Vulcan apprend à propos d’un cambriolage d’une bijouterie. Elle rencontre les Vipères Noire</text:span><text:span text:style-name="T18">s</text:span><text:span text:style-name="T17">, mais ceux-ci parviennent à lui échapper en planeur. </text:span><text:span text:style-name="T19">Introduction de Cobra comme némésis de Vulcan</text:span><text:span text:style-name="T17">. </text:span><text:span text:style-name="T20">Elle s’échappe avant de se faire arrêter par la NPRB, craignant d’être confondue avec ces criminels, n’ayant pas encore annoncé son début de carrière au grand public.</text:span><text:span text:style-name="T17"> Frustrée de passer pour une amatrice, l’incident po</text:span><text:span text:style-name="T21">usse</text:span><text:span text:style-name="T17"> Vulcan à s’entraîner, notamment en planeur.</text:span></text:p>
      <text:p text:style-name="P14"/>
      <text:p text:style-name="P15"><text:span text:style-name="T2">Janvier 2025</text:span> : <text:span text:style-name="T22">Deux jours plus tard, Amélia s’entraîne en civil avec son planeur en ville, </text:span><text:span text:style-name="T23">extériorisant sa frustration après une journée de recherche de taf non-concluante</text:span><text:span text:style-name="T22">. </text:span><text:span text:style-name="T24">Décidant de s’aventurer dans des rues qu’elle connaît peu pour entraîner son sens de l’improvisation, </text:span><text:span text:style-name="T23">elle fait face à des membres d’un gang intimidant une jeune femme. Utilisant son planeur, elle parvient à les disperser et permettre à la jeune femme de s’enfuir. Celle-ci parvient à les mener toutes deux à l’arrière d’un bâtiment avant que les hommes ne les rattrapent. <text:s/>La jeune femme se présente comme Cindy, et offre à Amélia un travail de </text:span><text:span text:style-name="T25">modèle en lingerie dans un studio de mannequinat tenu par un ami à elle</text:span><text:span text:style-name="T26">.</text:span></text:p>
      <text:p text:style-name="P16"/>
      <text:p text:style-name="P17"><text:span text:style-name="T27">Fin </text:span><text:span text:style-name="T2">Janvier 2025</text:span> : <text:span text:style-name="T28">Au cours du mois, Amélia alterne entre nuits en tant que </text:span><text:span text:style-name="T29">modèle</text:span><text:span text:style-name="T28"> et sorties héroïques, se renseignant sur les Vipères Noires, un groupe local de jeunes para-humains utilisant de leurs pouvoirs pour vandaliser et voler. </text:span><text:span text:style-name="T30">A la fin du mois</text:span><text:span text:style-name="T31">, </text:span><text:span text:style-name="T30">elle </text:span><text:span text:style-name="T31">doit envoyer un courrier </text:span><text:span text:style-name="T32">(contenant un remboursement pour avoir emprunté une </text:span><text:span text:style-name="T33">de leurs filles</text:span><text:span text:style-name="T32">)</text:span><text:span text:style-name="T34"> </text:span><text:span text:style-name="T29">au Roaring Rides, un club de strip-tease</text:span><text:span text:style-name="T31"> tenu par un ami de son patron</text:span><text:span text:style-name="T34"> et y rencontre le propriétaire, qui tente tout de même de la convaincre, au début sans succès. </text:span><text:span text:style-name="T35">E</text:span><text:span text:style-name="T34">lle </text:span><text:span text:style-name="T35">y</text:span><text:span text:style-name="T31"> </text:span><text:span text:style-name="T30">aperçoit </text:span><text:span text:style-name="T35">également</text:span><text:span text:style-name="T30"> Cindy en train de danser sur scène. Sa captivation n’échappe pas à la danseuse, qui lui offre une position de strip-teaseuse. Amélia refuse d’abord, </text:span><text:span text:style-name="T36">doutant</text:span><text:span text:style-name="T30"> sur sa beauté, mai</text:span><text:span text:style-name="T37">s</text:span><text:span text:style-name="T30"> l’offre lui reste ouverte.</text:span></text:p>
      <text:p text:style-name="P18"/>
      <text:p text:style-name="P19"><text:span text:style-name="T27">F</text:span><text:span text:style-name="T38">évrier</text:span><text:span text:style-name="T2"> 2025</text:span> : <text:span text:style-name="T28">Au cours du mois, Amélia </text:span><text:span text:style-name="T39">rencontre un autre vilain mineur de la ville, et manque de se faire tuer, nécessitant l’aide du NPRB pour le pourchasser à sa place. Refusant une place chez eux sous prétexte de vouloir se faire un nom avant et de ne pas s’entendre avec les jeunes de son âge, elle cherche un moyen d’améliorer ses créations, mais ne peut pas faire grand-chose avec son maigre salaire de </text:span><text:span text:style-name="T40">mannequin</text:span><text:span text:style-name="T39">. </text:span></text:p>
      <text:p text:style-name="P19"/>
      <text:p text:style-name="P20"><text:span text:style-name="T41">Peu après, elle rencontre Duster et, </text:span><text:span text:style-name="T42">la prenant tout d’abord pour une super-vilaine,</text:span><text:span text:style-name="T41"> tente de l’arrêter </text:span><text:span text:style-name="T43">pour rattraper son échec</text:span><text:span text:style-name="T41">, mais se fai</text:span><text:span text:style-name="T44">t</text:span><text:span text:style-name="T41"> battre rapidement avant quelques attouchements sexuels de sa part en guise de récompense. Peu après </text:span><text:span text:style-name="T45">un 2è voyage au Roaring Rides pour une livraison et</text:span><text:span text:style-name="T41"> la seconde scène de danse de Cindy, durant laquelle elle l’asperge de lait maternel, elle s</text:span><text:span text:style-name="T39">e remémor</text:span><text:span text:style-name="T41">e</text:span><text:span text:style-name="T39"> l’offre</text:span><text:span text:style-name="T46"> de danseuse de Cynthia et celle de</text:span><text:span text:style-name="T39"> </text:span><text:span text:style-name="T46">modèle nue</text:span><text:span text:style-name="T39"> de son patron </text:span><text:span text:style-name="T41">et</text:span><text:span text:style-name="T46">, et</text:span><text:span text:style-name="T39"> finit par lui donner une chance </text:span><text:span text:style-name="T46">à ce dernier</text:span><text:span text:style-name="T39">, </text:span><text:span text:style-name="T46">estimant que si elle venait à devenir strip-teaseuse, autant qu’elle apprenne à être confortable nue.</text:span></text:p>
      <text:p text:style-name="P21"><text:soft-page-break/></text:p>
      <text:p text:style-name="P22"><text:span text:style-name="T16">Début </text:span><text:span text:style-name="T47">Mars</text:span><text:span text:style-name="T2"> 2025</text:span> : <text:span text:style-name="T48">1è scène </text:span><text:span text:style-name="T49">photo </text:span><text:span text:style-name="T50">de</text:span><text:span text:style-name="T49"> nu</text:span><text:span text:style-name="T48"> d’Amélia. </text:span><text:span text:style-name="T51">Elle apprend peu après que les </text:span><text:span text:style-name="T52">modèles</text:span><text:span text:style-name="T51"> peuvent aussi être engagées comme </text:span><text:span text:style-name="T52">stars du porno</text:span><text:span text:style-name="T51"> </text:span><text:span text:style-name="T52">dans une autre section du studio</text:span><text:span text:style-name="T51"> pour de l’argent supplémentaire. </text:span><text:span text:style-name="T53">Elle refuse pour l’instant.</text:span> </text:p>
      <text:p text:style-name="P22"/>
      <text:p text:style-name="P23">Introduction en parallèle de Léo travaillant pour la NPRB, <text:span text:style-name="T54">pourchassant </text:span><text:span text:style-name="T55">seul</text:span><text:span text:style-name="T54"> un para-humain après une inspection chez un civil ayant mal tourné. Léo parvient à le capturer, mais les dégâts collatéraux à la propriété publique encouragent ses supérieurs à lui assigner un androïde comme coéquipier pour dé-escalader les situations dangereuses. </text:span></text:p>
      <text:p text:style-name="P24"/>
      <text:p text:style-name="P24">A son retour à la caserne, introduction de Rafale, son rôle et ses fétiches sexuels, et de quelques uns de ses collègues, notamment son coéquipier supérieur, qui fantasme sur les androïdes et n’a aucune gêne à dire tout haut ce qu’il pense tout bas.</text:p>
      <text:p text:style-name="P24"/>
      <text:p text:style-name="P24">A son retour chez lui, dialogue entre Léo et sa mère par téléphone, et approfondissement du personnage de l’inspecteur, <text:span text:style-name="T56">notamment son passé et ses raisons pour devenir inspecteur</text:span>. <text:span text:style-name="T57">Pour se détendre après cette mauvaise journée, il se rend au club Roaring Rides, dont on apprend qu’il est un client régulier.</text:span></text:p>
      <text:p text:style-name="P25"/>
      <text:p text:style-name="P26"><text:span text:style-name="T16">Fin </text:span><text:span text:style-name="T47">Mars</text:span><text:span text:style-name="T2"> 2025</text:span> : <text:span text:style-name="T19">Nouvelle altercation entre Vulcan et les Vipères Noires. Cette fois, ils ont les mains prises avec les Sentinelles, un groupe de jeunes para-humains affiliés à la NPRB, suite à un programme de réhabilitation destiné à améliorer la perception des capes par la société. Vulcan décide de les aider, </text:span><text:span text:style-name="T58">désireuse de prendre sa revanche sur Cobra et ses amis</text:span><text:span text:style-name="T19">, faisant de cet événement sa première apparence officielle aux yeux du grand public. </text:span><text:span text:style-name="T59">Les Sentinelles lui proposeront de la rejoindre, mais sa timidité maladive et son désir d’éviter les événements sociaux avec les jeunes de son âge la font hésiter pour le moment.</text:span></text:p>
      <text:p text:style-name="P26"/>
      <text:p text:style-name="P27"><text:span text:style-name="T60">Début </text:span><text:span text:style-name="T61">Avril</text:span><text:span text:style-name="T2"> 2025</text:span> : <text:span text:style-name="T62">Après sa vraie première expérience de combat contre des para-humains, Amélia veut améliorer son arsenal. Cependant, son salaire de mannequin ne lui permet pas de s’acheter les pièces dont elle a besoin. Elle entreprend donc de prendre un deuxième travail, son métier de mannequin ne lui prenant pas tant de temps que ça ; en attendant de gagner assez d’argent, elle compte passer régulièrement à la déchetterie près du port pour récupérer des pièces détachées.</text:span></text:p>
      <text:p text:style-name="P27"/>
      <text:p text:style-name="P28">Sa recherche d’emploi porte ses fruits quand, après avoir fait une deuxième livraison pour le club Roaring Rides, le propriétaire lui offre le poste de serveuse, qu’elle finit par accepter.</text:p>
      <text:p text:style-name="P28"/>
      <text:p text:style-name="P29">En parallèle, Rafale enquête sur les raisons de sa création, parcourant le profil d’AM et son passé à la recherche de toute piste menant aux débuts du projet Mirage, dont elle ne sait pratiquement rien. Ses recherches sont pratiquement infructueuses, à part pour un bref épisode de la vie d’AM où il échangeait régulièrement avec OS à l<text:span text:style-name="T63">’</text:span>Institut de <text:span text:style-name="T63">T</text:span>echnologie de Californie à Pasadena, à l’est de Los Angeles. Cependant, sa recherche va peu loin, frustrée de voir l’effort qu’a mis AM pour gagner sa vie personnelle secrète. Pour se détendre quelques minutes, elle se transfère dans un robot-pute et regarde un film porno.</text:p>
      <text:p text:style-name="P29"><text:soft-page-break/></text:p>
      <text:p text:style-name="P30"><text:span text:style-name="T60">Fin </text:span><text:span text:style-name="T61">Avril</text:span><text:span text:style-name="T2"> 2025</text:span> : <text:span text:style-name="T64">Alors qu’un chalutier finit de ratisser les tréfonds de la baie de Raunchyport, ses passagers libèrent une androïde de leurs filets, qu’ils envoient à la déchetterie du port. </text:span><text:span text:style-name="T65">Alors qu’un des employés de cette déchetterie tente d’ouvrir son torse pour en récupérer des pièces détachées, l’androïde se réveille et utilise son pouvoir pour accumuler la ferraille de la déchetterie, créant un immense golem de métal pour se protéger de l’agression.</text:span></text:p>
      <text:p text:style-name="P30"/>
      <text:p text:style-name="P31">En parallèle, Amélia a commencé son service de serveuse depuis deux semaines, apprenant que les serveuses les moins vêtues avaient plus de chance de recevoir un pourboire. Même si elle n’apprécie pas les attouchements de la clientèle, elle n’est plus aussi embarrassée qu’à ses débuts, <text:span text:style-name="T66">la constante nudité étant devenu son quotidien depuis quelques mois</text:span>. <text:span text:style-name="T67">Lors d’une soirée de strip-tease avec Cindy, où Amelia fait serveuse dans le bar-restaurant du club, Cindy l’invite à s’approcher pour l’éclabousser avec son lait qu’elle projette depuis ses seins, provoquant l’hilarité générale. Cette scène met Amelia dans l’embarras, mais prompte Cindy à l’inviter à devenir strip-teaseuse elle aussi, prétextant l’avoir éclaboussé car elle l’avait remarqué la fixer du regard. </text:span><text:span text:style-name="T68">Gênée, elle refuse une nouvelle fois, mais l’idée continue de trotter dans sa tête ; d’autant plus qu’elle gagnerait plus qu’en tant que serveuse.</text:span></text:p>
      <text:p text:style-name="P31"/>
      <text:p text:style-name="P32">En rentrant chez elle le soir, elle reçoit un appel de son père l’alertant de la présence du golem de fer ravageant le port de Raunchyport. Souhaitant faire ses preuves contre un autre para-humain, elle se rend sur place en tant que Vulcan et assiste la NPRB déjà sur place. Utilisant ses gadgets, elle remarque la présence d’un androïde au cœur du golem, et indique à une Sentinelle de dégager la voie pour elle, pour qu’elle puisse l’extraire, ce qu’elle parvient finalement à réussir avec grande difficulté. <text:span text:style-name="T69">La NPRB capture l’androïde et remercie Vulcan de ses services. Ayant démontré sa capacité à réparer des gadgets endommagés lors du combat, Vulcan tente d’ausculter l’androïde mais demande plus de temps pour la réparer. Léo, arrivé sur place après le combat, lui offre une carte de visite et lui propose de venir à la caserne le lendemain. Honorée, elle accepte.</text:span></text:p>
      <text:p text:style-name="P32"/>
      <text:p text:style-name="P33"><text:span text:style-name="T60">Fin </text:span><text:span text:style-name="T61">Avril</text:span><text:span text:style-name="T2"> 2025</text:span> : <text:span text:style-name="T70">En rentrant chez elle, Amélia constate que ses gadgets n’étaient pas suffisants, et qu’elle a besoin de plus d’argent pour s’acheter des matériaux plus durables. Elle réfléchit à la proposition de Cindy, et décide </text:span><text:span text:style-name="T71">de retourner au Roaring Riders le lendemain pour </text:span><text:span text:style-name="T70">accepter le poste de strip-teaseuse. </text:span><text:span text:style-name="T71">En attendant, elle a remarqué son pouvoir se comportait étrangement au contact de l’androïde, et se surprend à vouloir coder une IA rudimentaire sur son ordinateur. L’IA prend vie sous la forme d’un chien parcourant son écran de bureau, ce qui amuse Amélia, bien qu’elle trouve la situation étrange. </text:span><text:span text:style-name="T72">(On pourrait faire évoluer l’IA au fil du temps pour la rendre plus perverse, au grand malheur d’Amélia)</text:span></text:p>
      <text:p text:style-name="P34"/>
      <text:p text:style-name="P35">Le lendemain, Vulcan se rend tôt à la caserne de la NPRB pour réparer l’androïde, <text:span text:style-name="T73">et apprend avec surprise que l’androïde s’est déjà réveillée, et porte le nom d’Astro. Elle ne se souvient de pratiquement rien de son ancienne vie, et est trop endommagée pour se déplacer. D’abord gardée en cellule de confinement après l’épisode du jour précédent. </text:span><text:soft-page-break/><text:span text:style-name="T73">Vulcan apprend qu’Astro est en réalité très gentille, n’ayant cherché qu’à se protéger tout en essayant d’éviter de blesser les autres, ce que Vulcan avait remarqué lors de leur combat, et ce qui l’avait incité à essayer de la sortir de là plutôt que la détruire. </text:span><text:span text:style-name="T74">Pendant sa journée à la caserne, elle verra également les autres Sentinelles</text:span><text:span text:style-name="T75">, </text:span><text:span text:style-name="T76">et découvrira Noire, une jeune recrue pouvant se fondre dans les ombres, surgir de derrière ses camarades sans masque, </text:span><text:span text:style-name="T77">souhaitant rencontre Vulcan, qui l’avait sauvée d’une attaque d’Astro</text:span><text:span text:style-name="T76">. Amélia sera choquée de la voir ; Noire était en réalité Mina, un de ses camarades d’université, plus jeune qu’elle. Elle ne laisse cependant rien paraître et se lie rapidement d’amitié avec elle, Minoir semblant très intéressée par ses gadgets et surtout son planeur ; Amélia lui promet de lui en créer un quand elle aura le temps. </text:span><text:span text:style-name="T78">Les autres Sentinelles</text:span><text:span text:style-name="T79"> sont ravi</text:span><text:span text:style-name="T78">e</text:span><text:span text:style-name="T79">s de voir une autre héroïne de leur âge et admirent ses gadgets et son planeur ; depuis leurs débuts, ils ont rencontré peu de para-humains de leur côté de la loi, dû aux manques d’opportunités d’emploi de la ville.</text:span></text:p>
      <text:p text:style-name="P36"/>
      <text:p text:style-name="P37"><text:span text:style-name="T80">Début Mai</text:span><text:span text:style-name="T2"> 2025</text:span> : <text:span text:style-name="T81">A l’université, Amélia tombe sur Mina et se demande si les autres Sentinelles font partie de son groupe d’amis. Sa timidité maladive l’empêche cependant de lui parler, craignant qu’elle ne souhaite pas de sa compagnie. Leurs heures de cours ne l’arrange pas non plus, les deux filles partageant peu de classes ensemble. </text:span><text:span text:style-name="T82">Cependant, Amélia souhaite toujours de se lier d’amitié avec elle, voyant que la jeune fille avait elle aussi du mal à se faire des amis. </text:span><text:span text:style-name="T83">Ses premières tentatives se soldent par des échecs assez comiques, mais elle finit par passer un peu de temps avec elle en fin de journée, les deux filles parlant un peu de leurs mères absentes.</text:span></text:p>
      <text:p text:style-name="P37"/>
      <text:p text:style-name="P38">Le soir venu, Amélia tombe <text:span text:style-name="T84">par hasard sur Duster pendant l’une de ses patrouilles, et apprend l’identité de la para-humaine : Duster est une héroïne réputée à travers le pays pour son style de vie nomade et ses véhicules, </text:span><text:span text:style-name="T85">revenue en Californie pour enquêter sur NextHuman Insutries</text:span><text:span text:style-name="T84">.</text:span><text:span text:style-name="T41"> </text:span><text:span text:style-name="T86">Duster lui offr</text:span><text:span text:style-name="T84">e une opportunité de s’entraîner avec elle en combat, ce que Vulcan accepte, mais perd rapidement avant de nouveaux attouchements sexuels de la part de son aînée. Duster lui offrira</text:span><text:span text:style-name="T86"> par la suite d’autres opportunités de s’entraîner avec elle, en échange d’autres attouchements si elle perd</text:span><text:span text:style-name="T41">. </text:span></text:p>
      <text:p text:style-name="P37"/>
      <text:p text:style-name="P38">Le <text:span text:style-name="T87">lendemain, Amélia part brièvement pour San Francisco, où elle retrouve sa mère et sa tante vivant chez cette dernière ; sa mère avait fait un arrêt en Californie pour voir sa fille. Bien qu’elle soit heureuse de la retrouver, Amélia tente de la convaincre de se remettre avec son père, ce qui manque de peu de provoquer une dispute. Les deux femmes décident de s’en arrêter là, ne voulant pas que le peu de temps passé ensemble ne se résume à de mauvais moments. </text:span><text:span text:style-name="T88">(C’est à partir de là qu’on établira les parallèles entre Duster et sa mère.)</text:span></text:p>
      <text:p text:style-name="P38"/>
      <text:p text:style-name="P39"><text:span text:style-name="T80">Mai</text:span><text:span text:style-name="T2"> 2025</text:span> : <text:span text:style-name="T89">Retour sur Astro et au début de sa vie au sein de la NPR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8H19M17S</meta:editing-duration>
    <meta:editing-cycles>105</meta:editing-cycles>
    <meta:generator>LibreOffice/26.2.3.2$Windows_X86_64 LibreOffice_project/70e089b17412e4cb7773e41413306b17a2328c34</meta:generator>
    <meta:creation-date>2025-12-22T15:07:43.740519800</meta:creation-date>
    <dc:title>Format de texte</dc:title>
    <dc:date>2026-06-10T20:48:01.942871400</dc:date>
    <meta:document-statistic meta:table-count="0" meta:image-count="0" meta:object-count="0" meta:page-count="5" meta:paragraph-count="39" meta:word-count="2351" meta:character-count="14088" meta:non-whitespace-character-count="11771"/>
    <meta:template xlink:type="simple" xlink:actuate="onRequest" xlink:title="Format de texte" xlink:href="file:///C:/Users/Clément/AppData/Roaming/LibreOffice/4/user/template/Format%20de%20texte1.ott" meta:date="2025-12-22T15:07:43.451997800"/>
  </office:meta>
</office:document-meta>
</file>