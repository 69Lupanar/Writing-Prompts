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2e5e5e" officeooo:paragraph-rsid="002e5e5e"/>
    </style:style>
    <style:style style:name="P2" style:family="paragraph" style:parent-style-name="Text_20_body" style:list-style-name="L1">
      <style:text-properties officeooo:rsid="002e5e5e" officeooo:paragraph-rsid="002e5e5e"/>
    </style:style>
    <style:style style:name="P3" style:family="paragraph" style:parent-style-name="Text_20_body">
      <style:text-properties officeooo:rsid="00187c94" officeooo:paragraph-rsid="00187c94"/>
    </style:style>
    <style:style style:name="P4" style:family="paragraph" style:parent-style-name="Text_20_body" style:list-style-name="L2">
      <style:text-properties officeooo:rsid="00187c94" officeooo:paragraph-rsid="00187c94"/>
    </style:style>
    <style:style style:name="P5" style:family="paragraph" style:parent-style-name="Standard" style:list-style-name="L2">
      <style:paragraph-properties fo:line-height="115%"/>
      <style:text-properties officeooo:rsid="001cac3d" officeooo:paragraph-rsid="00290f06"/>
    </style:style>
    <style:style style:name="P6" style:family="paragraph" style:parent-style-name="Text_20_body">
      <style:text-properties officeooo:rsid="0019b3e6" officeooo:paragraph-rsid="0019b3e6"/>
    </style:style>
    <style:style style:name="P7" style:family="paragraph" style:parent-style-name="Text_20_body" style:list-style-name="L3">
      <style:text-properties officeooo:rsid="0019b3e6" officeooo:paragraph-rsid="0019b3e6"/>
    </style:style>
    <style:style style:name="P8" style:family="paragraph" style:parent-style-name="Text_20_body" style:list-style-name="L3">
      <style:text-properties officeooo:rsid="0019b3e6" officeooo:paragraph-rsid="00265081"/>
    </style:style>
    <style:style style:name="P9" style:family="paragraph" style:parent-style-name="Text_20_body" style:list-style-name="L3">
      <style:text-properties officeooo:rsid="002313e2" officeooo:paragraph-rsid="00265081"/>
    </style:style>
    <style:style style:name="P10" style:family="paragraph" style:parent-style-name="Text_20_body" style:list-style-name="L3">
      <style:text-properties officeooo:rsid="001b7ffc" officeooo:paragraph-rsid="00265081"/>
    </style:style>
    <style:style style:name="P11" style:family="paragraph" style:parent-style-name="Text_20_body" style:list-style-name="L3">
      <style:text-properties officeooo:rsid="001abde2" officeooo:paragraph-rsid="00265081"/>
    </style:style>
    <style:style style:name="P12" style:family="paragraph" style:parent-style-name="Text_20_body" style:list-style-name="L3">
      <style:text-properties officeooo:rsid="002a7975" officeooo:paragraph-rsid="002a7975"/>
    </style:style>
    <style:style style:name="T1" style:family="text">
      <style:text-properties officeooo:rsid="00290f06"/>
    </style:style>
    <style:style style:name="T2" style:family="text">
      <style:text-properties officeooo:rsid="002a7975"/>
    </style:style>
    <style:style style:name="T3" style:family="text">
      <style:text-properties officeooo:rsid="002554b5"/>
    </style:style>
    <style:style style:name="T4" style:family="text">
      <style:text-properties officeooo:rsid="00203035"/>
    </style:style>
    <style:style style:name="T5" style:family="text">
      <style:text-properties officeooo:rsid="001c2372"/>
    </style:style>
    <style:style style:name="T6" style:family="text">
      <style:text-properties officeooo:rsid="001c6d7b"/>
    </style:style>
    <style:style style:name="T7" style:family="text">
      <style:text-properties officeooo:rsid="001d6984"/>
    </style:style>
    <style:style style:name="T8" style:family="text">
      <style:text-properties officeooo:rsid="001e8bfc"/>
    </style:style>
    <style:style style:name="T9" style:family="text">
      <style:text-properties officeooo:rsid="002313e2"/>
    </style:style>
    <style:style style:name="T10" style:family="text">
      <style:text-properties officeooo:rsid="00265081"/>
    </style:style>
    <style:style style:name="T11" style:family="text">
      <style:text-properties officeooo:rsid="002176b6"/>
    </style:style>
    <style:style style:name="T12" style:family="text">
      <style:text-properties officeooo:rsid="0022623c"/>
    </style:style>
    <style:style style:name="T13" style:family="text">
      <style:text-properties officeooo:rsid="002c3b77"/>
    </style:style>
    <style:style style:name="T14" style:family="text">
      <style:text-properties officeooo:rsid="002e04f3"/>
    </style:style>
    <style:style style:name="T15" style:family="text">
      <style:text-properties officeooo:rsid="002e4b8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pirations :</text:p>
      <text:list text:style-name="L1">
        <text:list-item>
          <text:p text:style-name="P2">Worm pour le worldbuilding, les thèmes de super-héros et de sci-fi, les messages abordés par l’histoire ainsi que l’écriture des personnages.</text:p>
        </text:list-item>
      </text:list>
      <text:p text:style-name="P3"/>
      <text:p text:style-name="P3">Idées de scénario :</text:p>
      <text:list text:style-name="L2">
        <text:list-item>
          <text:p text:style-name="P4">Reprend l’idée de Skitter Stripper, une jeune héroïne qui devient une strip-teaseuse pour financer ses expéditions héroïques. Le lecteur en apprendra plus sur cet univers dans une histoire qui se veut donner la parole aux travailleurs du sexe, leur montrant un certain respect en rappelant qu’il s’agit avant tout d’humains, avec leurs propres ressentis sur leur situation et objectifs.</text:p>
        </text:list-item>
        <text:list-item>
          <text:p text:style-name="P5">Dans un monde futuriste où des cyborgs humanoïdes conscients cohabitent avec les humains, le protagoniste fait partie <text:span text:style-name="T1">d’une force spéciale de la police chargée d’arrêter les cyberterroristes et tout cyborg s’en prenant aux humains</text:span>. Le protagoniste, dégoûté par les cyborgs et la volonté de leurs créateurs de les faire ressembler de plus en plus à des humains, est contraint malgré lui d’adopter chez lui une cyborg pour X raisons. Malgré son caractère enjoué et serviable, l<text:span text:style-name="T2">a</text:span> cyborg ne parvient par à sortir le protag de sa carapace. L’histoire tournera autour du protag et du conflit entre terroristes et corpos, ainsi que du rapport du protag aux robots et à sa compagne de tous les jours.</text:p>
        </text:list-item>
      </text:list>
      <text:p text:style-name="P3"/>
      <text:p text:style-name="P6">Idées de personnages: </text:p>
      <text:list text:style-name="L3">
        <text:list-item>
          <text:p text:style-name="P7">A, la protagoniste de l’histoire, étudiante en informatique et mécano à ses temps perdus, grâce à sa passion pour les machines qu’elle hérite de son père mécanicien. Malheureusement, elle peine à trouver du travail dans sa ville malgré son diplôme, et déménager n’est pas chose facile quand ses parents sont liés à leur garage. Elle fera la rencontre de B, une strip-teaseuse qui l’aidera à décrocher un rôle de serveuse dans leur maison close, puis deviendra strip-teaseuse à son tour.</text:p>
        </text:list-item>
        <text:list-item>
          <text:p text:style-name="P8">B, une strip-teaseuse qui servira de mentor à A et lui fera découvrir le monde de la prostitution et du sexe. <text:span text:style-name="T3">Employée</text:span><text:span text:style-name="T4"> du gérant d’un studio porno, elle introduira peu à peu A à la pornographie, allant de la photo de nu pour des magaziens adultes aux films pornos zoophiles.</text:span></text:p>
        </text:list-item>
        <text:list-item>
          <text:p text:style-name="P9">C, le père le A, possède un garage et partage sa passion de la mécanique avec sa fille. Bien qu’il ne soit pas très intelligent, il se soucie énormément de sa fille. Il a divorcé depuis quelques années, ce qui explique l’attachement presque maternel qu’à A avec B. Il finira par rencontrer B et sortir avec elle.</text:p>
        </text:list-item>
        <text:list-item>
          <text:p text:style-name="P10">D, une supervillaine majeure qui gère un réseau de prostitution illégal dans les <text:soft-page-break/>souterrains de la ville, où les prostituées baisent avec des animaux en spectable pour un public de gens fortunés. Ces putes sont soit des femmes désespérées pour de l’argent, ou des ennemies de groupes criminels rivaux capturés par D. D à la capacité de se faire obéir par <text:span text:style-name="T5">la plupart des animaux </text:span><text:span text:style-name="T6">assez intelligents pour comprendre les ordres humains (chiens, chats, oiseaux, chevaux, porcs, singes, etc.) </text:span><text:span text:style-name="T7">Dans l’histoire, A s’infiltrera dans ce réseau pour tenter de collecter des infos, ce qui la conduira à </text:span><text:span text:style-name="T8">accomplir</text:span><text:span text:style-name="T7"> plusieurs spectacles zoophiles.</text:span><text:span text:style-name="T9"> B et D se connaissent depuis longtemps et sont bonnes amies, n’hésitant pas à se partager leurs partenaires sexuels.</text:span></text:p>
        </text:list-item>
        <text:list-item>
          <text:p text:style-name="P11"><text:span text:style-name="T10">E</text:span>, une supervillaine mineure qui deviendra d’abord la némésis de A, puis son amante. Dans sa vie civile, <text:span text:style-name="T10">E </text:span>est une avocate pour parahumains et militante pour le droit des parahumains à la protection et au travail. <text:span text:style-name="T10">E</text:span><text:span text:style-name="T11"> est une futa qui adore se battre contre des capes adolescentes pour ensuite les baiser, </text:span><text:span text:style-name="T12">et ne manquera pas de le faire avec A à chacune de ses victoires contre elle.</text:span></text:p>
        </text:list-item>
        <text:list-item>
          <text:p text:style-name="P12">F, le policier de la force spéciale anti-parahumains, acerbe et cynique, contraint malgré lui de faire équipe avec une cyborg, G, pendant ses missions. Malgré son dégoût pour les machines, les deux coéquipiers se rapprocheront l’un de l’autre.</text:p>
        </text:list-item>
        <text:list-item>
          <text:p text:style-name="P12">G, la partenaire cyborg de F, est enjouée et serviable et apprécie la compagnie des humains, le parfait opposé de F qui est reclus et antipathique. <text:span text:style-name="T13">G a été créée par G’, un parahumain spécialisé dans les IAs et la robotique, autrefois partenaire de G’’, un parahumain milliadaire </text:span><text:span text:style-name="T14">qui, jaloux de la capacité de G’ à créer des IAs douées de conscience, l’a tué pour</text:span><text:span text:style-name="T13"> </text:span><text:span text:style-name="T14">ensuite tirer profit</text:span><text:span text:style-name="T13"> </text:span><text:span text:style-name="T14">de</text:span><text:span text:style-name="T13"> ses recherches, créant des robots servants pour les entreprises et la police, </text:span><text:span text:style-name="T15">sans pour autant recréer l’âme que possède G</text:span><text:span text:style-name="T13">. G’’ ne voit pas d’un bon œil l’existence de G, craignant qu’elle ne révèle qu’il est l’auteur de l’assassination de son créateur, et cherchera à la détruir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39M13S</meta:editing-duration>
    <meta:editing-cycles>23</meta:editing-cycles>
    <meta:generator>LibreOffice/25.2.4.3$Windows_X86_64 LibreOffice_project/33e196637044ead23f5c3226cde09b47731f7e27</meta:generator>
    <meta:creation-date>2025-10-19T20:52:14.785797500</meta:creation-date>
    <dc:title>Format de texte</dc:title>
    <dc:date>2025-12-12T17:58:19.886980100</dc:date>
    <meta:document-statistic meta:table-count="0" meta:image-count="0" meta:object-count="0" meta:page-count="2" meta:paragraph-count="13" meta:word-count="744" meta:character-count="4398" meta:non-whitespace-character-count="3676"/>
    <meta:template xlink:type="simple" xlink:actuate="onRequest" xlink:title="Format de texte" xlink:href="file:///C:/Users/Clément/AppData/Roaming/LibreOffice/4/user/template/Format%20de%20texte1.ott" meta:date="2025-10-19T20:52:14.416498000"/>
  </office:meta>
</office:document-meta>
</file>