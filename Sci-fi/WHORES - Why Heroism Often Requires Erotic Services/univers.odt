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5ffb00"/>
    </style:style>
    <style:style style:name="P2" style:family="paragraph" style:parent-style-name="Standard">
      <style:text-properties officeooo:rsid="00106f63" officeooo:paragraph-rsid="00106f63"/>
    </style:style>
    <style:style style:name="P3" style:family="paragraph" style:parent-style-name="Subtitle">
      <style:text-properties officeooo:rsid="001d0bb0" officeooo:paragraph-rsid="001d0bb0"/>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text-properties officeooo:rsid="00251bca" officeooo:paragraph-rsid="00251bca"/>
    </style:style>
    <style:style style:name="P7" style:family="paragraph" style:parent-style-name="Heading_20_1">
      <style:text-properties officeooo:rsid="001d0bb0" officeooo:paragraph-rsid="001d0bb0"/>
    </style:style>
    <style:style style:name="P8" style:family="paragraph" style:parent-style-name="Standard">
      <style:text-properties officeooo:rsid="00106f63" officeooo:paragraph-rsid="0058a0d8"/>
    </style:style>
    <style:style style:name="P9" style:family="paragraph" style:parent-style-name="Heading_20_2">
      <style:text-properties officeooo:rsid="001d0bb0" officeooo:paragraph-rsid="001d0bb0"/>
    </style:style>
    <style:style style:name="P10" style:family="paragraph" style:parent-style-name="Standard">
      <style:text-properties officeooo:paragraph-rsid="001d0bb0"/>
    </style:style>
    <style:style style:name="P11" style:family="paragraph" style:parent-style-name="Standard">
      <style:text-properties officeooo:rsid="00219877" officeooo:paragraph-rsid="0049a573"/>
    </style:style>
    <style:style style:name="P12" style:family="paragraph" style:parent-style-name="Standard">
      <style:text-properties officeooo:rsid="002478da" officeooo:paragraph-rsid="00251bca"/>
    </style:style>
    <style:style style:name="P13" style:family="paragraph" style:parent-style-name="Standard">
      <style:text-properties officeooo:rsid="002caecb" officeooo:paragraph-rsid="002caecb"/>
    </style:style>
    <style:style style:name="P14" style:family="paragraph" style:parent-style-name="Standard">
      <style:text-properties officeooo:rsid="00106f63" officeooo:paragraph-rsid="001d0bb0"/>
    </style:style>
    <style:style style:name="P15" style:family="paragraph" style:parent-style-name="Standard">
      <style:text-properties officeooo:rsid="002d91fc" officeooo:paragraph-rsid="002d91fc"/>
    </style:style>
    <style:style style:name="P16" style:family="paragraph" style:parent-style-name="Standard">
      <style:text-properties officeooo:rsid="0051f549" officeooo:paragraph-rsid="001d0bb0"/>
    </style:style>
    <style:style style:name="T1" style:family="text">
      <style:text-properties officeooo:rsid="0017c9de"/>
    </style:style>
    <style:style style:name="T2" style:family="text">
      <style:text-properties officeooo:rsid="002306d8"/>
    </style:style>
    <style:style style:name="T3" style:family="text">
      <style:text-properties officeooo:rsid="00543913"/>
    </style:style>
    <style:style style:name="T4" style:family="text">
      <style:text-properties officeooo:rsid="0034050b"/>
    </style:style>
    <style:style style:name="T5" style:family="text">
      <style:text-properties officeooo:rsid="0049a573"/>
    </style:style>
    <style:style style:name="T6" style:family="text">
      <style:text-properties officeooo:rsid="0048a25b"/>
    </style:style>
    <style:style style:name="T7" style:family="text">
      <style:text-properties officeooo:rsid="002c9c4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univers de l’histoir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L’univers<text:tab/>1</text:a></text:p>
          <text:p text:style-name="P5"><text:a xlink:type="simple" xlink:href="#__RefHeading___Toc717_353095010" text:style-name="Index_20_Link" text:visited-style-name="Index_20_Link">Le monde avant le début de l’histoire<text:tab/>1</text:a></text:p>
          <text:p text:style-name="P5"><text:a xlink:type="simple" xlink:href="#__RefHeading___Toc717_353095010%20Copie%202" text:style-name="Index_20_Link" text:visited-style-name="Index_20_Link">Le monde au début de l’histoire<text:tab/>2</text:a></text:p>
        </text:index-body>
      </text:table-of-content>
      <text:p text:style-name="P2"/>
      <text:p text:style-name="P6"/>
      <text:h text:style-name="P7" text:outline-level="1"><text:bookmark-start text:name="__RefHeading___Toc715_353095010"/>L’univers<text:bookmark-end text:name="__RefHeading___Toc715_353095010"/></text:h>
      <text:p text:style-name="P8"/>
      <text:h text:style-name="P9" text:outline-level="2"><text:bookmark-start text:name="__RefHeading___Toc717_353095010"/>Le monde avant le début de l’histoire<text:bookmark-end text:name="__RefHeading___Toc717_353095010"/></text:h>
      <text:p text:style-name="P10"/>
      <text:p text:style-name="P11">Avant le début de l’histoire, <text:span text:style-name="T2">les premiers para-humains font leur apparition </text:span><text:span text:style-name="T3">en 1987</text:span><text:span text:style-name="T2">. Nul ne sait s’il s’agit d’une intervention divine ou alien, un projet militaire hors de contrôle, ou simplement l’évolution humaine, mais leur nombre, bien que faible, ne fait qu’augmenter au fil des années. </text:span><text:span text:style-name="T4">La population leur donne différents noms ; « Supers », « </text:span><text:span text:style-name="T5">Paras</text:span><text:span text:style-name="T4"> », « Mutants » ou « </text:span><text:span text:style-name="T5">A</text:span><text:span text:style-name="T4">liens », mais tous sont vus avec suspicion, et ont été longtemps pourchassés dans de nombreux pays, encore aujourd’hui.</text:span></text:p>
      <text:p text:style-name="P12"/>
      <text:p text:style-name="P12">En réponse au nombre de para-humains se tournant vers le crime, ou simplement causant des dégâts autour d’eux dû à leur manque de maîtrise de leurs pouvoirs, le gouvernement a rapidement mis en place un programme de contre-mesure dédié à l’arrestation et l’élimination des criminels para-humains : La National Paranormal Response Brigade (NPRB). La N<text:span text:style-name="T6">P</text:span>RB ne fait pas qu’arrêter les para-humains, mais en compte également comme membre<text:span text:style-name="T7">s</text:span> actifs pour les missions les plus dangereuses, et offre un programme de réhabilitation pour ceux souhaitant rejoindre la vie civile après leur service ou une fois leur peine servie.</text:p>
      <text:p text:style-name="P12"/>
      <text:p text:style-name="P13">Après quelques décennies, la panique autour des para-humains s’est dissipée, ces derniers étant devenus une partie du paysage public. Beaucoup les voient toujours avec suspicion, mais avec la recrudescence d’équipe de héros faisant surface et des campagnes de propagande du gouvernement, l’opinion publique est généralement plus favorable aux para-humains que par le passé.</text:p>
      <text:p text:style-name="P14"/>
      <text:h text:style-name="P9" text:outline-level="2"><text:bookmark-start text:name="__RefHeading___Toc717_353095010 Copie 2"/><text:soft-page-break/>Le monde au début de l’histoire<text:bookmark-end text:name="__RefHeading___Toc717_353095010 Copie 2"/></text:h>
      <text:p text:style-name="P10"/>
      <text:p text:style-name="P15">Au début de l’histoire, l’équilibre du pouvoir entre les héros/le gouvernement et les vilains est fragile : Si de nombreuses équipes de héros ont fait leur apparition, indépendantes ou non de la NPRB, la plupart des gangs de villains optent pour une influence plus discrète, dirigeant de nombreuses opérations illégales comme des marchés noirs, trafics d’armes et de paratechnologie, ou dirigent des entreprises fantoches pour financer leurs activités criminelles.</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H39M23S</meta:editing-duration>
    <meta:editing-cycles>71</meta:editing-cycles>
    <meta:generator>LibreOffice/25.2.4.3$Windows_X86_64 LibreOffice_project/33e196637044ead23f5c3226cde09b47731f7e27</meta:generator>
    <meta:creation-date>2025-12-10T20:35:48.785774900</meta:creation-date>
    <dc:title>Format de texte</dc:title>
    <dc:date>2026-01-07T23:24:13.379678100</dc:date>
    <meta:document-statistic meta:table-count="0" meta:image-count="0" meta:object-count="0" meta:page-count="2" meta:paragraph-count="13" meta:word-count="343" meta:character-count="2191" meta:non-whitespace-character-count="1860"/>
    <meta:template xlink:type="simple" xlink:actuate="onRequest" xlink:title="Format de texte" xlink:href="file:///C:/Users/Clément/AppData/Roaming/LibreOffice/4/user/template/Format%20de%20texte1.ott" meta:date="2025-12-10T20:35:48.603924200"/>
  </office:meta>
</office:document-meta>
</file>