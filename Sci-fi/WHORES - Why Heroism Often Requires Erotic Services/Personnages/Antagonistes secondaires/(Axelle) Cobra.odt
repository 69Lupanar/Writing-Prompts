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50b9c3" officeooo:paragraph-rsid="0050b9c3"/>
    </style:style>
    <style:style style:name="P2" style:family="paragraph" style:parent-style-name="Standard">
      <style:text-properties officeooo:rsid="00106f63" officeooo:paragraph-rsid="00106f63"/>
    </style:style>
    <style:style style:name="P3" style:family="paragraph" style:parent-style-name="Subtitle">
      <style:text-properties officeooo:rsid="001907a9" officeooo:paragraph-rsid="001907a9"/>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91d8b"/>
    </style:style>
    <style:style style:name="P6" style:family="paragraph" style:parent-style-name="Heading_20_1">
      <style:text-properties officeooo:rsid="00191d8b" officeooo:paragraph-rsid="00191d8b"/>
    </style:style>
    <style:style style:name="P7" style:family="paragraph" style:parent-style-name="Standard">
      <style:text-properties officeooo:rsid="00191d8b" officeooo:paragraph-rsid="00191d8b"/>
    </style:style>
    <style:style style:name="P8" style:family="paragraph" style:parent-style-name="Standard">
      <style:text-properties officeooo:rsid="001bf89c" officeooo:paragraph-rsid="001bf89c"/>
    </style:style>
    <style:style style:name="P9" style:family="paragraph" style:parent-style-name="Standard">
      <style:text-properties officeooo:rsid="00520191" officeooo:paragraph-rsid="00520191"/>
    </style:style>
    <style:style style:name="P10" style:family="paragraph" style:parent-style-name="Standard">
      <style:paragraph-properties fo:text-align="justify" style:justify-single-word="false"/>
      <style:text-properties officeooo:paragraph-rsid="0054055b"/>
    </style:style>
    <style:style style:name="P11" style:family="paragraph" style:parent-style-name="Standard">
      <style:paragraph-properties fo:text-align="justify" style:justify-single-word="false"/>
      <style:text-properties officeooo:paragraph-rsid="0056a0bf"/>
    </style:style>
    <style:style style:name="P12" style:family="paragraph" style:parent-style-name="Standard">
      <style:paragraph-properties fo:text-align="justify" style:justify-single-word="false"/>
      <style:text-properties officeooo:paragraph-rsid="0062205f"/>
    </style:style>
    <style:style style:name="P13" style:family="paragraph" style:parent-style-name="Standard">
      <style:paragraph-properties fo:text-align="justify" style:justify-single-word="false"/>
      <style:text-properties officeooo:paragraph-rsid="005b81d4"/>
    </style:style>
    <style:style style:name="P14" style:family="paragraph" style:parent-style-name="Standard">
      <style:paragraph-properties fo:text-align="justify" style:justify-single-word="false"/>
      <style:text-properties officeooo:paragraph-rsid="005be305"/>
    </style:style>
    <style:style style:name="P15" style:family="paragraph" style:parent-style-name="Standard">
      <style:paragraph-properties fo:text-align="justify" style:justify-single-word="false"/>
      <style:text-properties officeooo:rsid="005be305" officeooo:paragraph-rsid="005be305"/>
    </style:style>
    <style:style style:name="P16" style:family="paragraph" style:parent-style-name="Standard">
      <style:paragraph-properties fo:text-align="justify" style:justify-single-word="false"/>
      <style:text-properties officeooo:rsid="00668c32" officeooo:paragraph-rsid="00668c32"/>
    </style:style>
    <style:style style:name="P17" style:family="paragraph" style:parent-style-name="Standard">
      <style:text-properties officeooo:rsid="006292a2" officeooo:paragraph-rsid="006292a2"/>
    </style:style>
    <style:style style:name="P18" style:family="paragraph" style:parent-style-name="Standard">
      <style:text-properties officeooo:rsid="006d777c" officeooo:paragraph-rsid="006d777c"/>
    </style:style>
    <style:style style:name="P19" style:family="paragraph" style:parent-style-name="Standard">
      <style:text-properties officeooo:rsid="0033ed47" officeooo:paragraph-rsid="0033ed47"/>
    </style:style>
    <style:style style:name="P20" style:family="paragraph" style:parent-style-name="Heading_20_1">
      <style:text-properties officeooo:rsid="0036a4f7" officeooo:paragraph-rsid="0036a4f7"/>
    </style:style>
    <style:style style:name="P21" style:family="paragraph" style:parent-style-name="Standard">
      <style:text-properties officeooo:rsid="00191d8b" officeooo:paragraph-rsid="0036a4f7"/>
    </style:style>
    <style:style style:name="P22" style:family="paragraph" style:parent-style-name="Standard">
      <style:text-properties officeooo:rsid="0036bacb" officeooo:paragraph-rsid="003eac87"/>
    </style:style>
    <style:style style:name="P23" style:family="paragraph" style:parent-style-name="Heading_20_1">
      <style:text-properties officeooo:rsid="001a3d83" officeooo:paragraph-rsid="001a3d83"/>
    </style:style>
    <style:style style:name="P24" style:family="paragraph" style:parent-style-name="Standard">
      <style:text-properties officeooo:rsid="00191d8b" officeooo:paragraph-rsid="001a3d83"/>
    </style:style>
    <style:style style:name="P25" style:family="paragraph" style:parent-style-name="Standard">
      <style:text-properties officeooo:rsid="0069eb33" officeooo:paragraph-rsid="0069eb33"/>
    </style:style>
    <style:style style:name="P26" style:family="paragraph" style:parent-style-name="Heading_20_1">
      <style:text-properties officeooo:rsid="0019270e" officeooo:paragraph-rsid="0019270e"/>
    </style:style>
    <style:style style:name="P27" style:family="paragraph" style:parent-style-name="Standard">
      <style:text-properties officeooo:rsid="00191d8b" officeooo:paragraph-rsid="0019270e"/>
    </style:style>
    <style:style style:name="P28" style:family="paragraph" style:parent-style-name="Standard">
      <style:text-properties officeooo:rsid="004430bc" officeooo:paragraph-rsid="004430bc"/>
    </style:style>
    <style:style style:name="P29" style:family="paragraph" style:parent-style-name="Standard">
      <style:text-properties officeooo:rsid="00458ed1" officeooo:paragraph-rsid="00458ed1"/>
    </style:style>
    <style:style style:name="T1" style:family="text">
      <style:text-properties officeooo:rsid="00555050"/>
    </style:style>
    <style:style style:name="T2" style:family="text">
      <style:text-properties officeooo:rsid="0056068e"/>
    </style:style>
    <style:style style:name="T3" style:family="text">
      <style:text-properties officeooo:rsid="0050b9c3"/>
    </style:style>
    <style:style style:name="T4" style:family="text">
      <style:text-properties officeooo:rsid="0051e8c3"/>
    </style:style>
    <style:style style:name="T5" style:family="text">
      <style:text-properties officeooo:rsid="0056a0bf"/>
    </style:style>
    <style:style style:name="T6" style:family="text">
      <style:text-properties officeooo:rsid="0059d184"/>
    </style:style>
    <style:style style:name="T7" style:family="text">
      <style:text-properties officeooo:rsid="00609332"/>
    </style:style>
    <style:style style:name="T8" style:family="text">
      <style:text-properties officeooo:rsid="0054055b"/>
    </style:style>
    <style:style style:name="T9" style:family="text">
      <style:text-properties officeooo:rsid="005b81d4"/>
    </style:style>
    <style:style style:name="T10" style:family="text">
      <style:text-properties officeooo:rsid="00588856"/>
    </style:style>
    <style:style style:name="T11" style:family="text">
      <style:text-properties officeooo:rsid="005bcf18"/>
    </style:style>
    <style:style style:name="T12" style:family="text">
      <style:text-properties officeooo:rsid="005be305"/>
    </style:style>
    <style:style style:name="T13" style:family="text">
      <style:text-properties officeooo:rsid="005e0081"/>
    </style:style>
    <style:style style:name="T14" style:family="text">
      <style:text-properties officeooo:rsid="005fb841"/>
    </style:style>
    <style:style style:name="T15" style:family="text">
      <style:text-properties officeooo:rsid="00685b58"/>
    </style:style>
    <style:style style:name="T16" style:family="text">
      <style:text-properties officeooo:rsid="00648adf"/>
    </style:style>
    <style:style style:name="T17" style:family="text">
      <style:text-properties officeooo:rsid="00699250"/>
    </style:style>
    <style:style style:name="T18" style:family="text">
      <style:text-properties officeooo:rsid="0065ed43"/>
    </style:style>
    <style:style style:name="T19" style:family="text">
      <style:text-properties officeooo:rsid="006be448"/>
    </style:style>
    <style:style style:name="T20" style:family="text">
      <style:text-properties officeooo:rsid="006e8f15"/>
    </style:style>
    <style:style style:name="T21" style:family="text">
      <style:text-properties officeooo:rsid="006fe30e"/>
    </style:style>
    <style:style style:name="T22" style:family="text">
      <style:text-properties officeooo:rsid="007164be"/>
    </style:style>
    <style:style style:name="T23" style:family="text">
      <style:text-properties officeooo:rsid="00721f3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bra <text:span text:style-name="T1">(</text:span><text:span text:style-name="T2">Axelle</text:span><text:span text:style-name="T1">)</text:span></text:p>
      <text:p text:style-name="P2"/>
      <text:p text:style-name="P3">Fiche personnag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Physique<text:tab/>1</text:a></text:p>
          <text:p text:style-name="P4"><text:a xlink:type="simple" xlink:href="#__RefHeading___Toc715_353095010%20Copie%201" text:style-name="Index_20_Link" text:visited-style-name="Index_20_Link">Personnalité<text:tab/>1</text:a></text:p>
          <text:p text:style-name="P4"><text:a xlink:type="simple" xlink:href="#__RefHeading___Toc715_353095010%20Copie%202" text:style-name="Index_20_Link" text:visited-style-name="Index_20_Link">Passé<text:tab/>2</text:a></text:p>
          <text:p text:style-name="P4"><text:a xlink:type="simple" xlink:href="#__RefHeading___Toc715_353095010%20Copie%203" text:style-name="Index_20_Link" text:visited-style-name="Index_20_Link">Objectifs<text:tab/>2</text:a></text:p>
          <text:p text:style-name="P4"><text:a xlink:type="simple" xlink:href="#__RefHeading___Toc715_353095010%20Copie%203%20Copie%201" text:style-name="Index_20_Link" text:visited-style-name="Index_20_Link">Pouvoirs<text:tab/>2</text:a></text:p>
          <text:p text:style-name="P4"><text:a xlink:type="simple" xlink:href="#__RefHeading___Toc715_353095010%20Copie%204%20Copie%201" text:style-name="Index_20_Link" text:visited-style-name="Index_20_Link">Rôle dans l’histoire<text:tab/>3</text:a></text:p>
          <text:p text:style-name="P4"><text:a xlink:type="simple" xlink:href="#__RefHeading___Toc715_353095010%20Copie%204" text:style-name="Index_20_Link" text:visited-style-name="Index_20_Link">Relations<text:tab/>3</text:a></text:p>
        </text:index-body>
      </text:table-of-content>
      <text:p text:style-name="P5"/>
      <text:p text:style-name="P5"/>
      <text:h text:style-name="P6" text:outline-level="1"><text:bookmark-start text:name="__RefHeading___Toc715_353095010"/>Physique<text:bookmark-end text:name="__RefHeading___Toc715_353095010"/></text:h>
      <text:p text:style-name="P7"/>
      <text:p text:style-name="P8">Fille de 1<text:span text:style-name="T3">9</text:span> ans, <text:span text:style-name="T3">peau blanche car elle ne sort le plus souvent que la nuit pour travailler à son studio de tournage ou traîner avec son gang. Rousse aux yeux bleus, poitrine taille D, </text:span><text:span text:style-name="T4">musculature un peu plus développée que les filles de son âge dû à ses excursions nocturnes.</text:span></text:p>
      <text:p text:style-name="P8"/>
      <text:p text:style-name="P9">Aime porter des vêtements provocateurs (jeans et collants déchirés, hauts courts, etc.) Mais porte souvent un masque en tissu et une casquette pour cacher son visage, notamment son front qu’elle trouve trop grand.</text:p>
      <text:p text:style-name="P8"/>
      <text:h text:style-name="P6" text:outline-level="1"><text:bookmark-start text:name="__RefHeading___Toc715_353095010 Copie 1"/>Personnalité<text:bookmark-end text:name="__RefHeading___Toc715_353095010 Copie 1"/></text:h>
      <text:p text:style-name="P7"/>
      <text:p text:style-name="P10">Son passé auprès d’un père abusif a conduit <text:span text:style-name="T5">Axelle</text:span> à devenir elle-même très renfermée et violente, déversant sa frustration sur ceux qui lui cherchent des ennuis, et cachant son complexe d’infériorité derrière un masque d’assurance pour dissuader ceux qui souhaiteraient créer un lien avec elle. Dû à cela, elle n’arrive pas à se faire des amis, et les rares aides compatissantes abandonnent rapidement après l’avoir confronté.</text:p>
      <text:p text:style-name="P10"/>
      <text:p text:style-name="P11">Cependant, sous son masque, <text:span text:style-name="T5">Axelle</text:span> est une fille très fragile, capable de passer de la colère aux larmes en un rien de temps quand elle est confrontée à ses problèmes personnels, qu’elle fuit constamment. <text:span text:style-name="T5">Elle complexe sur son corps, et est jalouse de celui d’Amélia, notamment de ses seins, pour lesquels elle la pique régulièrement pour masquer son complexe.</text:span></text:p>
      <text:p text:style-name="P11"><text:soft-page-break/></text:p>
      <text:p text:style-name="P11">Elle est aussi très romantique <text:span text:style-name="T6">malgré son apparence, </text:span><text:span text:style-name="T7">lisant des romances dans son temps libre</text:span><text:span text:style-name="T6">,</text:span> et apprécie ceux qui ont le courage de leurs opinions, une qualité qu’elle envie secrètement à <text:span text:style-name="T8">Amélia</text:span>, chez qui elle a pu voir son évolution tout au long de leurs interactions, et <text:span text:style-name="T9">a </text:span>commenc<text:span text:style-name="T9">é</text:span> à se préoccuper d’<text:span text:style-name="T8">elle</text:span> quand <text:span text:style-name="T8">elle</text:span> s’attirera des ennuis avec les Vipères Noires. <text:span text:style-name="T10">Elle est homosexuelle, mais vit très mal sa sexualité, notamment à cause de son père homophobe.</text:span></text:p>
      <text:p text:style-name="P5"/>
      <text:h text:style-name="P6" text:outline-level="1"><text:bookmark-start text:name="__RefHeading___Toc715_353095010 Copie 2"/>Passé<text:bookmark-end text:name="__RefHeading___Toc715_353095010 Copie 2"/></text:h>
      <text:p text:style-name="P7"/>
      <text:p text:style-name="P12"><text:span text:style-name="T5">Axelle</text:span> est la fille d’un ancien <text:span text:style-name="T9">employé de NextHuman Industries</text:span>, ayant participé à <text:span text:style-name="T9">de nombreux tests pratiques de leurs derniers modèles de robots soldats</text:span>. Après un <text:span text:style-name="T9">accident d</text:span>e <text:span text:style-name="T9">chanter durant lequel </text:span>il a perdu une de ses jambes et le soutien de s<text:span text:style-name="T9">on employeur</text:span>, il s’est <text:span text:style-name="T9">retrouvé au chômage</text:span> et <text:span text:style-name="T9">peine à retrouver du travail</text:span>, restant enfermé jour après jour chez lui à repasser sur sa télé les <text:span text:style-name="T9">divers programmes et pubs de son ancienne entreprise</text:span>, ruminant des jours révolus. Aigri par sa déchéance, il a sombré dans l’alcool et a commencé à négliger sa famille, ce qui lui a valu un divorce de sa femme, laissant <text:span text:style-name="T11">Axelle</text:span> sous la tutelle de son père.</text:p>
      <text:p text:style-name="P13"/>
      <text:p text:style-name="P14">Au fil des années, son père est devenu de plus en plus frustré et violent, passant ses accès de colère sur sa fille de manière physique comme verbale. <text:span text:style-name="T11">Axelle</text:span> a vécu toute son enfance et son adolescence dans ce climat hostile, ce qui a eu pour effet de la renfermer sur elle-même et de développer un complexe d’infériorité, l’incitant à repousser tout contact avec d’autres adolescents de peur de se blesser. </text:p>
      <text:p text:style-name="P15"/>
      <text:p text:style-name="P14"><text:span text:style-name="T12">Jusqu’au jour où elle est recrutée par les Vipères Noires, une bande de jeunes délinquants para-humains qui commettent de petits délits de vandalisme pour s’amuser et se venger de la société qui leur a causé du tort. </text:span><text:span text:style-name="T13">Inspirée par leur liberté et mépris des règles, elle rejoint leur groupe</text:span> pour déverser sa frustration sur les victimes de leurs coups, elle n’a cependant jamais eu le courage de confronter son père en face à face, craignant sa violence et d’être livrée à elle-même dans les rues si s<text:span text:style-name="T14">o</text:span>n père venait à la désavouer.</text:p>
      <text:p text:style-name="P14"/>
      <text:p text:style-name="P16">En attendant, elle a trouvé un petit travail au même studio de pornographie où travaille Amélia, faisant le plus souvent des vidéos en webcam <text:span text:style-name="T15">seule</text:span> ou du porno avec d’autres filles, où elle peut vivre ses fantaisies homosexuelles sans crainte d’être jugée.</text:p>
      <text:p text:style-name="P5"/>
      <text:h text:style-name="P6" text:outline-level="1"><text:bookmark-start text:name="__RefHeading___Toc715_353095010 Copie 3"/>Objectifs<text:bookmark-end text:name="__RefHeading___Toc715_353095010 Copie 3"/></text:h>
      <text:p text:style-name="P7"/>
      <text:p text:style-name="P17">L’attitude d’Axelle cache un mal-être profond, dont elle cherche des échappatoires pour éviter d’avoir à confronter ses démons, notamment son père, son homosexualité, et sa vie dépourvue de sens. Axelle n’a pas vraiment d’objectif, se laissant porter par la vie en espérant que ses problèmes s’envolent d’eux-mêmes. C’est sur ce point qu’Amélia tentera <text:soft-page-break/>d’aider Axelle, en l’encourageant à affronter ses peurs et de compter sur ses camarades pour l’aider, une vision naïve mais qui touchera la délinquante.</text:p>
      <text:p text:style-name="P17"/>
      <text:p text:style-name="P18">Elle est aussi une romantique éperdue, et désespère de trouver un petit-ami, espérant que sortir avec un garçon pourrait faire disparaître son homosexualité.</text:p>
      <text:p text:style-name="P19"/>
      <text:h text:style-name="P20" text:outline-level="1"><text:bookmark-start text:name="__RefHeading___Toc715_353095010 Copie 3 Copie 1"/>Pouvoirs<text:bookmark-end text:name="__RefHeading___Toc715_353095010 Copie 3 Copie 1"/></text:h>
      <text:p text:style-name="P21"/>
      <text:p text:style-name="P22"><text:span text:style-name="T16">Axelle</text:span> a développé ses pouvoirs <text:span text:style-name="T16">après des années de frustration vis-à-vis de son père, leur pauvreté et son homosexualité, empoisonnant son quotidien jusqu’à prendre une forme concrète sous la forme de venin corrosif, qu’elle est capable de projeter </text:span><text:span text:style-name="T17">depuis</text:span><text:span text:style-name="T16"> ses mains </text:span><text:span text:style-name="T17">ou sa salive</text:span><text:span text:style-name="T16"> et qui attaque toute matière organique comme métallique ; seule les minéraux en sont épargnés. </text:span><text:span text:style-name="T18">Plus Axelle est en colère, plus ce venin est rapide et corrosif. Son pouvoir représente son état mental, Axelle cherchant une cible sur laquelle cracher son venin et déverser tout ce qu’elle a sur le cœur.</text:span></text:p>
      <text:p text:style-name="P22"/>
      <text:h text:style-name="P23" text:outline-level="1"><text:bookmark-start text:name="__RefHeading___Toc715_353095010 Copie 4 Copie 1"/>Rôle dans l’histoire<text:bookmark-end text:name="__RefHeading___Toc715_353095010 Copie 4 Copie 1"/></text:h>
      <text:p text:style-name="P24"/>
      <text:p text:style-name="P25">Antagoniste mineur de l’histoire, Axelle devient malgré elle l’amie d’Amélia dans la vie de tous les jours, et son némésis en tant que Cobra. Cependant, elle représente un des victimes des agissements d’AM, et une des personnes dans le besoin qu’Amélia souhaite aider par son identité de héros, <text:span text:style-name="T19">l’aidant à gagner confiance en elle et à accepter son homosexualité</text:span>, montrant le côté altruiste et héroïque de cette dernière.</text:p>
      <text:p text:style-name="P5"/>
      <text:h text:style-name="P26" text:outline-level="1"><text:bookmark-start text:name="__RefHeading___Toc715_353095010 Copie 4"/>Relations<text:bookmark-end text:name="__RefHeading___Toc715_353095010 Copie 4"/></text:h>
      <text:p text:style-name="P27"/>
      <text:p text:style-name="P28"><text:span text:style-name="T20">Sa famille</text:span> : <text:span text:style-name="T21">Axelle est en froid avec sa mère, qu’elle ne voit que très peu, celle-ci n’ayant pas pu obtenir la garde de sa fille malgré les tendances violentes du père de la jeune fille. Quant à celui-ci, Axelle et lui ne se parlent presque plus, et la jeune para-humaine désespère de rétablir le contact avec lui, surtout avec sa haine des homosexuels, mais aussi et surtout des capes, qu’il blâme comme la cause de ses soucis, au lieu de NextHuman Industries.</text:span></text:p>
      <text:p text:style-name="P28"/>
      <text:p text:style-name="P29"><text:span text:style-name="T20">Amélia</text:span> : <text:span text:style-name="T22">Si Axelle ne voit au début Amélia que comme une fille naïve et irritante, elle se réchauffera rapidement à son contact, découvrant une fille douce et attentionnée, soucieuse du bonheur des autres malgré son travail de strip-teaseuse et star du porno qui laisserait présager le contraire. </text:span><text:span text:style-name="T23">Sous le persona de Cobra, elle affrontera Amelia à plusieurs reprises, mais sera malgré elle amené à respecter la réputation qu’elle a gagné au fil des années, la hissant au rang des héros majeurs de Californi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2H31M9S</meta:editing-duration>
    <meta:editing-cycles>92</meta:editing-cycles>
    <meta:generator>LibreOffice/25.2.4.3$Windows_X86_64 LibreOffice_project/33e196637044ead23f5c3226cde09b47731f7e27</meta:generator>
    <meta:creation-date>2025-12-13T08:33:05.842320600</meta:creation-date>
    <dc:title>Format de texte</dc:title>
    <dc:date>2025-12-16T16:03:45.465507500</dc:date>
    <meta:document-statistic meta:table-count="0" meta:image-count="0" meta:object-count="0" meta:page-count="3" meta:paragraph-count="32" meta:word-count="1066" meta:character-count="6403" meta:non-whitespace-character-count="5368"/>
    <meta:template xlink:type="simple" xlink:actuate="onRequest" xlink:title="Format de texte" xlink:href="file:///C:/Users/Clément/AppData/Roaming/LibreOffice/4/user/template/Format%20de%20texte1.ott" meta:date="2025-12-13T08:33:05.542099300"/>
  </office:meta>
</office:document-meta>
</file>