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4cff39" officeooo:paragraph-rsid="004cff39"/>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ebd91" officeooo:paragraph-rsid="004ebd91"/>
    </style:style>
    <style:style style:name="P9" style:family="paragraph" style:parent-style-name="Standard">
      <style:text-properties officeooo:rsid="004ed2c5" officeooo:paragraph-rsid="004ed2c5"/>
    </style:style>
    <style:style style:name="P10" style:family="paragraph" style:parent-style-name="Standard">
      <style:text-properties officeooo:rsid="001bf89c" officeooo:paragraph-rsid="001bf89c"/>
    </style:style>
    <style:style style:name="P11" style:family="paragraph" style:parent-style-name="Standard">
      <style:text-properties officeooo:rsid="00503e35" officeooo:paragraph-rsid="00503e35"/>
    </style:style>
    <style:style style:name="P12" style:family="paragraph" style:parent-style-name="Standard">
      <style:text-properties officeooo:rsid="005712f1" officeooo:paragraph-rsid="005712f1"/>
    </style:style>
    <style:style style:name="P13" style:family="paragraph" style:parent-style-name="Standard">
      <style:text-properties officeooo:rsid="0052f63b" officeooo:paragraph-rsid="0052f63b"/>
    </style:style>
    <style:style style:name="P14" style:family="paragraph" style:parent-style-name="Standard">
      <style:text-properties officeooo:rsid="005a422a" officeooo:paragraph-rsid="005a422a"/>
    </style:style>
    <style:style style:name="P15" style:family="paragraph" style:parent-style-name="Standard">
      <style:text-properties officeooo:rsid="0033ed47" officeooo:paragraph-rsid="0033ed47"/>
    </style:style>
    <style:style style:name="P16" style:family="paragraph" style:parent-style-name="Heading_20_1">
      <style:text-properties officeooo:rsid="0036a4f7" officeooo:paragraph-rsid="0036a4f7"/>
    </style:style>
    <style:style style:name="P17" style:family="paragraph" style:parent-style-name="Standard">
      <style:text-properties officeooo:rsid="00191d8b" officeooo:paragraph-rsid="0036a4f7"/>
    </style:style>
    <style:style style:name="P18" style:family="paragraph" style:parent-style-name="Standard">
      <style:text-properties officeooo:rsid="005d9c7d" officeooo:paragraph-rsid="005d9c7d"/>
    </style:style>
    <style:style style:name="P19" style:family="paragraph" style:parent-style-name="Heading_20_1">
      <style:text-properties officeooo:rsid="001a3d83" officeooo:paragraph-rsid="001a3d83"/>
    </style:style>
    <style:style style:name="P20" style:family="paragraph" style:parent-style-name="Standard">
      <style:text-properties officeooo:rsid="00191d8b" officeooo:paragraph-rsid="001a3d83"/>
    </style:style>
    <style:style style:name="P21" style:family="paragraph" style:parent-style-name="Standard">
      <style:text-properties officeooo:rsid="005f5bc9" officeooo:paragraph-rsid="005f5bc9"/>
    </style:style>
    <style:style style:name="P22" style:family="paragraph" style:parent-style-name="Heading_20_1">
      <style:text-properties officeooo:rsid="0019270e" officeooo:paragraph-rsid="0019270e"/>
    </style:style>
    <style:style style:name="P23" style:family="paragraph" style:parent-style-name="Standard">
      <style:text-properties officeooo:rsid="00191d8b" officeooo:paragraph-rsid="0019270e"/>
    </style:style>
    <style:style style:name="P24" style:family="paragraph" style:parent-style-name="Standard">
      <style:text-properties officeooo:rsid="004430bc" officeooo:paragraph-rsid="004430bc"/>
    </style:style>
    <style:style style:name="P25" style:family="paragraph" style:parent-style-name="Standard">
      <style:text-properties officeooo:rsid="00458ed1" officeooo:paragraph-rsid="00458ed1"/>
    </style:style>
    <style:style style:name="T1" style:family="text">
      <style:text-properties officeooo:rsid="004ebd91"/>
    </style:style>
    <style:style style:name="T2" style:family="text">
      <style:text-properties officeooo:rsid="0052fd05"/>
    </style:style>
    <style:style style:name="T3" style:family="text">
      <style:text-properties officeooo:rsid="0063a102"/>
    </style:style>
    <style:style style:name="T4" style:family="text">
      <style:text-properties officeooo:rsid="004eb607"/>
    </style:style>
    <style:style style:name="T5" style:family="text">
      <style:text-properties officeooo:rsid="005019d3"/>
    </style:style>
    <style:style style:name="T6" style:family="text">
      <style:text-properties officeooo:rsid="00514a32"/>
    </style:style>
    <style:style style:name="T7" style:family="text">
      <style:text-properties officeooo:rsid="00516efb"/>
    </style:style>
    <style:style style:name="T8" style:family="text">
      <style:text-properties officeooo:rsid="0058f77c"/>
    </style:style>
    <style:style style:name="T9" style:family="text">
      <style:text-properties officeooo:rsid="005455a5"/>
    </style:style>
    <style:style style:name="T10" style:family="text">
      <style:text-properties officeooo:rsid="0065095a"/>
    </style:style>
    <style:style style:name="T11" style:family="text">
      <style:text-properties officeooo:rsid="005ba3e2"/>
    </style:style>
    <style:style style:name="T12" style:family="text">
      <style:text-properties officeooo:rsid="00633696"/>
    </style:style>
    <style:style style:name="T13" style:family="text">
      <style:text-properties officeooo:rsid="005fcbbc"/>
    </style:style>
    <style:style style:name="T14" style:family="text">
      <style:text-properties officeooo:rsid="0060102c"/>
    </style:style>
    <style:style style:name="T15" style:family="text">
      <style:text-properties officeooo:rsid="00614033"/>
    </style:style>
    <style:style style:name="T16" style:family="text">
      <style:text-properties officeooo:rsid="006393c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pha</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Standard"><text:span text:style-name="T1">Femme de 35 ans, cheveux noirs coupés en une frange courte, yeux bleus, silhouette fine et cuisses développées, poitrine normale, taille C. </text:span><text:span text:style-name="T2">Possède un tatouage </text:span><text:span text:style-name="T3">de deux griffures symétriques le long de ses reins</text:span><text:span text:style-name="T2">, preuve de ses ébats zoophiles </text:span>dans son propre bordel canin.</text:p>
      <text:p text:style-name="P8"/>
      <text:p text:style-name="P9">Alpha a des goûts de luxe, et porte des vêtements de qualité quand elle ne porte pas sa tenue moulante en latex caractéristique de sa vie para-humaine. Elle porte un mascara noir et bleu lui donnant un regard perçant.</text:p>
      <text:p text:style-name="P10"/>
      <text:h text:style-name="P6" text:outline-level="1"><text:bookmark-start text:name="__RefHeading___Toc715_353095010 Copie 1"/>Personnalité<text:bookmark-end text:name="__RefHeading___Toc715_353095010 Copie 1"/></text:h>
      <text:p text:style-name="P7"/>
      <text:p text:style-name="P11">Très similaire à Cindy dans sa personnalité, et tout aussi dépravée qu’elle<text:span text:style-name="T4">, </text:span><text:span text:style-name="T5">n’hésitant pas à user de ses charmes et de son corps pour s’attirer des faveurs et gagner plus d’argent. </text:span><text:span text:style-name="T6">Elle est cependant plus avide que sa comparse, </text:span><text:span text:style-name="T7">n’hésitant pas à s’associer à AM pour obtenir des robots de sécurité à bas prix en échange de surveiller les activités parahumaines de la ville ; ni à organiser son bordel canin pour le plaisir des super-villains et riches de la ville.</text:span></text:p>
      <text:p text:style-name="P11"/>
      <text:p text:style-name="P12">Elle est aussi relativement antipathique, préférant la compagnie des chiens aux hommes et ne sortant <text:span text:style-name="T8">habituellement </text:span>de son bureau que pour faire ses rapports à AM ou commercer avec d’autres para-humains.</text:p>
      <text:p text:style-name="P5"/>
      <text:h text:style-name="P6" text:outline-level="1"><text:bookmark-start text:name="__RefHeading___Toc715_353095010 Copie 2"/><text:soft-page-break/>Passé<text:bookmark-end text:name="__RefHeading___Toc715_353095010 Copie 2"/></text:h>
      <text:p text:style-name="P7"/>
      <text:p text:style-name="P13">Peu est connu sur le passé d’Alpha. Elle a grandi dans une famille très pauvre, qui a dû finir par l’abandonner car ils n’étaient plus capables de la nourrir. Elle a trouvé refuge auprès de chiens errants, avec qui elle a appris à voler de la nourriture, et a développé ses pouvoirs à leur contact, avant d’être attrapée par la police et envoyée dans un orphelinat.</text:p>
      <text:p text:style-name="P13"/>
      <text:p text:style-name="P13">Malgré les années passées, Alpha n’a pas oublié son contact avec les chiens, s’entraînant avec ses pouvoirs en secret dès qu’elle le pouvait, consciente de la mauvaise réputation des para-humains à son époque. Cela explique aussi pourquoi elle s’entend mieux avec les chiens qu’avec les hommes, <text:span text:style-name="T9">car les chiens ne la jugent pas et vivent en meute pour survivre.</text:span></text:p>
      <text:p text:style-name="P5"/>
      <text:h text:style-name="P6" text:outline-level="1"><text:bookmark-start text:name="__RefHeading___Toc715_353095010 Copie 3"/>Objectifs<text:bookmark-end text:name="__RefHeading___Toc715_353095010 Copie 3"/></text:h>
      <text:p text:style-name="P7"/>
      <text:p text:style-name="P14">L’objectif d’Alpha est simple : Se faire de l’argent, peu importe comment ou avec quel aide. Si elle doit utiliser ses chiens pour faire les basses besognes à sa place, elle le fera. C’est pourquoi, en voyant les tendances perverses des ultra-riches de la ville, décide de monter un trafic illégal de prostitution, utilisant ses chiens pour abuser des femmes volontaires comme capturées pour divertir sa clientèle, <text:span text:style-name="T10">et vendant les plus agressifs d’entre eux comme chiens de garde</text:span>. <text:span text:style-name="T11">Elle n’a pas peur non plus d’utiliser la violence et d’envoyer ses chiens tuer ses victimes et ceux qui tentent de la doubler.</text:span></text:p>
      <text:p text:style-name="P15"/>
      <text:h text:style-name="P16" text:outline-level="1"><text:bookmark-start text:name="__RefHeading___Toc715_353095010 Copie 3 Copie 1"/>Pouvoirs<text:bookmark-end text:name="__RefHeading___Toc715_353095010 Copie 3 Copie 1"/></text:h>
      <text:p text:style-name="P17"/>
      <text:p text:style-name="P18">Alpha possède le pouvoir de contrôler et de communiquer avec les chiens, de ressentir ce qu’ils ressentent, et de manipuler leurs sens pour les faire obéir au doigt et à l’oeil. Son pouvoir explique en partie pourquoi elle comprend mieux les chiens, car leurs désirs sont plus primaires et simples.</text:p>
      <text:p text:style-name="P18"/>
      <text:p text:style-name="P18">Étant capable de ressentir ce qu’ils ressentent, elle est aussi capable de voir, entendre, sentir, goûter et toucher via leurs sens, ce qui fait de ses chiens d’excellents espions dans son bordel, ceux-ci écoutant les conversations de ses clients pour rapporter toute découverte suspecte à AM. La portée de son pouvoir est large, capable d’étendre son contrôle sur plusieurs pâtés de maison.</text:p>
      <text:p text:style-name="P18"/>
      <text:h text:style-name="P19" text:outline-level="1"><text:bookmark-start text:name="__RefHeading___Toc715_353095010 Copie 4 Copie 1"/>Rôle dans l’histoire<text:bookmark-end text:name="__RefHeading___Toc715_353095010 Copie 4 Copie 1"/></text:h>
      <text:p text:style-name="P20"/>
      <text:p text:style-name="P21">Antagoniste mineur de l’histoire. A un moment de l’histoire, Amélia s’infiltre quelques jours dans son bordel en tant que pute pour collecter des infos sur elle et ses liens avec <text:soft-page-break/>AM. Bien qu’Alpha apprenne tôt <text:span text:style-name="T12">l’identité secrète et les</text:span> intentions d’Amelia grâce à ses chiens, elle tolère sa présence car Amélia s’occupe bien de ses chiens et n’a pas d’intention hostile envers elle ; et les chiens d’Alpha seraient rapidement capables de l’arrêter. <text:span text:style-name="T13">Elle finit cependant par lui révéler qu’AM est son contracteur, et qu’il est bien plus impliqué dans la vie politique du pays et du monde para-humain qu’il ne veut le faire croire.</text:span></text:p>
      <text:p text:style-name="P21"><text:line-break/><text:span text:style-name="T13">Thématiquement, Alpha représente les gens opportunistes profitant des défauts du système pour faire profit tout en évitant les ennuis, </text:span><text:span text:style-name="T14">n’ayant pas d’intention hostile, mais ne laissant personne l’éloigner de son argent.</text:span></text:p>
      <text:p text:style-name="P5"/>
      <text:h text:style-name="P22" text:outline-level="1"><text:bookmark-start text:name="__RefHeading___Toc715_353095010 Copie 4"/>Relations<text:bookmark-end text:name="__RefHeading___Toc715_353095010 Copie 4"/></text:h>
      <text:p text:style-name="P23"/>
      <text:p text:style-name="P24"><text:span text:style-name="T15">Amélia et Cindy</text:span> : <text:span text:style-name="T15">Alpha s’entend bien avec Cindy, cette dernière ayant travaillé pour elle quelques années plus tôt avant de partir pour un autre club. Les deux femmes se sont quittés en de bon termes, et se voient régulièrement pour discuter entre deux parties de sexe. Alpha est plus douce envers Amélia, la protégée de Cindy, qu’envers ses autres putes, principalement dû à leur lien et au fait qu’Amélia traite bien ses chiens et aime secrètement les baiser malgré elle.</text:span></text:p>
      <text:p text:style-name="P24"/>
      <text:p text:style-name="P25"><text:span text:style-name="T15">AM</text:span> : <text:span text:style-name="T16">Leur relation est purement professionnelle, AM étant son contracteur pour collecter ses impôts et ses informations en échange de la laisser opérer son bordel en ville. Mais la survie d’Alpha ne dépendant pas entièrement de lui, elle n’a aucun problème à divulguer ce qu’elle sait à Amélia lorsque celle-ci l’interroge sur ses contacts et leurs motiv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List_20_Contents" style:display-name="List Contents" style:family="paragraph" style:parent-style-name="Standard" style:class="html">
      <style:paragraph-properties fo:margin-left="1cm"/>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53M44S</meta:editing-duration>
    <meta:editing-cycles>78</meta:editing-cycles>
    <meta:generator>LibreOffice/25.2.4.3$Windows_X86_64 LibreOffice_project/33e196637044ead23f5c3226cde09b47731f7e27</meta:generator>
    <meta:creation-date>2025-12-13T08:33:05.842320600</meta:creation-date>
    <dc:title>Format de texte</dc:title>
    <dc:date>2026-01-04T01:34:53.294676300</dc:date>
    <meta:document-statistic meta:table-count="0" meta:image-count="0" meta:object-count="0" meta:page-count="3" meta:paragraph-count="30" meta:word-count="837" meta:character-count="5044" meta:non-whitespace-character-count="4236"/>
    <meta:template xlink:type="simple" xlink:actuate="onRequest" xlink:title="Format de texte" xlink:href="file:///C:/Users/Clément/AppData/Roaming/LibreOffice/4/user/template/Format%20de%20texte1.ott" meta:date="2025-12-13T08:33:05.542099300"/>
  </office:meta>
</office:document-meta>
</file>