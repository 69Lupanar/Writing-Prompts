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4b4893" officeooo:paragraph-rsid="004b4893"/>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4c1289" officeooo:paragraph-rsid="004c1289"/>
    </style:style>
    <style:style style:name="P9" style:family="paragraph" style:parent-style-name="Standard">
      <style:text-properties officeooo:rsid="001bf89c" officeooo:paragraph-rsid="001bf89c"/>
    </style:style>
    <style:style style:name="P10" style:family="paragraph" style:parent-style-name="Standard">
      <style:text-properties officeooo:rsid="004c2602" officeooo:paragraph-rsid="004c2602"/>
    </style:style>
    <style:style style:name="P11" style:family="paragraph" style:parent-style-name="Standard">
      <style:text-properties officeooo:rsid="004c2602" officeooo:paragraph-rsid="004eb39f"/>
    </style:style>
    <style:style style:name="P12" style:family="paragraph" style:parent-style-name="Standard">
      <style:text-properties officeooo:rsid="006336b6" officeooo:paragraph-rsid="006336b6"/>
    </style:style>
    <style:style style:name="P13" style:family="paragraph" style:parent-style-name="Standard">
      <style:text-properties officeooo:rsid="005224c6" officeooo:paragraph-rsid="00191d8b"/>
    </style:style>
    <style:style style:name="P14" style:family="paragraph" style:parent-style-name="Standard">
      <style:text-properties officeooo:rsid="005224c6" officeooo:paragraph-rsid="005224c6"/>
    </style:style>
    <style:style style:name="P15" style:family="paragraph" style:parent-style-name="Standard">
      <style:text-properties officeooo:rsid="005229df" officeooo:paragraph-rsid="005229df"/>
    </style:style>
    <style:style style:name="P16" style:family="paragraph" style:parent-style-name="Standard">
      <style:text-properties officeooo:rsid="006a93f9" officeooo:paragraph-rsid="0052da66"/>
    </style:style>
    <style:style style:name="P17" style:family="paragraph" style:parent-style-name="Standard">
      <style:text-properties officeooo:rsid="006bc516" officeooo:paragraph-rsid="00544426"/>
    </style:style>
    <style:style style:name="P18" style:family="paragraph" style:parent-style-name="Standard">
      <style:text-properties officeooo:rsid="006bc516" officeooo:paragraph-rsid="0054d228"/>
    </style:style>
    <style:style style:name="P19" style:family="paragraph" style:parent-style-name="Standard">
      <style:text-properties officeooo:rsid="0033ed47" officeooo:paragraph-rsid="003c07fd"/>
    </style:style>
    <style:style style:name="P20" style:family="paragraph" style:parent-style-name="Standard">
      <style:text-properties officeooo:rsid="00583fe9" officeooo:paragraph-rsid="005cca59"/>
    </style:style>
    <style:style style:name="P21" style:family="paragraph" style:parent-style-name="Standard">
      <style:text-properties officeooo:rsid="0033ed47" officeooo:paragraph-rsid="0033ed47"/>
    </style:style>
    <style:style style:name="P22" style:family="paragraph" style:parent-style-name="Heading_20_1">
      <style:text-properties officeooo:rsid="0036a4f7" officeooo:paragraph-rsid="0036a4f7"/>
    </style:style>
    <style:style style:name="P23" style:family="paragraph" style:parent-style-name="Standard">
      <style:text-properties officeooo:rsid="00191d8b" officeooo:paragraph-rsid="0036a4f7"/>
    </style:style>
    <style:style style:name="P24" style:family="paragraph" style:parent-style-name="Standard">
      <style:text-properties officeooo:rsid="005ce499" officeooo:paragraph-rsid="005ce499"/>
    </style:style>
    <style:style style:name="P25" style:family="paragraph" style:parent-style-name="Heading_20_1">
      <style:text-properties officeooo:rsid="001a3d83" officeooo:paragraph-rsid="001a3d83"/>
    </style:style>
    <style:style style:name="P26" style:family="paragraph" style:parent-style-name="Standard">
      <style:text-properties officeooo:rsid="00191d8b" officeooo:paragraph-rsid="001a3d83"/>
    </style:style>
    <style:style style:name="P27" style:family="paragraph" style:parent-style-name="Heading_20_1">
      <style:text-properties officeooo:rsid="0019270e" officeooo:paragraph-rsid="0019270e"/>
    </style:style>
    <style:style style:name="P28" style:family="paragraph" style:parent-style-name="Standard">
      <style:text-properties officeooo:rsid="00191d8b" officeooo:paragraph-rsid="0019270e"/>
    </style:style>
    <style:style style:name="P29" style:family="paragraph" style:parent-style-name="Standard">
      <style:text-properties officeooo:rsid="004430bc" officeooo:paragraph-rsid="004430bc"/>
    </style:style>
    <style:style style:name="P30" style:family="paragraph" style:parent-style-name="Standard">
      <style:text-properties officeooo:rsid="00458ed1" officeooo:paragraph-rsid="00458ed1"/>
    </style:style>
    <style:style style:name="T1" style:family="text">
      <style:text-properties officeooo:rsid="006203e1"/>
    </style:style>
    <style:style style:name="T2" style:family="text">
      <style:text-properties officeooo:rsid="0061e789"/>
    </style:style>
    <style:style style:name="T3" style:family="text">
      <style:text-properties officeooo:rsid="004eb39f"/>
    </style:style>
    <style:style style:name="T4" style:family="text">
      <style:text-properties officeooo:rsid="00583fe9"/>
    </style:style>
    <style:style style:name="T5" style:family="text">
      <style:text-properties officeooo:rsid="0052da66"/>
    </style:style>
    <style:style style:name="T6" style:family="text">
      <style:text-properties officeooo:rsid="006bc516"/>
    </style:style>
    <style:style style:name="T7" style:family="text">
      <style:text-properties officeooo:rsid="005229df"/>
    </style:style>
    <style:style style:name="T8" style:family="text">
      <style:text-properties officeooo:rsid="00530dbe"/>
    </style:style>
    <style:style style:name="T9" style:family="text">
      <style:text-properties officeooo:rsid="006bd873"/>
    </style:style>
    <style:style style:name="T10" style:family="text">
      <style:text-properties officeooo:rsid="00544426"/>
    </style:style>
    <style:style style:name="T11" style:family="text">
      <style:text-properties officeooo:rsid="0054d228"/>
    </style:style>
    <style:style style:name="T12" style:family="text">
      <style:text-properties officeooo:rsid="0054f67d"/>
    </style:style>
    <style:style style:name="T13" style:family="text">
      <style:text-properties officeooo:rsid="00551734"/>
    </style:style>
    <style:style style:name="T14" style:family="text">
      <style:text-properties officeooo:rsid="00564c92"/>
    </style:style>
    <style:style style:name="T15" style:family="text">
      <style:text-properties officeooo:rsid="0057acaa"/>
    </style:style>
    <style:style style:name="T16" style:family="text">
      <style:text-properties officeooo:rsid="0059514a"/>
    </style:style>
    <style:style style:name="T17" style:family="text">
      <style:text-properties officeooo:rsid="005b142e"/>
    </style:style>
    <style:style style:name="T18" style:family="text">
      <style:text-properties officeooo:rsid="005ea24d"/>
    </style:style>
    <style:style style:name="T19" style:family="text">
      <style:text-properties officeooo:rsid="0063d79a"/>
    </style:style>
    <style:style style:name="T20" style:family="text">
      <style:text-properties officeooo:rsid="0063f5e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M</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2</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P8">Homme de 50 ans au début de l’histoire. <text:span text:style-name="T1">Des c</text:span><text:span text:style-name="T2">heveux et yeux grisonnants, des pattes d’oie et des rides trahissent son âge, mais son </text:span>ambition transparaît dans son regard et la force de sa voix.</text:p>
      <text:p text:style-name="P9"/>
      <text:h text:style-name="P6" text:outline-level="1"><text:bookmark-start text:name="__RefHeading___Toc715_353095010 Copie 1"/>Personnalité<text:bookmark-end text:name="__RefHeading___Toc715_353095010 Copie 1"/></text:h>
      <text:p text:style-name="P7"/>
      <text:p text:style-name="P10">Solitaire et carriériste, AM (de son vrai nom Andrew Matthews) a dévoué sa vie à la création et l’expansion de NextHuman Industries, un complexe militaro-industriel s’étendant sur plusieurs états des États-Unis. Primairement focalisé sur la création de drones de combat pour la police et l’armée, l’entreprise s’est récemment diversifié pour offrir des androïdes personnels aux personnalités les plus riches et aux lieux d’éducation, cherchant à étendre son influence sur tout le pays, reflétant son ambition intarissable. </text:p>
      <text:p text:style-name="P10"/>
      <text:p text:style-name="P11"><text:span text:style-name="T3">AM croit en la supériorité de la machine et en la loi du plus fort. Il</text:span> a horreur de la compétition, n’hésitant pas à user de son argent et de ses contacts pour recruter tout potentiel para-humain pouvant faire de l’ombre à ses produits, voire éliminer les plus tenaces. <text:span text:style-name="T4">Il est très facilement frustré par tout échec, et se remémore encore de ce qu’il voit comme la trahison de son ancien meilleur ami, pleurant malgré lui la perte d’un tel intellect et potentiel.</text:span></text:p>
      <text:p text:style-name="P11"/>
      <text:p text:style-name="P12">Bien qu’il soit intelligent, il saisit mal les implications sur le long-terme de ses actes, et s’est à plusieurs reprises créé des ennemis en étendant son influence sans égard des <text:soft-page-break/>conséquences. C’est ce qui lui vaudra la colère de nombreux personnages au cours de l’histoire, notamment Amélia, d’une part car son influence a causé la pauvreté de sa famille le divorce de ses parents et l’apparition de ses pouvoirs, mais aussi car il tentera de l’éliminer pour l’empêcher d’aider Astro.</text:p>
      <text:p text:style-name="P11"/>
      <text:h text:style-name="P6" text:outline-level="1"><text:bookmark-start text:name="__RefHeading___Toc715_353095010 Copie 2"/>Passé<text:bookmark-end text:name="__RefHeading___Toc715_353095010 Copie 2"/></text:h>
      <text:p text:style-name="P13"/>
      <text:p text:style-name="P14">AM en tant que para-humain est arrivé sur la scène paranormale du jour au lendemain, offrant discrètement ses services et drones aux plus offrants, tout en gardant profil bas pour éviter d’attirer l’attention sur ses éventuelles transactions illégales. Ses nombreux services rendus aux différents groupes d’intérêt du pays lui ont permis d’acquérir assez d’argent pour prendre sa retraite de Super sur le terrain.</text:p>
      <text:p text:style-name="P14"/>
      <text:p text:style-name="P15">Son histoire se serait arrêté là s’il n’avait pas découvert les recherches d’un autre para-humain, Oliver Simpsons, au sujet de l’avancement de l’IA et la possibilité de créer des androïdes capables d’émuler à la perfection l’apparence et les comportements humains. Intéressé par l’idée d’acquérir de nouvelles technologies, Andrew contacte Oliver et utilise l’argent de sa retraite pour fonder une start-up vitrine masquant le Projet Mirage, leur expérimentation commune destinée à créer le robot parfait, capable de simuler les émotions humaines et de s’intégrer dans la société, évoluant en étudiant son entourage. Très vite, Andrew comprend le potentiel illimité de leur accomplissement, leur permettant de créer le robot de combat parfait, taillé pour l’infiltration et l’assassinat, pouvant passer inaperçu auprès des hommes ; le parfait soldat pour vendre aux gouvernements et milices privées pour engranger des richesses comme jamais.</text:p>
      <text:p text:style-name="P15"/>
      <text:p text:style-name="P15">Si Andrew était enthousiaste quant au promis succès financier de ce projet, <text:span text:style-name="T5">Oliver était ouvertement contre cet usage du Projet Mirage, préférant converser leur création comme exemple de l’harmonie possible entre hommes et machines, ces dernières assistant les premiers dans leurs tâches les plus pénibles comme dangereuses ; et souhaitant mettre en place des lois de la robotique et des régulations pour empêcher tout usage déviant de leur produit. </text:span><text:span text:style-name="T6">Face à ce désaccord, les deux dirigeants de la toute jeune start-up dissolvent déjà leur alliance, mettant fin au Projet Mirage sans avoir décidé du propriétaire d’Astro.</text:span></text:p>
      <text:p text:style-name="P16"/>
      <text:p text:style-name="P17">Cependant, <text:span text:style-name="T7">Andrew</text:span> ne veut pas en rester là, et peu avant le débarras des locaux, tente de subtiliser les plans et le code du Projet Mirage afin de les utiliser pour ses propres desseins. Cependant, <text:span text:style-name="T8">Oliver</text:span> ayant prévu un coup en traître de ce genre, s’était déjà rendu sur place et avait déjà effacé les données résultant du Projet Mirage, empêchant son ancien associé de créer de futures copies d’Astro. Fou de rage en apprenant qu’il avait été doublé, <text:span text:style-name="T7">Andrew</text:span> assassine <text:span text:style-name="T8">Oliver</text:span> et tente de se débarrasser d’Astro qui avait choisi de protéger son créateur. </text:p>
      <text:p text:style-name="P17"/>
      <text:p text:style-name="P18"><text:span text:style-name="T8">Oliver</text:span><text:span text:style-name="T9"> succombe à ses blessures, tandis que </text:span><text:span text:style-name="T7">Andrew</text:span><text:span text:style-name="T9"> tente de sauver le peu de ressources qu’il peut. </text:span><text:span text:style-name="T10">Il décide alors de fonder NextHuman Industries, fondée sur les cendres </text:span><text:span text:style-name="T11">de</text:span><text:span text:style-name="T10"> leur ancienne entreprise OSAM Institute, </text:span><text:span text:style-name="T11">et reprend le travail de son ancien collaborateur</text:span><text:span text:style-name="T9"> afin </text:span><text:soft-page-break/><text:span text:style-name="T9">de créer ses propres androïdes dotées d’une IA avancée, mais </text:span><text:span text:style-name="T12">ne parviendra jamais à recréer</text:span><text:span text:style-name="T9"> l’étincelle qui caractérise les créations d’OS. </text:span><text:span text:style-name="T13">Frustré par cet échec, il décide d’abandonner cette direction, préférant étendre son influence et insérer ses créations dans toutes les strates de la société, de l’éducation au divertissement en passant par la police et le militaire, afin d’obtenir le plus d’influence possible sur le pays </text:span><text:span text:style-name="T14">pour démontrer à Oliver que son idéal n’était qu’une illusion.</text:span></text:p>
      <text:p text:style-name="P5"/>
      <text:h text:style-name="P6" text:outline-level="1"><text:bookmark-start text:name="__RefHeading___Toc715_353095010 Copie 3"/>Objectifs<text:bookmark-end text:name="__RefHeading___Toc715_353095010 Copie 3"/></text:h>
      <text:p text:style-name="P7"/>
      <text:p text:style-name="P19">En tant que <text:span text:style-name="T15">Super, Andrew n’avait d’autre ambition que de profiter du climat politique du monde para-humain pour s’enrichir, offrant ses services de mercenaire et d’Ingénieur pour envoyer ses drones dans des missions de combat et d’assassinat. </text:span><text:span text:style-name="T4">Quand les choses ont commencé à s’envenimer et menacer son commerce, il a préféré se retirer quelques années et vivre de son argent collecté, AM disparaissant alors de la scène para-humaine.</text:span></text:p>
      <text:p text:style-name="P19"/>
      <text:p text:style-name="P20">Quand des années plus tard, il fait équipe avec OS pour réaliser le Projet Mirage, il sent l’immense potentiel financier que celui-ci peut lui apporter et tente d’en convaincre son partenaire, en vain. Il prend alors les rênes de son destin, fondant sa propre entreprise et poursuivant ses rêves de gloire et d’argent, à nouveau seul. </text:p>
      <text:p text:style-name="P20"/>
      <text:p text:style-name="P20"><text:span text:style-name="T16">Son but est maintenant d’étendre son influence à travers le pays, infiltrant toutes les strates de la société dans le but de pouvoir manipuler le cours du pays à sa guise tout en engrangeant le plus d’argent que possible, mais surtout, pour prouver à son vieil ami défunt que la vision d’AM était la plus ju</text:span><text:span text:style-name="T17">ste.</text:span></text:p>
      <text:p text:style-name="P21"/>
      <text:h text:style-name="P22" text:outline-level="1"><text:bookmark-start text:name="__RefHeading___Toc715_353095010 Copie 3 Copie 1"/>Pouvoirs<text:bookmark-end text:name="__RefHeading___Toc715_353095010 Copie 3 Copie 1"/></text:h>
      <text:p text:style-name="P23"/>
      <text:p text:style-name="P24">AM est un Ingénieur capable de créer des robots de combat, ceux-ci pouvant <text:span text:style-name="T18">venir sous</text:span> toutes sortes de formes pour pouvoir couvrir le plus de missions que possible pour son compte : Drones volants, soldats, espions, etc. Cependant, si ses créations sont variées, elles ne sont pas pour autant très adaptables, et perdent facilement l’avantage dès que les conditions ne sont plus optimales, comme un changement de cible ou d’environnement. Elles sont très efficaces pour tuer et espionner, mais pas pour grand-chose d’autre.</text:p>
      <text:p text:style-name="P24"><text:line-break/>C’est dans cette optique que AM avait contacté OS, espérant pouvoir utiliser sa paratechnologie pour compenser les faiblesses de ses robots, combinant leur puissance de feu à l’intelligence et l’adaptabilité suprêmes des IAs d’OS.</text:p>
      <text:p text:style-name="P24"/>
      <text:h text:style-name="P25" text:outline-level="1"><text:bookmark-start text:name="__RefHeading___Toc715_353095010 Copie 4 Copie 1"/>Rôle dans l’histoire<text:bookmark-end text:name="__RefHeading___Toc715_353095010 Copie 4 Copie 1"/></text:h>
      <text:p text:style-name="P26"/>
      <text:p text:style-name="P12">Antagoniste majeur de l’histoire. Avant et pendant l’histoire, ce sont ses actions qui, <text:soft-page-break/>volontairement ou non, directement ou non, causeront du tort à beaucoup de gens, notamment les para-humains forcés de se tourner vers le crime pour subsister. AM incarne le capitalisme sans limite, cherchant le contrôle total de la société et les dégâts sérieux comme subtils qu’il peut causer. Il tentera à plusieurs reprises de recruter Amélia pour utiliser ses talents d’Ingénieur à sa cause mais, voyant ses refus répétés et l’assistance qu’elle apporte à Astro, préférera l’éliminer, ce qui lui peindra une cible dans le dos.</text:p>
      <text:p text:style-name="P5"/>
      <text:h text:style-name="P27" text:outline-level="1"><text:bookmark-start text:name="__RefHeading___Toc715_353095010 Copie 4"/>Relations<text:bookmark-end text:name="__RefHeading___Toc715_353095010 Copie 4"/></text:h>
      <text:p text:style-name="P28"/>
      <text:p text:style-name="P29"><text:span text:style-name="T19">OS</text:span> : <text:span text:style-name="T19">Même si AM ne cherchait à s’allier à OS que pour utiliser sa paratechnologie, il respectait tout de même son intelligence et son ingéniosité, trouvant des solutions à des problèmes scientifiques que même AM n’aurait jamais imaginé. Leur dissociation s’est formée suite à leurs différences idéologiques, conduisant à la terminaison du Projet Mirage par OS et au meurtre de ce dernier. AM est encore frustré à ce jour par ce qu’il voit comme la trahison d’OS, et cherche constamment à prouver à son ancien ami défunt la naïveté de sa vision idéaliste du monde, et que la loi du plus fort règne en maître.</text:span></text:p>
      <text:p text:style-name="P29"/>
      <text:p text:style-name="P30"><text:span text:style-name="T19">Astro</text:span> : <text:span text:style-name="T20">A la conclusion du Projet Mirage, AM ne voyait en Astro que le potentiel que sa naissance ouvrait pour l’avenir de l’entreprise, plutôt que la personnalité qui se cachait sous son alliage de métal. Il tentera de se débarrasser d’elle pour effacer les preuves de son assassinat d’OS mais, voyant qu’elle a survécu, tentera de la détruire par tous les moyens, craignant que sa mémoire ne lui revienne et qu’elle ne serve d’arme dirigée contre lui.</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3H10M47S</meta:editing-duration>
    <meta:editing-cycles>84</meta:editing-cycles>
    <meta:generator>LibreOffice/25.2.4.3$Windows_X86_64 LibreOffice_project/33e196637044ead23f5c3226cde09b47731f7e27</meta:generator>
    <meta:creation-date>2025-12-13T08:33:05.842320600</meta:creation-date>
    <dc:title>Format de texte</dc:title>
    <dc:date>2025-12-16T10:23:41.830950300</dc:date>
    <meta:document-statistic meta:table-count="0" meta:image-count="0" meta:object-count="0" meta:page-count="4" meta:paragraph-count="34" meta:word-count="1393" meta:character-count="8650" meta:non-whitespace-character-count="7287"/>
    <meta:template xlink:type="simple" xlink:actuate="onRequest" xlink:title="Format de texte" xlink:href="file:///C:/Users/Clément/AppData/Roaming/LibreOffice/4/user/template/Format%20de%20texte1.ott" meta:date="2025-12-13T08:33:05.542099300"/>
  </office:meta>
</office:document-meta>
</file>