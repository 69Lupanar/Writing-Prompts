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6a91c7" officeooo:paragraph-rsid="006a91c7"/>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be52b" officeooo:paragraph-rsid="004be52b"/>
    </style:style>
    <style:style style:name="P9" style:family="paragraph" style:parent-style-name="Standard">
      <style:text-properties officeooo:rsid="006ae5d1" officeooo:paragraph-rsid="006ae5d1"/>
    </style:style>
    <style:style style:name="P10" style:family="paragraph" style:parent-style-name="Standard">
      <style:text-properties officeooo:rsid="001bf89c" officeooo:paragraph-rsid="001bf89c"/>
    </style:style>
    <style:style style:name="P11" style:family="paragraph" style:parent-style-name="Standard">
      <style:text-properties officeooo:rsid="0072c360" officeooo:paragraph-rsid="0072c360"/>
    </style:style>
    <style:style style:name="P12" style:family="paragraph" style:parent-style-name="Standard">
      <style:text-properties officeooo:rsid="006d0d28" officeooo:paragraph-rsid="006efd35"/>
    </style:style>
    <style:style style:name="P13" style:family="paragraph" style:parent-style-name="Standard">
      <style:text-properties officeooo:rsid="006efd35" officeooo:paragraph-rsid="006efd35"/>
    </style:style>
    <style:style style:name="P14" style:family="paragraph" style:parent-style-name="Standard">
      <style:text-properties officeooo:rsid="006efd35" officeooo:paragraph-rsid="007221f5"/>
    </style:style>
    <style:style style:name="P15" style:family="paragraph" style:parent-style-name="Standard">
      <style:text-properties officeooo:rsid="0072b33f" officeooo:paragraph-rsid="0072b33f"/>
    </style:style>
    <style:style style:name="P16" style:family="paragraph" style:parent-style-name="Standard">
      <style:text-properties officeooo:rsid="0061f596" officeooo:paragraph-rsid="0061f596"/>
    </style:style>
    <style:style style:name="P17" style:family="paragraph" style:parent-style-name="Heading_20_1">
      <style:text-properties officeooo:rsid="0036a4f7" officeooo:paragraph-rsid="0036a4f7"/>
    </style:style>
    <style:style style:name="P18" style:family="paragraph" style:parent-style-name="Standard">
      <style:text-properties officeooo:rsid="00191d8b" officeooo:paragraph-rsid="0036a4f7"/>
    </style:style>
    <style:style style:name="P19" style:family="paragraph" style:parent-style-name="Standard">
      <style:text-properties officeooo:rsid="0074c38f" officeooo:paragraph-rsid="0074c38f"/>
    </style:style>
    <style:style style:name="P20" style:family="paragraph" style:parent-style-name="Standard">
      <style:text-properties officeooo:rsid="0076528d" officeooo:paragraph-rsid="0076528d"/>
    </style:style>
    <style:style style:name="P21" style:family="paragraph" style:parent-style-name="Heading_20_1">
      <style:text-properties officeooo:rsid="001a3d83" officeooo:paragraph-rsid="001a3d83"/>
    </style:style>
    <style:style style:name="P22" style:family="paragraph" style:parent-style-name="Standard">
      <style:text-properties officeooo:rsid="00191d8b" officeooo:paragraph-rsid="001a3d83"/>
    </style:style>
    <style:style style:name="P23" style:family="paragraph" style:parent-style-name="Standard">
      <style:text-properties officeooo:rsid="007663d9" officeooo:paragraph-rsid="007663d9"/>
    </style:style>
    <style:style style:name="P24" style:family="paragraph" style:parent-style-name="Heading_20_1">
      <style:text-properties officeooo:rsid="0019270e" officeooo:paragraph-rsid="0019270e"/>
    </style:style>
    <style:style style:name="P25" style:family="paragraph" style:parent-style-name="Standard">
      <style:text-properties officeooo:rsid="00191d8b" officeooo:paragraph-rsid="0019270e"/>
    </style:style>
    <style:style style:name="P26" style:family="paragraph" style:parent-style-name="Standard">
      <style:text-properties officeooo:rsid="004430bc" officeooo:paragraph-rsid="004430bc"/>
    </style:style>
    <style:style style:name="P27" style:family="paragraph" style:parent-style-name="Standard">
      <style:text-properties officeooo:rsid="004430bc" officeooo:paragraph-rsid="005e99be"/>
    </style:style>
    <style:style style:name="P28" style:family="paragraph" style:parent-style-name="Standard">
      <style:text-properties officeooo:rsid="00458ed1" officeooo:paragraph-rsid="005e99be"/>
    </style:style>
    <style:style style:name="T1" style:family="text">
      <style:text-properties officeooo:rsid="006a91c7"/>
    </style:style>
    <style:style style:name="T2" style:family="text">
      <style:text-properties officeooo:rsid="001d81b6"/>
    </style:style>
    <style:style style:name="T3" style:family="text">
      <style:text-properties officeooo:rsid="001f437d"/>
    </style:style>
    <style:style style:name="T4" style:family="text">
      <style:text-properties officeooo:rsid="006b6c8f"/>
    </style:style>
    <style:style style:name="T5" style:family="text">
      <style:text-properties officeooo:rsid="007488eb"/>
    </style:style>
    <style:style style:name="T6" style:family="text">
      <style:text-properties officeooo:rsid="006efd35"/>
    </style:style>
    <style:style style:name="T7" style:family="text">
      <style:text-properties officeooo:rsid="0070269b"/>
    </style:style>
    <style:style style:name="T8" style:family="text">
      <style:text-properties officeooo:rsid="006fd8f9"/>
    </style:style>
    <style:style style:name="T9" style:family="text">
      <style:text-properties officeooo:rsid="007221f5"/>
    </style:style>
    <style:style style:name="T10" style:family="text">
      <style:text-properties officeooo:rsid="0076528d"/>
    </style:style>
    <style:style style:name="T11" style:family="text">
      <style:text-properties officeooo:rsid="0076867a"/>
    </style:style>
    <style:style style:name="T12" style:family="text">
      <style:text-properties officeooo:rsid="00781ac0"/>
    </style:style>
    <style:style style:name="T13" style:family="text">
      <style:text-properties officeooo:rsid="00798b23"/>
    </style:style>
    <style:style style:name="T14" style:family="text">
      <style:text-properties officeooo:rsid="007a4fd3"/>
    </style:style>
    <style:style style:name="T15" style:family="text">
      <style:text-properties officeooo:rsid="005e99be"/>
    </style:style>
    <style:style style:name="T16" style:family="text">
      <style:text-properties officeooo:rsid="007b8537"/>
    </style:style>
    <style:style style:name="T17" style:family="text">
      <style:text-properties officeooo:rsid="007c80d7"/>
    </style:style>
    <style:style style:name="T18" style:family="text">
      <style:text-properties officeooo:rsid="007e750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a</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text:span text:style-name="T1">Jeune fille</text:span> de <text:span text:style-name="T1">17</text:span> ans, <text:span text:style-name="T1">cheveux noirs</text:span> aux yeux bleus, <text:span text:style-name="T1">plutôt petite pour les filles de son âge au point de passer parfois pour une collégienne</text:span>. <text:span text:style-name="T2">Poitrine </text:span><text:span text:style-name="T1">très petite</text:span><text:span text:style-name="T2">, </text:span><text:span text:style-name="T3">taille </text:span><text:span text:style-name="T1">A</text:span><text:span text:style-name="T2">, </text:span><text:span text:style-name="T1">son corps juvénile la fait complexer par rapport aux corps et poitrines dévelopés de ses camarades de classe</text:span></text:p>
      <text:p text:style-name="P8"/>
      <text:p text:style-name="P9">En adéquation avec sa personnalité discrète, elle porte des vêtements noirs et épais, cherchant à se fondre dans la masse et à ne pas se faire remarquer.</text:p>
      <text:p text:style-name="P10"/>
      <text:h text:style-name="P6" text:outline-level="1"><text:bookmark-start text:name="__RefHeading___Toc715_353095010 Copie 1"/>Personnalité<text:bookmark-end text:name="__RefHeading___Toc715_353095010 Copie 1"/></text:h>
      <text:p text:style-name="P7"/>
      <text:p text:style-name="P9">Mina a une personnalité proche de celle d’Amélia, étant timide et discrète, cherchant à éviter d’attirer l’attention et les ennuis. Elle a du mal à se faire des amis, mais s’accroche férocement à ceux qu’elle possède, notamment ses camarades Sentinelles.</text:p>
      <text:p text:style-name="P9"/>
      <text:p text:style-name="P9">Mina est une bisexuelle qui souffre d’hypersexualité, une condition psychologique qui la pousse à fantasmer compulsivement sur ses proches, notamment Edward, le capitaine des Sentinelles et chef de son équipe, ainsi qu’Amélia, dont elle découvrira plus tard son activité de mannequin, strip-teaseuse et star du porno. <text:span text:style-name="T4">Son hypersexualité entraîne des troubles de l’attention et une grande détresse dans son quotidien, Mina étant souvent sujette à des crises régulières de dépression.</text:span></text:p>
      <text:p text:style-name="P5"/>
      <text:p text:style-name="P11">Elle sait cependant se montrer aussi courageuse, n’ayant pas peur de braver les interdits et <text:soft-page-break/>les dangers pour se battre contre d’autres para-humains ; <text:span text:style-name="T5">mais Mina confond parfois son courage avec son impulsivité, la jeune fille agissant le plus souvent avant de réfléchir, ce qui peut lui attirer – ainsi qu’à ses compagnons – des ennuis.</text:span></text:p>
      <text:p text:style-name="P11"/>
      <text:h text:style-name="P6" text:outline-level="1"><text:bookmark-start text:name="__RefHeading___Toc715_353095010 Copie 2"/>Passé<text:bookmark-end text:name="__RefHeading___Toc715_353095010 Copie 2"/></text:h>
      <text:p text:style-name="P7"/>
      <text:p text:style-name="P12">La famille de Mina vient de l’Oregon ; ses parents ont déménagé pour protéger leur fille d’une campagne de harcèlement à son ancien lycée dû à la découverte de son hypersexualité, ce qui a plongé Mina dans une longue dépression. <text:span text:style-name="T6">Son désir de se faire oublier de ses camarades de classe a fait naître chez elle le pouvoir de se fondre dans les ombres d’autrui ; elle décide alors de devenir un héros et rejoindre la NPRB, suivant les pas de sa grande sœur, </text:span><text:span text:style-name="T7">Erica</text:span><text:span text:style-name="T6">, ayant quitté le domicile familial pour devenir une héroïne de renom sous le p</text:span><text:span text:style-name="T8">s</text:span><text:span text:style-name="T6">eudonyme de </text:span><text:span text:style-name="T8">Prometheus</text:span><text:span text:style-name="T6">, en hommage à ses pouvoirs de </text:span><text:span text:style-name="T7">feu</text:span><text:span text:style-name="T6"> </text:span><text:span text:style-name="T7">et au Titan offrant le feu des dieux aux Hommes.</text:span></text:p>
      <text:p text:style-name="P13"/>
      <text:p text:style-name="P14">Cependant, malgré ses efforts, Mina n’est pas considérée à sa juste valeur, étant toujours comparée par ses collègues à sa grande sœur plus célèbre. <text:span text:style-name="T9">Son corps à l’apparence juvénile et sa voix encore peu développée ne l’aident pas à être prise au sérieux, et son manque d’exploits héroïques dû à son inexpérience sur le terrain,</text:span> <text:span text:style-name="T9">la forcent à</text:span> vivre <text:span text:style-name="T9">constamment</text:span> dans l’ombre de <text:span text:style-name="T9">Prometheus.</text:span></text:p>
      <text:p text:style-name="P5"/>
      <text:h text:style-name="P6" text:outline-level="1"><text:bookmark-start text:name="__RefHeading___Toc715_353095010 Copie 3"/>Objectifs<text:bookmark-end text:name="__RefHeading___Toc715_353095010 Copie 3"/></text:h>
      <text:p text:style-name="P7"/>
      <text:p text:style-name="P15">Mina souhaite simplement se faire des amis et laisser son passé derrière elle, mais son hypersexualité l’empêche de former des relations saines avec les jeunes de son âge, brouillant sa perception des concepts de l’amitié et de l’amour avec son désir sexuel. Elle souhaite aussi s’affirmer en tant qu’héroïne, n’hésitant pas à braver les interdits et les dangers pour se retrouver sur le front lors des combats de rue malgré son inexpérience, ce qui lui attirera des ennuis.</text:p>
      <text:p text:style-name="P16"/>
      <text:h text:style-name="P17" text:outline-level="1"><text:bookmark-start text:name="__RefHeading___Toc715_353095010 Copie 3 Copie 1"/>Pouvoirs<text:bookmark-end text:name="__RefHeading___Toc715_353095010 Copie 3 Copie 1"/></text:h>
      <text:p text:style-name="P18"/>
      <text:p text:style-name="P19">A l’image de sa personnalité <text:span text:style-name="T10">discrète et son désir d’éviter la confrontation, Mina a le pouvoir de son fondre dans les ombre d’autrui, humains comme machines, et de voir le monde depuis leur point de vue sans que personne ne soupçonne sa présence. De ce fait, elle est une espionne redoutable, pouvant s’infiltrer là où personne d’autre ne le pourrait, et pouvant prendre en filature n’importe qui. </text:span><text:span text:style-name="T11">Sa seule faiblesse est la lumière trop vive projetée directement sur l’ombre qui l’habite, ce qui la force immédiatement à reprendre forme humaine.</text:span></text:p>
      <text:p text:style-name="P19"/>
      <text:p text:style-name="P20">Son pouvoir mis à part, elle fait une piètre combattante, sa stature frêle et sa petite faille <text:soft-page-break/>l’empêchant de battre la plupart des adversaires qu’elle croise au corps-à-corps. Elle n’est cependant pas autant sans ressources, utilisant son pouvoir pour soutenir ses coéquipiers, en distrayant ou en gênant sa cible pour permettre à ses coéquipiers de l’abattre.</text:p>
      <text:p text:style-name="P19"/>
      <text:h text:style-name="P21" text:outline-level="1"><text:bookmark-start text:name="__RefHeading___Toc715_353095010 Copie 4 Copie 1"/>Rôle dans l’histoire<text:bookmark-end text:name="__RefHeading___Toc715_353095010 Copie 4 Copie 1"/></text:h>
      <text:p text:style-name="P22"/>
      <text:p text:style-name="P23">Mina a un rôle mineur dans l’intrigue, servant plus à développer la vie universitaire d’Amélia. <text:span text:style-name="T11">Ayant au début flashé sur Amélia, son obsession la poussera à créer des deepfakes porno d’elle pour se soulager, puis à découvrir sa vie de star du porno et son poste de strip-teaseuse au Roaring Rides. </text:span><text:span text:style-name="T12">Elle tentera de s’y introduire pour prendre des photos d’elle </text:span><text:span text:style-name="T13">avant de s’enfuir, mais Cobra, qui passait dans le coin avec son gang, parvient à l’arrêter et permet à Amélia d’effacer les photos, et à elle-même d’effacer la dette qu’elle a envers Amélia. </text:span><text:span text:style-name="T14">Après que Mina s’excuse auprès d’elle, Amélia acceptera de l’excuser en attendant de trouver une punition appropriée pour elle.</text:span></text:p>
      <text:p text:style-name="P5"/>
      <text:h text:style-name="P24" text:outline-level="1"><text:bookmark-start text:name="__RefHeading___Toc715_353095010 Copie 4"/>Relations<text:bookmark-end text:name="__RefHeading___Toc715_353095010 Copie 4"/></text:h>
      <text:p text:style-name="P25"/>
      <text:p text:style-name="P26">S<text:span text:style-name="T15">a famille</text:span> : <text:span text:style-name="T16">Mina aime beaucoup sa famille, en particulier sa grande sœur Erica, qu’elle traite comme un rôle modèle. Elle est cependant chagrinée d’être éclipsée par elle dans sa vie normale comme celle de héros.</text:span></text:p>
      <text:p text:style-name="P27"/>
      <text:p text:style-name="P28"><text:span text:style-name="T15">Amélia</text:span> : <text:span text:style-name="T17">Mina voit en Vulcan un autre rôle modèle plus « raisonnable », la jeune fille s’attachant rapidement à la nouvelle héroïne </text:span><text:span text:style-name="T18">de par ses gadgets et sa bravoure</text:span><text:span text:style-name="T17">. Dans la vie réelle, Mina aime beaucoup Amélia, et finit par développer une obsession sexuelle envers elle, ce qui nuira à leur relation. Elle réussira cependant à réparer ses bêtises et à l’aider lors de la recherche de preuves contre NextHuman Industries ainsi que durant le combat final. Elle repaiera ses erreurs envers elle en rejoignant à son tour le Roaring Rides, travaillant comme strip-teaseuse aux côtés d’Améli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H31M22S</meta:editing-duration>
    <meta:editing-cycles>106</meta:editing-cycles>
    <meta:generator>LibreOffice/25.2.4.3$Windows_X86_64 LibreOffice_project/33e196637044ead23f5c3226cde09b47731f7e27</meta:generator>
    <meta:creation-date>2025-12-13T08:33:05.842320600</meta:creation-date>
    <dc:title>Format de texte</dc:title>
    <dc:date>2026-04-08T02:50:33.612321700</dc:date>
    <meta:document-statistic meta:table-count="0" meta:image-count="0" meta:object-count="0" meta:page-count="3" meta:paragraph-count="30" meta:word-count="922" meta:character-count="5589" meta:non-whitespace-character-count="4695"/>
    <meta:template xlink:type="simple" xlink:actuate="onRequest" xlink:title="Format de texte" xlink:href="file:///C:/Users/Clément/AppData/Roaming/LibreOffice/4/user/template/Format%20de%20texte1.ott" meta:date="2025-12-13T08:33:05.542099300"/>
  </office:meta>
</office:document-meta>
</file>