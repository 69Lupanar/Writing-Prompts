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itle">
      <style:text-properties officeooo:rsid="0061ab19" officeooo:paragraph-rsid="0061ab19"/>
    </style:style>
    <style:style style:name="P2" style:family="paragraph" style:parent-style-name="Standard">
      <style:text-properties officeooo:rsid="00106f63" officeooo:paragraph-rsid="00106f63"/>
    </style:style>
    <style:style style:name="P3" style:family="paragraph" style:parent-style-name="Subtitle">
      <style:text-properties officeooo:rsid="001907a9" officeooo:paragraph-rsid="001907a9"/>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Standard">
      <style:text-properties officeooo:rsid="00106f63" officeooo:paragraph-rsid="00191d8b"/>
    </style:style>
    <style:style style:name="P6" style:family="paragraph" style:parent-style-name="Heading_20_1">
      <style:text-properties officeooo:rsid="00191d8b" officeooo:paragraph-rsid="00191d8b"/>
    </style:style>
    <style:style style:name="P7" style:family="paragraph" style:parent-style-name="Standard">
      <style:text-properties officeooo:rsid="00191d8b" officeooo:paragraph-rsid="00191d8b"/>
    </style:style>
    <style:style style:name="P8" style:family="paragraph" style:parent-style-name="Standard">
      <style:text-properties officeooo:rsid="0061e789" officeooo:paragraph-rsid="0061e789"/>
    </style:style>
    <style:style style:name="P9" style:family="paragraph" style:parent-style-name="Standard">
      <style:text-properties officeooo:rsid="001bf89c" officeooo:paragraph-rsid="001bf89c"/>
    </style:style>
    <style:style style:name="P10" style:family="paragraph" style:parent-style-name="Standard">
      <style:text-properties officeooo:paragraph-rsid="0076b63c"/>
    </style:style>
    <style:style style:name="P11" style:family="paragraph" style:parent-style-name="Standard">
      <style:text-properties officeooo:paragraph-rsid="00637426"/>
    </style:style>
    <style:style style:name="P12" style:family="paragraph" style:parent-style-name="Standard">
      <style:text-properties officeooo:rsid="00671674" officeooo:paragraph-rsid="00671674"/>
    </style:style>
    <style:style style:name="P13" style:family="paragraph" style:parent-style-name="Standard">
      <style:text-properties officeooo:rsid="006a93f9" officeooo:paragraph-rsid="006a93f9"/>
    </style:style>
    <style:style style:name="P14" style:family="paragraph" style:parent-style-name="Standard">
      <style:text-properties officeooo:rsid="006bc516" officeooo:paragraph-rsid="006bc516"/>
    </style:style>
    <style:style style:name="P15" style:family="paragraph" style:parent-style-name="Standard">
      <style:text-properties officeooo:rsid="006cd66d" officeooo:paragraph-rsid="006cd66d"/>
    </style:style>
    <style:style style:name="P16" style:family="paragraph" style:parent-style-name="Standard">
      <style:text-properties officeooo:rsid="0033ed47" officeooo:paragraph-rsid="0033ed47"/>
    </style:style>
    <style:style style:name="P17" style:family="paragraph" style:parent-style-name="Heading_20_1">
      <style:text-properties officeooo:rsid="0036a4f7" officeooo:paragraph-rsid="0036a4f7"/>
    </style:style>
    <style:style style:name="P18" style:family="paragraph" style:parent-style-name="Standard">
      <style:text-properties officeooo:rsid="00191d8b" officeooo:paragraph-rsid="0036a4f7"/>
    </style:style>
    <style:style style:name="P19" style:family="paragraph" style:parent-style-name="Standard">
      <style:text-properties officeooo:rsid="006f492f" officeooo:paragraph-rsid="006f492f"/>
    </style:style>
    <style:style style:name="P20" style:family="paragraph" style:parent-style-name="Standard">
      <style:text-properties officeooo:rsid="00713a6d" officeooo:paragraph-rsid="00713a6d"/>
    </style:style>
    <style:style style:name="P21" style:family="paragraph" style:parent-style-name="Heading_20_1">
      <style:text-properties officeooo:rsid="001a3d83" officeooo:paragraph-rsid="0036a4f7"/>
    </style:style>
    <style:style style:name="P22" style:family="paragraph" style:parent-style-name="Heading_20_1">
      <style:text-properties officeooo:rsid="001a3d83" officeooo:paragraph-rsid="001a3d83"/>
    </style:style>
    <style:style style:name="P23" style:family="paragraph" style:parent-style-name="Standard">
      <style:text-properties officeooo:rsid="00191d8b" officeooo:paragraph-rsid="001a3d83"/>
    </style:style>
    <style:style style:name="P24" style:family="paragraph" style:parent-style-name="Standard">
      <style:text-properties officeooo:rsid="00725a58" officeooo:paragraph-rsid="00725a58"/>
    </style:style>
    <style:style style:name="P25" style:family="paragraph" style:parent-style-name="Heading_20_1">
      <style:text-properties officeooo:rsid="0019270e" officeooo:paragraph-rsid="0019270e"/>
    </style:style>
    <style:style style:name="P26" style:family="paragraph" style:parent-style-name="Standard">
      <style:text-properties officeooo:rsid="00191d8b" officeooo:paragraph-rsid="0019270e"/>
    </style:style>
    <style:style style:name="P27" style:family="paragraph" style:parent-style-name="Standard">
      <style:text-properties officeooo:rsid="004430bc" officeooo:paragraph-rsid="004430bc"/>
    </style:style>
    <style:style style:name="P28" style:family="paragraph" style:parent-style-name="Standard">
      <style:text-properties officeooo:rsid="004430bc" officeooo:paragraph-rsid="005e99be"/>
    </style:style>
    <style:style style:name="P29" style:family="paragraph" style:parent-style-name="Standard">
      <style:text-properties officeooo:rsid="00458ed1" officeooo:paragraph-rsid="005e99be"/>
    </style:style>
    <style:style style:name="T1" style:family="text">
      <style:text-properties officeooo:rsid="006203e1"/>
    </style:style>
    <style:style style:name="T2" style:family="text">
      <style:text-properties officeooo:rsid="00637426"/>
    </style:style>
    <style:style style:name="T3" style:family="text">
      <style:text-properties officeooo:rsid="006525ed"/>
    </style:style>
    <style:style style:name="T4" style:family="text">
      <style:text-properties officeooo:rsid="00671674"/>
    </style:style>
    <style:style style:name="T5" style:family="text">
      <style:text-properties officeooo:rsid="0063f583"/>
    </style:style>
    <style:style style:name="T6" style:family="text">
      <style:text-properties officeooo:rsid="00664cad"/>
    </style:style>
    <style:style style:name="T7" style:family="text">
      <style:text-properties officeooo:rsid="0068b425"/>
    </style:style>
    <style:style style:name="T8" style:family="text">
      <style:text-properties officeooo:rsid="006a10e2"/>
    </style:style>
    <style:style style:name="T9" style:family="text">
      <style:text-properties officeooo:rsid="006bc516"/>
    </style:style>
    <style:style style:name="T10" style:family="text">
      <style:text-properties officeooo:rsid="006bd873"/>
    </style:style>
    <style:style style:name="T11" style:family="text">
      <style:text-properties officeooo:rsid="006e6b2f"/>
    </style:style>
    <style:style style:name="T12" style:family="text">
      <style:text-properties officeooo:rsid="006eeacd"/>
    </style:style>
    <style:style style:name="T13" style:family="text">
      <style:text-properties officeooo:rsid="00702ec0"/>
    </style:style>
    <style:style style:name="T14" style:family="text">
      <style:text-properties officeooo:rsid="0071c059"/>
    </style:style>
    <style:style style:name="T15" style:family="text">
      <style:text-properties officeooo:rsid="0072c9cb"/>
    </style:style>
    <style:style style:name="T16" style:family="text">
      <style:text-properties officeooo:rsid="00746d2e"/>
    </style:style>
    <style:style style:name="T17" style:family="text">
      <style:text-properties officeooo:rsid="0075e7e9"/>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S</text:p>
      <text:p text:style-name="P2"/>
      <text:p text:style-name="P3">Fiche personnage</text:p>
      <text:p text:style-name="P2"/>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Sommaire</text:p>
          </text:index-title>
          <text:p text:style-name="P4"><text:a xlink:type="simple" xlink:href="#__RefHeading___Toc715_353095010" text:style-name="Index_20_Link" text:visited-style-name="Index_20_Link">Physique<text:tab/>1</text:a></text:p>
          <text:p text:style-name="P4"><text:a xlink:type="simple" xlink:href="#__RefHeading___Toc715_353095010%20Copie%201" text:style-name="Index_20_Link" text:visited-style-name="Index_20_Link">Personnalité<text:tab/>1</text:a></text:p>
          <text:p text:style-name="P4"><text:a xlink:type="simple" xlink:href="#__RefHeading___Toc715_353095010%20Copie%202" text:style-name="Index_20_Link" text:visited-style-name="Index_20_Link">Passé<text:tab/>2</text:a></text:p>
          <text:p text:style-name="P4"><text:a xlink:type="simple" xlink:href="#__RefHeading___Toc715_353095010%20Copie%203" text:style-name="Index_20_Link" text:visited-style-name="Index_20_Link">Objectifs<text:tab/>2</text:a></text:p>
          <text:p text:style-name="P4"><text:a xlink:type="simple" xlink:href="#__RefHeading___Toc715_353095010%20Copie%203%20Copie%201" text:style-name="Index_20_Link" text:visited-style-name="Index_20_Link">Pouvoirs<text:tab/>2</text:a></text:p>
          <text:p text:style-name="P4"><text:a xlink:type="simple" xlink:href="#__RefHeading___Toc715_353095010%20Copie%204%20Copie%201" text:style-name="Index_20_Link" text:visited-style-name="Index_20_Link">Rôle dans l’histoire<text:tab/>3</text:a></text:p>
          <text:p text:style-name="P4"><text:a xlink:type="simple" xlink:href="#__RefHeading___Toc715_353095010%20Copie%204" text:style-name="Index_20_Link" text:visited-style-name="Index_20_Link">Relations<text:tab/>3</text:a></text:p>
        </text:index-body>
      </text:table-of-content>
      <text:p text:style-name="P5"/>
      <text:p text:style-name="P5"/>
      <text:h text:style-name="P6" text:outline-level="1"><text:bookmark-start text:name="__RefHeading___Toc715_353095010"/>Physique<text:bookmark-end text:name="__RefHeading___Toc715_353095010"/></text:h>
      <text:p text:style-name="P7"/>
      <text:p text:style-name="P8">Homme de 50 ans avant sa mort. <text:span text:style-name="T1">Des c</text:span>heveux et yeux grisonnants, des pattes d’oie et des rides trahissent son âge, mais son regard et son attitude énergiques le font paraître plus jeune.</text:p>
      <text:p text:style-name="P9"/>
      <text:h text:style-name="P6" text:outline-level="1"><text:bookmark-start text:name="__RefHeading___Toc715_353095010 Copie 1"/>Personnalité<text:bookmark-end text:name="__RefHeading___Toc715_353095010 Copie 1"/></text:h>
      <text:p text:style-name="P7"/>
      <text:p text:style-name="P10"><text:span text:style-name="T2">OS</text:span><text:span text:style-name="T3"> </text:span><text:span text:style-name="T4">(de son vrai nom Oliver Simpsons)</text:span><text:span text:style-name="T2"> était un scientifique excentrique, et un professeur aimé de ses étudiants comme collègues, partageant avec les premiers sa passion pour les machines et l’informatique. Sa personnalité serviable et joviale, </text:span><text:span text:style-name="T5">combinée à un véritable désir de partager sa passion,</text:span><text:span text:style-name="T2"> </text:span><text:span text:style-name="T5">f</text:span><text:span text:style-name="T3">ormait</text:span><text:span text:style-name="T2"> un véritable charisme qui forçait le respect et l’écoute de son entourage.</text:span></text:p>
      <text:p text:style-name="P11"/>
      <text:p text:style-name="P5"/>
      <text:h text:style-name="P6" text:outline-level="1"><text:bookmark-start text:name="__RefHeading___Toc715_353095010 Copie 2"/>Passé<text:bookmark-end text:name="__RefHeading___Toc715_353095010 Copie 2"/></text:h>
      <text:p text:style-name="P7"/>
      <text:p text:style-name="P11"><text:span text:style-name="T2">Autrefois professeur d’informatique à l’</text:span>Institut de <text:span text:style-name="T2">T</text:span>echnologie de Californie à Pasadena, à l’est de Los Angeles, <text:span text:style-name="T3">OS avait développé ses pouvoirs peu après avoir été enrôlé dans la prestigieuse académie. Cependant, il n’avait pas encore eu l’idée d’utiliser ses pouvoirs pour améliorer la société, se contenant de créer des IAs puissantes pour avancer ses thèses</text:span>. <text:span text:style-name="T2">Après une discussion avec une élève passionnée par la robotique, une ferme </text:span><text:soft-page-break/><text:span text:style-name="T2">croyante des bienfaits des robots pour la société, OS est inspiré par son discours ; </text:span><text:span text:style-name="T3">quelques jours après, une idée bourgeonne dans son esprit : Créer une IA capable de répliquer la conscience humaine, et l’implanter dans un androïde dans le but de faire vivre ensemble humains et </text:span><text:span text:style-name="T6">robots, et faire avancer la société ensemble</text:span><text:span text:style-name="T2">.</text:span></text:p>
      <text:p text:style-name="P11"/>
      <text:p text:style-name="P12">Cependant, peu d’entreprises de robotiques sont intéressées par sa thèse, ne voyant pas grand intérêt financier à créer des robots aussi sophistiqués quand des machines plus simples faisaient l’affaire. Jusqu’au jour où OS est contacté par AM, un autre Ingénieur spécialisé dans la création de robots de combat, très intéressé par les recherches d’OS. <text:span text:style-name="T7">Ensemble, ils fondent l’OSAM Institute, une startup leur permettant de lever des fonds pour concevoir le prototype de leur rêve commun : Une androïde capable d’émuler la psyché humaine, avec toutes ses nuances et ses émotions, dans le corps d’une machine armée pour protéger les humains : Ainsi naît Astro, alors connue sous le nom de son prototype, Projet </text:span><text:span text:style-name="T8">Mirage, nommé après les propos de leurs détracteurs qui pensaient que le duo ne pourchassait qu’un mirage, un rêve impossible à concrétiser.</text:span></text:p>
      <text:p text:style-name="P12"/>
      <text:p text:style-name="P13">Cependant, les deux compères se disputent quand à la direction que doit prendre leur entreprise : Là où OS veut se servir d’Astro comme un exemple pour faire avancer l’humanité et les androïdes main dans la main, implémentant des lois de la robotique et des régulations pour éviter les dérives dangereuses, AM veut au contraire se servir de leur technologie pour concevoir des robots de combat et créer une armée privatisable qu’ils pourront alors offrir aux plus offrants, sécurisant l’avenir financier de leur entreprise. <text:span text:style-name="T9">Face à ce désaccord, les deux dirigeants de la toute jeune start-up dissolvent déjà leur alliance, mettant fin au Projet Mirage sans avoir décidé du propriétaire d’Astro.</text:span></text:p>
      <text:p text:style-name="P13"/>
      <text:p text:style-name="P14">Cependant, AM ne veut pas en rester là, et peu avant le débarras des locaux, tente de subtiliser les plans et le code du Projet Mirage afin de les utiliser pour ses propres desseins. Cependant, OS ayant prévu un coup en traître de ce genre, s’était déjà rendu sur place et avait déjà effacé les données résultant du Projet Mirage, empêchant son ancien associé de créer de futures copies d’Astro. Fou de rage en apprenant qu’il avait été doublé, AM assassine OS et tente de se débarrasser d’Astro qui avait choisi de protéger son créateur. <text:span text:style-name="T10">OS succombe à ses blessures, tandis que AM tente de sauver le peu de ressources qu’il peut afin de créer ses propres androïdes dotées d’une IA avancée, mais sans l’étincelle qui caractérise les créations d’OS.</text:span></text:p>
      <text:p text:style-name="P5"/>
      <text:h text:style-name="P6" text:outline-level="1"><text:bookmark-start text:name="__RefHeading___Toc715_353095010 Copie 3"/>Objectifs<text:bookmark-end text:name="__RefHeading___Toc715_353095010 Copie 3"/></text:h>
      <text:p text:style-name="P7"/>
      <text:p text:style-name="P15">OS était un visionnaire idéaliste, cherchant à assurer la prospérité de l’humanité par le progrès. Ce progrès, il le voyait aux côtés des machines, qui auraient assisté les humains dans leurs tâches les plus laborieuses et dangereuses, laissant à ces derniers tout leur temps libre pour explorer d’autres axes d’évolution. Astro est la concrétisation de ce rêve, voyant en elle le premier pas vers l’harmonie entre humains et machines, <text:span text:style-name="T11">cette dernière étant capable de ressentir toute la gamme d’émotions qu’un humain pouvait ressentir, et prendre des décisions par elle-même en apprenant de son environnemen</text:span><text:span text:style-name="T12">t</text:span>.</text:p>
      <text:p text:style-name="P16"><text:soft-page-break/></text:p>
      <text:h text:style-name="P17" text:outline-level="1"><text:bookmark-start text:name="__RefHeading___Toc715_353095010 Copie 3 Copie 1"/>Pouvoirs<text:bookmark-end text:name="__RefHeading___Toc715_353095010 Copie 3 Copie 1"/></text:h>
      <text:p text:style-name="P18"/>
      <text:p text:style-name="P19">OS était un Ingénieur spécialisé dans la création d’intelligences artificielles. Si ses capacités en mécanique étaient limitées par son pouvoir, ses compétences en programmation étaient sans pareil, capable de créer toute sorte d’algorithmes et programmes capables de l’assister dans ses tâches du quotidien. Il était capable de donner à ses IAs des personnalités et de leur apprendre des choses en dehors de leur domaine principal d’application. <text:span text:style-name="T13">Astro, la culmination d’années de travail, est sa plus grande réussite, capable d’évoluer au-delà de ce que sa programmation d’origine le permettait, en modifiant son propre code et son corps pour s’améliorer en continu.</text:span></text:p>
      <text:p text:style-name="P19"/>
      <text:p text:style-name="P20">Après la réussite du projet Mirage, OS avait un plan clair : Annoncer la naissance d’Astro au grand public et la laisser évoluer en compagnie des humains, la faisant évoluer à leur contact et utiliser ces résultats pour produire plus de robots capables d’assister les humains <text:span text:style-name="T14">et de marcher avec eux sur la voie du progrès.</text:span></text:p>
      <text:h text:style-name="P21" text:outline-level="1"/>
      <text:h text:style-name="P22" text:outline-level="1"><text:bookmark-start text:name="__RefHeading___Toc715_353095010 Copie 4 Copie 1"/>Rôle dans l’histoire<text:bookmark-end text:name="__RefHeading___Toc715_353095010 Copie 4 Copie 1"/></text:h>
      <text:p text:style-name="P23"/>
      <text:p text:style-name="P24">OS meurt avant le début de l’histoire, et n’a donc qu’un impact mineur sur son développement, notamment sur l’évolution du personnage d’Astro, qui par traumatisme a bloqué ses souvenirs du meurtre de son créateur, pour peu à peu accepter d’affronter ses peurs et de révéler la vérité.</text:p>
      <text:p text:style-name="P24"/>
      <text:p text:style-name="P24">OS incarne avec AM les deux facettes du progrès : Là où AM est un progrès froid dirigé par la cupidité et la supériorité technologique sur leurs concurrents, OS a une approche plus humaine dirigée vers la coopération plutôt que la confrontation, <text:span text:style-name="T15">croyant fermement au bénéfice pour tous.</text:span></text:p>
      <text:p text:style-name="P5"/>
      <text:h text:style-name="P25" text:outline-level="1"><text:bookmark-start text:name="__RefHeading___Toc715_353095010 Copie 4"/>Relations<text:bookmark-end text:name="__RefHeading___Toc715_353095010 Copie 4"/></text:h>
      <text:p text:style-name="P26"/>
      <text:p text:style-name="P27"><text:span text:style-name="T16">AM</text:span> : <text:span text:style-name="T16">Au début devenus amis proches dû à leur but commun qu’était le Projet Mirage, leur relation s’envenime rapidement une fois celui-ci conclu. Leur entreprise commune s’effondre, pour culminer à l’assassinat d’OS par son ancien meilleur ami, une trahison vue comme mutuelle par les deux partis, chacun ayant accusé l’autre d’avoir détourné le projet pour leurs propres désirs.</text:span></text:p>
      <text:p text:style-name="P28"/>
      <text:p text:style-name="P29"><text:span text:style-name="T16">Astro</text:span> : <text:span text:style-name="T17">Bien qu’Astro ne soit qu’une machine, et malgré les avertissements d’AM de ne pas s’attacher à leurs créations, OS ne put s’empêcher d’éprouver de l’affection pour elle, au </text:span><text:soft-page-break/><text:span text:style-name="T17">point de la considérer comme sa fille – surtout après avoir vu ses capacités d’apprentissage et son émotivité. Astro considèrait également OS comme son père, jusqu’à ce que l’incident lui fasse chasser son souvenir de sa mémoir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Calibri3" fo:font-family="Calibri" style:font-style-name="Normal" style:font-family-generic="swiss" style:font-pitch="variable" fo:font-size="13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color="#00588c" loext:opacity="100%" style:font-name="Calibri3" fo:font-family="Calibri" style:font-style-name="Norm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00588c" loext:opacity="100%" style:font-name="Calibri3" fo:font-family="Calibri" style:font-style-name="Normal"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color="#00588c" loext:opacity="100%" style:font-name="Calibri3" fo:font-family="Calibri" style:font-style-name="Normal" style:font-family-generic="swiss" style:font-pitch="variable"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color="#00588c" loext:opacity="100%" style:font-name="Calibri2" fo:font-family="Calibri" style:font-style-name="Italique gras" style:font-family-generic="swiss" style:font-pitch="variable" fo:font-size="16pt" fo:font-style="italic" fo:font-weight="normal" officeooo:rsid="00106f6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00588c" loext:opacity="100%" style:font-name="Calibri Light2" fo:font-family="'Calibri Light'" style:font-style-name="Normal" style:font-family-generic="swiss" style:font-pitch="variable" fo:font-size="14pt" fo:font-weight="25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color="#00588c" loext:opacity="100%" style:font-name="Calibri Light1" fo:font-family="'Calibri Light'" style:font-style-name="Italique gras" style:font-family-generic="swiss" style:font-pitch="variable" fo:font-size="13pt" fo:font-style="italic" fo:font-weight="250"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00588c" loext:opacity="100%" style:font-name="Calibri" fo:font-family="Calibri" style:font-style-name="Gras" style:font-family-generic="swiss"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588c" loext:opacity="1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00588c" loext:opacity="100%" style:font-name="Calibri1" fo:font-family="Calibri" style:font-style-name="Italique" style:font-family-generic="swiss" style:font-pitch="variable" fo:font-style="italic"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color="#00588c" loext:opacity="100%" style:font-name="Calibri Light2" fo:font-family="'Calibri Light'" style:font-style-name="Normal" style:font-family-generic="swiss" style:font-pitch="variable" fo:font-weight="250"/>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color="#00588c" loext:opacity="100%" style:font-name="Calibri Light" fo:font-family="'Calibri Light'" style:font-style-name="Italique" style:font-family-generic="swiss" style:font-pitch="variable" fo:font-style="italic" fo:font-weight="25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duration>PT12H12M45S</meta:editing-duration>
    <meta:editing-cycles>103</meta:editing-cycles>
    <meta:generator>LibreOffice/25.2.4.3$Windows_X86_64 LibreOffice_project/33e196637044ead23f5c3226cde09b47731f7e27</meta:generator>
    <meta:creation-date>2025-12-13T08:33:05.842320600</meta:creation-date>
    <dc:title>Format de texte</dc:title>
    <dc:date>2025-12-14T19:45:59.329166700</dc:date>
    <meta:document-statistic meta:table-count="0" meta:image-count="0" meta:object-count="0" meta:page-count="4" meta:paragraph-count="30" meta:word-count="1088" meta:character-count="6758" meta:non-whitespace-character-count="5699"/>
    <meta:template xlink:type="simple" xlink:actuate="onRequest" xlink:title="Format de texte" xlink:href="file:///C:/Users/Clément/AppData/Roaming/LibreOffice/4/user/template/Format%20de%20texte1.ott" meta:date="2025-12-13T08:33:05.542099300"/>
  </office:meta>
</office:document-meta>
</file>