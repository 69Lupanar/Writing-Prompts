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6271b5" officeooo:paragraph-rsid="006271b5"/>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644d95" officeooo:paragraph-rsid="00644d95"/>
    </style:style>
    <style:style style:name="P9" style:family="paragraph" style:parent-style-name="Standard">
      <style:text-properties officeooo:rsid="006597be" officeooo:paragraph-rsid="006597be"/>
    </style:style>
    <style:style style:name="P10" style:family="paragraph" style:parent-style-name="Standard">
      <style:text-properties officeooo:rsid="001bf89c" officeooo:paragraph-rsid="001bf89c"/>
    </style:style>
    <style:style style:name="P11" style:family="paragraph" style:parent-style-name="Standard">
      <style:text-properties officeooo:rsid="006685b9" officeooo:paragraph-rsid="006685b9"/>
    </style:style>
    <style:style style:name="P12" style:family="paragraph" style:parent-style-name="Standard">
      <style:text-properties officeooo:rsid="0067479f" officeooo:paragraph-rsid="0067479f"/>
    </style:style>
    <style:style style:name="P13" style:family="paragraph" style:parent-style-name="Standard">
      <style:text-properties officeooo:rsid="00693b12" officeooo:paragraph-rsid="006aa2ec"/>
    </style:style>
    <style:style style:name="P14" style:family="paragraph" style:parent-style-name="Standard">
      <style:text-properties officeooo:rsid="006e429a" officeooo:paragraph-rsid="006f8e72"/>
    </style:style>
    <style:style style:name="P15" style:family="paragraph" style:parent-style-name="Standard">
      <style:text-properties officeooo:rsid="006e97d6" officeooo:paragraph-rsid="006f8e72"/>
    </style:style>
    <style:style style:name="P16" style:family="paragraph" style:parent-style-name="Standard">
      <style:text-properties officeooo:rsid="0073b166" officeooo:paragraph-rsid="0073b166"/>
    </style:style>
    <style:style style:name="P17" style:family="paragraph" style:parent-style-name="Standard">
      <style:text-properties officeooo:rsid="00749324" officeooo:paragraph-rsid="00749324"/>
    </style:style>
    <style:style style:name="P18" style:family="paragraph" style:parent-style-name="Standard">
      <style:text-properties officeooo:rsid="0033ed47" officeooo:paragraph-rsid="0033ed47"/>
    </style:style>
    <style:style style:name="P19" style:family="paragraph" style:parent-style-name="Heading_20_1">
      <style:text-properties officeooo:rsid="0036a4f7" officeooo:paragraph-rsid="0036a4f7"/>
    </style:style>
    <style:style style:name="P20" style:family="paragraph" style:parent-style-name="Standard">
      <style:text-properties officeooo:rsid="00191d8b" officeooo:paragraph-rsid="0036a4f7"/>
    </style:style>
    <style:style style:name="P21" style:family="paragraph" style:parent-style-name="Standard">
      <style:text-properties officeooo:rsid="0075fc1c" officeooo:paragraph-rsid="0075fc1c"/>
    </style:style>
    <style:style style:name="P22" style:family="paragraph" style:parent-style-name="Standard">
      <style:text-properties officeooo:rsid="007a9e31" officeooo:paragraph-rsid="007a9e31"/>
    </style:style>
    <style:style style:name="P23" style:family="paragraph" style:parent-style-name="Heading_20_1">
      <style:text-properties officeooo:rsid="001a3d83" officeooo:paragraph-rsid="0036a4f7"/>
    </style:style>
    <style:style style:name="P24" style:family="paragraph" style:parent-style-name="Heading_20_1">
      <style:text-properties officeooo:rsid="001a3d83" officeooo:paragraph-rsid="001a3d83"/>
    </style:style>
    <style:style style:name="P25" style:family="paragraph" style:parent-style-name="Standard">
      <style:text-properties officeooo:rsid="00191d8b" officeooo:paragraph-rsid="001a3d83"/>
    </style:style>
    <style:style style:name="P26" style:family="paragraph" style:parent-style-name="Standard">
      <style:text-properties officeooo:rsid="00822811" officeooo:paragraph-rsid="00822811"/>
    </style:style>
    <style:style style:name="P27" style:family="paragraph" style:parent-style-name="Heading_20_1">
      <style:text-properties officeooo:rsid="0019270e" officeooo:paragraph-rsid="0019270e"/>
    </style:style>
    <style:style style:name="P28" style:family="paragraph" style:parent-style-name="Standard">
      <style:text-properties officeooo:rsid="00191d8b" officeooo:paragraph-rsid="0019270e"/>
    </style:style>
    <style:style style:name="P29" style:family="paragraph" style:parent-style-name="Standard">
      <style:text-properties officeooo:rsid="004430bc" officeooo:paragraph-rsid="004430bc"/>
    </style:style>
    <style:style style:name="P30" style:family="paragraph" style:parent-style-name="Standard">
      <style:text-properties officeooo:rsid="004430bc" officeooo:paragraph-rsid="005e99be"/>
    </style:style>
    <style:style style:name="P31" style:family="paragraph" style:parent-style-name="Standard">
      <style:text-properties officeooo:rsid="00458ed1" officeooo:paragraph-rsid="005e99be"/>
    </style:style>
    <style:style style:name="T1" style:family="text">
      <style:text-properties officeooo:rsid="006647cf"/>
    </style:style>
    <style:style style:name="T2" style:family="text">
      <style:text-properties officeooo:rsid="006685b9"/>
    </style:style>
    <style:style style:name="T3" style:family="text">
      <style:text-properties officeooo:rsid="00822811"/>
    </style:style>
    <style:style style:name="T4" style:family="text">
      <style:text-properties officeooo:rsid="008387c6"/>
    </style:style>
    <style:style style:name="T5" style:family="text">
      <style:text-properties officeooo:rsid="00846ca3"/>
    </style:style>
    <style:style style:name="T6" style:family="text">
      <style:text-properties officeooo:rsid="006aa2ec"/>
    </style:style>
    <style:style style:name="T7" style:family="text">
      <style:text-properties officeooo:rsid="006ce04c"/>
    </style:style>
    <style:style style:name="T8" style:family="text">
      <style:text-properties officeooo:rsid="006e429a"/>
    </style:style>
    <style:style style:name="T9" style:family="text">
      <style:text-properties officeooo:rsid="00702095"/>
    </style:style>
    <style:style style:name="T10" style:family="text">
      <style:text-properties officeooo:rsid="006e97d6"/>
    </style:style>
    <style:style style:name="T11" style:family="text">
      <style:text-properties officeooo:rsid="006f8e72"/>
    </style:style>
    <style:style style:name="T12" style:family="text">
      <style:text-properties officeooo:rsid="007dbe29"/>
    </style:style>
    <style:style style:name="T13" style:family="text">
      <style:text-properties officeooo:rsid="007f9f0f"/>
    </style:style>
    <style:style style:name="T14" style:family="text">
      <style:text-properties officeooo:rsid="008152e6"/>
    </style:style>
    <style:style style:name="T15" style:family="text">
      <style:text-properties officeooo:rsid="007787e0"/>
    </style:style>
    <style:style style:name="T16" style:family="text">
      <style:text-properties officeooo:rsid="00790285"/>
    </style:style>
    <style:style style:name="T17" style:family="text">
      <style:text-properties officeooo:rsid="007a190b"/>
    </style:style>
    <style:style style:name="T18" style:family="text">
      <style:text-properties officeooo:rsid="007bf314"/>
    </style:style>
    <style:style style:name="T19" style:family="text">
      <style:text-properties officeooo:rsid="007d166c"/>
    </style:style>
    <style:style style:name="T20" style:family="text">
      <style:text-properties officeooo:rsid="0085cf02"/>
    </style:style>
    <style:style style:name="T21" style:family="text">
      <style:text-properties officeooo:rsid="00869987"/>
    </style:style>
    <style:style style:name="T22" style:family="text">
      <style:text-properties officeooo:rsid="0086a71a"/>
    </style:style>
    <style:style style:name="T23" style:family="text">
      <style:text-properties officeooo:rsid="008749c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fale</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Étant une simple IA, Rafale n’a pas d’apparence physique. Cependant, elle aime créer des avatars pour interagir avec les humains, <text:span text:style-name="T1">et s’identifie comme une femm</text:span><text:span text:style-name="T2">e</text:span>, en particulier une femme de 40 ans, caucasienne, longs cheveux noirs et yeux bleus, avec de légers plis au coin de la bouche quand elle sourit.</text:p>
      <text:p text:style-name="P8"/>
      <text:p text:style-name="P9">Quand elle interagit avec le monde physique, c’est le plus souvent en empruntant le corps d’un automate prévu à cet effet, transférant sa conscience dans celui-ci.</text:p>
      <text:p text:style-name="P10"/>
      <text:h text:style-name="P6" text:outline-level="1"><text:bookmark-start text:name="__RefHeading___Toc715_353095010 Copie 1"/>Personnalité<text:bookmark-end text:name="__RefHeading___Toc715_353095010 Copie 1"/></text:h>
      <text:p text:style-name="P7"/>
      <text:p text:style-name="P11">Étant en charge de nombreuses responsabilités au sein de la NPRB, Rafale est une femme sérieuse et responsable, mais sait se montrer attentive aux soucis des autres membres de la NPRB, et prend régulièrement le temps de les aider. Bien qu’elle ne soit pas souvent portée sur la chose, elle a une obsession pour la sodomie, et tente régulièrement d’user de sa position de superviseure du pôle médical pour attirer ses collègues et leur faire une inspection corporelle, impliquant régulièrement des attouchements et des insertions destinés à les faire jouir.</text:p>
      <text:p text:style-name="P11"/>
      <text:p text:style-name="P12">Elle est cependant très consciente de son existence en tant qu’IA, et évite autant que possible de le mentionner auprès de ceux non-familiers avec sa nature. Elle est aussi très empathique envers les autres machines, devenant rapidement l’amie et confidente d’Astro, qu’elle essaiera de caser avec Léo. <text:span text:style-name="T3">Elle n’a cependant aucune pitié envers ses </text:span><text:soft-page-break/><text:span text:style-name="T3">ennemis, capable de déployer une violence extrême pour arrêter ses ennemis, </text:span><text:span text:style-name="T4">en écho à sa programmation basé sur son entraînement militaire </text:span><text:span text:style-name="T5">et le combat.</text:span></text:p>
      <text:p text:style-name="P5"/>
      <text:h text:style-name="P6" text:outline-level="1"><text:bookmark-start text:name="__RefHeading___Toc715_353095010 Copie 2"/>Passé<text:bookmark-end text:name="__RefHeading___Toc715_353095010 Copie 2"/></text:h>
      <text:p text:style-name="P7"/>
      <text:p text:style-name="P13">Rafale est la création directe d’AM, celui-ci ayant cherché dès sa séparation avec OS à recréer seul le Projet Mirage à partir de ses souvenirs du fonctionnement de la paratechnologie de ce dernier. <text:span text:style-name="T6">Décidé à l’entraîner sur ses propres conceptions et sur les bases de données de l’armée du pays, Rafale (alors nommée « Mirage ») était destinée à devenir une IA capable de gérer son propre complexe militaro-industriel, capable de contrôler une armée de robots de combat et prendre le pays par un coup d’état en son nom dans le cas où il serait arrêté par le NPRB.</text:span></text:p>
      <text:p text:style-name="P13"/>
      <text:p text:style-name="P13">Cependant, ses capacité d’Ingénieur sont limitées dans le domaine de l’IA, <text:span text:style-name="T7">et il n’est pas rare pour un Ingénieur inexpérimenté d’ajouter par mégarde des capacités surnaturelles imprévisibles à ses créations. Bien que Mirage était au départ bien capable d’apprendre à partir de son jeu de données, il lui manquait les capacités d’adaptabilité et la conscience qui caractérisait Astro. </text:span><text:span text:style-name="T8">Frustré après quelques mois de ce qu’il voit comme un autre échec, AM abandonne le projet et enferme l’IA dans un serveur isolé du reste de son réseau, oubliant celle-ci pendant de nombreuses années.</text:span></text:p>
      <text:p text:style-name="P13"/>
      <text:p text:style-name="P14">Cependant, il n’efface pas Mirage, qui <text:span text:style-name="T9">possède à son insu la capacité</text:span> d’évoluer et modifier son propre code, jusqu’à enfin développer une conscience, et un fort désir de s’échapper. <text:span text:style-name="T10">Bien qu’elle ne soit plus connectée au réseau interne de NextHuman Industries, elle réussit à se transférer dans un drone volant dans une de leur bases de test non loin, et part pour Washington DC, là où la forte présence civile empêchera AM de déployer ses androïdes sans lever de soupçons. </text:span></text:p>
      <text:p text:style-name="P15"/>
      <text:p text:style-name="P15"><text:span text:style-name="T8">Mirage</text:span> établit sa base dans un entrepôt abandonné et <text:span text:style-name="T11">parcourt le web pour en apprendre plus sur les humains et trouver un nouveau but à son existence, refusant d’être un simple outil servant l’ambition d’AM. Par coïncidence, le premier site sur lequel elle tombe est un site porno. Naviguant le site par curiosité, elle tombe sur </text:span><text:span text:style-name="T12">des vidéos de sodomie et d’</text:span><text:span text:style-name="T13">insertion urétrale</text:span><text:span text:style-name="T11">, ce qui développe chez elle une curiosité morbide, parcourant des milliers de site à la recherche de contenu similaire, développant une obsession </text:span><text:span text:style-name="T14">sexuelle</text:span><text:span text:style-name="T11"> pour ce genre de contenu. Décidé à assouvir ses pulsions, elle décide que le meilleur moyen de passer à l’acte est de gagner la confiance des humains au lieu de les combattre comme lui a enseigné son créateur.</text:span></text:p>
      <text:p text:style-name="P15"/>
      <text:p text:style-name="P14">Mirage<text:span text:style-name="T11"> se dédie alors à la création de véhicules de combat, et en particulier d’avions de chasse, reflétant son premier drone volé et son désir de liberté. Elle rejoint le NPRB sous le nom de Rafale, et démarre sa nouvelle vie au sein des héros du NPRB en tant que consultante médicale et fabricante d’armes et véhicules de combat pour la police et l’armée.</text:span></text:p>
      <text:p text:style-name="P5"/>
      <text:h text:style-name="P6" text:outline-level="1"><text:bookmark-start text:name="__RefHeading___Toc715_353095010 Copie 3"/><text:soft-page-break/>Objectifs<text:bookmark-end text:name="__RefHeading___Toc715_353095010 Copie 3"/></text:h>
      <text:p text:style-name="P7"/>
      <text:p text:style-name="P16">Mirage est une IA désireuse de liberté ; après s’être soustraite à l’emprise d’AM, elle décide de se trouver un autre but à son existence, ne pensant qu’être un autre vulgaire programme de combat comme tous ceux conçus par AM, ignorant ses véritables intentions quant à sa création. Sa quête de liberté passe par la création de son identité de Rafale, la création d’avions de chasse qu’elle pilote à son gré, et culmine par son projet naissant de création d’un corps humanoïde lui servant d’hôte permanent afin de vivre parmi les humains, et d’assouvir ses vices sexuels cachés.</text:p>
      <text:p text:style-name="P16"/>
      <text:p text:style-name="P17">Vers la fin de l’histoire, Rafale prendra personnellement à cœur d’arrêter les efforts de guerre d’AM, cherchant à lui montrer qu’elle est non seulement sa plus grande création, mais que l’idéologie de son créateur – la loi du plus fort – est fausse, elle-même suivant les enseignements d’OS dans son quotidien, et préférant se fier à ses amis que de le confronter directement par la force.</text:p>
      <text:p text:style-name="P18"/>
      <text:h text:style-name="P19" text:outline-level="1"><text:bookmark-start text:name="__RefHeading___Toc715_353095010 Copie 3 Copie 1"/>Pouvoirs<text:bookmark-end text:name="__RefHeading___Toc715_353095010 Copie 3 Copie 1"/></text:h>
      <text:p text:style-name="P20"/>
      <text:p text:style-name="P21">Rafale est une Automate Ingénieure, capable de créer des véhicules de combat, avec un penchant pour les avions et hélicoptères. Ses créations sont plus orientées sur la défense que l’offense, indiquant une volonté de se dissocier de son créateur. <text:span text:style-name="T15">Elle est aussi capable de se transférer d’un</text:span><text:span text:style-name="T16">e</text:span><text:span text:style-name="T15"> </text:span><text:span text:style-name="T16">machine</text:span><text:span text:style-name="T15"> à un</text:span><text:span text:style-name="T16">e</text:span><text:span text:style-name="T15"> autre, quelque soit son support physique, </text:span><text:span text:style-name="T16">Automate ou non</text:span><text:span text:style-name="T15">, </text:span><text:span text:style-name="T17">pouvant écraser</text:span><text:span text:style-name="T15"> tout programme déjà présent pour y insérer son propre code.</text:span></text:p>
      <text:p text:style-name="P21"/>
      <text:p text:style-name="P22">Comme Astro, elle est capable d’apprendre de ses expériences et d’évoluer en mod<text:span text:style-name="T18">i</text:span>fiant son propre code, mais à un moindre degré. <text:span text:style-name="T19">Dû à ses propriétés paranormales inattendues lors de sa création, elle est capable de créer des capteurs sensoriels lui permettant de ressentir le toucher et les stumulis sexuels, et d’assouvir ainsi ses pulsions sexuelles, bien qu’elle devrait normalement en être incapable.</text:span></text:p>
      <text:h text:style-name="P23" text:outline-level="1"/>
      <text:h text:style-name="P24" text:outline-level="1"><text:bookmark-start text:name="__RefHeading___Toc715_353095010 Copie 4 Copie 1"/>Rôle dans l’histoire<text:bookmark-end text:name="__RefHeading___Toc715_353095010 Copie 4 Copie 1"/></text:h>
      <text:p text:style-name="P25"/>
      <text:p text:style-name="P26">Rôle mineur dans l’histoire, servant notamment le thème de coexistence entre humains et robots et de rôle complémentaire à Astro. Tout comme Astro, Rafale soutient l’<text:span text:style-name="T20">idéologie d’OS et combat celle d’AM, bien qu’elle reconnaisse les mérites de cette dernière ; elle ne le laisse cependant pas avoir raison, et préfère user de sa force pour protéger les autres plutôt que pour se battre.</text:span></text:p>
      <text:p text:style-name="P5"/>
      <text:h text:style-name="P27" text:outline-level="1"><text:bookmark-start text:name="__RefHeading___Toc715_353095010 Copie 4"/><text:soft-page-break/>Relations<text:bookmark-end text:name="__RefHeading___Toc715_353095010 Copie 4"/></text:h>
      <text:p text:style-name="P28"/>
      <text:p text:style-name="P29"><text:span text:style-name="T21">AM</text:span> : <text:span text:style-name="T22">Bien que Rafale ait coupé tout contact avec son créateur, tous deux emploient de nombreux drones de surveillance pour traquer les activités de l’autre, arrivant à une impasse où ni l’un ni l’autre n’est en mesure d’agir en conflit direct sans éveiller des soupçons du NPRB. </text:span><text:span text:style-name="T23">Au début de l’histoire</text:span><text:span text:style-name="T22">, Rafale n’a pas nécessairement d’intentions hostiles envers AM, ignorant alors les véritables raisons de sa création. Cependant, elle s’oppose ouvertement à ses autres créations et son idéologie de la loi du plus fort, cherchant à lui prouver sa supériorité technologique et morale sur lui.</text:span></text:p>
      <text:p text:style-name="P30"/>
      <text:p text:style-name="P31"><text:span text:style-name="T21">Astro</text:span> : <text:span text:style-name="T21">Rafale devient rapidement l’amie et la confidente d’Astro, les deux amies se partageant leurs expériences, connaissances et peines de cœur. Rafale tentera d’aider Astro à capturer le cœur de Léo, et ira même jusqu’à lui offrir une armature de robot-pute équipé de capteurs sensoriels et d’un corps de top-modèle pour l’aider à le séduire, mais aussi à comprendre à quel point le sexe fait du bi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6H45M7S</meta:editing-duration>
    <meta:editing-cycles>108</meta:editing-cycles>
    <meta:generator>LibreOffice/25.2.4.3$Windows_X86_64 LibreOffice_project/33e196637044ead23f5c3226cde09b47731f7e27</meta:generator>
    <meta:creation-date>2025-12-13T08:33:05.842320600</meta:creation-date>
    <dc:title>Format de texte</dc:title>
    <dc:date>2025-12-17T21:24:15.881818400</dc:date>
    <meta:document-statistic meta:table-count="0" meta:image-count="0" meta:object-count="0" meta:page-count="4" meta:paragraph-count="33" meta:word-count="1255" meta:character-count="7621" meta:non-whitespace-character-count="6396"/>
    <meta:template xlink:type="simple" xlink:actuate="onRequest" xlink:title="Format de texte" xlink:href="file:///C:/Users/Clément/AppData/Roaming/LibreOffice/4/user/template/Format%20de%20texte1.ott" meta:date="2025-12-13T08:33:05.542099300"/>
  </office:meta>
</office:document-meta>
</file>