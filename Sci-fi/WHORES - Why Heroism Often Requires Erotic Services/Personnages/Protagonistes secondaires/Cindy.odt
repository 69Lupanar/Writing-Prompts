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4a5148" officeooo:paragraph-rsid="004a5148"/>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be52b" officeooo:paragraph-rsid="004be52b"/>
    </style:style>
    <style:style style:name="P9" style:family="paragraph" style:parent-style-name="Standard">
      <style:text-properties officeooo:rsid="004df2ac" officeooo:paragraph-rsid="004df2ac"/>
    </style:style>
    <style:style style:name="P10" style:family="paragraph" style:parent-style-name="Standard">
      <style:text-properties officeooo:rsid="001bf89c" officeooo:paragraph-rsid="001bf89c"/>
    </style:style>
    <style:style style:name="P11" style:family="paragraph" style:parent-style-name="Standard">
      <style:text-properties officeooo:rsid="004eb607" officeooo:paragraph-rsid="004eb607"/>
    </style:style>
    <style:style style:name="P12" style:family="paragraph" style:parent-style-name="Standard">
      <style:text-properties officeooo:rsid="0053e72f" officeooo:paragraph-rsid="0053e72f"/>
    </style:style>
    <style:style style:name="P13" style:family="paragraph" style:parent-style-name="Standard">
      <style:text-properties officeooo:rsid="005552f2" officeooo:paragraph-rsid="005552f2"/>
    </style:style>
    <style:style style:name="P14" style:family="paragraph" style:parent-style-name="Standard">
      <style:text-properties officeooo:rsid="005552f2" officeooo:paragraph-rsid="0057c3fb"/>
    </style:style>
    <style:style style:name="P15" style:family="paragraph" style:parent-style-name="Standard">
      <style:text-properties officeooo:rsid="0057c3fb" officeooo:paragraph-rsid="0057c3fb"/>
    </style:style>
    <style:style style:name="P16" style:family="paragraph" style:parent-style-name="Standard">
      <style:text-properties officeooo:rsid="0053e72f" officeooo:paragraph-rsid="0058115a"/>
    </style:style>
    <style:style style:name="P17" style:family="paragraph" style:parent-style-name="Standard">
      <style:text-properties officeooo:rsid="0061f596" officeooo:paragraph-rsid="0061f596"/>
    </style:style>
    <style:style style:name="P18" style:family="paragraph" style:parent-style-name="Heading_20_1">
      <style:text-properties officeooo:rsid="0036a4f7" officeooo:paragraph-rsid="0036a4f7"/>
    </style:style>
    <style:style style:name="P19" style:family="paragraph" style:parent-style-name="Standard">
      <style:text-properties officeooo:rsid="00191d8b" officeooo:paragraph-rsid="0036a4f7"/>
    </style:style>
    <style:style style:name="P20" style:family="paragraph" style:parent-style-name="Standard">
      <style:text-properties officeooo:rsid="0059eb77" officeooo:paragraph-rsid="0059eb77"/>
    </style:style>
    <style:style style:name="P21" style:family="paragraph" style:parent-style-name="Heading_20_1">
      <style:text-properties officeooo:rsid="001a3d83" officeooo:paragraph-rsid="0036a4f7"/>
    </style:style>
    <style:style style:name="P22" style:family="paragraph" style:parent-style-name="Heading_20_1">
      <style:text-properties officeooo:rsid="001a3d83" officeooo:paragraph-rsid="001a3d83"/>
    </style:style>
    <style:style style:name="P23" style:family="paragraph" style:parent-style-name="Standard">
      <style:text-properties officeooo:rsid="00191d8b" officeooo:paragraph-rsid="001a3d83"/>
    </style:style>
    <style:style style:name="P24" style:family="paragraph" style:parent-style-name="Standard">
      <style:text-properties officeooo:rsid="005b6001" officeooo:paragraph-rsid="005b6001"/>
    </style:style>
    <style:style style:name="P25" style:family="paragraph" style:parent-style-name="Standard">
      <style:text-properties officeooo:rsid="005ce65b" officeooo:paragraph-rsid="005ce65b"/>
    </style:style>
    <style:style style:name="P26" style:family="paragraph" style:parent-style-name="Heading_20_1">
      <style:text-properties officeooo:rsid="0019270e" officeooo:paragraph-rsid="0019270e"/>
    </style:style>
    <style:style style:name="P27" style:family="paragraph" style:parent-style-name="Standard">
      <style:text-properties officeooo:rsid="00191d8b" officeooo:paragraph-rsid="0019270e"/>
    </style:style>
    <style:style style:name="P28" style:family="paragraph" style:parent-style-name="Standard">
      <style:text-properties officeooo:rsid="004430bc" officeooo:paragraph-rsid="004430bc"/>
    </style:style>
    <style:style style:name="P29" style:family="paragraph" style:parent-style-name="Standard">
      <style:text-properties officeooo:rsid="004430bc" officeooo:paragraph-rsid="005e99be"/>
    </style:style>
    <style:style style:name="P30" style:family="paragraph" style:parent-style-name="Standard">
      <style:text-properties officeooo:rsid="00458ed1" officeooo:paragraph-rsid="005e99be"/>
    </style:style>
    <style:style style:name="T1" style:family="text">
      <style:text-properties officeooo:rsid="001d81b6"/>
    </style:style>
    <style:style style:name="T2" style:family="text">
      <style:text-properties officeooo:rsid="001f437d"/>
    </style:style>
    <style:style style:name="T3" style:family="text">
      <style:text-properties officeooo:rsid="004d7d68"/>
    </style:style>
    <style:style style:name="T4" style:family="text">
      <style:text-properties officeooo:rsid="0052fd05"/>
    </style:style>
    <style:style style:name="T5" style:family="text">
      <style:text-properties officeooo:rsid="0063a102"/>
    </style:style>
    <style:style style:name="T6" style:family="text">
      <style:text-properties officeooo:rsid="005019d3"/>
    </style:style>
    <style:style style:name="T7" style:family="text">
      <style:text-properties officeooo:rsid="0051b6d0"/>
    </style:style>
    <style:style style:name="T8" style:family="text">
      <style:text-properties officeooo:rsid="0066c66d"/>
    </style:style>
    <style:style style:name="T9" style:family="text">
      <style:text-properties officeooo:rsid="0068a8f6"/>
    </style:style>
    <style:style style:name="T10" style:family="text">
      <style:text-properties officeooo:rsid="0068e323"/>
    </style:style>
    <style:style style:name="T11" style:family="text">
      <style:text-properties officeooo:rsid="005d9018"/>
    </style:style>
    <style:style style:name="T12" style:family="text">
      <style:text-properties officeooo:rsid="00563ccc"/>
    </style:style>
    <style:style style:name="T13" style:family="text">
      <style:text-properties officeooo:rsid="0058115a"/>
    </style:style>
    <style:style style:name="T14" style:family="text">
      <style:text-properties officeooo:rsid="005854e0"/>
    </style:style>
    <style:style style:name="T15" style:family="text">
      <style:text-properties officeooo:rsid="005a4d23"/>
    </style:style>
    <style:style style:name="T16" style:family="text">
      <style:text-properties officeooo:rsid="005e99be"/>
    </style:style>
    <style:style style:name="T17" style:family="text">
      <style:text-properties officeooo:rsid="005f39a5"/>
    </style:style>
    <style:style style:name="T18" style:family="text">
      <style:text-properties officeooo:rsid="00602781"/>
    </style:style>
    <style:style style:name="T19" style:family="text">
      <style:text-properties officeooo:rsid="006154bb"/>
    </style:style>
    <style:style style:name="T20" style:family="text">
      <style:text-properties officeooo:rsid="006173c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ndy</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Femme de 35 ans, blonde aux yeux bleus, assez grande par rapport aux autres travailleuses de leur club. <text:span text:style-name="T1">Poitrine généreuse, </text:span><text:span text:style-name="T2">taille </text:span>G<text:span text:style-name="T1">, </text:span>s’étant développée suite à sa grossesse, qui a aussi laissé derrière elle un léger ventre<text:span text:style-name="T1">. </text:span><text:span text:style-name="T3">Elle produit toujours du lait pour allaiter son fils de 10 mois. </text:span><text:span text:style-name="T4">Possède un tatouage </text:span><text:span text:style-name="T5">de deux griffures symétriques le long de ses reins</text:span><text:span text:style-name="T4">, preuve de ses ébats zoophiles occasionnels chez Alpha, son amie para-humaine.</text:span></text:p>
      <text:p text:style-name="P8"/>
      <text:p text:style-name="P9">Elle ne supporte pas le froid, et aime porter des vêtements chauds en fausse fourrure pour se donner une importance plus riche.</text:p>
      <text:p text:style-name="P10"/>
      <text:h text:style-name="P6" text:outline-level="1"><text:bookmark-start text:name="__RefHeading___Toc715_353095010 Copie 1"/>Personnalité<text:bookmark-end text:name="__RefHeading___Toc715_353095010 Copie 1"/></text:h>
      <text:p text:style-name="P7"/>
      <text:p text:style-name="P11">Cindy est à l’opposé d’Amélia, extrovertie et sociable, acceptant pleinement sa vie de strip-teaseuse sous le nom de « Candy », <text:span text:style-name="T6">n’hésitant pas à user de ses charmes et de son corps pour s’attirer des faveurs et gagner plus d’argent. Elle n’est cependant pas imbue d’elle-même, et même si elle est loin d’être naïve, elle sait se montrer à l’écoute et aider ceux qu’elle considère dans le besoin, comme Amélia, </text:span><text:span text:style-name="T7">qu’elle traite à certains moments comme une enfant dû à son propre instinct maternel.</text:span></text:p>
      <text:p text:style-name="P11"/>
      <text:p text:style-name="P12">Elle n’offre pas facilement sa confiance, même à ses connaissances de longue date, se confiant uniquement à ceux comme Amélia qui tiennent leur amitié à cœur. <text:span text:style-name="T8">Elle a comme bon nombre de personnes une certaine méfiance vis-à-vis des para-humains, sans pour autant leur être hostile ; </text:span><text:span text:style-name="T9">elle n’apprécie cependant pas les para-humains de la NPRB, </text:span><text:soft-page-break/><text:span text:style-name="T9">qu’elle considère comme des </text:span><text:span text:style-name="T10">profiteurs</text:span><text:span text:style-name="T9"> incapables de repousser la criminalité dans la ville.</text:span></text:p>
      <text:p text:style-name="P5"/>
      <text:h text:style-name="P6" text:outline-level="1"><text:bookmark-start text:name="__RefHeading___Toc715_353095010 Copie 2"/>Passé<text:bookmark-end text:name="__RefHeading___Toc715_353095010 Copie 2"/></text:h>
      <text:p text:style-name="P7"/>
      <text:p text:style-name="P13">Cindy vient d’une famille pauvre vivant dans le Dakota du Nord, où le climat est bien plus froid qu’en Californie. Sa famille étant très religieuse et conservatrice, Cindy a vécu une enfance composée principalement de restrictions et de remontrances, ne pouvant pas s’exprimer aussi librement que d’autres enfants. Cela lui a valu de développer une certaine aversion pour sa famille et leur mode de vie, cherchant au fil des années à défier de plus en plus leur autorité et leurs moeurses traditionnelles, expérimentant avec des drogues, l’alcool et le sexe avant même l’âge légal. <text:span text:style-name="T11">Cindy avait autrefois un grand-frère, parti des années avant elle pour échapper à leur famille étouffante. Bien qu’il lui avait promis de lui envoyer des lettres, elle ne les a jamais reçu.</text:span></text:p>
      <text:p text:style-name="P13"/>
      <text:p text:style-name="P14">Une fois l’âge adulte atteint, <text:span text:style-name="T11">sans la présence de son frère pour l’inciter à rester</text:span>, Cindy fuit sa famille pour errer à travers le pays, vivant de petits boulots ici et là jusqu’à trouver un endroit où vivre sa propre vie. Elle fait laveuse de voiture, serveuse, danseuse, et finit par rejoindre différents clubs de strip-tease et faire de la prostitution. Si au départ les épreuves sont rudes, parsemées d’alcool et de drogues pour tenir le coup, elle finit par accepter sa nouvelle vie, et après avoir économiser autant qu’elle le put, part en Californie pour vivre près de la mer, son rêve de petite fille. Elle rejoint alors à nouveau un club de strip-tease, cette fois de son plein gré plutôt que par nécessité, et parvient à obtenir un appartement et une vie stable, <text:span text:style-name="T12">ses épreuves ayant forgé son caractère plutôt que de le ruiner.</text:span></text:p>
      <text:p text:style-name="P13"/>
      <text:p text:style-name="P15">Elle parvient même à obtenir un petit-ami, mais leur idylle ne dure pas, celui-ci la quittant peu après la naissance de leur enfant, ayant découvert sa vie de strip-teaseuse. Même si l’expérience l’a blessé, Cindy ne laisse pas son passé la définir, et donne à son fils tout l’amour dont il a besoin.</text:p>
      <text:p text:style-name="P5"/>
      <text:h text:style-name="P6" text:outline-level="1"><text:bookmark-start text:name="__RefHeading___Toc715_353095010 Copie 3"/>Objectifs<text:bookmark-end text:name="__RefHeading___Toc715_353095010 Copie 3"/></text:h>
      <text:p text:style-name="P7"/>
      <text:p text:style-name="P16"><text:span text:style-name="T13">Cindy est une femme entreprenante et déterminée, qui n’hésite pas à poursuivre ses désirs et à mettre les bouchées doubles pour obtenir ce qu’elle veut, reflétant sa vie de privations et de dur labeur. Sa priorité est d’assurer l’avenir de son fils en gagnant autant d’argent qu’elle peut, </text:span><text:span text:style-name="T14">mais elle n’oublie pas de s’amuser de temps en temps ; cependant, ayant baigné dans le monde du sexe la vaste majorité de sa vie adulte, ses passe-temps se résument pour la plupart à du sexe en amis où à la lecture de fictions érotiques.</text:span></text:p>
      <text:p text:style-name="P16"/>
      <text:p text:style-name="P17">Elle aimerait toutefois se trouver un homme, sa dernière relation sérieuse ayant mal terminée et l’ayant laissée seule en charge d’un enfant. Avoir un homme dans sa vie lui permettrait d’offrir une figure paternelle à son fils, et combler le manque affectif qu’elle ressent en elle depuis sa séparation.</text:p>
      <text:p text:style-name="P17"><text:soft-page-break/></text:p>
      <text:h text:style-name="P18" text:outline-level="1"><text:bookmark-start text:name="__RefHeading___Toc715_353095010 Copie 3 Copie 1"/>Pouvoirs<text:bookmark-end text:name="__RefHeading___Toc715_353095010 Copie 3 Copie 1"/></text:h>
      <text:p text:style-name="P19"/>
      <text:p text:style-name="P20">Cindy n’est pas une para-humaine et n’a pas de pouvoirs ; elle sait mieux que quiconque de rester loin des affaires des para-humains et de la NPRB, <text:span text:style-name="T15">ayant elle-même noué des liens d’amitié avec Alpha, une super-villaine locale gérant un réseau de trafic zoophile.</text:span></text:p>
      <text:h text:style-name="P21" text:outline-level="1"/>
      <text:h text:style-name="P22" text:outline-level="1"><text:bookmark-start text:name="__RefHeading___Toc715_353095010 Copie 4 Copie 1"/>Rôle dans l’histoire<text:bookmark-end text:name="__RefHeading___Toc715_353095010 Copie 4 Copie 1"/></text:h>
      <text:p text:style-name="P23"/>
      <text:p text:style-name="P24">Cindy joue le rôle de mentor pour Amélia dans l’industrie du sexe, lui faisant découvrir le monde du strip-tease, de la prostitution et du porno. Elle joue aussi inconsciemment le rôle de figure maternelle pour Amélia, la prenant son aile et voyant en aile une version d’elle-même à l’époque où elle était perdue sans personne pour la guider.</text:p>
      <text:p text:style-name="P24"/>
      <text:p text:style-name="P25">Cindy incarne la confiance en soi, montrant qu’il ne faut pas avoir honte de son corps ; ainsi qu’une image plus positive des travailleurs du sexe, ceux-ci étant constamment dénigrés pour la voie qu’ils ont emprunté, volontairement ou non.</text:p>
      <text:p text:style-name="P5"/>
      <text:h text:style-name="P26" text:outline-level="1"><text:bookmark-start text:name="__RefHeading___Toc715_353095010 Copie 4"/>Relations<text:bookmark-end text:name="__RefHeading___Toc715_353095010 Copie 4"/></text:h>
      <text:p text:style-name="P27"/>
      <text:p text:style-name="P28">S<text:span text:style-name="T16">a famille</text:span> : <text:span text:style-name="T17">Cindy a coupé les ponts avec sa famille, et n’a pas reçu de leurs nouvelles depuis des années. Bien que son frère lui manque, elle n’a jamais reçu ses lettres, et ignore si ses parents les ont caché à leur fille, ou s’il l’a simplement oublié, ou pire ; Cindy préfère ne pas savoir, et laisser sa famille derrière elle avec le reste de son passé.</text:span></text:p>
      <text:p text:style-name="P29"/>
      <text:p text:style-name="P30"><text:span text:style-name="T16">Amélia</text:span> : <text:span text:style-name="T18">Cindy voit en Amélia une version plus jeune de la fille égarée qu’elle était à ses débuts, et ressent malgré elle une envie de la prendre sous son aile pour la guider à travers le monde du sexe. En plus de ça, Cindy admet ouvertement avoir un fétiche pour faire découvrir de nouveaux fétiches aux autres filles et les rendre de plus en plus dépravées. </text:span><text:span text:style-name="T19">Si au début de l’histoire, Cindy se sert plus d’Amélia pour avoir une prime de recrutement qu’autre chose, elle finira par se réchauffer rapidement à sa présence, trouvant en elle l’innocence et l’optimisme qui l’ont quitté il y a de nombreuses années.</text:span></text:p>
      <text:p text:style-name="P30"/>
      <text:p text:style-name="P30"><text:span text:style-name="T16">Alpha</text:span> : <text:span text:style-name="T20">Cindy était autrefois une membre du trafic zoophile d’Alpha, ayant même gardé son tatouage pour se remémorer cette époque. Depuis son départ, les deux femmes sont restées amies, et même si Alpha est le plus souvent trop occupée par ses affaires pour lui rendre visite, il leur arrive de temps en temps de faire une soirée de retrouvailles et de partager leurs partenaires sexuel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H36M22S</meta:editing-duration>
    <meta:editing-cycles>83</meta:editing-cycles>
    <meta:generator>LibreOffice/25.2.4.3$Windows_X86_64 LibreOffice_project/33e196637044ead23f5c3226cde09b47731f7e27</meta:generator>
    <meta:creation-date>2025-12-13T08:33:05.842320600</meta:creation-date>
    <dc:title>Format de texte</dc:title>
    <dc:date>2026-01-07T22:25:45.573652600</dc:date>
    <meta:document-statistic meta:table-count="0" meta:image-count="0" meta:object-count="0" meta:page-count="3" meta:paragraph-count="32" meta:word-count="1127" meta:character-count="6621" meta:non-whitespace-character-count="5526"/>
    <meta:template xlink:type="simple" xlink:actuate="onRequest" xlink:title="Format de texte" xlink:href="file:///C:/Users/Clément/AppData/Roaming/LibreOffice/4/user/template/Format%20de%20texte1.ott" meta:date="2025-12-13T08:33:05.542099300"/>
  </office:meta>
</office:document-meta>
</file>