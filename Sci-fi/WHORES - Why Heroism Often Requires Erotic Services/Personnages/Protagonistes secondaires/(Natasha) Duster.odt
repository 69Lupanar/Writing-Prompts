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6295f6" officeooo:paragraph-rsid="006295f6"/>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be52b" officeooo:paragraph-rsid="004be52b"/>
    </style:style>
    <style:style style:name="P9" style:family="paragraph" style:parent-style-name="Standard">
      <style:text-properties officeooo:rsid="00673644" officeooo:paragraph-rsid="00673644"/>
    </style:style>
    <style:style style:name="P10" style:family="paragraph" style:parent-style-name="Standard">
      <style:text-properties officeooo:rsid="001bf89c" officeooo:paragraph-rsid="001bf89c"/>
    </style:style>
    <style:style style:name="P11" style:family="paragraph" style:parent-style-name="Standard">
      <style:text-properties officeooo:rsid="0068796a" officeooo:paragraph-rsid="0068796a"/>
    </style:style>
    <style:style style:name="P12" style:family="paragraph" style:parent-style-name="Standard">
      <style:text-properties officeooo:rsid="006cb7d1" officeooo:paragraph-rsid="0070381a"/>
    </style:style>
    <style:style style:name="P13" style:family="paragraph" style:parent-style-name="Standard">
      <style:text-properties officeooo:rsid="00791c7f" officeooo:paragraph-rsid="00791c7f"/>
    </style:style>
    <style:style style:name="P14" style:family="paragraph" style:parent-style-name="Standard">
      <style:text-properties officeooo:rsid="006ad492" officeooo:paragraph-rsid="006cb7d1"/>
    </style:style>
    <style:style style:name="P15" style:family="paragraph" style:parent-style-name="Standard">
      <style:text-properties officeooo:rsid="0033ed47" officeooo:paragraph-rsid="0033ed47"/>
    </style:style>
    <style:style style:name="P16" style:family="paragraph" style:parent-style-name="Heading_20_1">
      <style:text-properties officeooo:rsid="0036a4f7" officeooo:paragraph-rsid="0036a4f7"/>
    </style:style>
    <style:style style:name="P17" style:family="paragraph" style:parent-style-name="Standard">
      <style:text-properties officeooo:rsid="00191d8b" officeooo:paragraph-rsid="0036a4f7"/>
    </style:style>
    <style:style style:name="P18" style:family="paragraph" style:parent-style-name="Standard">
      <style:text-properties officeooo:rsid="00720c0d" officeooo:paragraph-rsid="00720c0d"/>
    </style:style>
    <style:style style:name="P19" style:family="paragraph" style:parent-style-name="Heading_20_1">
      <style:text-properties officeooo:rsid="001a3d83" officeooo:paragraph-rsid="0036a4f7"/>
    </style:style>
    <style:style style:name="P20" style:family="paragraph" style:parent-style-name="Heading_20_1">
      <style:text-properties officeooo:rsid="001a3d83" officeooo:paragraph-rsid="001a3d83"/>
    </style:style>
    <style:style style:name="P21" style:family="paragraph" style:parent-style-name="Standard">
      <style:text-properties officeooo:rsid="00191d8b" officeooo:paragraph-rsid="001a3d83"/>
    </style:style>
    <style:style style:name="P22" style:family="paragraph" style:parent-style-name="Standard">
      <style:text-properties officeooo:rsid="005b6001" officeooo:paragraph-rsid="005b6001"/>
    </style:style>
    <style:style style:name="P23" style:family="paragraph" style:parent-style-name="Standard">
      <style:text-properties officeooo:rsid="005ce65b" officeooo:paragraph-rsid="005ce65b"/>
    </style:style>
    <style:style style:name="P24" style:family="paragraph" style:parent-style-name="Heading_20_1">
      <style:text-properties officeooo:rsid="0019270e" officeooo:paragraph-rsid="0019270e"/>
    </style:style>
    <style:style style:name="P25" style:family="paragraph" style:parent-style-name="Standard">
      <style:text-properties officeooo:rsid="00191d8b" officeooo:paragraph-rsid="0019270e"/>
    </style:style>
    <style:style style:name="P26" style:family="paragraph" style:parent-style-name="Standard">
      <style:text-properties officeooo:rsid="00458ed1" officeooo:paragraph-rsid="007abeda"/>
    </style:style>
    <style:style style:name="T1" style:family="text">
      <style:text-properties officeooo:rsid="00673644"/>
    </style:style>
    <style:style style:name="T2" style:family="text">
      <style:text-properties officeooo:rsid="006499a6"/>
    </style:style>
    <style:style style:name="T3" style:family="text">
      <style:text-properties officeooo:rsid="0065a2d9"/>
    </style:style>
    <style:style style:name="T4" style:family="text">
      <style:text-properties officeooo:rsid="001d81b6"/>
    </style:style>
    <style:style style:name="T5" style:family="text">
      <style:text-properties officeooo:rsid="001f437d"/>
    </style:style>
    <style:style style:name="T6" style:family="text">
      <style:text-properties officeooo:rsid="006ad492"/>
    </style:style>
    <style:style style:name="T7" style:family="text">
      <style:text-properties officeooo:rsid="00680fe0"/>
    </style:style>
    <style:style style:name="T8" style:family="text">
      <style:text-properties officeooo:rsid="007bd559"/>
    </style:style>
    <style:style style:name="T9" style:family="text">
      <style:text-properties officeooo:rsid="006a5dec"/>
    </style:style>
    <style:style style:name="T10" style:family="text">
      <style:text-properties officeooo:rsid="00808ea1"/>
    </style:style>
    <style:style style:name="T11" style:family="text">
      <style:text-properties officeooo:rsid="006df35d"/>
    </style:style>
    <style:style style:name="T12" style:family="text">
      <style:text-properties officeooo:rsid="006f9bd6"/>
    </style:style>
    <style:style style:name="T13" style:family="text">
      <style:text-properties officeooo:rsid="007e6fca"/>
    </style:style>
    <style:style style:name="T14" style:family="text">
      <style:text-properties officeooo:rsid="007e9131"/>
    </style:style>
    <style:style style:name="T15" style:family="text">
      <style:text-properties officeooo:rsid="006cb7d1"/>
    </style:style>
    <style:style style:name="T16" style:family="text">
      <style:text-properties officeooo:rsid="0070381a"/>
    </style:style>
    <style:style style:name="T17" style:family="text">
      <style:text-properties officeooo:rsid="0070b67c"/>
    </style:style>
    <style:style style:name="T18" style:family="text">
      <style:text-properties officeooo:rsid="0073d285"/>
    </style:style>
    <style:style style:name="T19" style:family="text">
      <style:text-properties officeooo:rsid="0073fdda"/>
    </style:style>
    <style:style style:name="T20" style:family="text">
      <style:text-properties officeooo:rsid="0074e44e"/>
    </style:style>
    <style:style style:name="T21" style:family="text">
      <style:text-properties officeooo:rsid="0076a7cc"/>
    </style:style>
    <style:style style:name="T22" style:family="text">
      <style:text-properties officeooo:rsid="007fd37f"/>
    </style:style>
    <style:style style:name="T23" style:family="text">
      <style:text-properties officeooo:rsid="00776f56"/>
    </style:style>
    <style:style style:name="T24" style:family="text">
      <style:text-properties officeooo:rsid="0078b6d2"/>
    </style:style>
    <style:style style:name="T25" style:family="text">
      <style:text-properties officeooo:rsid="005e99be"/>
    </style:style>
    <style:style style:name="T26" style:family="text">
      <style:text-properties officeooo:rsid="007f6c29"/>
    </style:style>
    <style:style style:name="T27" style:family="text">
      <style:text-properties officeooo:rsid="007abeda"/>
    </style:style>
    <style:style style:name="T28" style:family="text">
      <style:text-properties officeooo:rsid="00602781"/>
    </style:style>
    <style:style style:name="T29" style:family="text">
      <style:text-properties officeooo:rsid="006154bb"/>
    </style:style>
    <style:style style:name="T30" style:family="text">
      <style:text-properties officeooo:rsid="007b875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ster <text:span text:style-name="T1">(Natasha)</text:span></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Femme de <text:span text:style-name="T2">40</text:span> ans, <text:span text:style-name="T2">cheveux auburn aux yeux bruns</text:span>, assez grande par rapport aux autres <text:span text:style-name="T3">femmes et la plupart de ses collègues héros</text:span>. <text:span text:style-name="T4">Poitrine généreuse, </text:span><text:span text:style-name="T5">taille </text:span>G<text:span text:style-name="T4">.</text:span></text:p>
      <text:p text:style-name="P8"/>
      <text:p text:style-name="P9">En tant que civile, Natasha apparaît la plupart du temps dans <text:span text:style-name="T6">avec une</text:span> tenue <text:span text:style-name="T6">et coiffure soignée, portant des vêtements colorés comme si elle était en vacances</text:span>. En tant que Duster, elle apparaît souvent dans une tenue de course moulante et un casque avec visière masquant le haut de son visage ; <text:span text:style-name="T7">la fermeture de sa tenue descend jusqu’à son vagin pour pouvoir montrer le plus de son corps que possible pour paraître plus aguicheuse et distraire ses ennemis.</text:span> <text:span text:style-name="T7">E</text:span>lle ne porte des vêtements plus chauds qu’en hiver ou lorsqu’elle travaille dans des états plus au nord, où le climat est plus froid.</text:p>
      <text:p text:style-name="P10"/>
      <text:h text:style-name="P6" text:outline-level="1"><text:bookmark-start text:name="__RefHeading___Toc715_353095010 Copie 1"/>Personnalité<text:bookmark-end text:name="__RefHeading___Toc715_353095010 Copie 1"/></text:h>
      <text:p text:style-name="P7"/>
      <text:p text:style-name="P11">Duster a une personnalité différente selon la personne à qui elle s’adresse : Pour ses clients et ses amis, elle apparaît serviable et <text:span text:style-name="T8">calme</text:span> ; pour ses ennemis, elle apparaît volontairement arrogante et moqueuse pour les provoquer et les forcer à faire des erreurs en combat. En dehors de sa vie professionnelle ou des combats, Duster sait se montrer amicale et aider les gens dans le besoin, dont Amelia, qui montre des lacunes si flagrantes sur le monde para-humain que Duster la prend en pitié et la prend sous son aile.</text:p>
      <text:p text:style-name="P11"/>
      <text:p text:style-name="P11">Malgré cela, Duster peut se montrer sans pitié envers ses ennemis. Si elle n’a pas rejoint la NPRB et est restée une héroïne indépendante, c’est justement pour user de la force là où <text:soft-page-break/>les Supers du NPRB auraient les mains liées par leur perception par le public ; <text:span text:style-name="T9">elle n’a pas hésité par le passé à user de violence pour faire parler des captifs, ou user de ses charmes et son corps pour obtenir des faveurs.</text:span></text:p>
      <text:p text:style-name="P11"><text:line-break/><text:span text:style-name="T10">Dans tous les cas, elle aime l’exploration et la découverte de nouveaux endroits, ainsi que les véhicules de course, dont elle s’est inspirée pour créer ses propres véhicules.</text:span></text:p>
      <text:p text:style-name="P5"/>
      <text:h text:style-name="P6" text:outline-level="1"><text:bookmark-start text:name="__RefHeading___Toc715_353095010 Copie 2"/>Passé<text:bookmark-end text:name="__RefHeading___Toc715_353095010 Copie 2"/></text:h>
      <text:p text:style-name="P7"/>
      <text:p text:style-name="P12">Natasha fut l’une des premières para-humaines à adopter un<text:span text:style-name="T11">e</text:span> vie de héros indépendant, avec la particularité unique de voyager d’état en état<text:span text:style-name="T6"> depuis des années</text:span>, <text:span text:style-name="T6">usant de ses pouvoirs d’Ingénieur</text:span><text:span text:style-name="T12">e</text:span><text:span text:style-name="T6"> pour aider les héros locaux là où elle peut se rendre utile. </text:span>Au fil des ans, ses compétences d’Ingénieur se sont améliorées, au point d’avoir à un certain point créé un immense dirigeable, qui lui sert de base d’opérations comme de maison. </text:p>
      <text:p text:style-name="P12"/>
      <text:p text:style-name="P12">A cause de son style de vie nomade, Natasha ne reste jamais à un endroit plus de quelques mois, l’empêchant de former des connections profondes avec qui que ce soit. Cela est dû <text:span text:style-name="T13">au divorce avec son époux, le père d’Amélia</text:span>, <text:span text:style-name="T13">ce</text:span> qui l’a poussé à fuir leur ville d’origine pour éviter d’avoir à confronter ces souvenirs douloureux. Elle honore cependant leur passion pour l’exploration et la découverte, continuant de voyager des années après la fin de <text:span text:style-name="T14">leur couple</text:span> et trouvant le bonheur dans les petits plaisirs de la vie.</text:p>
      <text:p text:style-name="P12"/>
      <text:p text:style-name="P13">Au début de l’histoire, Duster décide de rester en Californie quelques mois de plus que prévu, ayant tracé des activités paranormales et criminelles jusqu’à NextHuman Industries, dont le siège social se trouve dans cet état, soupçonnant l’entreprise d’avoir des liens douteux avec le monde paranormal. Elle finira par découvrir le trafic humain d’Alpha, et s’infiltrera avec Amélia pour tenter de l’arrêter.</text:p>
      <text:p text:style-name="P5"/>
      <text:h text:style-name="P6" text:outline-level="1"><text:bookmark-start text:name="__RefHeading___Toc715_353095010 Copie 3"/>Objectifs<text:bookmark-end text:name="__RefHeading___Toc715_353095010 Copie 3"/></text:h>
      <text:p text:style-name="P7"/>
      <text:p text:style-name="P14">Natasha est une nomade. Libre comme le vent, elle n’a d’attache <text:span text:style-name="T15">nulle part, et transporte sa vie avec elle dans son immense dirigeable. </text:span><text:span text:style-name="T16">Son seul but est d’explorer le monde, aidant les gens sur son chemin quand elle le peut, avec pour futur projet de quitter les États-Unis dans son dirigeable pour explorer le reste de la planète. </text:span><text:span text:style-name="T17">Même si son mode de vie peut être solitaire à la longue, elle apprécie la myriade de cultures et de gens qu’elle rencontre, et prend plaisir à arrêter autant de super-villains qu’elle croise, quittant une ville satisfaite de savoir qu’elle a rendu le quotidien des locaux plus sûr.</text:span></text:p>
      <text:p text:style-name="P15"/>
      <text:h text:style-name="P16" text:outline-level="1"><text:bookmark-start text:name="__RefHeading___Toc715_353095010 Copie 3 Copie 1"/>Pouvoirs<text:bookmark-end text:name="__RefHeading___Toc715_353095010 Copie 3 Copie 1"/></text:h>
      <text:p text:style-name="P17"/>
      <text:p text:style-name="P18">En tant que Duster, elle est une Ingénieur capable de créer des véhicules aux propriétés <text:soft-page-break/>paranormales, capables d’accomplir des prouesses que des véhicules mondains similaires seraient incapables de reproduire. Ses véhicules préférés sont son dirigeable, qui constitue son QG et sa maison, et s<text:span text:style-name="T18">on immense </text:span>moto, capable de rouler sur les murs et d’atteindre une vitesse folle, qu’elle utilise en conduite comme en combat.</text:p>
      <text:p text:style-name="P18"><text:line-break/><text:span text:style-name="T19">Elle n’a cependant pas une grande variété de gadgets utilisables en combat, et se repose le plus souvent sur ses camarades, se battant rarement seule et n’hésitant pas à prendre la fuite en cas de danger, ce qui a contribué à sa longévité, peu de héros durant plus de 5 ans en vie.</text:span></text:p>
      <text:h text:style-name="P19" text:outline-level="1"/>
      <text:h text:style-name="P20" text:outline-level="1"><text:bookmark-start text:name="__RefHeading___Toc715_353095010 Copie 4 Copie 1"/>Rôle dans l’histoire<text:bookmark-end text:name="__RefHeading___Toc715_353095010 Copie 4 Copie 1"/></text:h>
      <text:p text:style-name="P21"/>
      <text:p text:style-name="P22"><text:span text:style-name="T20">Duster</text:span> joue le rôle de mentor pour Amélia dans <text:span text:style-name="T20">le monde paranormal</text:span>, lui faisant découvrir <text:span text:style-name="T21">comment naviguer autour</text:span> <text:span text:style-name="T21">les règles tacites de ce monde, ainsi que les rudiments du combat et autres domaines utiles à tout parahumain</text:span>. <text:span text:style-name="T20">Comme Cindy, e</text:span>lle joue aussi inconsciemment le rôle de figure maternelle pour Amélia, la prenant son aile et voyant en aile une version d’elle-même à l’époque où elle était perdue sans personne pour la guider, <text:span text:style-name="T22">sans savoir que Vulcan est en réalité sa fille</text:span>.</text:p>
      <text:p text:style-name="P22"/>
      <text:p text:style-name="P23">C<text:span text:style-name="T20">omme C</text:span>indy, <text:span text:style-name="T20">Duster</text:span> incarne la confiance en soi, <text:span text:style-name="T23">se montrant capable d’abattre des ennemis plus forts qu’elle malgré ses faiblesses, en usant de sa jugeote et en comptant sur des alliés en cas de besoin. </text:span><text:span text:style-name="T24">Elle enseigne au lecteur que peu importe comment une situation semble désespérée, il y a toujours une solution possible, et qu’il n’y a aucune honte à compter sur les autres pour obtenir de l’aide.</text:span></text:p>
      <text:p text:style-name="P5"/>
      <text:h text:style-name="P24" text:outline-level="1"><text:bookmark-start text:name="__RefHeading___Toc715_353095010 Copie 4"/>Relations<text:bookmark-end text:name="__RefHeading___Toc715_353095010 Copie 4"/></text:h>
      <text:p text:style-name="P25"/>
      <text:p text:style-name="P26"><text:span text:style-name="T25">Amélia</text:span> : <text:span text:style-name="T26">Natasha est en réalité la mère d’Amélia, bien qu’aucune des deux ne s’en rende compte. Cette information n’est révélée qu’implicitement et au compte-goutte au lecteur.</text:span> <text:span text:style-name="T27">Duster</text:span><text:span text:style-name="T28"> voit en </text:span><text:span text:style-name="T26">Vulcan</text:span><text:span text:style-name="T28"> une version plus jeune de la fille égarée qu’elle était à ses débuts, et ressent malgré elle une envie de la prendre sous son aile pour la guider à travers le monde du </text:span><text:span text:style-name="T27">paranormal</text:span><text:span text:style-name="T28">. </text:span><text:span text:style-name="T29">Si au début de l’histoire, </text:span><text:span text:style-name="T30">Duster</text:span><text:span text:style-name="T29"> </text:span><text:span text:style-name="T30">ne voit en Amélia qu’une fille en quête de gloire comme elle en a vu tant d’autres</text:span><text:span text:style-name="T29"> </text:span><text:span text:style-name="T30">durant ses nombreux voyages</text:span><text:span text:style-name="T29">, elle finira par se réchauffer rapidement à sa présence, trouvant en elle </text:span><text:span text:style-name="T30">les qualités d’un grand héros qui ne se trouvent que chez une poignée de para-humai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H25M12S</meta:editing-duration>
    <meta:editing-cycles>108</meta:editing-cycles>
    <meta:generator>LibreOffice/25.2.4.3$Windows_X86_64 LibreOffice_project/33e196637044ead23f5c3226cde09b47731f7e27</meta:generator>
    <meta:creation-date>2025-12-13T08:33:05.842320600</meta:creation-date>
    <dc:title>Format de texte</dc:title>
    <dc:date>2026-01-10T18:16:21.025101300</dc:date>
    <meta:document-statistic meta:table-count="0" meta:image-count="0" meta:object-count="0" meta:page-count="3" meta:paragraph-count="31" meta:word-count="1070" meta:character-count="6295" meta:non-whitespace-character-count="5253"/>
    <meta:template xlink:type="simple" xlink:actuate="onRequest" xlink:title="Format de texte" xlink:href="file:///C:/Users/Clément/AppData/Roaming/LibreOffice/4/user/template/Format%20de%20texte1.ott" meta:date="2025-12-13T08:33:05.542099300"/>
  </office:meta>
</office:document-meta>
</file>