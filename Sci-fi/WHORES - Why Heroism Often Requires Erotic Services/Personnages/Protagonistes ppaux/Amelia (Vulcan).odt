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907a9" officeooo:paragraph-rsid="001907a9"/>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1bf89c" officeooo:paragraph-rsid="001bf89c"/>
    </style:style>
    <style:style style:name="P9" style:family="paragraph" style:parent-style-name="Standard">
      <style:text-properties officeooo:rsid="00249e2b" officeooo:paragraph-rsid="00249e2b"/>
    </style:style>
    <style:style style:name="P10" style:family="paragraph" style:parent-style-name="Standard">
      <style:text-properties officeooo:rsid="002760d6" officeooo:paragraph-rsid="002760d6"/>
    </style:style>
    <style:style style:name="P11" style:family="paragraph" style:parent-style-name="Standard">
      <style:text-properties officeooo:rsid="0020eac4" officeooo:paragraph-rsid="0020eac4"/>
    </style:style>
    <style:style style:name="P12" style:family="paragraph" style:parent-style-name="Standard">
      <style:text-properties officeooo:rsid="00293564" officeooo:paragraph-rsid="00293564"/>
    </style:style>
    <style:style style:name="P13" style:family="paragraph" style:parent-style-name="Standard">
      <style:text-properties officeooo:rsid="002dab31" officeooo:paragraph-rsid="0034fdae"/>
    </style:style>
    <style:style style:name="P14" style:family="paragraph" style:parent-style-name="Standard">
      <style:text-properties officeooo:rsid="0033ed47" officeooo:paragraph-rsid="003c07fd"/>
    </style:style>
    <style:style style:name="P15" style:family="paragraph" style:parent-style-name="Standard">
      <style:text-properties officeooo:rsid="003c07fd" officeooo:paragraph-rsid="003c07fd"/>
    </style:style>
    <style:style style:name="P16" style:family="paragraph" style:parent-style-name="Standard">
      <style:text-properties officeooo:rsid="0033ed47" officeooo:paragraph-rsid="0033ed47"/>
    </style:style>
    <style:style style:name="P17" style:family="paragraph" style:parent-style-name="Heading_20_1">
      <style:text-properties officeooo:rsid="0036a4f7" officeooo:paragraph-rsid="0036a4f7"/>
    </style:style>
    <style:style style:name="P18" style:family="paragraph" style:parent-style-name="Standard">
      <style:text-properties officeooo:rsid="00191d8b" officeooo:paragraph-rsid="0036a4f7"/>
    </style:style>
    <style:style style:name="P19" style:family="paragraph" style:parent-style-name="Standard">
      <style:text-properties officeooo:rsid="0036bacb" officeooo:paragraph-rsid="003eac87"/>
    </style:style>
    <style:style style:name="P20" style:family="paragraph" style:parent-style-name="Standard">
      <style:text-properties officeooo:rsid="004d1e47" officeooo:paragraph-rsid="004d1e47"/>
    </style:style>
    <style:style style:name="P21" style:family="paragraph" style:parent-style-name="Heading_20_1">
      <style:text-properties officeooo:rsid="001a3d83" officeooo:paragraph-rsid="001a3d83"/>
    </style:style>
    <style:style style:name="P22" style:family="paragraph" style:parent-style-name="Standard">
      <style:text-properties officeooo:rsid="00191d8b" officeooo:paragraph-rsid="001a3d83"/>
    </style:style>
    <style:style style:name="P23" style:family="paragraph" style:parent-style-name="Standard">
      <style:text-properties officeooo:rsid="0040e165" officeooo:paragraph-rsid="0040e165"/>
    </style:style>
    <style:style style:name="P24" style:family="paragraph" style:parent-style-name="Heading_20_1">
      <style:text-properties officeooo:rsid="0019270e" officeooo:paragraph-rsid="0019270e"/>
    </style:style>
    <style:style style:name="P25" style:family="paragraph" style:parent-style-name="Standard">
      <style:text-properties officeooo:rsid="00191d8b" officeooo:paragraph-rsid="0019270e"/>
    </style:style>
    <style:style style:name="P26" style:family="paragraph" style:parent-style-name="Standard">
      <style:text-properties officeooo:rsid="004430bc" officeooo:paragraph-rsid="004430bc"/>
    </style:style>
    <style:style style:name="P27" style:family="paragraph" style:parent-style-name="Standard">
      <style:text-properties officeooo:rsid="00458ed1" officeooo:paragraph-rsid="00458ed1"/>
    </style:style>
    <style:style style:name="T1" style:family="text">
      <style:text-properties officeooo:rsid="003adc2f"/>
    </style:style>
    <style:style style:name="T2" style:family="text">
      <style:text-properties officeooo:rsid="0032820e"/>
    </style:style>
    <style:style style:name="T3" style:family="text">
      <style:text-properties officeooo:rsid="001c9bc7"/>
    </style:style>
    <style:style style:name="T4" style:family="text">
      <style:text-properties officeooo:rsid="002002c6"/>
    </style:style>
    <style:style style:name="T5" style:family="text">
      <style:text-properties officeooo:rsid="001d81b6"/>
    </style:style>
    <style:style style:name="T6" style:family="text">
      <style:text-properties officeooo:rsid="001f437d"/>
    </style:style>
    <style:style style:name="T7" style:family="text">
      <style:text-properties officeooo:rsid="0024e8c4"/>
    </style:style>
    <style:style style:name="T8" style:family="text">
      <style:text-properties officeooo:rsid="00251390"/>
    </style:style>
    <style:style style:name="T9" style:family="text">
      <style:text-properties officeooo:rsid="0025b53a"/>
    </style:style>
    <style:style style:name="T10" style:family="text">
      <style:text-properties officeooo:rsid="0021bd78"/>
    </style:style>
    <style:style style:name="T11" style:family="text">
      <style:text-properties officeooo:rsid="00536f50"/>
    </style:style>
    <style:style style:name="T12" style:family="text">
      <style:text-properties officeooo:rsid="00549c31"/>
    </style:style>
    <style:style style:name="T13" style:family="text">
      <style:text-properties officeooo:rsid="002328b5"/>
    </style:style>
    <style:style style:name="T14" style:family="text">
      <style:text-properties officeooo:rsid="00439101"/>
    </style:style>
    <style:style style:name="T15" style:family="text">
      <style:text-properties officeooo:rsid="002aedef"/>
    </style:style>
    <style:style style:name="T16" style:family="text">
      <style:text-properties officeooo:rsid="004a0db6"/>
    </style:style>
    <style:style style:name="T17" style:family="text">
      <style:text-properties officeooo:rsid="0032a423"/>
    </style:style>
    <style:style style:name="T18" style:family="text">
      <style:text-properties officeooo:rsid="004773a0"/>
    </style:style>
    <style:style style:name="T19" style:family="text">
      <style:text-properties officeooo:rsid="00481977"/>
    </style:style>
    <style:style style:name="T20" style:family="text">
      <style:text-properties officeooo:rsid="00485e59"/>
    </style:style>
    <style:style style:name="T21" style:family="text">
      <style:text-properties officeooo:rsid="002e93bb"/>
    </style:style>
    <style:style style:name="T22" style:family="text">
      <style:text-properties officeooo:rsid="0033579e"/>
    </style:style>
    <style:style style:name="T23" style:family="text">
      <style:text-properties officeooo:rsid="0034fdae"/>
    </style:style>
    <style:style style:name="T24" style:family="text">
      <style:text-properties officeooo:rsid="0036a4f7"/>
    </style:style>
    <style:style style:name="T25" style:family="text">
      <style:text-properties officeooo:rsid="003dc1bd"/>
    </style:style>
    <style:style style:name="T26" style:family="text">
      <style:text-properties officeooo:rsid="003830e1"/>
    </style:style>
    <style:style style:name="T27" style:family="text">
      <style:text-properties officeooo:rsid="003eac87"/>
    </style:style>
    <style:style style:name="T28" style:family="text">
      <style:text-properties officeooo:rsid="00402933"/>
    </style:style>
    <style:style style:name="T29" style:family="text">
      <style:text-properties officeooo:rsid="004d3f48"/>
    </style:style>
    <style:style style:name="T30" style:family="text">
      <style:text-properties officeooo:rsid="004f1fa2"/>
    </style:style>
    <style:style style:name="T31" style:family="text">
      <style:text-properties officeooo:rsid="0050de90"/>
    </style:style>
    <style:style style:name="T32" style:family="text">
      <style:text-properties officeooo:rsid="004dc5d2"/>
    </style:style>
    <style:style style:name="T33" style:family="text">
      <style:text-properties officeooo:rsid="004def9d"/>
    </style:style>
    <style:style style:name="T34" style:family="text">
      <style:text-properties officeooo:rsid="0042acda"/>
    </style:style>
    <style:style style:name="T35" style:family="text">
      <style:text-properties officeooo:rsid="0043fa89"/>
    </style:style>
    <style:style style:name="T36" style:family="text">
      <style:text-properties officeooo:rsid="0044a258"/>
    </style:style>
    <style:style style:name="T37" style:family="text">
      <style:text-properties officeooo:rsid="0044bb5a"/>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elia</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3</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Fille de 1<text:span text:style-name="T1">8</text:span> ans, <text:span text:style-name="T2">peau légèrement bronzée dû à son héritage italien</text:span>, yeux bleu-<text:span text:style-name="T3">gris</text:span>, long cheveux bruns, <text:span text:style-name="T4">cuisses larges et </text:span>longues jambes développées dû en partie à son usage extensif de son planeur. <text:span text:style-name="T5">Le reste de sa musculature est peu développée, plus proche de celle des filles de son âge. Poitrine généreuse, </text:span><text:span text:style-name="T6">taille F</text:span><text:span text:style-name="T5">, qu’elle hérite de sa mère.</text:span></text:p>
      <text:p text:style-name="P8"/>
      <text:p text:style-name="P9">Son costume de héros consiste au début de l’histoire en une tenue noire et bleue, montrant son manque de moyens pour s’offrir un véritable costume. Elle se verra par la suite offrir une armure composée de plaques métalliques couvrant son torse, ainsi qu’un casque et des gants métalliques. <text:span text:style-name="T7">Ses jambes seront peu protégées </text:span><text:span text:style-name="T8">et sa taille de poitrine sera grandement mise en avant par son </text:span><text:span text:style-name="T9">poitrail</text:span><text:span text:style-name="T7"> dans le but de montrer ses courbes, malgré ses réticences à le faire.</text:span></text:p>
      <text:p text:style-name="P9"/>
      <text:p text:style-name="P10">Plus tard, elle obtient un véritable costume utilisant l’or et le bleu, symbolisant un soleil levant radieux et un avenir radieux. Ses protections seront plus solides et légères mais moins visibles, lui permettant de voler plus efficacement sur son planeur et de mieux montrer ses courbes.</text:p>
      <text:p text:style-name="P8"/>
      <text:h text:style-name="P6" text:outline-level="1"><text:bookmark-start text:name="__RefHeading___Toc715_353095010 Copie 1"/>Personnalité<text:bookmark-end text:name="__RefHeading___Toc715_353095010 Copie 1"/></text:h>
      <text:p text:style-name="P7"/>
      <text:p text:style-name="P11">Timide et réservée, elle ne possède pas beaucoup d’amies dû à son intérêt pour la mécanique et l’<text:span text:style-name="T10">électronique</text:span>, une passion qui n’est pas partagée par les filles de son âge. <text:span text:style-name="T11">Bien qu’elle ne sache pas s’y faire avec les jeunes de son âge, </text:span><text:span text:style-name="T12">e</text:span><text:span text:style-name="T13">lle aime cependant se faire </text:span><text:soft-page-break/><text:span text:style-name="T13">des amis, et fait toujours de son mieux pour aider une connaissance dans le besoin. </text:span><text:span text:style-name="T14">Elle est aussi une travailleuse acharnée, mettant toute son énergie pour accomplir ce qu’elle désire obtenir.</text:span></text:p>
      <text:p text:style-name="P11"/>
      <text:p text:style-name="P12">En costume, elle force sa voix pour tenter de paraître plus imposante, mais flanche rapidement quand une para-humaine lui témoigne de l’intérêt, <text:span text:style-name="T15">et il lui arrive souvent de bégayer quand elle perd confiance</text:span>.</text:p>
      <text:p text:style-name="P12"/>
      <text:p text:style-name="P12">Sa pudeur face au sexe diminue régulièrement au fil de l’histoire, mais elle garde toujours une certaine timidité quand elle couche avec des gens qu’elle connaît. <text:span text:style-name="T16">En tant que strip-teaseuse, elle garde une personnalité mystérieuse et envoûtante pour rester dans le personnage de la « beauté exotique » qu’elle incarne.</text:span></text:p>
      <text:p text:style-name="P5"/>
      <text:h text:style-name="P6" text:outline-level="1"><text:bookmark-start text:name="__RefHeading___Toc715_353095010 Copie 2"/>Passé<text:bookmark-end text:name="__RefHeading___Toc715_353095010 Copie 2"/></text:h>
      <text:p text:style-name="P7"/>
      <text:p text:style-name="P13">Amelia est issue d’une famille de garagistes, son père <text:span text:style-name="T17">étant un immigré du sud de l’Italie</text:span> possédant un garage où il lui a transmis sa passion pour la mécanique. Ils vivent modestement, <text:span text:style-name="T18">surtout depuis l’implantation de Nexthuman Industries dans la région leur compétition </text:span><text:span text:style-name="T19">pour la réparation de </text:span><text:span text:style-name="T20">leurs</text:span><text:span text:style-name="T19"> nouveaux véhicules</text:span><text:span text:style-name="T18">. Leur vie modeste</text:span> n’a pas plu à la famille de sa mère, qui souhaitaient la voir épouser quelqu’un de plus riche. Cette aigreur finira par affecter leur couple, et ils finiront par se séparer et partager la garde de leur fille. </text:p>
      <text:p text:style-name="P13"/>
      <text:p text:style-name="P13">Même s’ils aiment toujours leur fille, Amelia a mal vécu leur séparation, se sentant partiellement coupable de leur séparation. <text:span text:style-name="T21">Elle se sent également plus proche de son père que de sa mère, </text:span><text:span text:style-name="T22">dû à sa couleur de peau comme à sa passion</text:span><text:span text:style-name="T21">, ce qui explique pourquoi elle offre rapidement sa confiance aux femmes qu’elle rencontre, cherchant inconsciemment une figure maternelle pour la guider ; c’est pourquoi elle s’entend si bien avec Cindy dès le début de l’histoire.</text:span></text:p>
      <text:p text:style-name="P5"/>
      <text:h text:style-name="P6" text:outline-level="1"><text:bookmark-start text:name="__RefHeading___Toc715_353095010 Copie 3"/>Objectifs<text:bookmark-end text:name="__RefHeading___Toc715_353095010 Copie 3"/></text:h>
      <text:p text:style-name="P7"/>
      <text:p text:style-name="P14">En tant que civile, Amelia n’a pas de grande ambition dans la vie, étant encore une jeune adolescente au lycée. Elle rêve cependant de se faire des amis et d’avoir un petit ami, comme toutes les filles de son âge. <text:span text:style-name="T23">Et comme beaucoup, elle a toujours rêvé de devenir un héros, c’est pourquoi elle a accepté ses pouvoirs avec joie, malgré les circonstances </text:span><text:span text:style-name="T24">déprimantes de leur apparition.</text:span></text:p>
      <text:p text:style-name="P14"/>
      <text:p text:style-name="P15">Cependant, face à son manque de fonds pour financer ses expéditions héroïques, sa première priorité est de trouver un emploi quel qu’il soit, <text:span text:style-name="T25">ayant échoué à trouver un métier bien payé d’ingénieure.</text:span></text:p>
      <text:p text:style-name="P16"/>
      <text:h text:style-name="P17" text:outline-level="1"><text:bookmark-start text:name="__RefHeading___Toc715_353095010 Copie 3 Copie 1"/><text:soft-page-break/>Pouvoirs<text:bookmark-end text:name="__RefHeading___Toc715_353095010 Copie 3 Copie 1"/></text:h>
      <text:p text:style-name="P18"/>
      <text:p text:style-name="P19">Amelia a développé ses pouvoirs peu après la séparation de ses parents. Trouvant refuge dans le garage de son père auprès de la compagnie des machines pour noyer son chagrin, elle devient soudainement Ingénieure, capable de construire <text:span text:style-name="T26">et réparer</text:span> toute sorte de machines et gadgets, et même de réparer les paratechs d’autres Ingénieurs.</text:p>
      <text:p text:style-name="P19"/>
      <text:p text:style-name="P19"><text:span text:style-name="T27">S</text:span>a compréhension de leur paratech <text:span text:style-name="T27">nécessite cependant un contact physique et du temps pour comprendre leur structure, et est très volatile, </text:span>disparaissant une fois les réparations terminées, <text:span text:style-name="T27">mais laissant suffisamment de traces pour s’en inspirer pour ses propres créations. Amelia est capable de construire des approximations des paratechs qu’elle rencontre, bien qu’il lui faille souvent s’en approcher et se mettre en danger pour obtenir leurs plans. </text:span><text:span text:style-name="T28">Elle a cependant réussi à construire un planeur par elle-même avec des bouts de ferraille venant d’une déchetterie et des pièces usagées de son garage ; ce qu’elle considère comme un exploit personnel et qu’elle n’hésite pas à montrer aux autres.</text:span></text:p>
      <text:p text:style-name="P19"/>
      <text:p text:style-name="P20">Ayant rêvé depuis toute petite de devenir un héros, Amelia adopte « <text:span text:style-name="T29">Vulcan »</text:span> comme nom de héros – <text:span text:style-name="T29">en rapport au dieu </text:span><text:span text:style-name="T30">romain</text:span><text:span text:style-name="T29"> de la forge, référant </text:span><text:span text:style-name="T30">son héritage italien </text:span><text:span text:style-name="T31">et</text:span><text:span text:style-name="T29"> sa capacité de réparer de la paratech –</text:span> espérant apporter un peu de sécurité dans une ville avec une forte proportion de para-humains, la plupart contre les forces de l’ordre. <text:span text:style-name="T32">Le nom « Vulcan » ne lui est pas venu tout de suite, et est ambigu sur </text:span><text:span text:style-name="T33">son sexe et </text:span><text:span text:style-name="T32">sa signification vis-à-vis des pouvoirs d’Amélia pour beaucoup de gens, mais elle devra faire avec.</text:span></text:p>
      <text:p text:style-name="P19"/>
      <text:h text:style-name="P21" text:outline-level="1"><text:bookmark-start text:name="__RefHeading___Toc715_353095010 Copie 4 Copie 1"/>Rôle dans l’histoire<text:bookmark-end text:name="__RefHeading___Toc715_353095010 Copie 4 Copie 1"/></text:h>
      <text:p text:style-name="P22"/>
      <text:p text:style-name="P23">Personnage ppal de l’histoire. <text:span text:style-name="T34">Elle devient une travailleuse du sexe pour financer sa vie de héros, pour laquelle elle s’entraîne sans relâche. Elle permet au lecteur de découvrir à travers ses yeux l’industrie du sexe, et de voir les travailleurs du sexe comme des gens normaux, traités comme des parias comme le sont les para-humains. </text:span><text:span text:style-name="T35">Son ambition et son amour de l’effort montrent aussi au lecteur que quiconque est capable d’accomplir de grandes choses, quelque soit leur origine ou statut social.</text:span></text:p>
      <text:p text:style-name="P5"/>
      <text:h text:style-name="P24" text:outline-level="1"><text:bookmark-start text:name="__RefHeading___Toc715_353095010 Copie 4"/>Relations<text:bookmark-end text:name="__RefHeading___Toc715_353095010 Copie 4"/></text:h>
      <text:p text:style-name="P25"/>
      <text:p text:style-name="P26">Ses parents : Même si Amelia aime beaucoup ses parents, elle leur en veut beaucoup de s’être séparés à cause de ses grand-parents. Elle est plus proche de son père que de sa mère, avec qui elle tente de garder une relation au moins cordiale, évitant de parler de son père autant que possible. Elle évite également <text:span text:style-name="T36">autant que possible</text:span> de leur mentionner sa vie de héros et son métier de travailleuse du sexe, <text:span text:style-name="T37">utilisant un prétexte de travailler comme aidante dans un studio de photographie.</text:span></text:p>
      <text:p text:style-name="P26"/>
      <text:p text:style-name="P27">Cindy : Amelia voit Cindy comme une mentor dans l’industrie du sexe, suivant ses conseils <text:soft-page-break/>et se sentant redevable de son aide. Elle la voit aussi avec affection comme une figure maternelle, et ressent également une certaine attraction dû à sa beauté et sa confiance en el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49M20S</meta:editing-duration>
    <meta:editing-cycles>64</meta:editing-cycles>
    <meta:generator>LibreOffice/25.2.4.3$Windows_X86_64 LibreOffice_project/33e196637044ead23f5c3226cde09b47731f7e27</meta:generator>
    <meta:creation-date>2025-12-13T08:33:05.842320600</meta:creation-date>
    <dc:title>Format de texte</dc:title>
    <dc:date>2026-04-08T00:24:33.582082600</dc:date>
    <meta:document-statistic meta:table-count="0" meta:image-count="0" meta:object-count="0" meta:page-count="4" meta:paragraph-count="33" meta:word-count="1111" meta:character-count="6687" meta:non-whitespace-character-count="5606"/>
    <meta:template xlink:type="simple" xlink:actuate="onRequest" xlink:title="Format de texte" xlink:href="file:///C:/Users/Clément/AppData/Roaming/LibreOffice/4/user/template/Format%20de%20texte1.ott" meta:date="2025-12-13T08:33:05.542099300"/>
  </office:meta>
</office:document-meta>
</file>