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485e67" officeooo:paragraph-rsid="00485e67"/>
    </style:style>
    <style:style style:name="P2" style:family="paragraph" style:parent-style-name="Standard">
      <style:text-properties officeooo:rsid="00106f63" officeooo:paragraph-rsid="00106f63"/>
    </style:style>
    <style:style style:name="P3" style:family="paragraph" style:parent-style-name="Subtitle">
      <style:text-properties officeooo:rsid="001907a9" officeooo:paragraph-rsid="001907a9"/>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91d8b"/>
    </style:style>
    <style:style style:name="P6" style:family="paragraph" style:parent-style-name="Heading_20_1">
      <style:text-properties officeooo:rsid="00191d8b" officeooo:paragraph-rsid="00191d8b"/>
    </style:style>
    <style:style style:name="P7" style:family="paragraph" style:parent-style-name="Standard">
      <style:text-properties officeooo:rsid="00191d8b" officeooo:paragraph-rsid="00191d8b"/>
    </style:style>
    <style:style style:name="P8" style:family="paragraph" style:parent-style-name="Standard">
      <style:text-properties officeooo:rsid="00485e67" officeooo:paragraph-rsid="004cf90e"/>
    </style:style>
    <style:style style:name="P9" style:family="paragraph" style:parent-style-name="Standard">
      <style:text-properties officeooo:rsid="001bf89c" officeooo:paragraph-rsid="001bf89c"/>
    </style:style>
    <style:style style:name="P10" style:family="paragraph" style:parent-style-name="Standard">
      <style:text-properties officeooo:rsid="004cfce0" officeooo:paragraph-rsid="004cfce0"/>
    </style:style>
    <style:style style:name="P11" style:family="paragraph" style:parent-style-name="Standard">
      <style:text-properties officeooo:rsid="00502fcf" officeooo:paragraph-rsid="00502fcf"/>
    </style:style>
    <style:style style:name="P12" style:family="paragraph" style:parent-style-name="Standard">
      <style:text-properties officeooo:rsid="0051d41f" officeooo:paragraph-rsid="0051d41f"/>
    </style:style>
    <style:style style:name="P13" style:family="paragraph" style:parent-style-name="Standard">
      <style:text-properties officeooo:rsid="0051ef32" officeooo:paragraph-rsid="0051ef32"/>
    </style:style>
    <style:style style:name="P14" style:family="paragraph" style:parent-style-name="Standard">
      <style:text-properties officeooo:rsid="0059c977" officeooo:paragraph-rsid="005b8227"/>
    </style:style>
    <style:style style:name="P15" style:family="paragraph" style:parent-style-name="Standard">
      <style:text-properties officeooo:rsid="005c96b7" officeooo:paragraph-rsid="005c96b7"/>
    </style:style>
    <style:style style:name="P16" style:family="paragraph" style:parent-style-name="Standard">
      <style:text-properties officeooo:rsid="0033ed47" officeooo:paragraph-rsid="0033ed47"/>
    </style:style>
    <style:style style:name="P17" style:family="paragraph" style:parent-style-name="Heading_20_1">
      <style:text-properties officeooo:rsid="0036a4f7" officeooo:paragraph-rsid="0036a4f7"/>
    </style:style>
    <style:style style:name="P18" style:family="paragraph" style:parent-style-name="Standard">
      <style:text-properties officeooo:rsid="00191d8b" officeooo:paragraph-rsid="0036a4f7"/>
    </style:style>
    <style:style style:name="P19" style:family="paragraph" style:parent-style-name="Standard">
      <style:text-properties officeooo:rsid="005f9457" officeooo:paragraph-rsid="0062e81b"/>
    </style:style>
    <style:style style:name="P20" style:family="paragraph" style:parent-style-name="Standard">
      <style:text-properties officeooo:rsid="0062e81b" officeooo:paragraph-rsid="0062e81b"/>
    </style:style>
    <style:style style:name="P21" style:family="paragraph" style:parent-style-name="Standard">
      <style:text-properties officeooo:rsid="006db331" officeooo:paragraph-rsid="006db331"/>
    </style:style>
    <style:style style:name="P22" style:family="paragraph" style:parent-style-name="Standard">
      <style:text-properties officeooo:rsid="006f1f54" officeooo:paragraph-rsid="006f1f54"/>
    </style:style>
    <style:style style:name="P23" style:family="paragraph" style:parent-style-name="Standard">
      <style:text-properties officeooo:rsid="001a3d83" officeooo:paragraph-rsid="0062e81b"/>
    </style:style>
    <style:style style:name="P24" style:family="paragraph" style:parent-style-name="Heading_20_1">
      <style:text-properties officeooo:rsid="001a3d83" officeooo:paragraph-rsid="001a3d83"/>
    </style:style>
    <style:style style:name="P25" style:family="paragraph" style:parent-style-name="Standard">
      <style:text-properties officeooo:rsid="00191d8b" officeooo:paragraph-rsid="001a3d83"/>
    </style:style>
    <style:style style:name="P26" style:family="paragraph" style:parent-style-name="Standard">
      <style:text-properties officeooo:rsid="00652d17" officeooo:paragraph-rsid="00652d17"/>
    </style:style>
    <style:style style:name="P27" style:family="paragraph" style:parent-style-name="Standard">
      <style:text-properties officeooo:rsid="0067cc03" officeooo:paragraph-rsid="0067cc03"/>
    </style:style>
    <style:style style:name="P28" style:family="paragraph" style:parent-style-name="Heading_20_1">
      <style:text-properties officeooo:rsid="0019270e" officeooo:paragraph-rsid="0019270e"/>
    </style:style>
    <style:style style:name="P29" style:family="paragraph" style:parent-style-name="Standard">
      <style:text-properties officeooo:rsid="00191d8b" officeooo:paragraph-rsid="0019270e"/>
    </style:style>
    <style:style style:name="P30" style:family="paragraph" style:parent-style-name="Standard">
      <style:text-properties officeooo:rsid="004430bc" officeooo:paragraph-rsid="004430bc"/>
    </style:style>
    <style:style style:name="P31" style:family="paragraph" style:parent-style-name="Standard">
      <style:text-properties officeooo:rsid="00458ed1" officeooo:paragraph-rsid="00458ed1"/>
    </style:style>
    <style:style style:name="T1" style:family="text">
      <style:text-properties officeooo:rsid="0049ec82"/>
    </style:style>
    <style:style style:name="T2" style:family="text">
      <style:text-properties officeooo:rsid="004b9955"/>
    </style:style>
    <style:style style:name="T3" style:family="text">
      <style:text-properties officeooo:rsid="004cf90e"/>
    </style:style>
    <style:style style:name="T4" style:family="text">
      <style:text-properties officeooo:rsid="0050968a"/>
    </style:style>
    <style:style style:name="T5" style:family="text">
      <style:text-properties officeooo:rsid="005bca42"/>
    </style:style>
    <style:style style:name="T6" style:family="text">
      <style:text-properties officeooo:rsid="00529cd0"/>
    </style:style>
    <style:style style:name="T7" style:family="text">
      <style:text-properties officeooo:rsid="00546442"/>
    </style:style>
    <style:style style:name="T8" style:family="text">
      <style:text-properties officeooo:rsid="0055cb95"/>
    </style:style>
    <style:style style:name="T9" style:family="text">
      <style:text-properties officeooo:rsid="00560627"/>
    </style:style>
    <style:style style:name="T10" style:family="text">
      <style:text-properties officeooo:rsid="0057dc0d"/>
    </style:style>
    <style:style style:name="T11" style:family="text">
      <style:text-properties officeooo:rsid="0059c977"/>
    </style:style>
    <style:style style:name="T12" style:family="text">
      <style:text-properties officeooo:rsid="005a2b56"/>
    </style:style>
    <style:style style:name="T13" style:family="text">
      <style:text-properties officeooo:rsid="005b8227"/>
    </style:style>
    <style:style style:name="T14" style:family="text">
      <style:text-properties officeooo:rsid="005e24da"/>
    </style:style>
    <style:style style:name="T15" style:family="text">
      <style:text-properties officeooo:rsid="005e3279"/>
    </style:style>
    <style:style style:name="T16" style:family="text">
      <style:text-properties officeooo:rsid="00618142"/>
    </style:style>
    <style:style style:name="T17" style:family="text">
      <style:text-properties officeooo:rsid="0062e81b"/>
    </style:style>
    <style:style style:name="T18" style:family="text">
      <style:text-properties officeooo:rsid="0064bc4d"/>
    </style:style>
    <style:style style:name="T19" style:family="text">
      <style:text-properties officeooo:rsid="00708c49"/>
    </style:style>
    <style:style style:name="T20" style:family="text">
      <style:text-properties officeooo:rsid="0066de7d"/>
    </style:style>
    <style:style style:name="T21" style:family="text">
      <style:text-properties officeooo:rsid="0069afd4"/>
    </style:style>
    <style:style style:name="T22" style:family="text">
      <style:text-properties officeooo:rsid="006b7c5f"/>
    </style:style>
    <style:style style:name="T23" style:family="text">
      <style:text-properties officeooo:rsid="00671724"/>
    </style:style>
    <style:style style:name="T24" style:family="text">
      <style:text-properties officeooo:rsid="0067cc03"/>
    </style:style>
    <style:style style:name="T25" style:family="text">
      <style:text-properties officeooo:rsid="0068400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tro</text:p>
      <text:p text:style-name="P2"/>
      <text:p text:style-name="P3">Fiche personnag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Physique<text:tab/>1</text:a></text:p>
          <text:p text:style-name="P4"><text:a xlink:type="simple" xlink:href="#__RefHeading___Toc715_353095010%20Copie%201" text:style-name="Index_20_Link" text:visited-style-name="Index_20_Link">Personnalité<text:tab/>1</text:a></text:p>
          <text:p text:style-name="P4"><text:a xlink:type="simple" xlink:href="#__RefHeading___Toc715_353095010%20Copie%202" text:style-name="Index_20_Link" text:visited-style-name="Index_20_Link">Passé<text:tab/>2</text:a></text:p>
          <text:p text:style-name="P4"><text:a xlink:type="simple" xlink:href="#__RefHeading___Toc715_353095010%20Copie%203" text:style-name="Index_20_Link" text:visited-style-name="Index_20_Link">Objectifs<text:tab/>2</text:a></text:p>
          <text:p text:style-name="P4"><text:a xlink:type="simple" xlink:href="#__RefHeading___Toc715_353095010%20Copie%203%20Copie%201" text:style-name="Index_20_Link" text:visited-style-name="Index_20_Link">Pouvoirs<text:tab/>2</text:a></text:p>
          <text:p text:style-name="P4"><text:a xlink:type="simple" xlink:href="#__RefHeading___Toc715_353095010%20Copie%204%20Copie%201" text:style-name="Index_20_Link" text:visited-style-name="Index_20_Link">Rôle dans l’histoire<text:tab/>3</text:a></text:p>
          <text:p text:style-name="P4"><text:a xlink:type="simple" xlink:href="#__RefHeading___Toc715_353095010%20Copie%204" text:style-name="Index_20_Link" text:visited-style-name="Index_20_Link">Relations<text:tab/>3</text:a></text:p>
        </text:index-body>
      </text:table-of-content>
      <text:p text:style-name="P5"/>
      <text:p text:style-name="P5"/>
      <text:h text:style-name="P6" text:outline-level="1"><text:bookmark-start text:name="__RefHeading___Toc715_353095010"/>Physique<text:bookmark-end text:name="__RefHeading___Toc715_353095010"/></text:h>
      <text:p text:style-name="P7"/>
      <text:p text:style-name="P8">Androïde <text:span text:style-name="T1">composée de divers alliages et de paratechs d’origine inconnue. Son design partage cependant des similarités avec les androïdes de NextHuman Industries, notamment leurs androïdes de combat. </text:span><text:span text:style-name="T2">Son apparence représente une femme à l’âge indéterminée, estimé au milieu de la vingtaine. Cheveux courts et gris, yeux gris, </text:span><text:span text:style-name="T3">petite stature pour l’âge qu’elle représente. Récupérée par le NPRB dans un état endommagé, avec de nombreux accessoires non-fonctionnels, jusqu’à sa réparation par Amélia.</text:span></text:p>
      <text:p text:style-name="P9"/>
      <text:h text:style-name="P6" text:outline-level="1"><text:bookmark-start text:name="__RefHeading___Toc715_353095010 Copie 1"/>Personnalité<text:bookmark-end text:name="__RefHeading___Toc715_353095010 Copie 1"/></text:h>
      <text:p text:style-name="P7"/>
      <text:p text:style-name="P10">Astro peut devenir rapidement aimée par son entourage grâce à sa personnalité enjouée et serviable, se montrant polie et courtoise en toute circonstance. Cependant, elle démontre rapidement une personnalité plus riche que les autres androïdes du NPRB, montrant une grande maturité émotionnelle, une curiosité et une empathie introuvable chez les autres machines, <text:span text:style-name="T4">rivalisant celles des humains.</text:span></text:p>
      <text:p text:style-name="P10"/>
      <text:p text:style-name="P11">Elle fait également preuve <text:span text:style-name="T5">d’un fort altruisme, mettant toujours la survie des autres au-dessus de la sienne. Elle est aussi</text:span> d’une grande innocence bordant la naïveté, ayant du mal à comprendre certains concepts tels que le mensonge ou la supercherie, ce qui peut lui causer des problèmes.</text:p>
      <text:p text:style-name="P5"/>
      <text:h text:style-name="P6" text:outline-level="1"><text:bookmark-start text:name="__RefHeading___Toc715_353095010 Copie 2"/>Passé<text:bookmark-end text:name="__RefHeading___Toc715_353095010 Copie 2"/></text:h>
      <text:p text:style-name="P7"><text:soft-page-break/></text:p>
      <text:p text:style-name="P12">Le passé d’Astro est révélé au compte-goutte au fil de l’histoire. Elle est retrouvée dans une déchetterie, endommagée et avec une grande partie de sa mémoire verrouillée, y compris son nom. Après avoir assisté à un des nombreux élans d’empathie d’Astro envers un androïde défectueux ayant semé le chaos en ville, les membres du NPRB décident de la nommer « Astro », en référence à Astro Boy.</text:p>
      <text:p text:style-name="P12"/>
      <text:p text:style-name="P13">Peu à peu, Astro parvient à déverrouiller ses souvenirs. Elle est la création de l’effort combiné d’OS, <text:span text:style-name="T6">un Ingénieur spécialisé dans la création d’IAs, et AM, un Ingénieur spécialisé dans la création de robots de combat. Ensemble, ils parviennent à réaliser l’impossible : La création d’Astro, une androïde possédant une </text:span><text:span text:style-name="T7">appar</text:span><text:span text:style-name="T8">e</text:span><text:span text:style-name="T7">nce et une</text:span><text:span text:style-name="T6"> conscience </text:span><text:span text:style-name="T7">humaines</text:span><text:span text:style-name="T6">. </text:span><text:span text:style-name="T9">OS veut utiliser cette nouvelle création comme modèle pour créer des androïdes capables d’assister et vivre aux côtés des humains, mais AM, voyant le potentiel financier d’une telle découverte, désire créer des robots de combats parfaits, capables de décisions complexes et de s’adapter à tout type de mission, du combat de tranchée à l’assassinat, et les vendre aux plus offrants. Une dissension se forme entre les deux para-humains, menant à l’assassinat de OS par AM. Astro, seule témoin du meu</text:span><text:span text:style-name="T10">r</text:span><text:span text:style-name="T9">tre, tente de s’échapper, mais est grièvement endommagé par AM, qui la laisse pour morte après avoir jeté ses restes dans </text:span><text:span text:style-name="T11">la mer</text:span><text:span text:style-name="T9">. Toujours vivante, traumatisée par la mort d’un de ses créateurs de la main de l’autre, bloque ces souvenirs de sa mémoire et passe en mode veille pour économiser ses forces.</text:span></text:p>
      <text:p text:style-name="P13"/>
      <text:p text:style-name="P14">Récupérée des années plus tard par un chalutier, la carcasse d’Astro est jetée dans une déchetterie, puis retrouvée par la NPRB. Cette dernière ne peut lui offrir que des réparations minimales, car son design paratech empêche quiconque de la remettre sur pied. Cependant, après l’avoir rallumé et remise sur pied, Astro est capable de se réparer elle-même, et sans souvenir de l’incident, décide de rejoindre la NPRB comme unité de combat. </text:p>
      <text:p text:style-name="P14"/>
      <text:p text:style-name="P14"><text:span text:style-name="T12">AM, quant à lui, fonde NextHuman Industries, utilisant les plans initiaux d’Astro comme modèle pour ses androïdes de combat, mais incapable de reproduire l’étincelle qui caractérise les IAs d’OS, </text:span><text:span text:style-name="T13">ce qui lui cause une grande frustration et l’incitera à capturer Astro pour la démanteler et l’étudier à nouveau.</text:span></text:p>
      <text:p text:style-name="P5"/>
      <text:h text:style-name="P6" text:outline-level="1"><text:bookmark-start text:name="__RefHeading___Toc715_353095010 Copie 3"/>Objectifs<text:bookmark-end text:name="__RefHeading___Toc715_353095010 Copie 3"/></text:h>
      <text:p text:style-name="P7"/>
      <text:p text:style-name="P15">La préoccupation première d’Astro étant bien sûr de déverrouiller sa mémoire perdue, <text:span text:style-name="T14">elle prend toujours le temps d’aider son prochain, la volonté d’OS de protéger l’humanité étant son seul héritage de son créateur défunt. Elle cherche également à aider son partenaire Léo autant qu’elle le peut dans son travail, mais aussi sa vie privée, </text:span><text:span text:style-name="T15">et peut se montrer envahissante dans ses tentatives de l’ouvrir aux autres malgré ses bonnes intentions.</text:span></text:p>
      <text:p text:style-name="P16"/>
      <text:h text:style-name="P17" text:outline-level="1"><text:bookmark-start text:name="__RefHeading___Toc715_353095010 Copie 3 Copie 1"/><text:soft-page-break/>Pouvoirs<text:bookmark-end text:name="__RefHeading___Toc715_353095010 Copie 3 Copie 1"/></text:h>
      <text:p text:style-name="P18"/>
      <text:p text:style-name="P19">Astro est une Automate, <text:span text:style-name="T16">désignation réservée aux créations d’autres para-humains. </text:span><text:span text:style-name="T17">En tant qu’androïde de combat, elle possède </text:span><text:span text:style-name="T2">de nombreuses armes, gadgets et systèmes de propulsion intégrés dans diverses parties de son corps, </text:span><text:span text:style-name="T3">ordinairement masqués </text:span><text:span text:style-name="T17">quand elle ne se bat pas</text:span><text:span text:style-name="T2">. </text:span><text:span text:style-name="T17">Elle possède également une grande connaissance de l’anatomie humaine, lui permettant de frapper les points faibles de ses ennemis. </text:span></text:p>
      <text:p text:style-name="P20"/>
      <text:p text:style-name="P20">Elle a aussi la capacité unique d’établir un « lien mental » avec les androïdes qu’elle contacte, et est capable de les reprogrammer, de contrôler leurs corps, ou de les réparer, dû au fait qu’elle partage en partie leur paratech, venant du même créateur, AM. <text:span text:style-name="T18">Elle est aussi capable de se réparer elle-même et de modifier son propre corps et code, chose impossible pour un androïde normal.</text:span></text:p>
      <text:p text:style-name="P20"/>
      <text:p text:style-name="P21">Elle est aussi capable de « rêver » lorsqu’elle est en mode veille, son programme ressassant ses souvenirs afin d’apprendre et d’évoluer à partir de ses expériences récentes. C’est grâce à cette capacité qu’Astro va petit à petit se souvenir de son passé.</text:p>
      <text:p text:style-name="P21"/>
      <text:p text:style-name="P22">Quand son existence est en danger, Astro est capable d’assimiler les composants <text:s/>métalliques d’autres machines au alentours, créant un automate géant qui lui sert d’armure et dont elle a le contrôle total. Le jour de sa récupération par le NPRB, elle tentera d’en créer un pour se protéger de leur arrivée, mais étant endommagée, sa création sera incomplète et elle manquera de peu de tuer des innocents, avant qu’elle ne soit extraite de force de sa construction. <text:span text:style-name="T19">Après son acquisition par la NPRB, elle aura du mal à contrôler cette forme, mais en regagnera la maîtrise après avoir débloqué ses souvenirs.</text:span></text:p>
      <text:p text:style-name="P23"/>
      <text:h text:style-name="P24" text:outline-level="1"><text:bookmark-start text:name="__RefHeading___Toc715_353095010 Copie 4 Copie 1"/>Rôle dans l’histoire<text:bookmark-end text:name="__RefHeading___Toc715_353095010 Copie 4 Copie 1"/></text:h>
      <text:p text:style-name="P25"/>
      <text:p text:style-name="P26">Astro devient rapidement l’assistante de Léo, l’accompagnant lors de ses missions les plus dangereuses. Leur temps passé ensemble leur permettra d’apprendre à se connaître et à s’entraider pour résoudre leurs problèmes personnels, Astro trouvant chez Léo le courage de confronter son propre passé, en voyant que Léo confronte le sien sans crainte de la douleur qui en résulte pour être en paix avec lui-même.</text:p>
      <text:p text:style-name="P26"/>
      <text:p text:style-name="P27">Le rôle d’Astro est également d’incarner le côté positif des androïdes et para-humains, montrant à Léo que son identité ne se résume pas à ses origines ni à ses pouvoirs, mais que quiconque peut choisir de faire le bien s’il lui en est offert l’opportunité. Cela le mènera aussi à s’ouvrir aux autres para-humains du NPRB, décidant de jouer un rôle plus actif dans leur réhabilitation. </text:p>
      <text:p text:style-name="P5"/>
      <text:h text:style-name="P28" text:outline-level="1"><text:bookmark-start text:name="__RefHeading___Toc715_353095010 Copie 4"/><text:soft-page-break/>Relations<text:bookmark-end text:name="__RefHeading___Toc715_353095010 Copie 4"/></text:h>
      <text:p text:style-name="P29"/>
      <text:p text:style-name="P30">Ses <text:span text:style-name="T20">créateurs</text:span> : <text:span text:style-name="T20">Même si son temps passé avec ses créateurs avant son amnésie fut relativement bref, elle se souvient avec affection de la philosophie de paix inculquée par OS, avec qui elle passait le plus clair de son temps comme assistante, </text:span><text:span text:style-name="T21">et qui elle considérait le plus c</text:span><text:span text:style-name="T22">o</text:span><text:span text:style-name="T21">mme s</text:span><text:span text:style-name="T22">o</text:span><text:span text:style-name="T21">n père</text:span><text:span text:style-name="T20">. Elle est en revanche terrifiée par AM, le responsable de la mort d’OS et de la désactivation d’Astro. </text:span><text:span text:style-name="T23">Même si elle le considère toujours comme son père, elle ne voit aucune rédemption pour lui, et n’a aucun problème à détruire ses créations et à l’envoyer en prison pour ses crimes.</text:span></text:p>
      <text:p text:style-name="P30"/>
      <text:p text:style-name="P31"><text:span text:style-name="T24">Léo</text:span> : <text:span text:style-name="T24">Astro s’attache rapidement à Léo, voyant rapidement qu’il cache un passé douloureux, malgré ses tentatives de garder ses distances avec elle. Ils finiront cependant rapidement par se rapprocher et se témoigner une véritable affection, et trouvera en </text:span><text:span text:style-name="T25">lui le courage d’affronter son propre traumatisme en déverrouillant ces souvenirs qui lui font tant peu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4H28M41S</meta:editing-duration>
    <meta:editing-cycles>86</meta:editing-cycles>
    <meta:generator>LibreOffice/25.2.4.3$Windows_X86_64 LibreOffice_project/33e196637044ead23f5c3226cde09b47731f7e27</meta:generator>
    <meta:creation-date>2025-12-13T08:33:05.842320600</meta:creation-date>
    <dc:title>Format de texte</dc:title>
    <dc:date>2026-01-07T21:39:09.148397100</dc:date>
    <meta:document-statistic meta:table-count="0" meta:image-count="0" meta:object-count="0" meta:page-count="4" meta:paragraph-count="33" meta:word-count="1202" meta:character-count="7493" meta:non-whitespace-character-count="6320"/>
    <meta:template xlink:type="simple" xlink:actuate="onRequest" xlink:title="Format de texte" xlink:href="file:///C:/Users/Clément/AppData/Roaming/LibreOffice/4/user/template/Format%20de%20texte1.ott" meta:date="2025-12-13T08:33:05.542099300"/>
  </office:meta>
</office:document-meta>
</file>