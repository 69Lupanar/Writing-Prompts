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46bf0d" officeooo:paragraph-rsid="0046bf0d"/>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77e16" officeooo:paragraph-rsid="00477e16"/>
    </style:style>
    <style:style style:name="P9" style:family="paragraph" style:parent-style-name="Standard">
      <style:text-properties officeooo:rsid="004b5dcb" officeooo:paragraph-rsid="004b5dcb"/>
    </style:style>
    <style:style style:name="P10" style:family="paragraph" style:parent-style-name="Standard">
      <style:text-properties officeooo:rsid="001bf89c" officeooo:paragraph-rsid="001bf89c"/>
    </style:style>
    <style:style style:name="P11" style:family="paragraph" style:parent-style-name="Standard">
      <style:text-properties officeooo:rsid="004c51e7" officeooo:paragraph-rsid="004c51e7"/>
    </style:style>
    <style:style style:name="P12" style:family="paragraph" style:parent-style-name="Standard">
      <style:text-properties officeooo:rsid="0051f735" officeooo:paragraph-rsid="0051f735"/>
    </style:style>
    <style:style style:name="P13" style:family="paragraph" style:parent-style-name="Standard">
      <style:text-properties officeooo:rsid="0052ae63" officeooo:paragraph-rsid="0052ae63"/>
    </style:style>
    <style:style style:name="P14" style:family="paragraph" style:parent-style-name="Standard">
      <style:text-properties officeooo:rsid="0055572c" officeooo:paragraph-rsid="0055572c"/>
    </style:style>
    <style:style style:name="P15" style:family="paragraph" style:parent-style-name="Heading_20_1">
      <style:text-properties officeooo:rsid="0036a4f7" officeooo:paragraph-rsid="0036a4f7"/>
    </style:style>
    <style:style style:name="P16" style:family="paragraph" style:parent-style-name="Standard">
      <style:text-properties officeooo:rsid="00191d8b" officeooo:paragraph-rsid="0036a4f7"/>
    </style:style>
    <style:style style:name="P17" style:family="paragraph" style:parent-style-name="Standard">
      <style:text-properties officeooo:rsid="00570456" officeooo:paragraph-rsid="00570456"/>
    </style:style>
    <style:style style:name="P18" style:family="paragraph" style:parent-style-name="Heading_20_1">
      <style:text-properties officeooo:rsid="001a3d83" officeooo:paragraph-rsid="0036a4f7"/>
    </style:style>
    <style:style style:name="P19" style:family="paragraph" style:parent-style-name="Heading_20_1">
      <style:text-properties officeooo:rsid="001a3d83" officeooo:paragraph-rsid="001a3d83"/>
    </style:style>
    <style:style style:name="P20" style:family="paragraph" style:parent-style-name="Standard">
      <style:text-properties officeooo:rsid="00191d8b" officeooo:paragraph-rsid="001a3d83"/>
    </style:style>
    <style:style style:name="P21" style:family="paragraph" style:parent-style-name="Standard">
      <style:text-properties officeooo:rsid="0040e165" officeooo:paragraph-rsid="0040e165"/>
    </style:style>
    <style:style style:name="P22" style:family="paragraph" style:parent-style-name="Standard">
      <style:text-properties officeooo:rsid="0058f473" officeooo:paragraph-rsid="0058f473"/>
    </style:style>
    <style:style style:name="P23" style:family="paragraph" style:parent-style-name="Heading_20_1">
      <style:text-properties officeooo:rsid="0019270e" officeooo:paragraph-rsid="0019270e"/>
    </style:style>
    <style:style style:name="P24" style:family="paragraph" style:parent-style-name="Standard">
      <style:text-properties officeooo:rsid="00191d8b" officeooo:paragraph-rsid="0019270e"/>
    </style:style>
    <style:style style:name="P25" style:family="paragraph" style:parent-style-name="Standard">
      <style:text-properties officeooo:rsid="004430bc" officeooo:paragraph-rsid="004430bc"/>
    </style:style>
    <style:style style:name="P26" style:family="paragraph" style:parent-style-name="Standard">
      <style:text-properties officeooo:rsid="00458ed1" officeooo:paragraph-rsid="00458ed1"/>
    </style:style>
    <style:style style:name="P27" style:family="paragraph" style:parent-style-name="Standard">
      <style:text-properties officeooo:rsid="005c15e0" officeooo:paragraph-rsid="00608eaa"/>
    </style:style>
    <style:style style:name="T1" style:family="text">
      <style:text-properties officeooo:rsid="00495daf"/>
    </style:style>
    <style:style style:name="T2" style:family="text">
      <style:text-properties officeooo:rsid="00498ada"/>
    </style:style>
    <style:style style:name="T3" style:family="text">
      <style:text-properties officeooo:rsid="004ace8d"/>
    </style:style>
    <style:style style:name="T4" style:family="text">
      <style:text-properties officeooo:rsid="004c4512"/>
    </style:style>
    <style:style style:name="T5" style:family="text">
      <style:text-properties officeooo:rsid="004c9bc1"/>
    </style:style>
    <style:style style:name="T6" style:family="text">
      <style:text-properties officeooo:rsid="004de83c"/>
    </style:style>
    <style:style style:name="T7" style:family="text">
      <style:text-properties officeooo:rsid="004f852e"/>
    </style:style>
    <style:style style:name="T8" style:family="text">
      <style:text-properties officeooo:rsid="00504e96"/>
    </style:style>
    <style:style style:name="T9" style:family="text">
      <style:text-properties officeooo:rsid="0050e4d9"/>
    </style:style>
    <style:style style:name="T10" style:family="text">
      <style:text-properties officeooo:rsid="0052ae63"/>
    </style:style>
    <style:style style:name="T11" style:family="text">
      <style:text-properties officeooo:rsid="00535e8b"/>
    </style:style>
    <style:style style:name="T12" style:family="text">
      <style:text-properties officeooo:rsid="00623c78"/>
    </style:style>
    <style:style style:name="T13" style:family="text">
      <style:text-properties officeooo:rsid="00633d3d"/>
    </style:style>
    <style:style style:name="T14" style:family="text">
      <style:text-properties officeooo:rsid="005714e3"/>
    </style:style>
    <style:style style:name="T15" style:family="text">
      <style:text-properties officeooo:rsid="005a723b"/>
    </style:style>
    <style:style style:name="T16" style:family="text">
      <style:text-properties officeooo:rsid="005f97c8"/>
    </style:style>
    <style:style style:name="T17" style:family="text">
      <style:text-properties officeooo:rsid="005c15e0"/>
    </style:style>
    <style:style style:name="T18" style:family="text">
      <style:text-properties officeooo:rsid="005dc27e"/>
    </style:style>
    <style:style style:name="T19" style:family="text">
      <style:text-properties officeooo:rsid="00608ea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éo</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Homme de 32 ans, cheveux et barbe rasée autrefois bruns qui ont commencé à griser avec le stress. Musculature développée dû <text:span text:style-name="T1">aux activités physiques que requiert son travail d’inspecteur </text:span><text:span text:style-name="T2">au NPRB</text:span>. Yeux bruns soulignés par des cernes montrant sa fatigue dû à son travail. <text:span text:style-name="T3">Son corps porte plusieurs cicatrices dûes à des accidents lors de son enfance, ou à des altercations violentes avec des para-humains.</text:span></text:p>
      <text:p text:style-name="P8"/>
      <text:p text:style-name="P9">S’habille sobrement en s’adaptant à la saison, mais porte toujours son uniforme d’inspecteur lors d’enquêtes ou de visites chez des témoins, cachant un gilet pare-balles sous ses vêtements. Lors de missions sérieuses, il se voit souvent vêtu d’une tenue <text:span text:style-name="T4">militaire</text:span> intégrale pour le protéger, portée par les officiers sur le terrain lors de missions de sauvetage ou de anti-terrorisme.</text:p>
      <text:p text:style-name="P10"/>
      <text:h text:style-name="P6" text:outline-level="1"><text:bookmark-start text:name="__RefHeading___Toc715_353095010 Copie 1"/>Personnalité<text:bookmark-end text:name="__RefHeading___Toc715_353095010 Copie 1"/></text:h>
      <text:p text:style-name="P7"/>
      <text:p text:style-name="P11">Bien qu’il soit serviable et poli avec ses collègues, Léo ne leur démontre que peu d’affection, apparaissant réservé et solitaire pendant et en dehors des missions, ne participant jamais aux fêtes ou événements de groupe ne requérant pas sa présence. Cela est dû en partie à son dépaysement, peu habitué à la vie animée de la grande ville <text:span text:style-name="T5">et regrettant sa vie calme à la campagne</text:span>.</text:p>
      <text:p text:style-name="P11"/>
      <text:p text:style-name="P11">Cynique et acerbe, Léo ne voit pas d’un bon œil l<text:span text:style-name="T6">a présence envahissante</text:span> de para-humains et d’androïdes dans son quotidien. <text:span text:style-name="T7">Étant constamment confronté au pire de ce que les </text:span><text:soft-page-break/><text:span text:style-name="T7">para-humains ont à offrir, il n’a pas une grande opinion d’eux, les considérant comme des détraqués dangereux que le NPRB doit baby-sitter pour éviter plus de morts. </text:span><text:span text:style-name="T8">C’est pourquoi il tente d’éviter le plus que possible ses collègues para-humains et androïdes, malgré les initiatives du NPRB de créer des </text:span><text:span text:style-name="T9">équipes</text:span><text:span text:style-name="T8"> mixtes.</text:span></text:p>
      <text:p text:style-name="P5"/>
      <text:h text:style-name="P6" text:outline-level="1"><text:bookmark-start text:name="__RefHeading___Toc715_353095010 Copie 2"/>Passé<text:bookmark-end text:name="__RefHeading___Toc715_353095010 Copie 2"/></text:h>
      <text:p text:style-name="P7"/>
      <text:p text:style-name="P12">Léo vient d’un petit village au fin fond du Wyoming, là où l’influence des méga-corporations et des para-humains est moindre, et se résume le plus souvent à des histoires de terrorisme, peignant dès son enfance une image négative des para-humains. <text:span text:style-name="T10">Fils d’un agriculteur, celui-ci a vu son marché s’effondrer suite à l’arrivée de NextHuman Industries dans l’état du Wyoming, dont la compétition rude de produits moins chers et plus rapides à produire a conduit bon nombre de producteurs locaux au chômage, dont le père de Léo ; ce qui explique en grande partie son dédain des androïdes, qu’il ne voit que comme des voleurs de gagne-pain.</text:span></text:p>
      <text:p text:style-name="P12"/>
      <text:p text:style-name="P13">Suite à cela, son père a sombré dans l’alcool. Pour protéger son fils des excès de colère de son père, sa mère a puisé toutes ses économies pour l’envoyer en Californie, où il pourrait trouver un travail qui ne serait pas dominé par les machines. Il parvient miraculeusement à devenir agent de sécurité dans un entrepôt d’une start-up rivale à NextHuman Industries (malgré son dégoût pour la chose), puis parvient à s’engager dans la police, où son zèle et son efficacité lui valent une promotion comme inspecteur au sein de la NPRB, <text:span text:style-name="T11">où il se trouve au début de l’histoire. </text:span><text:span text:style-name="T12">Cependant, alors que les androïdes prennent de plus en plus d’importance au sein de l’infrastructure de la NPRB, Léo voit la pérennité de son poste devenir instable, </text:span><text:span text:style-name="T13">et doit fournir encore plus de résultats pour justifier sa place.</text:span></text:p>
      <text:p text:style-name="P5"/>
      <text:h text:style-name="P6" text:outline-level="1"><text:bookmark-start text:name="__RefHeading___Toc715_353095010 Copie 3"/>Objectifs<text:bookmark-end text:name="__RefHeading___Toc715_353095010 Copie 3"/></text:h>
      <text:p text:style-name="P7"/>
      <text:p text:style-name="P14">Ayant enfin trouvé une position confortable (bien que dangereuse) au sein de la société, Léo n’a pas vraiment d’objectif dans sa vie. Il souhaite protéger les humains normaux des crimes des para-humains, mais n’a pas d’ambition personnelle, laissant la vie le porter comme elle le chante. Ce n’est qu’après avoir rencontré Astro et passé beaucoup de temps avec elle qu’il se découvrira une véritable raison de rechercher activement le bonheur.</text:p>
      <text:p text:style-name="P14"/>
      <text:h text:style-name="P15" text:outline-level="1"><text:bookmark-start text:name="__RefHeading___Toc715_353095010 Copie 3 Copie 1"/>Pouvoirs<text:bookmark-end text:name="__RefHeading___Toc715_353095010 Copie 3 Copie 1"/></text:h>
      <text:p text:style-name="P16"/>
      <text:p text:style-name="P17">Léo est un humain normal et n’a pas de pouvoirs. Sur le terrain, il possède un vieux Glock (appartenant autrefois à son père) et un pistolet-taseur utilisé spécifiquement par les unités de la NPRB, possdéant différent niveaux d’intensité pour éviter de blesser ou tuer accidentellement leurs cibles. Léo a déjà utilisé son pistolet personnel par le passé, ce qui lui a valu des réprimandes de sa hiérarchie et des menaces de démotion, mais il préfère la <text:soft-page-break/>fiabilité et l’absence d’électronique de sa vieille arme, plutôt qu’une arme pouvant se désactiver à tout moment.</text:p>
      <text:h text:style-name="P18" text:outline-level="1"/>
      <text:h text:style-name="P19" text:outline-level="1"><text:bookmark-start text:name="__RefHeading___Toc715_353095010 Copie 4 Copie 1"/>Rôle dans l’histoire<text:bookmark-end text:name="__RefHeading___Toc715_353095010 Copie 4 Copie 1"/></text:h>
      <text:p text:style-name="P20"/>
      <text:p text:style-name="P21">Personnage ppal de l’histoire. <text:span text:style-name="T14">Il est un inspecteur au sein de la NPRB, conduisant enquêtes et arrestations de para-humains et autres groupuscules terroristes. C’est à travers lui que seront introduits différents points importants de l’intrigue, puisque sa position lui offre un savoir du fonctionnement du monde paranormal qu’Amélia ne peut pas avoir.</text:span></text:p>
      <text:p text:style-name="P21"/>
      <text:p text:style-name="P22">Son personnage véhiculera un message d’apprentissage de la tolérance envers les para-humains <text:span text:style-name="T15">et androïdes</text:span>, sans pour autant balayer sous le tapis les aspects sombres de ce qu’avoir des pouvoirs sans restrictions peut apporter à ceux qui ne les méritent pas. <text:span text:style-name="T15">Au fil de l’histoire, il deviendra plus compatissant envers leur sort, notamment envers les Sentinelles qui ont pour beaucoup eu un passé tragique, ainsi qu’Astro, de laquelle il tombera amoureux malgré sa nature d’androïde.</text:span></text:p>
      <text:p text:style-name="P5"/>
      <text:h text:style-name="P23" text:outline-level="1"><text:bookmark-start text:name="__RefHeading___Toc715_353095010 Copie 4"/>Relations<text:bookmark-end text:name="__RefHeading___Toc715_353095010 Copie 4"/></text:h>
      <text:p text:style-name="P24"/>
      <text:p text:style-name="P25">S<text:span text:style-name="T16">a famille</text:span> : <text:span text:style-name="T17">Léo garde contact avec sa mère, lui envoyant régulièrement de l’argent pour l’aider à soutenir son père malade. Même s’ils ne se parlent plus vraiment, Léo aimerait rétablir ses liens avec son père pour encourager celui-ci à prendre soin de lui, en le sortant de sa dépression et l’aidant à arrêter l’alcool.</text:span></text:p>
      <text:p text:style-name="P25"/>
      <text:p text:style-name="P26"><text:span text:style-name="T17">Les membres du NPRB</text:span> : <text:span text:style-name="T17">Léo s’assure que sa relation avec ses collègues reste professionnelle, se montrant serviable et poli quand nécessaire, mais s’excusant des événements collectifs n’ayant aucun lien avec le travail. A cause de cela, Léo n’a jamais vraiment eu de connexion avec aucun membre du NPRB, jusqu’à l’arrivée d’Astro dans sa vie.</text:span></text:p>
      <text:p text:style-name="P26"/>
      <text:p text:style-name="P27">Astro : Ne montrant envers Astro que du dédain au début de l’histoire, Léo sera charmé par son innocence et sa pureté d’âme, découvrant en elle une part d’humanité absente chez beaucoup d’humains qu’il côtoie.<text:span text:style-name="T18"> </text:span><text:span text:style-name="T19">Léo sera beaucoup troublé par son attirance pour elle, Astro étant non seulement une création d’un para-humain, mais également une créature à la psyché complètement alien à celle d’un humain.</text:span> D’abord forcé de faire équipe avec elle pour ses missions d’arrestation, ils finiront par tomber amoureux l’un de l’autre, <text:span text:style-name="T18">chacun couvrant les arrières de l’autre sur le terra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7H33M58S</meta:editing-duration>
    <meta:editing-cycles>78</meta:editing-cycles>
    <meta:generator>LibreOffice/25.2.4.3$Windows_X86_64 LibreOffice_project/33e196637044ead23f5c3226cde09b47731f7e27</meta:generator>
    <meta:creation-date>2025-12-13T08:33:05.842320600</meta:creation-date>
    <dc:title>Format de texte</dc:title>
    <dc:date>2026-01-17T16:02:54.591623100</dc:date>
    <meta:document-statistic meta:table-count="0" meta:image-count="0" meta:object-count="0" meta:page-count="3" meta:paragraph-count="30" meta:word-count="1035" meta:character-count="6370" meta:non-whitespace-character-count="5365"/>
    <meta:template xlink:type="simple" xlink:actuate="onRequest" xlink:title="Format de texte" xlink:href="file:///C:/Users/Clément/AppData/Roaming/LibreOffice/4/user/template/Format%20de%20texte1.ott" meta:date="2025-12-13T08:33:05.542099300"/>
  </office:meta>
</office:document-meta>
</file>