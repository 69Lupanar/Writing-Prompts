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1aa4df"/>
    </style:style>
    <style:style style:name="P9" style:family="paragraph" style:parent-style-name="Heading_20_1">
      <style:text-properties officeooo:rsid="001a596d" officeooo:paragraph-rsid="001a596d"/>
    </style:style>
    <style:style style:name="P10" style:family="paragraph" style:parent-style-name="Standard">
      <style:paragraph-properties fo:margin-top="0.201cm" fo:margin-bottom="0.201cm" style:contextual-spacing="false"/>
      <style:text-properties officeooo:rsid="001e0d9d" officeooo:paragraph-rsid="001e0d9d"/>
    </style:style>
    <style:style style:name="P11" style:family="paragraph" style:parent-style-name="Standard">
      <style:paragraph-properties fo:margin-top="0.201cm" fo:margin-bottom="0.201cm" style:contextual-spacing="false"/>
      <style:text-properties officeooo:rsid="0021435a" officeooo:paragraph-rsid="0021435a"/>
    </style:style>
    <style:style style:name="P12" style:family="paragraph" style:parent-style-name="Standard">
      <style:paragraph-properties fo:margin-top="0.201cm" fo:margin-bottom="0.201cm" style:contextual-spacing="false"/>
      <style:text-properties officeooo:rsid="00222059" officeooo:paragraph-rsid="00222059"/>
    </style:style>
    <style:style style:name="T1" style:family="text">
      <style:text-properties officeooo:rsid="0017c9de"/>
    </style:style>
    <style:style style:name="T2" style:family="text">
      <style:text-properties officeooo:rsid="001997f6"/>
    </style:style>
    <style:style style:name="T3" style:family="text">
      <style:text-properties officeooo:rsid="00325476"/>
    </style:style>
    <style:style style:name="T4" style:family="text">
      <style:text-properties officeooo:rsid="00250da5"/>
    </style:style>
    <style:style style:name="T5" style:family="text">
      <style:text-properties officeooo:rsid="001aa4df"/>
    </style:style>
    <style:style style:name="T6" style:family="text">
      <style:text-properties officeooo:rsid="0032ab03"/>
    </style:style>
    <style:style style:name="T7" style:family="text">
      <style:text-properties officeooo:rsid="001addd0"/>
    </style:style>
    <style:style style:name="T8" style:family="text">
      <style:text-properties officeooo:rsid="001c3db0"/>
    </style:style>
    <style:style style:name="T9" style:family="text">
      <style:text-properties officeooo:rsid="001e4530"/>
    </style:style>
    <style:style style:name="T10" style:family="text">
      <style:text-properties officeooo:rsid="001fe5a0"/>
    </style:style>
    <style:style style:name="T11" style:family="text">
      <style:text-properties officeooo:rsid="00222059"/>
    </style:style>
    <style:style style:name="T12" style:family="text">
      <style:text-properties officeooo:rsid="002336aa"/>
    </style:style>
    <style:style style:name="T13" style:family="text">
      <style:text-properties officeooo:rsid="0022632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Métabolit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2">Un Métabolite</text:span><text:span text:style-name="T3"> définit tout </text:span><text:span text:style-name="T2">para-humain possédant un</text:span><text:span text:style-name="T3"> pouvoir agissant sur le </text:span><text:span text:style-name="T4">métabolisme</text:span><text:span text:style-name="T3"> de son hôte, comme une force extrême, l’invulnérabilité ou la régénération rapide de membres perdus. </text:span></text:p>
      <text:p text:style-name="P8"><text:span text:style-name="T5">Il s’agit d’une des catégories de pouvoirs les plus répandues parmi les para-humains. Les Métabolites</text:span><text:span text:style-name="T3"> sont appelés vulgairement « Supers » </text:span><text:span text:style-name="T6">ou « Brutes » </text:span><text:span text:style-name="T7">par le reste de la population</text:span><text:span text:style-name="T3"> dû à </text:span><text:span text:style-name="T8">la</text:span><text:span text:style-name="T3"> ressemblance </text:span><text:span text:style-name="T8">de leurs pouvoirs</text:span><text:span text:style-name="T3"> </text:span><text:span text:style-name="T8">à ceux de</text:span><text:span text:style-name="T3"> héros de bandes dessinées.</text:span></text:p>
      <text:p text:style-name="P5"/>
      <text:h text:style-name="P9" text:outline-level="1"><text:bookmark-start text:name="__RefHeading___Toc715_353095010 Copie 1"/>Capacités<text:bookmark-end text:name="__RefHeading___Toc715_353095010 Copie 1"/></text:h>
      <text:p text:style-name="P7"/>
      <text:p text:style-name="P10">Les pouvoirs des Métabolites sont parmi les plus simples à comprendre et utiliser, mais aussi les moins variés dans leurs fonctionnement. La plupart d’entre eux se résument à une force et/ou résistance extrême, mais peuvent être accompagnés de caractéristiques uniques comme la régénération <text:span text:style-name="T9">rapide</text:span> ou des sens anormalement aigus, <text:span text:style-name="T10">ou encore de pouvoirs additionnels d’autres catégories.</text:span></text:p>
      <text:p text:style-name="P11">Les Métabolites cause<text:span text:style-name="T11">nt régulièrement</text:span> de lourds dégâts matériels lors d’un combat, pouvant survivre à un feu de munitions nourri ou à un bâtiment qui s’effondre. <text:span text:style-name="T11">Affronter une Brute au corps-à-corps n’est réservé qu’à d’autres Brutes collant à leur niveau de force pure, </text:span><text:span text:style-name="T12">c’est pourquoi ils sont souvent utilisés par divers groupes d’intérêt comme gardes du corps ou avant-garde lors d’assauts durant des conflits.</text:span></text:p>
      <text:p text:style-name="P5"><text:soft-page-break/></text:p>
      <text:h text:style-name="P9" text:outline-level="1"><text:bookmark-start text:name="__RefHeading___Toc715_353095010 Copie 1 Copie 1"/>Faiblesses<text:bookmark-end text:name="__RefHeading___Toc715_353095010 Copie 1 Copie 1"/></text:h>
      <text:p text:style-name="P7"/>
      <text:p text:style-name="P12">Les Métabolites font rarement preuve de capacités surnaturelles en dehors du combat ; il est donc facile de les semer ou les abattre à distance. Tout pouvoir les empêchant de <text:span text:style-name="T13">se déplacer ou faire usage de leur force peut facilement les mettre hors-combat, c’est pourquoi les Kinésistes et Elémentalistes sont un bon contre aux Métabolites. Également, bien que ça ne soit pas toujours le cas, bon nombre de Métabolites possèdent une intelligence un peu plus basse que la moyenne, bien que nul ne sache si cela est dû à leurs pouvoirs ou une simple coïncidence.</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1M53S</meta:editing-duration>
    <meta:editing-cycles>13</meta:editing-cycles>
    <meta:generator>LibreOffice/25.2.4.3$Windows_X86_64 LibreOffice_project/33e196637044ead23f5c3226cde09b47731f7e27</meta:generator>
    <meta:creation-date>2026-01-07T23:25:34.548686300</meta:creation-date>
    <dc:title>Format de texte</dc:title>
    <dc:date>2026-01-07T23:56:02.317593800</dc:date>
    <meta:document-statistic meta:table-count="0" meta:image-count="0" meta:object-count="0" meta:page-count="2" meta:paragraph-count="14" meta:word-count="307" meta:character-count="1954" meta:non-whitespace-character-count="1659"/>
    <meta:template xlink:type="simple" xlink:actuate="onRequest" xlink:title="Format de texte" xlink:href="file:///C:/Users/Clément/AppData/Roaming/LibreOffice/4/user/template/Format%20de%20texte1.ott" meta:date="2026-01-07T23:25:34.465087300"/>
  </office:meta>
</office:document-meta>
</file>