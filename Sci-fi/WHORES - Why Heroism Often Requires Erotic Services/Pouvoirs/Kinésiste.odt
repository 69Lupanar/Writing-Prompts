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5ce9f7" officeooo:paragraph-rsid="00188758"/>
    </style:style>
    <style:style style:name="P2" style:family="paragraph" style:parent-style-name="Standard">
      <style:text-properties officeooo:rsid="00106f63" officeooo:paragraph-rsid="00106f63"/>
    </style:style>
    <style:style style:name="P3" style:family="paragraph" style:parent-style-name="Subtitle">
      <style:text-properties officeooo:rsid="00188758" officeooo:paragraph-rsid="00188758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06f63" officeooo:paragraph-rsid="001a596d"/>
    </style:style>
    <style:style style:name="P6" style:family="paragraph" style:parent-style-name="Heading_20_1">
      <style:text-properties officeooo:rsid="001997f6" officeooo:paragraph-rsid="001a596d"/>
    </style:style>
    <style:style style:name="P7" style:family="paragraph" style:parent-style-name="Standard">
      <style:paragraph-properties fo:margin-top="0.201cm" fo:margin-bottom="0.201cm" style:contextual-spacing="false"/>
      <style:text-properties officeooo:rsid="0031fe7d" officeooo:paragraph-rsid="001a596d"/>
    </style:style>
    <style:style style:name="P8" style:family="paragraph" style:parent-style-name="Standard">
      <style:paragraph-properties fo:margin-top="0.201cm" fo:margin-bottom="0.201cm" style:contextual-spacing="false"/>
      <style:text-properties officeooo:rsid="0031fe7d" officeooo:paragraph-rsid="0023face"/>
    </style:style>
    <style:style style:name="P9" style:family="paragraph" style:parent-style-name="Heading_20_1">
      <style:text-properties officeooo:rsid="001a596d" officeooo:paragraph-rsid="001a596d"/>
    </style:style>
    <style:style style:name="P10" style:family="paragraph" style:parent-style-name="Standard">
      <style:paragraph-properties fo:margin-top="0.201cm" fo:margin-bottom="0.201cm" style:contextual-spacing="false"/>
      <style:text-properties officeooo:rsid="001e0d9d" officeooo:paragraph-rsid="001e0d9d"/>
    </style:style>
    <style:style style:name="P11" style:family="paragraph" style:parent-style-name="Standard">
      <style:paragraph-properties fo:margin-top="0.201cm" fo:margin-bottom="0.201cm" style:contextual-spacing="false"/>
      <style:text-properties officeooo:rsid="0021435a" officeooo:paragraph-rsid="0021435a"/>
    </style:style>
    <style:style style:name="P12" style:family="paragraph" style:parent-style-name="Standard">
      <style:paragraph-properties fo:margin-top="0.201cm" fo:margin-bottom="0.201cm" style:contextual-spacing="false"/>
      <style:text-properties officeooo:rsid="001e0d9d" officeooo:paragraph-rsid="002708f1"/>
    </style:style>
    <style:style style:name="P13" style:family="paragraph" style:parent-style-name="Standard">
      <style:paragraph-properties fo:margin-top="0.201cm" fo:margin-bottom="0.201cm" style:contextual-spacing="false"/>
      <style:text-properties officeooo:rsid="0028305f" officeooo:paragraph-rsid="0028305f"/>
    </style:style>
    <style:style style:name="T1" style:family="text">
      <style:text-properties officeooo:rsid="0017c9de"/>
    </style:style>
    <style:style style:name="T2" style:family="text">
      <style:text-properties officeooo:rsid="0023c8c4"/>
    </style:style>
    <style:style style:name="T3" style:family="text">
      <style:text-properties officeooo:rsid="001997f6"/>
    </style:style>
    <style:style style:name="T4" style:family="text">
      <style:text-properties officeooo:rsid="0023face"/>
    </style:style>
    <style:style style:name="T5" style:family="text">
      <style:text-properties officeooo:rsid="00325476"/>
    </style:style>
    <style:style style:name="T6" style:family="text">
      <style:text-properties officeooo:rsid="00359d81"/>
    </style:style>
    <style:style style:name="T7" style:family="text">
      <style:text-properties officeooo:rsid="0025866d"/>
    </style:style>
    <style:style style:name="T8" style:family="text">
      <style:text-properties officeooo:rsid="0035d9be"/>
    </style:style>
    <style:style style:name="T9" style:family="text">
      <style:text-properties officeooo:rsid="003688b0"/>
    </style:style>
    <style:style style:name="T10" style:family="text">
      <style:text-properties officeooo:rsid="00372fe9"/>
    </style:style>
    <style:style style:name="T11" style:family="text">
      <style:text-properties officeooo:rsid="00252dcd"/>
    </style:style>
    <style:style style:name="T12" style:family="text">
      <style:text-properties officeooo:rsid="002495eb"/>
    </style:style>
    <style:style style:name="T13" style:family="text">
      <style:text-properties officeooo:rsid="002727dd"/>
    </style:style>
    <style:style style:name="T14" style:family="text">
      <style:text-properties officeooo:rsid="0028305f"/>
    </style:style>
    <style:style style:name="T15" style:family="text">
      <style:text-properties officeooo:rsid="0029d74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RES – Why Heroism Often Requires E<text:span text:style-name="T1">rotic Services</text:span></text:p>
      <text:p text:style-name="P2"/>
      <text:p text:style-name="P3">Les pouvoirs - <text:span text:style-name="T2">Kinésiste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4"><text:a xlink:type="simple" xlink:href="#__RefHeading___Toc715_353095010" text:style-name="Index_20_Link" text:visited-style-name="Index_20_Link">Description<text:tab/>1</text:a></text:p>
          <text:p text:style-name="P4"><text:a xlink:type="simple" xlink:href="#__RefHeading___Toc715_353095010%20Copie%201" text:style-name="Index_20_Link" text:visited-style-name="Index_20_Link">Capacités<text:tab/>1</text:a></text:p>
          <text:p text:style-name="P4"><text:a xlink:type="simple" xlink:href="#__RefHeading___Toc715_353095010%20Copie%201%20Copie%201" text:style-name="Index_20_Link" text:visited-style-name="Index_20_Link">Faiblesses<text:tab/>1</text:a></text:p>
        </text:index-body>
      </text:table-of-content>
      <text:p text:style-name="P2"/>
      <text:p text:style-name="P5"/>
      <text:h text:style-name="P6" text:outline-level="1"><text:bookmark-start text:name="__RefHeading___Toc715_353095010"/>Description<text:bookmark-end text:name="__RefHeading___Toc715_353095010"/></text:h>
      <text:p text:style-name="P7"/>
      <text:p text:style-name="P8"><text:span text:style-name="T3">Un </text:span><text:span text:style-name="T4">Kinésiste</text:span><text:span text:style-name="T5"> définit tout </text:span><text:span text:style-name="T3">para-humain </text:span><text:span text:style-name="T6">agissant sur le déplacement ou la manipulation physique </text:span><text:span text:style-name="T7">ou physiologique</text:span><text:span text:style-name="T6"> d’une entité, que ce soit l’hôte ou un autre objet. Ce domaine inclut </text:span><text:span text:style-name="T8">par exemple</text:span><text:span text:style-name="T6"> la super-vitesse, la télékinésie,</text:span><text:span text:style-name="T8"> le transfert d’énergie </text:span><text:span text:style-name="T9">ou l’activation </text:span><text:span text:style-name="T10">de certains signaux électrique dans le corps humain, pour faire par exemple repartir un cœur arrêté, ou activer les nerfs pour faire souffrir une cible.</text:span></text:p>
      <text:p text:style-name="P5"/>
      <text:h text:style-name="P9" text:outline-level="1"><text:bookmark-start text:name="__RefHeading___Toc715_353095010 Copie 1"/>Capacités<text:bookmark-end text:name="__RefHeading___Toc715_353095010 Copie 1"/></text:h>
      <text:p text:style-name="P7"/>
      <text:p text:style-name="P10">Les pouvoirs des <text:span text:style-name="T4">Kinésistes sont parmi les plus variés des catégories de pouvoirs, offrant de nombreux outils offensifs comme la projection de rayons d’énergie ou la manipulation des signaux chimiques d’un organisme ; ou défensifs, comme la téléportation ou la télékinésie.</text:span></text:p>
      <text:p text:style-name="P11">Les <text:span text:style-name="T4">Kinésistes sont rarement capables de prouesses au corps-à-corps, et servent le plus souvent de soutien à d’autres para-humains, offrant un feu de couverture ou un échappatoire en cas de besoin. Cependant, le potentiel d’un Kinésiste ne se résume </text:span><text:span text:style-name="T11">pas</text:span><text:span text:style-name="T4"> </text:span><text:span text:style-name="T11">qu’</text:span><text:span text:style-name="T4">au combat, et certains, notamment ceux capables de manipuler la physiologie d’autrui, servent souvent de médecin ou chirurgiste pour soigner les blessures ou maladies de leurs camarades, </text:span><text:span text:style-name="T12">à un degré cependant limité par leur domaine de prédilection.</text:span></text:p>
      <text:p text:style-name="P5"/>
      <text:h text:style-name="P9" text:outline-level="1"><text:bookmark-start text:name="__RefHeading___Toc715_353095010 Copie 1 Copie 1"/><text:soft-page-break/>Faiblesses<text:bookmark-end text:name="__RefHeading___Toc715_353095010 Copie 1 Copie 1"/></text:h>
      <text:p text:style-name="P7"/>
      <text:p text:style-name="P12">Les pouvoirs des <text:span text:style-name="T4">Kinésistes</text:span> <text:span text:style-name="T4">peuvent se montrer difficiles à prendre en main, certains pouvant causer de graves </text:span><text:span text:style-name="T12">dégâts</text:span><text:span text:style-name="T4"> à leur hôte ou leur cible s’ils ne sont pas manipulés correctement</text:span>. <text:span text:style-name="T13">Beaucoup de Kinésistes n’ont donc jamais exploité le plein potentiel de leurs pouvoirs, </text:span><text:span text:style-name="T14">ce qui les rend souvent moins efficaces en combat que d’autres catégories de para-humains.</text:span></text:p>
      <text:p text:style-name="P13">Les Kinésistes ont rarement des contres, mais peuvent être amenés à utiliser leurs pouvoirs dans des environnements peu adaptés à leur expression (par exemple, un télékinésiste dans une salle vide n’aurait rien à soulever). <text:span text:style-name="T15">Ils restent aussi fragiles qu’un humain normal, et n’offrent donc aucune résistance anormale en combat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29M46S</meta:editing-duration>
    <meta:editing-cycles>20</meta:editing-cycles>
    <meta:generator>LibreOffice/25.2.4.3$Windows_X86_64 LibreOffice_project/33e196637044ead23f5c3226cde09b47731f7e27</meta:generator>
    <meta:creation-date>2026-01-07T23:25:34.548686300</meta:creation-date>
    <dc:title>Format de texte</dc:title>
    <dc:date>2026-01-08T00:12:20.331269500</dc:date>
    <meta:document-statistic meta:table-count="0" meta:image-count="0" meta:object-count="0" meta:page-count="2" meta:paragraph-count="14" meta:word-count="309" meta:character-count="2036" meta:non-whitespace-character-count="1740"/>
    <meta:template xlink:type="simple" xlink:actuate="onRequest" xlink:title="Format de texte" xlink:href="file:///C:/Users/Clément/AppData/Roaming/LibreOffice/4/user/template/Format%20de%20texte1.ott" meta:date="2026-01-07T23:25:34.465087300"/>
  </office:meta>
</office:document-meta>
</file>