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officeooo:rsid="005ce9f7" officeooo:paragraph-rsid="00188758"/>
    </style:style>
    <style:style style:name="P2" style:family="paragraph" style:parent-style-name="Standard">
      <style:text-properties officeooo:rsid="00106f63" officeooo:paragraph-rsid="00106f63"/>
    </style:style>
    <style:style style:name="P3" style:family="paragraph" style:parent-style-name="Subtitle">
      <style:text-properties officeooo:rsid="00188758" officeooo:paragraph-rsid="00188758"/>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Standard">
      <style:text-properties officeooo:rsid="00106f63" officeooo:paragraph-rsid="001a596d"/>
    </style:style>
    <style:style style:name="P6" style:family="paragraph" style:parent-style-name="Heading_20_1">
      <style:text-properties officeooo:rsid="001997f6" officeooo:paragraph-rsid="001a596d"/>
    </style:style>
    <style:style style:name="P7" style:family="paragraph" style:parent-style-name="Standard">
      <style:paragraph-properties fo:margin-top="0.201cm" fo:margin-bottom="0.201cm" style:contextual-spacing="false"/>
      <style:text-properties officeooo:rsid="0031fe7d" officeooo:paragraph-rsid="001a596d"/>
    </style:style>
    <style:style style:name="P8" style:family="paragraph" style:parent-style-name="Standard">
      <style:paragraph-properties fo:margin-top="0.201cm" fo:margin-bottom="0.201cm" style:contextual-spacing="false"/>
      <style:text-properties officeooo:rsid="0031fe7d" officeooo:paragraph-rsid="00261e5f"/>
    </style:style>
    <style:style style:name="P9" style:family="paragraph" style:parent-style-name="Heading_20_1">
      <style:text-properties officeooo:rsid="001a596d" officeooo:paragraph-rsid="001a596d"/>
    </style:style>
    <style:style style:name="P10" style:family="paragraph" style:parent-style-name="Standard">
      <style:paragraph-properties fo:margin-top="0.201cm" fo:margin-bottom="0.201cm" style:contextual-spacing="false"/>
      <style:text-properties officeooo:rsid="00277ffb" officeooo:paragraph-rsid="00277ffb"/>
    </style:style>
    <style:style style:name="P11" style:family="paragraph" style:parent-style-name="Standard">
      <style:paragraph-properties fo:margin-top="0.201cm" fo:margin-bottom="0.201cm" style:contextual-spacing="false"/>
      <style:text-properties officeooo:rsid="0028d2b7" officeooo:paragraph-rsid="0028d2b7"/>
    </style:style>
    <style:style style:name="P12" style:family="paragraph" style:parent-style-name="Standard">
      <style:paragraph-properties fo:margin-top="0.201cm" fo:margin-bottom="0.201cm" style:contextual-spacing="false"/>
      <style:text-properties officeooo:rsid="00222059" officeooo:paragraph-rsid="00222059"/>
    </style:style>
    <style:style style:name="P13" style:family="paragraph" style:parent-style-name="Standard">
      <style:paragraph-properties fo:margin-top="0.201cm" fo:margin-bottom="0.201cm" style:contextual-spacing="false"/>
      <style:text-properties officeooo:rsid="002fb2d6" officeooo:paragraph-rsid="002fb2d6"/>
    </style:style>
    <style:style style:name="T1" style:family="text">
      <style:text-properties officeooo:rsid="0017c9de"/>
    </style:style>
    <style:style style:name="T2" style:family="text">
      <style:text-properties officeooo:rsid="00253025"/>
    </style:style>
    <style:style style:name="T3" style:family="text">
      <style:text-properties officeooo:rsid="001997f6"/>
    </style:style>
    <style:style style:name="T4" style:family="text">
      <style:text-properties officeooo:rsid="00325476"/>
    </style:style>
    <style:style style:name="T5" style:family="text">
      <style:text-properties officeooo:rsid="003688b0"/>
    </style:style>
    <style:style style:name="T6" style:family="text">
      <style:text-properties officeooo:rsid="0038319e"/>
    </style:style>
    <style:style style:name="T7" style:family="text">
      <style:text-properties officeooo:rsid="0026e771"/>
    </style:style>
    <style:style style:name="T8" style:family="text">
      <style:text-properties officeooo:rsid="00400e1f"/>
    </style:style>
    <style:style style:name="T9" style:family="text">
      <style:text-properties officeooo:rsid="00272e34"/>
    </style:style>
    <style:style style:name="T10" style:family="text">
      <style:text-properties officeooo:rsid="002890ed"/>
    </style:style>
    <style:style style:name="T11" style:family="text">
      <style:text-properties officeooo:rsid="00289f97"/>
    </style:style>
    <style:style style:name="T12" style:family="text">
      <style:text-properties officeooo:rsid="0028d2b7"/>
    </style:style>
    <style:style style:name="T13" style:family="text">
      <style:text-properties officeooo:rsid="0029fdeb"/>
    </style:style>
    <style:style style:name="T14" style:family="text">
      <style:text-properties officeooo:rsid="002bd4a7"/>
    </style:style>
    <style:style style:name="T15" style:family="text">
      <style:text-properties officeooo:rsid="002d40d2"/>
    </style:style>
    <style:style style:name="T16" style:family="text">
      <style:text-properties officeooo:rsid="002e8d62"/>
    </style:style>
    <style:style style:name="T17" style:family="text">
      <style:text-properties officeooo:rsid="002fb2d6"/>
    </style:style>
    <style:style style:name="T18" style:family="text">
      <style:text-properties officeooo:rsid="00318fd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ORES – Why Heroism Often Requires E<text:span text:style-name="T1">rotic Services</text:span></text:p>
      <text:p text:style-name="P2"/>
      <text:p text:style-name="P3">Les pouvoirs - <text:span text:style-name="T2">Mentaliste</text:span></text:p>
      <text:p text:style-name="P2"/>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Sommaire</text:p>
          </text:index-title>
          <text:p text:style-name="P4"><text:a xlink:type="simple" xlink:href="#__RefHeading___Toc715_353095010" text:style-name="Index_20_Link" text:visited-style-name="Index_20_Link">Description<text:tab/>1</text:a></text:p>
          <text:p text:style-name="P4"><text:a xlink:type="simple" xlink:href="#__RefHeading___Toc715_353095010%20Copie%201" text:style-name="Index_20_Link" text:visited-style-name="Index_20_Link">Capacités<text:tab/>1</text:a></text:p>
          <text:p text:style-name="P4"><text:a xlink:type="simple" xlink:href="#__RefHeading___Toc715_353095010%20Copie%201%20Copie%201" text:style-name="Index_20_Link" text:visited-style-name="Index_20_Link">Faiblesses<text:tab/>1</text:a></text:p>
        </text:index-body>
      </text:table-of-content>
      <text:p text:style-name="P2"/>
      <text:p text:style-name="P5"/>
      <text:h text:style-name="P6" text:outline-level="1"><text:bookmark-start text:name="__RefHeading___Toc715_353095010"/>Description<text:bookmark-end text:name="__RefHeading___Toc715_353095010"/></text:h>
      <text:p text:style-name="P7"/>
      <text:p text:style-name="P8"><text:span text:style-name="T3">Un Métabolite</text:span><text:span text:style-name="T4"> définit tout </text:span><text:span text:style-name="T3">para-humain possédant un</text:span><text:span text:style-name="T4"> pouvoir </text:span><text:span text:style-name="T5">agissant sur la psyché humaine ou animale, </text:span><text:span text:style-name="T6">notamment la télépathie ou la </text:span><text:span text:style-name="T7">divination</text:span><text:span text:style-name="T6">. Les mentalistes sont vus comme </text:span><text:span text:style-name="T8">parmi</text:span><text:span text:style-name="T6"> les plus dangereux des para-humains, car peu de protections existent face à leurs pouvoirs. </text:span><text:span text:style-name="T9">Ils sont cependant très recherchés par tout type de groupe d’intérêt, dû à leurs capacités intellectuelles souvent amplifiées par leurs pouvoirs, leur offrant des postes confortables dans les domaines de la politique, l’espionnage ou la gestion.</text:span></text:p>
      <text:p text:style-name="P5"/>
      <text:h text:style-name="P9" text:outline-level="1"><text:bookmark-start text:name="__RefHeading___Toc715_353095010 Copie 1"/>Capacités<text:bookmark-end text:name="__RefHeading___Toc715_353095010 Copie 1"/></text:h>
      <text:p text:style-name="P7"/>
      <text:p text:style-name="P10">Si les pouvoirs des Mentalistes couvrent peu de domaines (souvent limités à la divination et la manipulation de la psyché humaine), <text:span text:style-name="T10">leur puissance est anormalement variable par rapport aux autres catégories de pouvoirs, allant du pouvoir anecdotique, comme lire l’humeur d’une personne, à la prédiction du future et la lecture des pensées d’autrui. </text:span><text:span text:style-name="T11">C’est pour cette dernière catégorie de Mentalistes que beaucoup d’entre eux ont été traqués par divers groupes d’intérêt et </text:span><text:span text:style-name="T12">souvent</text:span><text:span text:style-name="T11"> forcés de rejoindre ces derniers par la force.</text:span></text:p>
      <text:p text:style-name="P11">Peu de protection existe contre les Mentalistes, leur domaine d’exercice n’ayant aucune barrière physique autre que la distance ou le champ de vision, dont il est difficile de se soustraire dans la plupart des cas. <text:span text:style-name="T13">Ayant peu d’utilité en combat, ils servent le plus souvent de coordinateur et sont souvent accompagnés </text:span><text:span text:style-name="T14">par </text:span><text:span text:style-name="T13">autres catégories de para-humains pour compenser leurs faiblesses.</text:span></text:p>
      <text:p text:style-name="P10"><text:soft-page-break/></text:p>
      <text:h text:style-name="P9" text:outline-level="1"><text:bookmark-start text:name="__RefHeading___Toc715_353095010 Copie 1 Copie 1"/>Faiblesses<text:bookmark-end text:name="__RefHeading___Toc715_353095010 Copie 1 Copie 1"/></text:h>
      <text:p text:style-name="P7"/>
      <text:p text:style-name="P12">Les <text:span text:style-name="T15">Mentalistes n’ayant aucune capacité offensive, peu sont utiles en combat au-delà de leur expertises en armes blanches ou à feu, </text:span><text:span text:style-name="T16">nécessitant d’agir depuis un abri ou en compagnie d’autres para-humains. </text:span><text:span text:style-name="T17">Cela rend aussi les Mentalistes faciles à détecter, car peu d’entre eux se déplacent seuls.</text:span></text:p>
      <text:p text:style-name="P13">Les Mentalistes ont souvent un égo plus prononcé que les autres para-humains, dû à leurs pouvoirs leur conférant une perspicacité anormalement plus élevée, qu’ils <text:span text:style-name="T18">confondent régulièrement avec leur intelligence. Ainsi, il est souvent facile de les duper en utilisant leur arrogance contre eux et de profiter de ce moment pour agir avant qu’ils ne s’en rendent compte.</text:span></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31M20S</meta:editing-duration>
    <meta:editing-cycles>27</meta:editing-cycles>
    <meta:generator>LibreOffice/25.2.4.3$Windows_X86_64 LibreOffice_project/33e196637044ead23f5c3226cde09b47731f7e27</meta:generator>
    <meta:creation-date>2026-01-07T23:25:34.548686300</meta:creation-date>
    <dc:title>Format de texte</dc:title>
    <dc:date>2026-01-08T00:32:52.169656400</dc:date>
    <meta:document-statistic meta:table-count="0" meta:image-count="0" meta:object-count="0" meta:page-count="2" meta:paragraph-count="14" meta:word-count="342" meta:character-count="2247" meta:non-whitespace-character-count="1918"/>
    <meta:template xlink:type="simple" xlink:actuate="onRequest" xlink:title="Format de texte" xlink:href="file:///C:/Users/Clément/AppData/Roaming/LibreOffice/4/user/template/Format%20de%20texte1.ott" meta:date="2026-01-07T23:25:34.465087300"/>
  </office:meta>
</office:document-meta>
</file>