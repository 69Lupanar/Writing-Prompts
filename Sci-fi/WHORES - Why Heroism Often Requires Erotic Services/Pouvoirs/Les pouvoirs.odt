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officeooo:rsid="005ce9f7" officeooo:paragraph-rsid="00192c76"/>
    </style:style>
    <style:style style:name="P2" style:family="paragraph" style:parent-style-name="Standard">
      <style:text-properties officeooo:rsid="00106f63" officeooo:paragraph-rsid="00106f63"/>
    </style:style>
    <style:style style:name="P3" style:family="paragraph" style:parent-style-name="Subtitle">
      <style:text-properties officeooo:rsid="00192c76" officeooo:paragraph-rsid="00192c76"/>
    </style:style>
    <style:style style:name="P4" style:family="paragraph" style:parent-style-name="Standard">
      <style:text-properties officeooo:rsid="002ea4ec" officeooo:paragraph-rsid="0027d606"/>
    </style:style>
    <style:style style:name="P5" style:family="paragraph" style:parent-style-name="Standard">
      <style:text-properties officeooo:rsid="002ea4ec" officeooo:paragraph-rsid="001b4e6c"/>
    </style:style>
    <style:style style:name="P6" style:family="paragraph" style:parent-style-name="Standard">
      <style:text-properties officeooo:rsid="002ea4ec" officeooo:paragraph-rsid="001a9459"/>
    </style:style>
    <style:style style:name="P7" style:family="paragraph" style:parent-style-name="Standard">
      <style:text-properties officeooo:rsid="0031fe7d" officeooo:paragraph-rsid="001a9459"/>
    </style:style>
    <style:style style:name="P8" style:family="paragraph" style:parent-style-name="Standard" style:list-style-name="L1">
      <style:paragraph-properties fo:margin-top="0.201cm" fo:margin-bottom="0.201cm" style:contextual-spacing="false"/>
      <style:text-properties officeooo:rsid="0031fe7d" officeooo:paragraph-rsid="001a9459"/>
    </style:style>
    <style:style style:name="P9" style:family="paragraph" style:parent-style-name="Standard" style:list-style-name="L1">
      <style:paragraph-properties fo:margin-top="0.201cm" fo:margin-bottom="0.201cm" style:contextual-spacing="false"/>
      <style:text-properties officeooo:rsid="00325476" officeooo:paragraph-rsid="001a9459"/>
    </style:style>
    <style:style style:name="P10" style:family="paragraph" style:parent-style-name="Standard" style:list-style-name="L1">
      <style:paragraph-properties fo:margin-top="0.201cm" fo:margin-bottom="0.201cm" style:contextual-spacing="false"/>
      <style:text-properties officeooo:rsid="003e86a4" officeooo:paragraph-rsid="001a9459"/>
    </style:style>
    <style:style style:name="T1" style:family="text">
      <style:text-properties officeooo:rsid="0017c9de"/>
    </style:style>
    <style:style style:name="T2" style:family="text">
      <style:text-properties officeooo:rsid="0020bf20"/>
    </style:style>
    <style:style style:name="T3" style:family="text">
      <style:text-properties officeooo:rsid="00229f45"/>
    </style:style>
    <style:style style:name="T4" style:family="text">
      <style:text-properties officeooo:rsid="0034050b"/>
    </style:style>
    <style:style style:name="T5" style:family="text">
      <style:text-properties officeooo:rsid="0049a573"/>
    </style:style>
    <style:style style:name="T6" style:family="text">
      <style:text-properties officeooo:rsid="0027d606"/>
    </style:style>
    <style:style style:name="T7" style:family="text">
      <style:text-properties officeooo:rsid="0023b439"/>
    </style:style>
    <style:style style:name="T8" style:family="text">
      <style:text-properties officeooo:rsid="001ec9d5"/>
    </style:style>
    <style:style style:name="T9" style:family="text">
      <style:text-properties officeooo:rsid="00305248"/>
    </style:style>
    <style:style style:name="T10" style:family="text">
      <style:text-properties fo:font-weight="bold" officeooo:rsid="00325476" style:font-weight-asian="bold" style:font-weight-complex="bold"/>
    </style:style>
    <style:style style:name="T11" style:family="text">
      <style:text-properties officeooo:rsid="00325476"/>
    </style:style>
    <style:style style:name="T12" style:family="text">
      <style:text-properties officeooo:rsid="00250da5"/>
    </style:style>
    <style:style style:name="T13" style:family="text">
      <style:text-properties officeooo:rsid="0032ab03"/>
    </style:style>
    <style:style style:name="T14" style:family="text">
      <style:text-properties fo:font-weight="bold" style:font-weight-asian="bold" style:font-weight-complex="bold"/>
    </style:style>
    <style:style style:name="T15" style:family="text">
      <style:text-properties officeooo:rsid="00359d81"/>
    </style:style>
    <style:style style:name="T16" style:family="text">
      <style:text-properties officeooo:rsid="0025866d"/>
    </style:style>
    <style:style style:name="T17" style:family="text">
      <style:text-properties officeooo:rsid="0035d9be"/>
    </style:style>
    <style:style style:name="T18" style:family="text">
      <style:text-properties officeooo:rsid="003688b0"/>
    </style:style>
    <style:style style:name="T19" style:family="text">
      <style:text-properties officeooo:rsid="00372fe9"/>
    </style:style>
    <style:style style:name="T20" style:family="text">
      <style:text-properties officeooo:rsid="0038319e"/>
    </style:style>
    <style:style style:name="T21" style:family="text">
      <style:text-properties officeooo:rsid="00400e1f"/>
    </style:style>
    <style:style style:name="T22" style:family="text">
      <style:text-properties officeooo:rsid="0039fbd7"/>
    </style:style>
    <style:style style:name="T23" style:family="text">
      <style:text-properties fo:font-weight="bold" officeooo:rsid="004c504d" style:font-weight-asian="bold" style:font-weight-complex="bold"/>
    </style:style>
    <style:style style:name="T24" style:family="text">
      <style:text-properties officeooo:rsid="003a5d76"/>
    </style:style>
    <style:style style:name="T25" style:family="text">
      <style:text-properties officeooo:rsid="004c504d"/>
    </style:style>
    <style:style style:name="T26" style:family="text">
      <style:text-properties officeooo:rsid="003bbb01"/>
    </style:style>
    <style:style style:name="T27" style:family="text">
      <style:text-properties officeooo:rsid="003bcd9d"/>
    </style:style>
    <style:style style:name="T28" style:family="text">
      <style:text-properties officeooo:rsid="003c8fed"/>
    </style:style>
    <style:style style:name="T29" style:family="text">
      <style:text-properties officeooo:rsid="003e86a4"/>
    </style:style>
    <style:style style:name="T30" style:family="text">
      <style:text-properties officeooo:rsid="0040ac31"/>
    </style:style>
    <style:style style:name="T31" style:family="text">
      <style:text-properties officeooo:rsid="00420ada"/>
    </style:style>
    <style:style style:name="T32" style:family="text">
      <style:text-properties officeooo:rsid="0043a3bc"/>
    </style:style>
    <style:style style:name="T33" style:family="text">
      <style:text-properties officeooo:rsid="00450892"/>
    </style:style>
    <style:style style:name="T34" style:family="text">
      <style:text-properties officeooo:rsid="0045c7a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ORES – Why Heroism Often Requires E<text:span text:style-name="T1">rotic Services</text:span></text:p>
      <text:p text:style-name="P2"/>
      <text:p text:style-name="P3">Les pouvoirs</text:p>
      <text:p text:style-name="P2"/>
      <text:p text:style-name="P4">Les pouvoirs sont <text:span text:style-name="T2">des capacités surnaturelles permettant à </text:span><text:span text:style-name="T3">leurs détenteurs</text:span><text:span text:style-name="T2"> de manipuler leur monde ou eux-mêmes de manière inexplicable par la science moderne. </text:span><text:span text:style-name="T3">Les possesseurs de ces capacités sont appelés par de nombreux noms par le reste de la population - </text:span><text:span text:style-name="T4">« Supers », « </text:span><text:span text:style-name="T5">Paras</text:span><text:span text:style-name="T4"> », « Mutants » ou « </text:span><text:span text:style-name="T5">A</text:span><text:span text:style-name="T4">liens »</text:span><text:span text:style-name="T3"> restant le</text:span><text:span text:style-name="T6">s</text:span><text:span text:style-name="T3"> plus répandu</text:span><text:span text:style-name="T6">s</text:span><text:span text:style-name="T3"> – mais restent </text:span><text:span text:style-name="T7">officiellement</text:span><text:span text:style-name="T3"> dénommés « para-humains » </text:span><text:span text:style-name="T7">par les autorités</text:span><text:span text:style-name="T2">. Ils</text:span> semblent pouvoir affecter n’importe quel être humain, indépendamment de son âge, sexe ou statut social. </text:p>
      <text:p text:style-name="P5"/>
      <text:p text:style-name="P5">Malgré les tentatives infructueuses du gouvernement de déclencher l’apparition de pouvoirs chez leurs sujets de tests, leurs études ont remarqué qu’ils semblaient surgir suite <text:span text:style-name="T8">au ressenti d’</text:span>une forte émotion, positive comme négative, qui influence le nombre et types des pouvoirs reçus en fonction de l’émotion et du contexte dans lequel elle a été ressentie ; <text:span text:style-name="T9">par exemple, un survivant d’un incendie développera des pouvoirs en lien avec le feu ou un moyen d’éteindre les flammes, ou une autre personne victime d’isolement sera en mesure de développer des IAs pour lui tenir compagnie.</text:span></text:p>
      <text:p text:style-name="P6"/>
      <text:p text:style-name="P7">Il y a autant de pouvoirs différents que d’individus, et une même personne peut en posséder plusieurs. Ils sont classés en différents types : </text:p>
      <text:p text:style-name="P7"/>
      <text:list text:style-name="L1">
        <text:list-item>
          <text:p text:style-name="P8"><text:span text:style-name="T10">Métabolite</text:span>, <text:span text:style-name="T11">qui définit tout pouvoir agissant sur le </text:span><text:span text:style-name="T12">métabolisme</text:span><text:span text:style-name="T11"> de son hôte, comme une force extrême, l’invulnérabilité ou la régénération rapide de membres perdus. Les métabolites sont appelés vulgairement « Supers » </text:span><text:span text:style-name="T13">ou « Brutes »</text:span><text:span text:style-name="T11"> dû à leur ressemblance aux héros de bandes dessinées.</text:span></text:p>
        </text:list-item>
        <text:list-item>
          <text:p text:style-name="P8"><text:span text:style-name="T14">Kinésiste</text:span>, <text:span text:style-name="T15">qui définit tout pouvoir agissant sur le déplacement ou la manipulation physique </text:span><text:span text:style-name="T16">ou physiologique</text:span><text:span text:style-name="T15"> d’une entité, que ce soit l’hôte ou un autre objet. Ce domaine inclut </text:span><text:span text:style-name="T17">par exemple</text:span><text:span text:style-name="T15"> la super-vitesse, la télékinésie,</text:span><text:span text:style-name="T17"> le transfert d’énergie </text:span><text:span text:style-name="T18">ou l’activation </text:span><text:span text:style-name="T19">de certains signaux électrique dans le corps humain, pour faire par exemple repartir un cœur arrêté, ou activer les nerfs pour faire souffrir une cible.</text:span></text:p>
        </text:list-item>
        <text:list-item>
          <text:p text:style-name="P8"><text:span text:style-name="T14">Mentaliste</text:span>, <text:span text:style-name="T18">qui définit tout pouvoir agissant sur la psyché humaine ou animale, </text:span><text:span text:style-name="T20">notamment la télépathie ou la possession d’un autre corps. Les mentalistes sont vus comme </text:span><text:span text:style-name="T21">parmi</text:span><text:span text:style-name="T20"> les plus dangereux des para-humains, car peu de protections existent face à leurs pouvoirs.</text:span></text:p>
        </text:list-item>
        <text:list-item>
          <text:p text:style-name="P8"><text:span text:style-name="T14">Elémentaliste</text:span>, <text:span text:style-name="T22">qui définit la </text:span><text:span text:style-name="T20">capa</text:span><text:span text:style-name="T22">cité</text:span><text:span text:style-name="T20"> de manipuler et façonner la matière, à divers degrés d’effort et de précision selon la puissance du pouvoir. Les élémentalistes </text:span><text:soft-page-break/><text:span text:style-name="T20">étaient autrefois classés comme des kinésistes avant que la distinction ne soit faite pour mieux distinguer les nuances entre les deux domaines.</text:span></text:p>
        </text:list-item>
        <text:list-item>
          <text:p text:style-name="P8"><text:span text:style-name="T23">Ingénieur</text:span>, <text:span text:style-name="T24">qui définit tout pouvoir impliquant la construction, le contrôle et/ou l’usage de machines et programmes informatiques. Bien que les « paratechnologies » soient conçues avec des matériaux connus, leur processus de fabrication demeure incompréhensible par les non-</text:span><text:span text:style-name="T25">ingénieurs</text:span><text:span text:style-name="T24">, même sous enregistrement vidéo, </text:span><text:span text:style-name="T26">et même </text:span><text:span text:style-name="T27">par</text:span><text:span text:style-name="T26"> différents </text:span><text:span text:style-name="T25">ingénieurs</text:span><text:span text:style-name="T24">. Les </text:span><text:span text:style-name="T25">ingénieurs</text:span><text:span text:style-name="T24"> peuvent être ou non des génies, mais tous ont en commun une connaissance innée et complète du domaine dans lequel ils exercent leur pouvoir ; par exemple, un </text:span><text:span text:style-name="T25">ingénieurs</text:span><text:span text:style-name="T24"> développant des IAs sera excellent en programmation et piratage, mais souvent mauvais en mécanique, ou mettra bien plus de temps en mécanique qu’un </text:span><text:span text:style-name="T25">ingénieurs</text:span><text:span text:style-name="T24"> disposé à ce domaine.</text:span></text:p>
        </text:list-item>
        <text:list-item>
          <text:p text:style-name="P9"><text:span text:style-name="T14">Dominant</text:span>, <text:span text:style-name="T28">qui définit la capacité de contrôler (voire créer) certaines entités. Cette dénomination fut autrefois mélangée à celle des mentalistes, avant d’en être séparée. </text:span><text:span text:style-name="T29">Ce contrôle peut être partiel ou total, et physique comme mental, allant jusqu’à réécrire les pensées, émotions et souvenirs des victimes. </text:span><text:span text:style-name="T21">Les dominants sont vus avec les mentalistes comme les plus dangereux parmi les para-humains, car là aussi peu de protection existe contre eux, et les effets de réécriture de la psyché des victimes est souvent irréversible.</text:span></text:p>
        </text:list-item>
        <text:list-item>
          <text:p text:style-name="P9"><text:span text:style-name="T14">Métapotent</text:span>, <text:span text:style-name="T30">qui définit la capacité d’influer sur ses propres pouvoirs ou ceux d’autres para-humains, et affectent peu voire nullement leur hôte ou leur environnement, à l’opposé des autres classes. </text:span><text:span text:style-name="T31">Très rares, ils sont très recherchés par les héros comme les vilains, car un métapotent puissant peut renverser le cours d’un combat en un instant. </text:span><text:span text:style-name="T32">Les métapotents peuvent généralement renforcer ou affaiblir les pouvoirs d’autres para-humains, leur octroyer ou copier leurs pouvoirs, et dans certains cas les annuler ou voler complètement, </text:span><text:span text:style-name="T33">ou encore se protéger des effets d’un parahumain adverse</text:span><text:span text:style-name="T32">.</text:span></text:p>
        </text:list-item>
        <text:list-item>
          <text:p text:style-name="P10"><text:span text:style-name="T14">Automate</text:span>, <text:span text:style-name="T21">qui ne désigne pas un type de parahumain, mais une création d’un parahumain, </text:span><text:span text:style-name="T34">le plus souvent d’un dominant ou </text:span><text:span text:style-name="T25">ingénieur</text:span><text:span text:style-name="T21">. C’est une définition large qui peut désigner une IA, un androïde, etc. Un automate peut lui aussi posséder des pouvoirs (autres que ceux conférés par son créateur) auquel cas il est classifié comme tout autre parahumain parmi les domaines ci-dessus.</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56M24S</meta:editing-duration>
    <meta:editing-cycles>13</meta:editing-cycles>
    <meta:generator>LibreOffice/25.2.4.3$Windows_X86_64 LibreOffice_project/33e196637044ead23f5c3226cde09b47731f7e27</meta:generator>
    <meta:creation-date>2026-01-07T22:28:07.753905300</meta:creation-date>
    <dc:title>Format de texte</dc:title>
    <dc:date>2026-01-07T23:24:35.820311200</dc:date>
    <meta:document-statistic meta:table-count="0" meta:image-count="0" meta:object-count="0" meta:page-count="2" meta:paragraph-count="13" meta:word-count="751" meta:character-count="4823" meta:non-whitespace-character-count="4089"/>
    <meta:template xlink:type="simple" xlink:actuate="onRequest" xlink:title="Format de texte" xlink:href="file:///C:/Users/Clément/AppData/Roaming/LibreOffice/4/user/template/Format%20de%20texte1.ott" meta:date="2026-01-07T22:28:07.419511700"/>
  </office:meta>
</office:document-meta>
</file>