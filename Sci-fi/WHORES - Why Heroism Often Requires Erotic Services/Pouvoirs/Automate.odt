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5ce9f7" officeooo:paragraph-rsid="00188758"/>
    </style:style>
    <style:style style:name="P2" style:family="paragraph" style:parent-style-name="Standard">
      <style:text-properties officeooo:rsid="00106f63" officeooo:paragraph-rsid="00106f63"/>
    </style:style>
    <style:style style:name="P3" style:family="paragraph" style:parent-style-name="Subtitle">
      <style:text-properties officeooo:rsid="00188758" officeooo:paragraph-rsid="00188758"/>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a596d"/>
    </style:style>
    <style:style style:name="P6" style:family="paragraph" style:parent-style-name="Heading_20_1">
      <style:text-properties officeooo:rsid="001997f6" officeooo:paragraph-rsid="001a596d"/>
    </style:style>
    <style:style style:name="P7" style:family="paragraph" style:parent-style-name="Standard">
      <style:paragraph-properties fo:margin-top="0.201cm" fo:margin-bottom="0.201cm" style:contextual-spacing="false"/>
      <style:text-properties officeooo:rsid="0031fe7d" officeooo:paragraph-rsid="001a596d"/>
    </style:style>
    <style:style style:name="P8" style:family="paragraph" style:parent-style-name="Standard">
      <style:paragraph-properties fo:margin-top="0.201cm" fo:margin-bottom="0.201cm" style:contextual-spacing="false"/>
      <style:text-properties officeooo:rsid="004a26d6" officeooo:paragraph-rsid="004be9ad"/>
    </style:style>
    <style:style style:name="P9" style:family="paragraph" style:parent-style-name="Heading_20_1">
      <style:text-properties officeooo:rsid="001a596d" officeooo:paragraph-rsid="001a596d"/>
    </style:style>
    <style:style style:name="P10" style:family="paragraph" style:parent-style-name="Standard">
      <style:paragraph-properties fo:margin-top="0.201cm" fo:margin-bottom="0.201cm" style:contextual-spacing="false"/>
      <style:text-properties officeooo:rsid="004eb96f" officeooo:paragraph-rsid="004eb96f"/>
    </style:style>
    <style:style style:name="P11" style:family="paragraph" style:parent-style-name="Standard">
      <style:paragraph-properties fo:margin-top="0.201cm" fo:margin-bottom="0.201cm" style:contextual-spacing="false"/>
      <style:text-properties officeooo:rsid="004fb6d3" officeooo:paragraph-rsid="004fb6d3"/>
    </style:style>
    <style:style style:name="P12" style:family="paragraph" style:parent-style-name="Standard">
      <style:paragraph-properties fo:margin-top="0.201cm" fo:margin-bottom="0.201cm" style:contextual-spacing="false"/>
      <style:text-properties officeooo:rsid="0050ebfb" officeooo:paragraph-rsid="0050ebfb"/>
    </style:style>
    <style:style style:name="P13" style:family="paragraph" style:parent-style-name="Standard">
      <style:paragraph-properties fo:margin-top="0.201cm" fo:margin-bottom="0.201cm" style:contextual-spacing="false"/>
      <style:text-properties officeooo:rsid="0052d99f" officeooo:paragraph-rsid="0052d99f"/>
    </style:style>
    <style:style style:name="T1" style:family="text">
      <style:text-properties officeooo:rsid="0017c9de"/>
    </style:style>
    <style:style style:name="T2" style:family="text">
      <style:text-properties officeooo:rsid="0048fddf"/>
    </style:style>
    <style:style style:name="T3" style:family="text">
      <style:text-properties officeooo:rsid="00400e1f"/>
    </style:style>
    <style:style style:name="T4" style:family="text">
      <style:text-properties officeooo:rsid="0045c7a9"/>
    </style:style>
    <style:style style:name="T5" style:family="text">
      <style:text-properties officeooo:rsid="004c504d"/>
    </style:style>
    <style:style style:name="T6" style:family="text">
      <style:text-properties officeooo:rsid="004c7041"/>
    </style:style>
    <style:style style:name="T7" style:family="text">
      <style:text-properties officeooo:rsid="004ccb2e"/>
    </style:style>
    <style:style style:name="T8" style:family="text">
      <style:text-properties officeooo:rsid="005439d5"/>
    </style:style>
    <style:style style:name="T9" style:family="text">
      <style:text-properties officeooo:rsid="00561bf2"/>
    </style:style>
    <style:style style:name="T10" style:family="text">
      <style:text-properties officeooo:rsid="005691d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ORES – Why Heroism Often Requires E<text:span text:style-name="T1">rotic Services</text:span></text:p>
      <text:p text:style-name="P2"/>
      <text:p text:style-name="P3">Les pouvoirs - <text:span text:style-name="T2">Automate</text:span></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Description<text:tab/>1</text:a></text:p>
          <text:p text:style-name="P4"><text:a xlink:type="simple" xlink:href="#__RefHeading___Toc715_353095010%20Copie%201" text:style-name="Index_20_Link" text:visited-style-name="Index_20_Link">Capacités<text:tab/>1</text:a></text:p>
          <text:p text:style-name="P4"><text:a xlink:type="simple" xlink:href="#__RefHeading___Toc715_353095010%20Copie%201%20Copie%201" text:style-name="Index_20_Link" text:visited-style-name="Index_20_Link">Faiblesses<text:tab/>1</text:a></text:p>
        </text:index-body>
      </text:table-of-content>
      <text:p text:style-name="P2"/>
      <text:p text:style-name="P5"/>
      <text:h text:style-name="P6" text:outline-level="1"><text:bookmark-start text:name="__RefHeading___Toc715_353095010"/>Description<text:bookmark-end text:name="__RefHeading___Toc715_353095010"/></text:h>
      <text:p text:style-name="P7"/>
      <text:p text:style-name="P8">L’appellation « Automate »<text:span text:style-name="T3"> ne désigne pas </text:span>directement<text:span text:style-name="T3"> un type de parahumain, mais une création d’un parahumain, </text:span><text:span text:style-name="T4">le plus souvent d’un dominant ou </text:span><text:span text:style-name="T5">ingénieur</text:span><text:span text:style-name="T3">. C’est une définition large qui peut désigner une </text:span><text:span text:style-name="T6">entité de tout type de forme ou niveau d’intelligence, que ce soit une</text:span><text:span text:style-name="T3"> IA, un androïde, etc. Un automate peut lui aussi posséder des pouvoirs (autres que ceux conférés par son créateur) auquel cas il est </text:span><text:span text:style-name="T7">également</text:span><text:span text:style-name="T3"> classifié comme tout autre parahumain parmi les </text:span><text:span text:style-name="T7">autre catégories.</text:span></text:p>
      <text:p text:style-name="P5"/>
      <text:h text:style-name="P9" text:outline-level="1"><text:bookmark-start text:name="__RefHeading___Toc715_353095010 Copie 1"/>Capacités<text:bookmark-end text:name="__RefHeading___Toc715_353095010 Copie 1"/></text:h>
      <text:p text:style-name="P7"/>
      <text:p text:style-name="P10">Les capacités des Automates sont le plus souvent définies par celles que possède leur créateur ; ainsi, si un élémentaliste manipulant la pierre peut créer des Automates extrêmement résistants, un ingénieur spécialisé dans l’infiltration peut créer des robots capable de pirater des systèmes informatiques, par exemple.</text:p>
      <text:p text:style-name="P11">En dehors des invocations, qui peuvent posséder des pouvoirs grandement différents de leur dominant, la plupart des pouvoirs d’Automates diffèrent peu de ceux de leurs créateurs, et rares sont les Automates capables de développer leurs propres pouvoirs.</text:p>
      <text:p text:style-name="P12">L’utilisation primaire des Automates et d’exécuter les tâches les plus pénibles ou dangereuses à la place de leur créateur. Certains sont capables de créer des armées d’Automates, d’autres ne peuvent en instancier qu’un seul ou une poignée à la fois.</text:p>
      <text:h text:style-name="P9" text:outline-level="1"><text:bookmark-start text:name="__RefHeading___Toc715_353095010 Copie 1 Copie 1"/><text:soft-page-break/>Faiblesses<text:bookmark-end text:name="__RefHeading___Toc715_353095010 Copie 1 Copie 1"/></text:h>
      <text:p text:style-name="P7"/>
      <text:p text:style-name="P13">Si la plupart des Automates peuvent être plus forts que leur créateur, rares sont ceux qui possèdent l’intelligence d’exécuter des tâches plus complexes, et beaucoup d’entre eux manquant la sapience qui leur permettrait d’atteindre la conscience de soi. <text:span text:style-name="T8">Comme pour les serviteurs des dominants, il n’existe pas de solution </text:span><text:span text:style-name="T9">applicable à tout type d’Automate pour l’arrêter</text:span><text:span text:style-name="T8"> en dehors de la destruction, </text:span><text:span text:style-name="T10">et donc</text:span><text:span text:style-name="T8"> la meilleure stratégie pour les battre et de foncer à la recherche de leur créateur pour l’arrêter, et d’ignorer les Automates eux-mêmes.</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H38M49S</meta:editing-duration>
    <meta:editing-cycles>62</meta:editing-cycles>
    <meta:generator>LibreOffice/25.2.4.3$Windows_X86_64 LibreOffice_project/33e196637044ead23f5c3226cde09b47731f7e27</meta:generator>
    <meta:creation-date>2026-01-07T23:25:34.548686300</meta:creation-date>
    <dc:title>Format de texte</dc:title>
    <dc:date>2026-01-08T10:03:04.198150200</dc:date>
    <meta:document-statistic meta:table-count="0" meta:image-count="0" meta:object-count="0" meta:page-count="2" meta:paragraph-count="14" meta:word-count="307" meta:character-count="2000" meta:non-whitespace-character-count="1706"/>
    <meta:template xlink:type="simple" xlink:actuate="onRequest" xlink:title="Format de texte" xlink:href="file:///C:/Users/Clément/AppData/Roaming/LibreOffice/4/user/template/Format%20de%20texte1.ott" meta:date="2026-01-07T23:25:34.465087300"/>
  </office:meta>
</office:document-meta>
</file>