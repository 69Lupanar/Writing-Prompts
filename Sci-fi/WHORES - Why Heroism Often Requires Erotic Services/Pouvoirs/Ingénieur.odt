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31fe7d" officeooo:paragraph-rsid="002cbb84"/>
    </style:style>
    <style:style style:name="P9" style:family="paragraph" style:parent-style-name="Standard">
      <style:paragraph-properties fo:margin-top="0.201cm" fo:margin-bottom="0.201cm" style:contextual-spacing="false"/>
      <style:text-properties officeooo:rsid="0031fe7d" officeooo:paragraph-rsid="002d853b"/>
    </style:style>
    <style:style style:name="P10" style:family="paragraph" style:parent-style-name="Heading_20_1">
      <style:text-properties officeooo:rsid="001a596d" officeooo:paragraph-rsid="001a596d"/>
    </style:style>
    <style:style style:name="P11" style:family="paragraph" style:parent-style-name="Standard">
      <style:paragraph-properties fo:margin-top="0.201cm" fo:margin-bottom="0.201cm" style:contextual-spacing="false"/>
      <style:text-properties officeooo:rsid="0031fe7d" officeooo:paragraph-rsid="002ff627"/>
    </style:style>
    <style:style style:name="P12" style:family="paragraph" style:parent-style-name="Standard">
      <style:paragraph-properties fo:margin-top="0.201cm" fo:margin-bottom="0.201cm" style:contextual-spacing="false"/>
      <style:text-properties officeooo:rsid="001e0d9d" officeooo:paragraph-rsid="0031d8bb"/>
    </style:style>
    <style:style style:name="P13" style:family="paragraph" style:parent-style-name="Standard">
      <style:paragraph-properties fo:margin-top="0.201cm" fo:margin-bottom="0.201cm" style:contextual-spacing="false"/>
      <style:text-properties officeooo:rsid="001e0d9d" officeooo:paragraph-rsid="002708f1"/>
    </style:style>
    <style:style style:name="P14" style:family="paragraph" style:parent-style-name="Standard">
      <style:paragraph-properties fo:margin-top="0.201cm" fo:margin-bottom="0.201cm" style:contextual-spacing="false"/>
      <style:text-properties officeooo:rsid="0036b670" officeooo:paragraph-rsid="0036b670"/>
    </style:style>
    <style:style style:name="T1" style:family="text">
      <style:text-properties officeooo:rsid="0017c9de"/>
    </style:style>
    <style:style style:name="T2" style:family="text">
      <style:text-properties officeooo:rsid="002a4595"/>
    </style:style>
    <style:style style:name="T3" style:family="text">
      <style:text-properties officeooo:rsid="001997f6"/>
    </style:style>
    <style:style style:name="T4" style:family="text">
      <style:text-properties officeooo:rsid="00325476"/>
    </style:style>
    <style:style style:name="T5" style:family="text">
      <style:text-properties officeooo:rsid="00359d81"/>
    </style:style>
    <style:style style:name="T6" style:family="text">
      <style:text-properties officeooo:rsid="003a5d76"/>
    </style:style>
    <style:style style:name="T7" style:family="text">
      <style:text-properties officeooo:rsid="002cbb84"/>
    </style:style>
    <style:style style:name="T8" style:family="text">
      <style:text-properties officeooo:rsid="004c504d"/>
    </style:style>
    <style:style style:name="T9" style:family="text">
      <style:text-properties officeooo:rsid="003bbb01"/>
    </style:style>
    <style:style style:name="T10" style:family="text">
      <style:text-properties officeooo:rsid="003bcd9d"/>
    </style:style>
    <style:style style:name="T11" style:family="text">
      <style:text-properties officeooo:rsid="002d853b"/>
    </style:style>
    <style:style style:name="T12" style:family="text">
      <style:text-properties officeooo:rsid="002eb183"/>
    </style:style>
    <style:style style:name="T13" style:family="text">
      <style:text-properties officeooo:rsid="0031fbb3"/>
    </style:style>
    <style:style style:name="T14" style:family="text">
      <style:text-properties officeooo:rsid="0031d8bb"/>
    </style:style>
    <style:style style:name="T15" style:family="text">
      <style:text-properties officeooo:rsid="00335367"/>
    </style:style>
    <style:style style:name="T16" style:family="text">
      <style:text-properties officeooo:rsid="002ff627"/>
    </style:style>
    <style:style style:name="T17" style:family="text">
      <style:text-properties officeooo:rsid="003502e0"/>
    </style:style>
    <style:style style:name="T18" style:family="text">
      <style:text-properties officeooo:rsid="003567d7"/>
    </style:style>
    <style:style style:name="T19" style:family="text">
      <style:text-properties officeooo:rsid="003619aa"/>
    </style:style>
    <style:style style:name="T20" style:family="text">
      <style:text-properties officeooo:rsid="0037a5c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text:span text:style-name="T2">Ingénieur</text:span></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text:span text:style-name="T3">Un </text:span><text:span text:style-name="T2">Ingénieur</text:span><text:span text:style-name="T4"> définit tout </text:span><text:span text:style-name="T3">para-humain </text:span><text:span text:style-name="T2">ayant un pouvoir</text:span><text:span text:style-name="T5"> </text:span><text:span text:style-name="T6">impliquant la construction, le contrôle et/ou l’usage de machines et programmes informatiques.</text:span></text:p>
      <text:p text:style-name="P9"><text:span text:style-name="T6">Bien que </text:span><text:span text:style-name="T7">leurs créations, appelées</text:span><text:span text:style-name="T6"> </text:span><text:span text:style-name="T7">alors des </text:span><text:span text:style-name="T6">« paratechnologies », soient conçues avec des matériaux connus, leur processus de fabrication demeure incompréhensible par les non-</text:span><text:span text:style-name="T8">ingénieurs</text:span><text:span text:style-name="T6">, même sous enregistrement vidéo, </text:span><text:span text:style-name="T9">et même </text:span><text:span text:style-name="T10">par</text:span><text:span text:style-name="T9"> différents </text:span><text:span text:style-name="T8">ingénieurs</text:span><text:span text:style-name="T6">. </text:span><text:span text:style-name="T11">Il est cependant possible pour deux paratechnologies d’interface entre elles, pourvu que leurs créateurs se soient entendus sur une conception commune. Ainsi, bon nombre de collaborations d’ingénieurs sont en réalité des systèmes différents connectés entre eux par des moyens souvent plus mondains.</text:span></text:p>
      <text:p text:style-name="P8"><text:span text:style-name="T6">Les </text:span><text:span text:style-name="T8">ingénieurs</text:span><text:span text:style-name="T6"> peuvent être ou non des génies, mais tous ont en commun une connaissance innée et complète du domaine dans lequel ils exercent leur pouvoir ; par exemple, un </text:span><text:span text:style-name="T8">ingénieurs</text:span><text:span text:style-name="T6"> développant des IAs sera excellent en programmation et piratage, mais souvent mauvais en mécanique, ou mettra bien plus de temps en mécanique qu’un </text:span><text:span text:style-name="T8">ingénieurs</text:span><text:span text:style-name="T6"> disposé à ce domaine.</text:span></text:p>
      <text:p text:style-name="P5"/>
      <text:h text:style-name="P10" text:outline-level="1"><text:bookmark-start text:name="__RefHeading___Toc715_353095010 Copie 1"/>Capacités<text:bookmark-end text:name="__RefHeading___Toc715_353095010 Copie 1"/></text:h>
      <text:p text:style-name="P7"/>
      <text:p text:style-name="P11"><text:span text:style-name="T7">Le domaine de prédilection </text:span><text:span text:style-name="T12">des ingénieurs</text:span><text:span text:style-name="T7"> est l’un des plus larges du domaine paranormal, pouvant couvrir toutes sortes de créations, machines, procédés de construction et source d’énergie, </text:span><text:span text:style-name="T13">allant du développement de programmes informatiques à l’armement militaire, </text:span><text:soft-page-break/><text:span text:style-name="T13">en passant par la création d’Automates ou de véhicules.</text:span></text:p>
      <text:p text:style-name="P12">Les <text:span text:style-name="T12">Ingénieurs sont aussi puissants que leurs </text:span><text:span text:style-name="T14">outils et créations leur permettent, </text:span><text:span text:style-name="T15">et peuvent adopter tout type de rôles en combat</text:span><text:span text:style-name="T14">, n’étant limités que par les ressources et le temps à leur disposition </text:span><text:span text:style-name="T15">pour concevoir leurs machines</text:span><text:span text:style-name="T14">.</text:span><text:span text:style-name="T7"> Ces para-humains sont capables </text:span><text:span text:style-name="T16">d’exploiter</text:span><text:span text:style-name="T7"> toutes sortes de ressources pour concevoir leurs créations, et sont souvent surnommés « charognards » dû à leur propension à écumer champs de bataille et déchetteries à la recherche de la moindre pièce utile.</text:span></text:p>
      <text:p text:style-name="P5"/>
      <text:h text:style-name="P10" text:outline-level="1"><text:bookmark-start text:name="__RefHeading___Toc715_353095010 Copie 1 Copie 1"/>Faiblesses<text:bookmark-end text:name="__RefHeading___Toc715_353095010 Copie 1 Copie 1"/></text:h>
      <text:p text:style-name="P7"/>
      <text:p text:style-name="P13">Les <text:span text:style-name="T17">Ingénieurs dépendent entièrement de leurs créations ; la majorité de celles-ci étant des machines, elles sont particulièrement vulnérables à tout élémentaliste manipulant le métal, ou tout kinésiste manipulant l’électricité, </text:span><text:span text:style-name="T18">ou encore une simple bombe électro-magnétique. </text:span><text:span text:style-name="T19">L’efficacité de leurs armes dépendant également de la résistance de leur cible à leurs effets, et un métabolite assez résistant laissera peu d’options offensives à un ingénieur.</text:span></text:p>
      <text:p text:style-name="P14">Les Ingénieurs nécessitent également beaucoup de temps pour compléter leurs créations, et peuvent très difficilement concevoir quoi que ce soit en plein conflit, même à l’abri, <text:span text:style-name="T20">c’est pourquoi la majorité de leurs efforts passent dans la préparation pour le plus de cas extrêmes que possible, car peu peuvent s’adapter rapidement à de nouvelles circonstances.</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1M1S</meta:editing-duration>
    <meta:editing-cycles>36</meta:editing-cycles>
    <meta:generator>LibreOffice/25.2.4.3$Windows_X86_64 LibreOffice_project/33e196637044ead23f5c3226cde09b47731f7e27</meta:generator>
    <meta:creation-date>2026-01-07T23:25:34.548686300</meta:creation-date>
    <dc:title>Format de texte</dc:title>
    <dc:date>2026-01-08T01:32:01.723387800</dc:date>
    <meta:document-statistic meta:table-count="0" meta:image-count="0" meta:object-count="0" meta:page-count="2" meta:paragraph-count="16" meta:word-count="414" meta:character-count="2831" meta:non-whitespace-character-count="2432"/>
    <meta:template xlink:type="simple" xlink:actuate="onRequest" xlink:title="Format de texte" xlink:href="file:///C:/Users/Clément/AppData/Roaming/LibreOffice/4/user/template/Format%20de%20texte1.ott" meta:date="2026-01-07T23:25:34.465087300"/>
  </office:meta>
</office:document-meta>
</file>