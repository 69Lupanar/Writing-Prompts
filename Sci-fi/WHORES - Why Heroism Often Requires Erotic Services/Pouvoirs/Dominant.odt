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officeooo:rsid="005ce9f7" officeooo:paragraph-rsid="00188758"/>
    </style:style>
    <style:style style:name="P2" style:family="paragraph" style:parent-style-name="Standard">
      <style:text-properties officeooo:rsid="00106f63" officeooo:paragraph-rsid="00106f63"/>
    </style:style>
    <style:style style:name="P3" style:family="paragraph" style:parent-style-name="Subtitle">
      <style:text-properties officeooo:rsid="00188758" officeooo:paragraph-rsid="00188758"/>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Standard">
      <style:text-properties officeooo:rsid="00106f63" officeooo:paragraph-rsid="001a596d"/>
    </style:style>
    <style:style style:name="P6" style:family="paragraph" style:parent-style-name="Heading_20_1">
      <style:text-properties officeooo:rsid="001997f6" officeooo:paragraph-rsid="001a596d"/>
    </style:style>
    <style:style style:name="P7" style:family="paragraph" style:parent-style-name="Standard">
      <style:paragraph-properties fo:margin-top="0.201cm" fo:margin-bottom="0.201cm" style:contextual-spacing="false"/>
      <style:text-properties officeooo:rsid="0031fe7d" officeooo:paragraph-rsid="001a596d"/>
    </style:style>
    <style:style style:name="P8" style:family="paragraph" style:parent-style-name="Standard">
      <style:paragraph-properties fo:margin-top="0.201cm" fo:margin-bottom="0.201cm" style:contextual-spacing="false"/>
      <style:text-properties officeooo:rsid="0031fe7d" officeooo:paragraph-rsid="003a843a"/>
    </style:style>
    <style:style style:name="P9" style:family="paragraph" style:parent-style-name="Standard">
      <style:paragraph-properties fo:margin-top="0.201cm" fo:margin-bottom="0.201cm" style:contextual-spacing="false"/>
      <style:text-properties officeooo:rsid="0031fe7d" officeooo:paragraph-rsid="003e5d62"/>
    </style:style>
    <style:style style:name="P10" style:family="paragraph" style:parent-style-name="Standard">
      <style:paragraph-properties fo:margin-top="0.201cm" fo:margin-bottom="0.201cm" style:contextual-spacing="false"/>
      <style:text-properties officeooo:rsid="00400e1f" officeooo:paragraph-rsid="003e5d62"/>
    </style:style>
    <style:style style:name="P11" style:family="paragraph" style:parent-style-name="Heading_20_1">
      <style:text-properties officeooo:rsid="001a596d" officeooo:paragraph-rsid="001a596d"/>
    </style:style>
    <style:style style:name="P12" style:family="paragraph" style:parent-style-name="Standard">
      <style:paragraph-properties fo:margin-top="0.201cm" fo:margin-bottom="0.201cm" style:contextual-spacing="false"/>
      <style:text-properties officeooo:rsid="00422d17" officeooo:paragraph-rsid="00422d17"/>
    </style:style>
    <style:style style:name="P13" style:family="paragraph" style:parent-style-name="Standard">
      <style:paragraph-properties fo:margin-top="0.201cm" fo:margin-bottom="0.201cm" style:contextual-spacing="false"/>
      <style:text-properties officeooo:rsid="0044b27a" officeooo:paragraph-rsid="0044b27a"/>
    </style:style>
    <style:style style:name="P14" style:family="paragraph" style:parent-style-name="Standard">
      <style:paragraph-properties fo:margin-top="0.201cm" fo:margin-bottom="0.201cm" style:contextual-spacing="false"/>
      <style:text-properties officeooo:rsid="004860e9" officeooo:paragraph-rsid="004860e9"/>
    </style:style>
    <style:style style:name="T1" style:family="text">
      <style:text-properties officeooo:rsid="0017c9de"/>
    </style:style>
    <style:style style:name="T2" style:family="text">
      <style:text-properties officeooo:rsid="0038b4cd"/>
    </style:style>
    <style:style style:name="T3" style:family="text">
      <style:text-properties officeooo:rsid="001997f6"/>
    </style:style>
    <style:style style:name="T4" style:family="text">
      <style:text-properties officeooo:rsid="003b2018"/>
    </style:style>
    <style:style style:name="T5" style:family="text">
      <style:text-properties officeooo:rsid="00325476"/>
    </style:style>
    <style:style style:name="T6" style:family="text">
      <style:text-properties officeooo:rsid="002a4595"/>
    </style:style>
    <style:style style:name="T7" style:family="text">
      <style:text-properties officeooo:rsid="003c8fed"/>
    </style:style>
    <style:style style:name="T8" style:family="text">
      <style:text-properties officeooo:rsid="003e86a4"/>
    </style:style>
    <style:style style:name="T9" style:family="text">
      <style:text-properties officeooo:rsid="003d1e5b"/>
    </style:style>
    <style:style style:name="T10" style:family="text">
      <style:text-properties officeooo:rsid="003e5d62"/>
    </style:style>
    <style:style style:name="T11" style:family="text">
      <style:text-properties officeooo:rsid="004011aa"/>
    </style:style>
    <style:style style:name="T12" style:family="text">
      <style:text-properties officeooo:rsid="00478c94"/>
    </style:style>
    <style:style style:name="T13" style:family="text">
      <style:text-properties officeooo:rsid="0041e557"/>
    </style:style>
    <style:style style:name="T14" style:family="text">
      <style:text-properties officeooo:rsid="0043a75d"/>
    </style:style>
    <style:style style:name="T15" style:family="text">
      <style:text-properties officeooo:rsid="00466099"/>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ORES – Why Heroism Often Requires E<text:span text:style-name="T1">rotic Services</text:span></text:p>
      <text:p text:style-name="P2"/>
      <text:p text:style-name="P3">Les pouvoirs - <text:span text:style-name="T2">Dominant</text:span></text:p>
      <text:p text:style-name="P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4"><text:a xlink:type="simple" xlink:href="#__RefHeading___Toc715_353095010" text:style-name="Index_20_Link" text:visited-style-name="Index_20_Link">Description<text:tab/>1</text:a></text:p>
          <text:p text:style-name="P4"><text:a xlink:type="simple" xlink:href="#__RefHeading___Toc715_353095010%20Copie%201" text:style-name="Index_20_Link" text:visited-style-name="Index_20_Link">Capacités<text:tab/>1</text:a></text:p>
          <text:p text:style-name="P4"><text:a xlink:type="simple" xlink:href="#__RefHeading___Toc715_353095010%20Copie%201%20Copie%201" text:style-name="Index_20_Link" text:visited-style-name="Index_20_Link">Faiblesses<text:tab/>1</text:a></text:p>
        </text:index-body>
      </text:table-of-content>
      <text:p text:style-name="P2"/>
      <text:p text:style-name="P5"/>
      <text:h text:style-name="P6" text:outline-level="1"><text:bookmark-start text:name="__RefHeading___Toc715_353095010"/>Description<text:bookmark-end text:name="__RefHeading___Toc715_353095010"/></text:h>
      <text:p text:style-name="P7"/>
      <text:p text:style-name="P8"><text:span text:style-name="T3">Un </text:span><text:span text:style-name="T4">Dominant</text:span><text:span text:style-name="T5"> définit tout </text:span><text:span text:style-name="T3">para-humain </text:span><text:span text:style-name="T6">ayant </text:span><text:span text:style-name="T7">la capacité de contrôler (voire créer) certaines entités. </text:span><text:span text:style-name="T8">Ce contrôle peut être partiel ou total, et physique comme mental, allant jusqu’à réécrire les pensées, émotions et souvenirs des victimes.</text:span></text:p>
      <text:p text:style-name="P9"><text:span text:style-name="T7">Cette dénomination fut autrefois mélangée à celle des mentalistes, avant d’en être séparée </text:span><text:span text:style-name="T4">pour comprendre spécifiquement les pouvoirs permettant la possession</text:span><text:span text:style-name="T9">, car les dominants </text:span><text:span text:style-name="T10">n</text:span><text:span text:style-name="T9">’interfacent pas nécessairement avec la psyché de leurs cibles pour les contrôler, </text:span><text:span text:style-name="T11">pouvant utilise des </text:span><text:span text:style-name="T9">phéromones, signaux électriques, etc ; </text:span><text:span text:style-name="T12">ainsi que les invocateurs et utilisateurs d’Automates, qui ne possèdent généralement aucun pouvoir de possession.</text:span><text:span text:style-name="T8"> </text:span></text:p>
      <text:p text:style-name="P10">Les dominants sont vus avec les mentalistes comme les plus dangereux parmi les para-humains, car là aussi peu de protection existe contre eux, et les effets de réécriture de la psyché des victimes est souvent irréversible. <text:span text:style-name="T13">Pour cette raison, les Dominants sont souvent considérés plus durement par le reste de la société, parfois traités en parias même par d’autres para-humains.</text:span></text:p>
      <text:p text:style-name="P5"/>
      <text:h text:style-name="P11" text:outline-level="1"><text:bookmark-start text:name="__RefHeading___Toc715_353095010 Copie 1"/>Capacités<text:bookmark-end text:name="__RefHeading___Toc715_353095010 Copie 1"/></text:h>
      <text:p text:style-name="P7"/>
      <text:p text:style-name="P12">La plage de compétences d’un Dominant et leur puissance peut grandement varier entre individus. Si certains Dominants ne sont capables au mieux que d’exercer une faible influence sur le corps ou la psyché de leur cible dans un champ restreint, les plus puissants <text:soft-page-break/>d’entre eux sont capables d’hypnotiser ou posséder leurs victimes sur une large distance sans avoir recourir à un champ de vision, voire même de réécrire leur psyché pour les asservir sur une longue durée, même en dehors de leur présence. Certains d’entre eux, plutôt que de posséder une entité, peuvent à la placer invoquer des créatures (humaines ou non) pour se battre à leur place.</text:p>
      <text:p text:style-name="P12">Dû à leur facilité d’accès à des sbires pour acter leur volonté, peu de Dominants ont besoin d’une équipe de para-humains pour les soutenir, préférant se terrer à l’abri du danger et laisser leurs <text:span text:style-name="T14">victimes faire le travail, ce qui peut rendre difficile la détermination de leur position lors d’un conflit.</text:span></text:p>
      <text:p text:style-name="P5"/>
      <text:h text:style-name="P11" text:outline-level="1"><text:bookmark-start text:name="__RefHeading___Toc715_353095010 Copie 1 Copie 1"/>Faiblesses<text:bookmark-end text:name="__RefHeading___Toc715_353095010 Copie 1 Copie 1"/></text:h>
      <text:p text:style-name="P7"/>
      <text:p text:style-name="P13">Les Dominants sont aussi dangereux que leurs pouvoirs de contrôle le sont ; rester à distance et hors de leur champ de vision suffit généralement à éviter leurs effets. Les invocateurs et utilisateurs d’Automates <text:span text:style-name="T15">en particulier</text:span> dépendent <text:span text:style-name="T15">grandement</text:span> de l’efficacité de leurs entités en combat ; si ces dernières viennent à être détruites, un Dominant n’a alors que peu d’options restantes pour gagner le conflit.</text:p>
      <text:p text:style-name="P14">Généralement, un Dominant avec un pouvoir d’hypnose ou de possession ne peut contrôler qu’une entité à la fois, ou un type d’entité répondant à certains critères. Ainsi envoyer un groupe entier de combattants peut parfois suffire à submerger le premier cas, et envoyer un entité ne correspondant pas aux critères du deuxième peut suffire à l’arrêter (par ex : Un Dominant possédant les animaux ne peut pas contrôler des humains ou machines.)</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8H34M54S</meta:editing-duration>
    <meta:editing-cycles>51</meta:editing-cycles>
    <meta:generator>LibreOffice/25.2.4.3$Windows_X86_64 LibreOffice_project/33e196637044ead23f5c3226cde09b47731f7e27</meta:generator>
    <meta:creation-date>2026-01-07T23:25:34.548686300</meta:creation-date>
    <dc:title>Format de texte</dc:title>
    <dc:date>2026-01-08T09:16:55.656975700</dc:date>
    <meta:document-statistic meta:table-count="0" meta:image-count="0" meta:object-count="0" meta:page-count="2" meta:paragraph-count="16" meta:word-count="471" meta:character-count="3007" meta:non-whitespace-character-count="2550"/>
    <meta:template xlink:type="simple" xlink:actuate="onRequest" xlink:title="Format de texte" xlink:href="file:///C:/Users/Clément/AppData/Roaming/LibreOffice/4/user/template/Format%20de%20texte1.ott" meta:date="2026-01-07T23:25:34.465087300"/>
  </office:meta>
</office:document-meta>
</file>