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333e06"/>
    </style:style>
    <style:style style:name="P9" style:family="paragraph" style:parent-style-name="Standard">
      <style:paragraph-properties fo:margin-top="0.201cm" fo:margin-bottom="0.201cm" style:contextual-spacing="false"/>
      <style:text-properties officeooo:rsid="0038319e" officeooo:paragraph-rsid="00333e06"/>
    </style:style>
    <style:style style:name="P10" style:family="paragraph" style:parent-style-name="Heading_20_1">
      <style:text-properties officeooo:rsid="001a596d" officeooo:paragraph-rsid="001a596d"/>
    </style:style>
    <style:style style:name="P11" style:family="paragraph" style:parent-style-name="Standard">
      <style:paragraph-properties fo:margin-top="0.201cm" fo:margin-bottom="0.201cm" style:contextual-spacing="false"/>
      <style:text-properties officeooo:rsid="00374dd1" officeooo:paragraph-rsid="004187fd"/>
    </style:style>
    <style:style style:name="P12" style:family="paragraph" style:parent-style-name="Standard">
      <style:paragraph-properties fo:margin-top="0.201cm" fo:margin-bottom="0.201cm" style:contextual-spacing="false"/>
      <style:text-properties officeooo:rsid="00277ffb" officeooo:paragraph-rsid="00277ffb"/>
    </style:style>
    <style:style style:name="P13" style:family="paragraph" style:parent-style-name="Standard">
      <style:paragraph-properties fo:margin-top="0.201cm" fo:margin-bottom="0.201cm" style:contextual-spacing="false"/>
      <style:text-properties officeooo:rsid="00222059" officeooo:paragraph-rsid="00222059"/>
    </style:style>
    <style:style style:name="T1" style:family="text">
      <style:text-properties officeooo:rsid="0017c9de"/>
    </style:style>
    <style:style style:name="T2" style:family="text">
      <style:text-properties officeooo:rsid="00333e06"/>
    </style:style>
    <style:style style:name="T3" style:family="text">
      <style:text-properties officeooo:rsid="001997f6"/>
    </style:style>
    <style:style style:name="T4" style:family="text">
      <style:text-properties officeooo:rsid="00325476"/>
    </style:style>
    <style:style style:name="T5" style:family="text">
      <style:text-properties officeooo:rsid="0039fbd7"/>
    </style:style>
    <style:style style:name="T6" style:family="text">
      <style:text-properties officeooo:rsid="0038319e"/>
    </style:style>
    <style:style style:name="T7" style:family="text">
      <style:text-properties officeooo:rsid="00374dd1"/>
    </style:style>
    <style:style style:name="T8" style:family="text">
      <style:text-properties officeooo:rsid="003645d1"/>
    </style:style>
    <style:style style:name="T9" style:family="text">
      <style:text-properties officeooo:rsid="0036d75e"/>
    </style:style>
    <style:style style:name="T10" style:family="text">
      <style:text-properties officeooo:rsid="003b43d7"/>
    </style:style>
    <style:style style:name="T11" style:family="text">
      <style:text-properties officeooo:rsid="0039158e"/>
    </style:style>
    <style:style style:name="T12" style:family="text">
      <style:text-properties officeooo:rsid="003bfb05"/>
    </style:style>
    <style:style style:name="T13" style:family="text">
      <style:text-properties officeooo:rsid="003c66da"/>
    </style:style>
    <style:style style:name="T14" style:family="text">
      <style:text-properties officeooo:rsid="003e18ab"/>
    </style:style>
    <style:style style:name="T15" style:family="text">
      <style:text-properties officeooo:rsid="003b72a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Elémentaliste</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3">Un </text:span><text:span text:style-name="T2">Elémentaliste</text:span><text:span text:style-name="T4"> définit tout </text:span><text:span text:style-name="T3">para-humain possédant </text:span><text:span text:style-name="T5">la </text:span><text:span text:style-name="T6">capa</text:span><text:span text:style-name="T5">cité</text:span><text:span text:style-name="T6"> de manipuler et façonner la matière, à divers degrés d’effort et de précision selon la puissance du pouvoir, </text:span><text:span text:style-name="T7">et possèdent souvent une forme d’immunité aux effets néfastes de leur matière de prédilection.</text:span></text:p>
      <text:p text:style-name="P9">Les élémentalistes étaient autrefois classés comme des kinésistes avant que la distinction ne soit faite pour mieux distinguer les nuances entre les deux domaines : <text:span text:style-name="T8">Bien que certains kinésistes soient eux aussi capables de manipuler certaines matières, </text:span><text:span text:style-name="T9">l</text:span><text:span text:style-name="T8">es élémentalistes en sont capables à un niveau granulaire bien plus fin que leurs homologues, et sont souvent spécialistes dans peu de matières, le plus souvent une seule. </text:span><text:span text:style-name="T9">De plus, les seuls élémentalistes capables d’affecter leur propre corps peuvent en façonner l’entièreté et ceux des autres, contrairement aux kinésistes, qui sont souvent limités à leur propre corps et/ou à une composante limité de leur physiologie, comme le système nerveux.</text:span></text:p>
      <text:p text:style-name="P5"/>
      <text:h text:style-name="P10" text:outline-level="1"><text:bookmark-start text:name="__RefHeading___Toc715_353095010 Copie 1"/>Capacités<text:bookmark-end text:name="__RefHeading___Toc715_353095010 Copie 1"/></text:h>
      <text:p text:style-name="P7"/>
      <text:p text:style-name="P11">Si les pouvoirs des <text:span text:style-name="T10">Elémentalistes</text:span> peuvent avoir des applications limitées en fonction de leur matière de prédilection, ils sont <text:span text:style-name="T11">souvent ceux avec la portée la plus large, pouvant étendre leurs effets à plusieurs dizaines, voire centaines de mètres. </text:span><text:span text:style-name="T12">Certains élémentalistes consomment leur matière pour utiliser leurs pouvoirs, tandis que d’autres peuvent </text:span><text:span text:style-name="T13">convertir la matière en une autre,</text:span><text:span text:style-name="T12"> la façonner sans soucis</text:span><text:span text:style-name="T13">, </text:span><text:span text:style-name="T14">ou </text:span><text:span text:style-name="T13">la conjurer à partir de rien</text:span><text:span text:style-name="T12">.</text:span></text:p>
      <text:p text:style-name="P11"><text:soft-page-break/></text:p>
      <text:p text:style-name="P11"><text:span text:style-name="T10">Les plus puissants d’entre eux peuvent étendre les propriétés de leur matière à leur propre corps, leur conférant des capacités physiques similaires à leurs homologues para-humains, comme une résistance accrue aux dégâts, un toucher mortel ou un moyen d’échapper à leurs ennemis. Pour cette raison, beaucoup d’élémentalistes transportent toujours avec eux un pan de leur matière de prédilection en cas de besoin.</text:span></text:p>
      <text:p text:style-name="P12"/>
      <text:h text:style-name="P10" text:outline-level="1"><text:bookmark-start text:name="__RefHeading___Toc715_353095010 Copie 1 Copie 1"/>Faiblesses<text:bookmark-end text:name="__RefHeading___Toc715_353095010 Copie 1 Copie 1"/></text:h>
      <text:p text:style-name="P7"/>
      <text:p text:style-name="P13">Les <text:span text:style-name="T15">Elémentalistes dépendent entièrement de leur matière de prédilection pour se battre. Si certaines matières sont facilement accessibles (comme de l’oxygène pour un manipulateur de feu) d’autres sont plus rares et demandent à être utilisées avec parcimonie, rendant leur possesseur plus facile à arrêter. Il est aussi possible de piéger l’élémentaliste dans une salle absente de la matière en question, le rendant aussi inoffensif qu’un humain normal.</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3M42S</meta:editing-duration>
    <meta:editing-cycles>42</meta:editing-cycles>
    <meta:generator>LibreOffice/25.2.4.3$Windows_X86_64 LibreOffice_project/33e196637044ead23f5c3226cde09b47731f7e27</meta:generator>
    <meta:creation-date>2026-01-07T23:25:34.548686300</meta:creation-date>
    <dc:title>Format de texte</dc:title>
    <dc:date>2026-01-08T01:00:07.138176400</dc:date>
    <meta:document-statistic meta:table-count="0" meta:image-count="0" meta:object-count="0" meta:page-count="2" meta:paragraph-count="14" meta:word-count="364" meta:character-count="2434" meta:non-whitespace-character-count="2083"/>
    <meta:template xlink:type="simple" xlink:actuate="onRequest" xlink:title="Format de texte" xlink:href="file:///C:/Users/Clément/AppData/Roaming/LibreOffice/4/user/template/Format%20de%20texte1.ott" meta:date="2026-01-07T23:25:34.465087300"/>
  </office:meta>
</office:document-meta>
</file>