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5ce9f7" officeooo:paragraph-rsid="00188758"/>
    </style:style>
    <style:style style:name="P2" style:family="paragraph" style:parent-style-name="Standard">
      <style:text-properties officeooo:rsid="00106f63" officeooo:paragraph-rsid="00106f63"/>
    </style:style>
    <style:style style:name="P3" style:family="paragraph" style:parent-style-name="Subtitle">
      <style:text-properties officeooo:rsid="00188758" officeooo:paragraph-rsid="00188758"/>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Standard">
      <style:text-properties officeooo:rsid="00106f63" officeooo:paragraph-rsid="001a596d"/>
    </style:style>
    <style:style style:name="P6" style:family="paragraph" style:parent-style-name="Heading_20_1">
      <style:text-properties officeooo:rsid="001997f6" officeooo:paragraph-rsid="001a596d"/>
    </style:style>
    <style:style style:name="P7" style:family="paragraph" style:parent-style-name="Standard">
      <style:paragraph-properties fo:margin-top="0.201cm" fo:margin-bottom="0.201cm" style:contextual-spacing="false"/>
      <style:text-properties officeooo:rsid="0031fe7d" officeooo:paragraph-rsid="001a596d"/>
    </style:style>
    <style:style style:name="P8" style:family="paragraph" style:parent-style-name="Standard">
      <style:paragraph-properties fo:margin-top="0.201cm" fo:margin-bottom="0.201cm" style:contextual-spacing="false"/>
      <style:text-properties officeooo:rsid="0031fe7d" officeooo:paragraph-rsid="004347ed"/>
    </style:style>
    <style:style style:name="P9" style:family="paragraph" style:parent-style-name="Heading_20_1">
      <style:text-properties officeooo:rsid="001a596d" officeooo:paragraph-rsid="001a596d"/>
    </style:style>
    <style:style style:name="P10" style:family="paragraph" style:parent-style-name="Standard">
      <style:paragraph-properties fo:margin-top="0.201cm" fo:margin-bottom="0.201cm" style:contextual-spacing="false"/>
      <style:text-properties officeooo:rsid="004347ed" officeooo:paragraph-rsid="0043d459"/>
    </style:style>
    <style:style style:name="P11" style:family="paragraph" style:parent-style-name="Standard">
      <style:paragraph-properties fo:margin-top="0.201cm" fo:margin-bottom="0.201cm" style:contextual-spacing="false"/>
      <style:text-properties officeooo:rsid="004347ed" officeooo:paragraph-rsid="004347ed"/>
    </style:style>
    <style:style style:name="P12" style:family="paragraph" style:parent-style-name="Standard">
      <style:paragraph-properties fo:margin-top="0.201cm" fo:margin-bottom="0.201cm" style:contextual-spacing="false"/>
      <style:text-properties officeooo:rsid="00277ffb" officeooo:paragraph-rsid="00277ffb"/>
    </style:style>
    <style:style style:name="P13" style:family="paragraph" style:parent-style-name="Standard">
      <style:paragraph-properties fo:margin-top="0.201cm" fo:margin-bottom="0.201cm" style:contextual-spacing="false"/>
      <style:text-properties officeooo:rsid="0043d459" officeooo:paragraph-rsid="0047bcea"/>
    </style:style>
    <style:style style:name="P14" style:family="paragraph" style:parent-style-name="Standard">
      <style:paragraph-properties fo:margin-top="0.201cm" fo:margin-bottom="0.201cm" style:contextual-spacing="false"/>
      <style:text-properties officeooo:rsid="00445eee" officeooo:paragraph-rsid="0047bcea"/>
    </style:style>
    <style:style style:name="T1" style:family="text">
      <style:text-properties officeooo:rsid="0017c9de"/>
    </style:style>
    <style:style style:name="T2" style:family="text">
      <style:text-properties officeooo:rsid="00422514"/>
    </style:style>
    <style:style style:name="T3" style:family="text">
      <style:text-properties officeooo:rsid="001997f6"/>
    </style:style>
    <style:style style:name="T4" style:family="text">
      <style:text-properties officeooo:rsid="0042daac"/>
    </style:style>
    <style:style style:name="T5" style:family="text">
      <style:text-properties officeooo:rsid="00325476"/>
    </style:style>
    <style:style style:name="T6" style:family="text">
      <style:text-properties officeooo:rsid="0040ac31"/>
    </style:style>
    <style:style style:name="T7" style:family="text">
      <style:text-properties officeooo:rsid="00420ada"/>
    </style:style>
    <style:style style:name="T8" style:family="text">
      <style:text-properties officeooo:rsid="0043a3bc"/>
    </style:style>
    <style:style style:name="T9" style:family="text">
      <style:text-properties officeooo:rsid="00450892"/>
    </style:style>
    <style:style style:name="T10" style:family="text">
      <style:text-properties officeooo:rsid="0043d459"/>
    </style:style>
    <style:style style:name="T11" style:family="text">
      <style:text-properties officeooo:rsid="0046d7a5"/>
    </style:style>
    <style:style style:name="T12" style:family="text">
      <style:text-properties officeooo:rsid="0044f97b"/>
    </style:style>
    <style:style style:name="T13" style:family="text">
      <style:text-properties officeooo:rsid="00445ee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ORES – Why Heroism Often Requires E<text:span text:style-name="T1">rotic Services</text:span></text:p>
      <text:p text:style-name="P2"/>
      <text:p text:style-name="P3">Les pouvoirs - <text:span text:style-name="T2">Métapotent</text:span></text:p>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4"><text:a xlink:type="simple" xlink:href="#__RefHeading___Toc715_353095010" text:style-name="Index_20_Link" text:visited-style-name="Index_20_Link">Description<text:tab/>1</text:a></text:p>
          <text:p text:style-name="P4"><text:a xlink:type="simple" xlink:href="#__RefHeading___Toc715_353095010%20Copie%201" text:style-name="Index_20_Link" text:visited-style-name="Index_20_Link">Capacités<text:tab/>1</text:a></text:p>
          <text:p text:style-name="P4"><text:a xlink:type="simple" xlink:href="#__RefHeading___Toc715_353095010%20Copie%201%20Copie%201" text:style-name="Index_20_Link" text:visited-style-name="Index_20_Link">Faiblesses<text:tab/>1</text:a></text:p>
        </text:index-body>
      </text:table-of-content>
      <text:p text:style-name="P2"/>
      <text:p text:style-name="P5"/>
      <text:h text:style-name="P6" text:outline-level="1"><text:bookmark-start text:name="__RefHeading___Toc715_353095010"/>Description<text:bookmark-end text:name="__RefHeading___Toc715_353095010"/></text:h>
      <text:p text:style-name="P7"/>
      <text:p text:style-name="P8"><text:span text:style-name="T3">Un </text:span><text:span text:style-name="T4">Métapotent</text:span><text:span text:style-name="T5"> définit tout </text:span><text:span text:style-name="T3">para-humain possédant </text:span><text:span text:style-name="T6">la capacité d’influer sur ses propres pouvoirs ou ceux d’autres para-humains, et affectent peu voire nullement leur hôte ou leur environnement, à l’opposé des autres classes. </text:span></text:p>
      <text:p text:style-name="P8"><text:span text:style-name="T7">Très rares, ils sont très recherchés par les héros comme les vilains, car un métapotent puissant peut renverser le cours d’un combat en un instant. </text:span><text:span text:style-name="T8">Les métapotents peuvent généralement renforcer ou affaiblir les pouvoirs d’autres para-humains, leur octroyer ou copier leurs pouvoirs, et dans certains cas les annuler ou voler complètement, </text:span><text:span text:style-name="T9">ou encore se protéger des effets d’un parahumain adverse</text:span><text:span text:style-name="T8">.</text:span></text:p>
      <text:p text:style-name="P5"/>
      <text:h text:style-name="P9" text:outline-level="1"><text:bookmark-start text:name="__RefHeading___Toc715_353095010 Copie 1"/>Capacités<text:bookmark-end text:name="__RefHeading___Toc715_353095010 Copie 1"/></text:h>
      <text:p text:style-name="P7"/>
      <text:p text:style-name="P10">Les Métapotents ont rarement des capacités directement offensives comme les métabolites ou les élémentalistes, usant plutôt de leurs pouvoirs pour interagir avec leurs semblables. Les plus faibles d’entre eux n’offrent que de légers bonus et malus de puissance à d’autres para-humains, ou étendre la durée des effets de leurs pouvoirs, tandis que d’autres peuventcomplètement couper leur accès à leurs pouvoirs, <text:span text:style-name="T10">en octroyer à leurs alliés,</text:span> développer un pouvoir contrant leur ennemi, voire se les approprier, temporairement ou non.</text:p>
      <text:p text:style-name="P11">Les Métapotents sont par conséquent très utiles pour désamorcer un combat de para-humains, et sont souvent le plus efficaces dans des combats de groupe où ils jouent le rôle <text:soft-page-break/>de soutien à leur équipe.</text:p>
      <text:p text:style-name="P12"/>
      <text:h text:style-name="P9" text:outline-level="1"><text:bookmark-start text:name="__RefHeading___Toc715_353095010 Copie 1 Copie 1"/>Faiblesses<text:bookmark-end text:name="__RefHeading___Toc715_353095010 Copie 1 Copie 1"/></text:h>
      <text:p text:style-name="P7"/>
      <text:p text:style-name="P13">L<text:span text:style-name="T11">a puissance d’un Métapotent</text:span><text:span text:style-name="T12"> dépen</text:span><text:span text:style-name="T11">d</text:span><text:span text:style-name="T12"> d</text:span><text:span text:style-name="T11">irectement</text:span><text:span text:style-name="T12"> de celle de </text:span><text:span text:style-name="T11">son</text:span><text:span text:style-name="T12"> entourage ; </text:span><text:span text:style-name="T11">l</text:span>eur domaine se résumant quasi-exclusivement à la manipulation de pouvoirs, la plupart des Métapotents nécessitent d’être soutenus par une équipe de para-humains pour tirer profit de leurs pouvoirs ; <text:span text:style-name="T13">combiné à leur forte désirabilité, peu d’entre eux se déplacent seul, craignant d’être pris en embuscade à tout moment. </text:span></text:p>
      <text:p text:style-name="P14">La vaste majorité des pouvoirs de Métapotents n’affectent cependant pas les Automates et humains normaux, et il est donc facile pour ces derniers de mettre hors d’état de nuire un Métapotent isolé.</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1H7M56S</meta:editing-duration>
    <meta:editing-cycles>50</meta:editing-cycles>
    <meta:generator>LibreOffice/25.2.4.3$Windows_X86_64 LibreOffice_project/33e196637044ead23f5c3226cde09b47731f7e27</meta:generator>
    <meta:creation-date>2026-01-07T23:25:34.548686300</meta:creation-date>
    <dc:title>Format de texte</dc:title>
    <dc:date>2026-01-08T09:31:43.939134800</dc:date>
    <meta:document-statistic meta:table-count="0" meta:image-count="0" meta:object-count="0" meta:page-count="2" meta:paragraph-count="15" meta:word-count="317" meta:character-count="2094" meta:non-whitespace-character-count="1789"/>
    <meta:template xlink:type="simple" xlink:actuate="onRequest" xlink:title="Format de texte" xlink:href="file:///C:/Users/Clément/AppData/Roaming/LibreOffice/4/user/template/Format%20de%20texte1.ott" meta:date="2026-01-07T23:25:34.465087300"/>
  </office:meta>
</office:document-meta>
</file>