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ce9f7" officeooo:paragraph-rsid="0017c9de"/>
    </style:style>
    <style:style style:name="P2" style:family="paragraph" style:parent-style-name="Standard">
      <style:text-properties officeooo:rsid="00106f63" officeooo:paragraph-rsid="001810a1"/>
    </style:style>
    <style:style style:name="P3" style:family="paragraph" style:parent-style-name="Subtitle">
      <style:text-properties officeooo:rsid="001810a1" officeooo:paragraph-rsid="001810a1"/>
    </style:style>
    <style:style style:name="P4" style:family="paragraph" style:parent-style-name="Standard">
      <style:text-properties officeooo:rsid="00106f63" officeooo:paragraph-rsid="00106f63"/>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Standard">
      <style:text-properties officeooo:paragraph-rsid="001810a1"/>
    </style:style>
    <style:style style:name="P7" style:family="paragraph" style:parent-style-name="Standard">
      <style:text-properties officeooo:rsid="00251bca" officeooo:paragraph-rsid="001810a1"/>
    </style:style>
    <style:style style:name="P8" style:family="paragraph" style:parent-style-name="Standard">
      <style:text-properties officeooo:rsid="002ff12a" officeooo:paragraph-rsid="001810a1"/>
    </style:style>
    <style:style style:name="P9" style:family="paragraph" style:parent-style-name="Standard">
      <style:text-properties officeooo:rsid="00265a11" officeooo:paragraph-rsid="001810a1"/>
    </style:style>
    <style:style style:name="P10" style:family="paragraph" style:parent-style-name="Standard">
      <style:text-properties officeooo:rsid="0028cf81" officeooo:paragraph-rsid="001810a1"/>
    </style:style>
    <style:style style:name="P11" style:family="paragraph" style:parent-style-name="Standard">
      <style:text-properties officeooo:rsid="002478da" officeooo:paragraph-rsid="001810a1"/>
    </style:style>
    <style:style style:name="P12" style:family="paragraph" style:parent-style-name="Standard" style:list-style-name="L1">
      <style:text-properties officeooo:rsid="0028cf81" officeooo:paragraph-rsid="001810a1"/>
    </style:style>
    <style:style style:name="P13" style:family="paragraph" style:parent-style-name="Standard" style:list-style-name="L1">
      <style:text-properties officeooo:rsid="002b2e6d" officeooo:paragraph-rsid="001810a1"/>
    </style:style>
    <style:style style:name="T1" style:family="text">
      <style:text-properties officeooo:rsid="0017c9de"/>
    </style:style>
    <style:style style:name="T2" style:family="text">
      <style:text-properties officeooo:rsid="001810a1"/>
    </style:style>
    <style:style style:name="T3" style:family="text">
      <style:text-properties officeooo:rsid="00251bca"/>
    </style:style>
    <style:style style:name="T4" style:family="text">
      <style:text-properties officeooo:rsid="00197d15"/>
    </style:style>
    <style:style style:name="T5" style:family="text">
      <style:text-properties officeooo:rsid="0026cee2"/>
    </style:style>
    <style:style style:name="T6" style:family="text">
      <style:text-properties officeooo:rsid="003005c4"/>
    </style:style>
    <style:style style:name="T7" style:family="text">
      <style:text-properties officeooo:rsid="0029780a"/>
    </style:style>
    <style:style style:name="T8" style:family="text">
      <style:text-properties officeooo:rsid="0028cf81"/>
    </style:style>
    <style:style style:name="T9" style:family="text">
      <style:text-properties officeooo:rsid="002b7a0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RES – Why Heroism Often Requires E<text:span text:style-name="T1">rotic Services</text:span></text:p>
      <text:p text:style-name="P2"/>
      <text:p text:style-name="P3">Les thèmes et messages</text:p>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5"><text:a xlink:type="simple" xlink:href="#__RefHeading___Toc717_353095010%20Copie%203" text:style-name="Index_20_Link" text:visited-style-name="Index_20_Link">Les messages<text:tab/>1</text:a></text:p>
          <text:p text:style-name="P5"><text:a xlink:type="simple" xlink:href="#__RefHeading___Toc717_353095010%20Copie%203%20Copie%201" text:style-name="Index_20_Link" text:visited-style-name="Index_20_Link">Les thèmes<text:tab/>2</text:a></text:p>
        </text:index-body>
      </text:table-of-content>
      <text:p text:style-name="P4"/>
      <text:p text:style-name="P4"/>
      <text:h text:style-name="Heading_20_1" text:outline-level="1"><text:bookmark-start text:name="__RefHeading___Toc717_353095010 Copie 3"/>Le<text:span text:style-name="T2">s</text:span> <text:span text:style-name="T3">message</text:span><text:span text:style-name="T2">s</text:span><text:bookmark-end text:name="__RefHeading___Toc717_353095010 Copie 3"/></text:h>
      <text:p text:style-name="P6"/>
      <text:p text:style-name="P7">L’histoire se déroule à travers le PdV de plusieurs personnages, chacun avec leur vision du monde, leurs préjugés et leurs propres rapports vis-à-vis des para-humains ; certains les <text:span text:style-name="T4">trouvent fascinants</text:span>, d’autres les haïssent. L’histoire se déroulera notamment autour de ces deux visions, et leur apportera plus de nuance. </text:p>
      <text:p text:style-name="P7"/>
      <text:p text:style-name="P7">Le message à transmettre tourne autour de la compréhension entre ind<text:span text:style-name="T5">i</text:span>vidus : Un para-humain est au fond un humain normal, qui s’est vu recevoir une mauvaise main et ne fait que vivre avec ce que la vie lui donne. Ce n’est pas les pouvoirs qui déterminent si une personne est bonne ou mauvaise; c’est le pouvoir sur les autres en général qui révèle le vrai visage de son possesseur.</text:p>
      <text:p text:style-name="P7"/>
      <text:p text:style-name="P8">L’origine des pouvoirs n’a pas d’importance, ne sont là que pour faciliter l’histoire. <text:span text:style-name="T6">Il</text:span> n’y a pas de menace planétaire ou de dénouement de fin du monde, <text:span text:style-name="T6">même si certains méchants seront à combattre et serviront de point culminant au développement des personnages</text:span>.</text:p>
      <text:p text:style-name="P7"/>
      <text:p text:style-name="P9">L’histoire va aussi traiter du sexe et de son impact sur cette société para-humaine, notamment sur la façon dont les travailleurs du sexe sont traités par ceux qui ont du pouvoir sur eux, faisant le parallèle avec la façon dont les para-humains sont traités par la société en général.</text:p>
      <text:p text:style-name="P9"/>
      <text:p text:style-name="P10">Plus mineur, <text:span text:style-name="T7">l’histoire parlera aussi du</text:span> thème de la sapience, avec des androïdes qui gagnent une conscience et ressentent des émotions, dans une société plus futuriste où les machines ont rapidement pris le pas sur la nature, <text:span text:style-name="T7">au point d’en affecter le rapport de l’Homme à la machine.</text:span></text:p>
      <text:p text:style-name="P11"/>
      <text:p text:style-name="P2"/>
      <text:h text:style-name="Heading_20_1" text:outline-level="1"><text:bookmark-start text:name="__RefHeading___Toc717_353095010 Copie 3 Copie 1"/><text:soft-page-break/>Le<text:span text:style-name="T8">s thèmes</text:span><text:bookmark-end text:name="__RefHeading___Toc717_353095010 Copie 3 Copie 1"/></text:h>
      <text:p text:style-name="P6"/>
      <text:list text:style-name="L1">
        <text:list-item>
          <text:p text:style-name="P12">Le rapport de la société face à ceux jugés différents, que ce soit leur âge, sexe ou pouvoirs ;</text:p>
        </text:list-item>
        <text:list-item>
          <text:p text:style-name="P12">Les pouvoirs et leur impact sur l’évolution de la société, et la façon dont les para-humains sont traités par les gens normaux, ainsi que les abus de pouvoir commis par les para-humains ;</text:p>
        </text:list-item>
        <text:list-item>
          <text:p text:style-name="P13">Le rapport de l’Homme à la machine, à la surveillance constante de la population, et aux androïdes et intelligences artificielles partageant leur quotidien ;</text:p>
        </text:list-item>
        <text:list-item>
          <text:p text:style-name="P13">La sapience développée chez certaines intelligences artificielles, et le débat sur leurs droits en tant qu’individus ;</text:p>
        </text:list-item>
        <text:list-item>
          <text:p text:style-name="P13">Le sexe et le rapport des travailleurs du sexe à leur vie civile ou para-humaine, <text:span text:style-name="T9">notamment la pauvreté qui force bon nombre d’individus à choisir ce milieu.</text:span></text:p>
        </text:list-item>
      </text:list>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3M58S</meta:editing-duration>
    <meta:editing-cycles>4</meta:editing-cycles>
    <meta:generator>LibreOffice/25.2.4.3$Windows_X86_64 LibreOffice_project/33e196637044ead23f5c3226cde09b47731f7e27</meta:generator>
    <meta:creation-date>2026-01-07T22:15:24.498971700</meta:creation-date>
    <dc:title>Format de texte</dc:title>
    <dc:date>2026-01-07T22:19:24.230047100</dc:date>
    <meta:document-statistic meta:table-count="0" meta:image-count="0" meta:object-count="0" meta:page-count="2" meta:paragraph-count="17" meta:word-count="404" meta:character-count="2385" meta:non-whitespace-character-count="2001"/>
    <meta:template xlink:type="simple" xlink:actuate="onRequest" xlink:title="Format de texte" xlink:href="file:///C:/Users/Clément/AppData/Roaming/LibreOffice/4/user/template/Format%20de%20texte1.ott" meta:date="2026-01-07T22:15:24.392313400"/>
  </office:meta>
</office:document-meta>
</file>