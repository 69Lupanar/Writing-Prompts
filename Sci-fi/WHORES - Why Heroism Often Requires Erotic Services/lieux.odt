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5ce9f7" officeooo:paragraph-rsid="0018a1f1"/>
    </style:style>
    <style:style style:name="P2" style:family="paragraph" style:parent-style-name="Standard">
      <style:text-properties officeooo:rsid="00106f63" officeooo:paragraph-rsid="00106f63"/>
    </style:style>
    <style:style style:name="P3" style:family="paragraph" style:parent-style-name="Subtitle">
      <style:text-properties officeooo:rsid="0018a1f1" officeooo:paragraph-rsid="0018a1f1"/>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Standard">
      <style:text-properties officeooo:rsid="00106f63" officeooo:paragraph-rsid="0018a1f1"/>
    </style:style>
    <style:style style:name="P7" style:family="paragraph" style:parent-style-name="Standard">
      <style:text-properties officeooo:rsid="00106f63" officeooo:paragraph-rsid="001cb3cb"/>
    </style:style>
    <style:style style:name="P8" style:family="paragraph" style:parent-style-name="Heading_20_1">
      <style:text-properties officeooo:rsid="001cb3cb" officeooo:paragraph-rsid="001cb3cb"/>
    </style:style>
    <style:style style:name="P9" style:family="paragraph" style:parent-style-name="Standard">
      <style:text-properties officeooo:rsid="0018a1f1" officeooo:paragraph-rsid="001cb3cb"/>
    </style:style>
    <style:style style:name="P10" style:family="paragraph" style:parent-style-name="Standard">
      <style:text-properties officeooo:rsid="001dff78" officeooo:paragraph-rsid="001dff78"/>
    </style:style>
    <style:style style:name="P11" style:family="paragraph" style:parent-style-name="Standard">
      <style:text-properties officeooo:rsid="001cb3cb" officeooo:paragraph-rsid="0018a1f1"/>
    </style:style>
    <style:style style:name="P12" style:family="paragraph" style:parent-style-name="Standard">
      <style:text-properties officeooo:rsid="0020ca03" officeooo:paragraph-rsid="0020ca03"/>
    </style:style>
    <style:style style:name="P13" style:family="paragraph" style:parent-style-name="Standard">
      <style:text-properties officeooo:rsid="0018a1f1" officeooo:paragraph-rsid="0018a1f1"/>
    </style:style>
    <style:style style:name="P14" style:family="paragraph" style:parent-style-name="Standard">
      <style:text-properties officeooo:rsid="00215745" officeooo:paragraph-rsid="00215745"/>
    </style:style>
    <style:style style:name="P15" style:family="paragraph" style:parent-style-name="Standard">
      <style:text-properties officeooo:rsid="0021b6fe" officeooo:paragraph-rsid="0021b6fe"/>
    </style:style>
    <style:style style:name="P16" style:family="paragraph" style:parent-style-name="Standard">
      <style:text-properties officeooo:rsid="001d343f" officeooo:paragraph-rsid="0032f08c"/>
    </style:style>
    <style:style style:name="P17" style:family="paragraph" style:parent-style-name="Heading_20_2">
      <style:text-properties officeooo:paragraph-rsid="0032f08c"/>
    </style:style>
    <style:style style:name="P18" style:family="paragraph" style:parent-style-name="Standard">
      <style:text-properties officeooo:paragraph-rsid="0032f08c"/>
    </style:style>
    <style:style style:name="P19" style:family="paragraph" style:parent-style-name="Standard">
      <style:text-properties officeooo:rsid="002be81b" officeooo:paragraph-rsid="0032f08c"/>
    </style:style>
    <style:style style:name="P20" style:family="paragraph" style:parent-style-name="Standard">
      <style:text-properties officeooo:rsid="00106f63" officeooo:paragraph-rsid="0032f08c"/>
    </style:style>
    <style:style style:name="P21" style:family="paragraph" style:parent-style-name="Standard">
      <style:text-properties officeooo:paragraph-rsid="001971dc"/>
    </style:style>
    <style:style style:name="P22" style:family="paragraph" style:parent-style-name="Standard">
      <style:text-properties officeooo:rsid="0025919b" officeooo:paragraph-rsid="0025919b"/>
    </style:style>
    <style:style style:name="P23" style:family="paragraph" style:parent-style-name="Standard">
      <style:text-properties officeooo:rsid="0026c7f9" officeooo:paragraph-rsid="0026c7f9"/>
    </style:style>
    <style:style style:name="P24" style:family="paragraph" style:parent-style-name="Heading_20_2">
      <style:text-properties officeooo:paragraph-rsid="001cb3cb"/>
    </style:style>
    <style:style style:name="P25" style:family="paragraph" style:parent-style-name="Standard">
      <style:text-properties officeooo:paragraph-rsid="001cb3cb"/>
    </style:style>
    <style:style style:name="P26" style:family="paragraph" style:parent-style-name="Standard">
      <style:text-properties officeooo:rsid="002a5f5f" officeooo:paragraph-rsid="002a68c5"/>
    </style:style>
    <style:style style:name="P27" style:family="paragraph" style:parent-style-name="Standard">
      <style:text-properties officeooo:rsid="002a5f5f" officeooo:paragraph-rsid="002a5f5f"/>
    </style:style>
    <style:style style:name="P28" style:family="paragraph" style:parent-style-name="Standard">
      <style:text-properties officeooo:rsid="0018a1f1" officeooo:paragraph-rsid="001d343f"/>
    </style:style>
    <style:style style:name="P29" style:family="paragraph" style:parent-style-name="Standard">
      <style:text-properties officeooo:rsid="001d343f" officeooo:paragraph-rsid="001d343f"/>
    </style:style>
    <style:style style:name="P30" style:family="paragraph" style:parent-style-name="Standard">
      <style:text-properties officeooo:rsid="001d343f" officeooo:paragraph-rsid="002be81b"/>
    </style:style>
    <style:style style:name="P31" style:family="paragraph" style:parent-style-name="Standard">
      <style:text-properties officeooo:rsid="001f39ce" officeooo:paragraph-rsid="0032f08c"/>
    </style:style>
    <style:style style:name="P32" style:family="paragraph" style:parent-style-name="Standard">
      <style:text-properties officeooo:rsid="001b8e16" officeooo:paragraph-rsid="0032f08c"/>
    </style:style>
    <style:style style:name="P33" style:family="paragraph" style:parent-style-name="Standard">
      <style:text-properties officeooo:rsid="00245ddf" officeooo:paragraph-rsid="0032f08c"/>
    </style:style>
    <style:style style:name="P34" style:family="paragraph" style:parent-style-name="Standard">
      <style:text-properties officeooo:rsid="0025919b" officeooo:paragraph-rsid="0032f08c"/>
    </style:style>
    <style:style style:name="P35" style:family="paragraph" style:parent-style-name="Standard">
      <style:text-properties officeooo:rsid="00326458" officeooo:paragraph-rsid="0032f08c"/>
    </style:style>
    <style:style style:name="P36" style:family="paragraph" style:parent-style-name="Standard">
      <style:text-properties officeooo:paragraph-rsid="001d343f"/>
    </style:style>
    <style:style style:name="P37" style:family="paragraph" style:parent-style-name="Standard">
      <style:text-properties officeooo:rsid="002c429d" officeooo:paragraph-rsid="002c429d"/>
    </style:style>
    <style:style style:name="P38" style:family="paragraph" style:parent-style-name="Standard">
      <style:text-properties officeooo:rsid="001d343f" officeooo:paragraph-rsid="00313d13"/>
    </style:style>
    <style:style style:name="P39" style:family="paragraph" style:parent-style-name="Heading_20_2">
      <style:text-properties officeooo:paragraph-rsid="00313d13"/>
    </style:style>
    <style:style style:name="P40" style:family="paragraph" style:parent-style-name="Standard">
      <style:text-properties officeooo:paragraph-rsid="00313d13"/>
    </style:style>
    <style:style style:name="P41" style:family="paragraph" style:parent-style-name="Standard">
      <style:text-properties officeooo:rsid="00300470" officeooo:paragraph-rsid="00313d13"/>
    </style:style>
    <style:style style:name="P42" style:family="paragraph" style:parent-style-name="Standard">
      <style:text-properties officeooo:rsid="00313d13" officeooo:paragraph-rsid="00313d13"/>
    </style:style>
    <style:style style:name="T1" style:family="text">
      <style:text-properties officeooo:rsid="002086b2"/>
    </style:style>
    <style:style style:name="T2" style:family="text">
      <style:text-properties officeooo:rsid="001ebd10"/>
    </style:style>
    <style:style style:name="T3" style:family="text">
      <style:text-properties officeooo:rsid="00306e9c"/>
    </style:style>
    <style:style style:name="T4" style:family="text">
      <style:text-properties officeooo:rsid="0020dba0"/>
    </style:style>
    <style:style style:name="T5" style:family="text">
      <style:text-properties officeooo:rsid="00215745"/>
    </style:style>
    <style:style style:name="T6" style:family="text">
      <style:text-properties officeooo:rsid="0026c7f9"/>
    </style:style>
    <style:style style:name="T7" style:family="text">
      <style:text-properties officeooo:rsid="0021b6fe"/>
    </style:style>
    <style:style style:name="T8" style:family="text">
      <style:text-properties officeooo:rsid="001d343f"/>
    </style:style>
    <style:style style:name="T9" style:family="text">
      <style:text-properties officeooo:rsid="002be81b"/>
    </style:style>
    <style:style style:name="T10" style:family="text">
      <style:text-properties officeooo:rsid="0032f08c"/>
    </style:style>
    <style:style style:name="T11" style:family="text">
      <style:text-properties officeooo:rsid="0033aa58"/>
    </style:style>
    <style:style style:name="T12" style:family="text">
      <style:text-properties officeooo:rsid="00285173"/>
    </style:style>
    <style:style style:name="T13" style:family="text">
      <style:text-properties officeooo:rsid="0019d32a"/>
    </style:style>
    <style:style style:name="T14" style:family="text">
      <style:text-properties officeooo:rsid="002a68c5"/>
    </style:style>
    <style:style style:name="T15" style:family="text">
      <style:text-properties officeooo:rsid="002ae339"/>
    </style:style>
    <style:style style:name="T16" style:family="text">
      <style:text-properties officeooo:rsid="001f39ce"/>
    </style:style>
    <style:style style:name="T17" style:family="text">
      <style:text-properties officeooo:rsid="0025919b"/>
    </style:style>
    <style:style style:name="T18" style:family="text">
      <style:text-properties officeooo:rsid="001b8e16"/>
    </style:style>
    <style:style style:name="T19" style:family="text">
      <style:text-properties officeooo:rsid="002c91ac"/>
    </style:style>
    <style:style style:name="T20" style:family="text">
      <style:text-properties officeooo:rsid="002cef31"/>
    </style:style>
    <style:style style:name="T21" style:family="text">
      <style:text-properties officeooo:rsid="002e9949"/>
    </style:style>
    <style:style style:name="T22" style:family="text">
      <style:text-properties officeooo:rsid="002f6ac7"/>
    </style:style>
    <style:style style:name="T23" style:family="text">
      <style:text-properties officeooo:rsid="00313d13"/>
    </style:style>
    <style:style style:name="T24" style:family="text">
      <style:text-properties officeooo:rsid="00322c8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ORES – Why Heroism Often Requires E<text:span text:style-name="T1">rotic Services</text:span></text:p>
      <text:p text:style-name="P2"/>
      <text:p text:style-name="P3">Lieux</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715_353095010%20Copie%202" text:style-name="Index_20_Link" text:visited-style-name="Index_20_Link">Lieux principaux<text:tab/>1</text:a></text:p>
          <text:p text:style-name="P5"><text:a xlink:type="simple" xlink:href="#__RefHeading___Toc715_353095010" text:style-name="Index_20_Link" text:visited-style-name="Index_20_Link">La maison d’Amélia<text:tab/>1</text:a></text:p>
          <text:p text:style-name="P5"><text:a xlink:type="simple" xlink:href="#__RefHeading___Toc715_353095010%20Copie%201" text:style-name="Index_20_Link" text:visited-style-name="Index_20_Link">La ville de San Francisco<text:tab/>1</text:a></text:p>
          <text:p text:style-name="P5"><text:a xlink:type="simple" xlink:href="#__RefHeading___Toc715_353095010%20Copie%201%20Copie%201" text:style-name="Index_20_Link" text:visited-style-name="Index_20_Link">Le club de strip-tease « Roaring Rides »<text:tab/>1</text:a></text:p>
          <text:p text:style-name="P5"><text:a xlink:type="simple" xlink:href="#__RefHeading___Toc715_353095010%20Copie%201%20Copie%201%20Copie%201" text:style-name="Index_20_Link" text:visited-style-name="Index_20_Link">La caserne locale de la NPRB<text:tab/>1</text:a></text:p>
          <text:p text:style-name="P5"><text:a xlink:type="simple" xlink:href="#__RefHeading___Toc715_353095010%20Copie%201%20Copie%201%20Copie%203" text:style-name="Index_20_Link" text:visited-style-name="Index_20_Link">Le siège de NextHuman Industries<text:tab/>2</text:a></text:p>
          <text:p text:style-name="P5"><text:a xlink:type="simple" xlink:href="#__RefHeading___Toc715_353095010%20Copie%201%20Copie%201%20Copie%202" text:style-name="Index_20_Link" text:visited-style-name="Index_20_Link">L’appartement de Léo<text:tab/>2</text:a></text:p>
        </text:index-body>
      </text:table-of-content>
      <text:p text:style-name="P6"/>
      <text:p text:style-name="P7"/>
      <text:h text:style-name="P8" text:outline-level="1"><text:bookmark-start text:name="__RefHeading___Toc715_353095010 Copie 2"/>Lieux principaux<text:bookmark-end text:name="__RefHeading___Toc715_353095010 Copie 2"/></text:h>
      <text:p text:style-name="P9"/>
      <text:p text:style-name="P10">Lieux visités régulièrement par les protagonistes ou abritant des moments clés d l’intrigue.</text:p>
      <text:p text:style-name="P9"/>
      <text:h text:style-name="Heading_20_2" text:outline-level="2"><text:bookmark-start text:name="__RefHeading___Toc715_353095010"/>La maison <text:span text:style-name="T2">et le garage de la famille</text:span> d’Amélia<text:bookmark-end text:name="__RefHeading___Toc715_353095010"/></text:h>
      <text:p text:style-name="P11"/>
      <text:p text:style-name="P12">Le lieu principal du développement de la relation entre Amélia et son père Adrian. La maison est adjac<text:span text:style-name="T3">e</text:span>nte au garage familial et ne possède pas de jardin. Amélia a passé bon nombres d’années de son enfance à bidouiller avec les pièces de machines usagées que son père défaussait entre les réparations. Leur domaine d’expertise s’étend aux voitures comme aux androïdes et à l’électroménager ; Amélia apporte de temps à autre de l’aide à son père, et plus régulièrement depuis que ses pouvoirs ont fait surface.</text:p>
      <text:p text:style-name="P12"/>
      <text:p text:style-name="P12">Le garage <text:span text:style-name="T4">se situe au Nord-Est de Raunchyport, loin de la mer et de la plupart des sites touristiques de la ville, ce qui leur apporte peu de clients. Le peu de clientèles qu’ils reçoivent a été également siphonnée par NextHuman Industries, qui s’est récemment implanté dans la ville et s’est imposé comme le réparateur n°1 de leurs produits, ce qui a rapidement forcé bon nombre d’autres garages à mettre la clé sous la porte, et menace le père d’Amélia de faire de même.</text:span></text:p>
      <text:p text:style-name="P12"/>
      <text:p text:style-name="P6"/>
      <text:h text:style-name="Heading_20_2" text:outline-level="2"><text:bookmark-start text:name="__RefHeading___Toc715_353095010 Copie 1"/><text:soft-page-break/>La ville de <text:span text:style-name="T4">Raunc</text:span><text:span text:style-name="T5">h</text:span><text:span text:style-name="T4">yport</text:span><text:bookmark-end text:name="__RefHeading___Toc715_353095010 Copie 1"/></text:h>
      <text:p text:style-name="P13"/>
      <text:p text:style-name="P14">Ville fictive inspiré de San Francisco, cette ville est relativement développée mais a subi un drain de cerveaux depuis l’implantation de NextHuman Industries à la Silicon Valley. Elle est aussi victime de plusieurs gangs sévissant dans ses quartiers mal-famés, principalement au sud de la ville. <text:span text:style-name="T6">Elle tient son nom de l’époque où les premiers marins s’arrêtaient à ce port pour profiter de services sexuels des femmes locales ; une tradition qui perdure encore aujourd’hui, faisant de la ville une cible facile de blagues de mauvais goût.</text:span></text:p>
      <text:p text:style-name="P14"/>
      <text:p text:style-name="P14">La ville possède cependant plusieurs atouts : Elle est bordée par l’océan Pacifique à l’Ouest, faisant d’elle un point de transit commercial important, et possède plusieurs stations balnéaires, <text:span text:style-name="T7">parcs naturels et autres sites historiques et touristiques.</text:span></text:p>
      <text:p text:style-name="P14"/>
      <text:p text:style-name="P15">La ville s’est cependant plus développée que ses voisines, principalement dû à la présence inhabituellement élevée de para-humains à cet endroit, ce qui a valu une forte présence de brigades de la NPRB, mais aussi l’intérêt de NextHuman Industries, qui a établi un siège là-bas dans l’espoir de débusquer de potentiels talents para-humains.</text:p>
      <text:p text:style-name="P15"/>
      <text:p text:style-name="P15">En conséquence de cela, la ville connaît une recrudescence d’androïdes et véhicules de la corporation, entrant en compétition avec beaucoup de petites entreprises locales qui ont dû fermer leur porte, contribuant à la hausse de la pauvreté et criminalité de la ville.</text:p>
      <text:p text:style-name="P16"/>
      <text:h text:style-name="P17" text:outline-level="2"><text:bookmark-start text:name="__RefHeading___Toc715_353095010 Copie 1 Copie 1 Copie 2 Copie 2 Copie 1"/>L<text:span text:style-name="T8">e </text:span><text:span text:style-name="T9">studio porno</text:span><text:bookmark-end text:name="__RefHeading___Toc715_353095010 Copie 1 Copie 1 Copie 2 Copie 2 Copie 1"/></text:h>
      <text:p text:style-name="P18"/>
      <text:p text:style-name="P19">Le studio porno où travaille Amélia est situé au sud-ouest de la ville, dans une région contrôlée en partie par Alpha et ses chiens. C’est en endroit régulièrement visité par Amélia et Axelle en journée, avant de rentrer à leurs appartements se reposer. <text:span text:style-name="T10">Ce studio fait aussi office de studio photo, où Amélia posera comme modèle à ses débuts, d’abord en lingerie puis nue, avant de passer </text:span><text:span text:style-name="T11">au club de strip-tease, pour finir</text:span><text:span text:style-name="T10"> au studio porno.</text:span></text:p>
      <text:p text:style-name="P16"/>
      <text:h text:style-name="P17" text:outline-level="2"><text:bookmark-start text:name="__RefHeading___Toc715_353095010 Copie 1 Copie 1 Copie 2 Copie 2 Copie 1 Copie 1"/>L<text:span text:style-name="T9">’appartement d’Amélia</text:span><text:bookmark-end text:name="__RefHeading___Toc715_353095010 Copie 1 Copie 1 Copie 2 Copie 2 Copie 1 Copie 1"/></text:h>
      <text:p text:style-name="P18"/>
      <text:p text:style-name="P19">Ces <text:span text:style-name="T10">appartements</text:span> sont plus proches de la mer que le studio, et consistent en des chambres d’hôtel achetées par le studio pour permettre à leurs travailleuses de tourner des directs en webcam.</text:p>
      <text:p text:style-name="P19"/>
      <text:p text:style-name="P19">Amélia utilisera un de ces appartements le temps de sa grossesse, et y rencontrera Axelle, une autre star du porno travaillant pour le même studio. Cet endroit constituera aussi un moment de détente pour les deux jeunes femmes, où elles apprendront à se connaître en dehors du monde paranormal et celui du sexe.</text:p>
      <text:p text:style-name="P20"/>
      <text:h text:style-name="Heading_20_2" text:outline-level="2"><text:bookmark-start text:name="__RefHeading___Toc715_353095010 Copie 1 Copie 1 Copie 1"/><text:soft-page-break/>La caserne locale de la NPRB<text:bookmark-end text:name="__RefHeading___Toc715_353095010 Copie 1 Copie 1 Copie 1"/></text:h>
      <text:p text:style-name="P21"/>
      <text:p text:style-name="P22">Située au centre de la ville pour une couverture de la ville la plus efficace possible, le commissariat de la NPRB comporte plusieurs brigades d’officiers humains, androïdes et para-humains, destinés à assurer l’arrestation de criminels para-humains et la protection des civils. Les cas d’attaques de para-humains sont généralement traités par les brigades standards composées d’humains, mais les androïdes peuvent être envoyés dans les cas de déminage ou défusage de bombe ; ces derniers restent cependant la plupart du temps en caserne, assignés à des tâches de gestion et d’organisation. </text:p>
      <text:p text:style-name="P22"/>
      <text:p text:style-name="P22">Dans le cas ou un gang entier de para-humains ferait irruption en ville, chaque caserne possède un contingent de para-humains, destinés non seulement à les arrêter, mais aussi à diffuser une image positive des para-humains dans la société ; autrement, le gouvernement aurait du mal à justifier <text:span text:style-name="T6">l’investissement financier dans de la paratechnologie.</text:span></text:p>
      <text:p text:style-name="P22"/>
      <text:p text:style-name="P23">Les casernes les plus peuplées, comme celle de Raunchyport, <text:span text:style-name="T12">possèdent des programmes de réhabilitation pour para-humains violents, permettant leur réinsertion dans la société, ainsi que le programme « Sentinelles », destiné aux jeunes para-humains cherchant à travailler pour la NPRB, similaire au service militaire national. Ces Sentinelles voient rarement le feu de l’action, souvent relégués à l’arrestation de criminels sans pouvoirs ou de para-humains isolés.</text:span></text:p>
      <text:p text:style-name="P23"/>
      <text:p text:style-name="P7"/>
      <text:h text:style-name="P24" text:outline-level="2"><text:bookmark-start text:name="__RefHeading___Toc715_353095010 Copie 1 Copie 1 Copie 3"/>Le <text:span text:style-name="T13">siège de NextHuman Industries</text:span><text:bookmark-end text:name="__RefHeading___Toc715_353095010 Copie 1 Copie 1 Copie 3"/></text:h>
      <text:p text:style-name="P25"/>
      <text:p text:style-name="P26">Le siège social de NextHuman Industries et situé à la Silicon Valley, mais une branche a été implanté à Raunchyport, que AM visite occasionnellement pour la signature de contrats ou le recrutement de para-humains. <text:span text:style-name="T14">C’est un endroit à l’aspect volontairement futuriste, </text:span><text:span text:style-name="T15">où le nombre d’androïdes dépasse largement celui d’humains</text:span><text:span text:style-name="T14">, reflétant l’ambition de son fondateur, celui-ci poussant l’excellence jusqu’au style vestimentaire de ses employés, ceux-ci devant porter des costards blancs pour accueillir les visiteurs.</text:span></text:p>
      <text:p text:style-name="P26"/>
      <text:p text:style-name="P26">NextHuman Industries a signé un partenariat avec la NPRB, leur offrant de nombreux androïdes et autres paratechnologie en échange d’un traitement préférentiel par le gouvernement pour l’équipement de son armée ; tout ça dans le but d’obtenir un contrôle implicite sur les affaires du pays.</text:p>
      <text:p text:style-name="P27"/>
      <text:p text:style-name="P27">Cet endroit est visité rarement au cours de l’histoire, et est le plus souvent vu au travers d’interludes du PdV d’un autre personnage.</text:p>
      <text:p text:style-name="P7"/>
      <text:h text:style-name="P8" text:outline-level="1"><text:bookmark-start text:name="__RefHeading___Toc715_353095010 Copie 2 Copie 1"/><text:soft-page-break/>Lieux secondaires<text:bookmark-end text:name="__RefHeading___Toc715_353095010 Copie 2 Copie 1"/></text:h>
      <text:p text:style-name="P9"/>
      <text:p text:style-name="P28"/>
      <text:p text:style-name="P29">Lieux peu visités, servant principalement d’interludes pour avoir une introspection d’un personnage à un moment précis de l’intrigue pour observer son évolution.</text:p>
      <text:p text:style-name="P30"/>
      <text:p text:style-name="P16"/>
      <text:h text:style-name="P17" text:outline-level="2"><text:bookmark-start text:name="__RefHeading___Toc715_353095010 Copie 1 Copie 1"/>Le club de strip-tease « Roaring Rides »<text:bookmark-end text:name="__RefHeading___Toc715_353095010 Copie 1 Copie 1"/></text:h>
      <text:p text:style-name="P18"/>
      <text:p text:style-name="P31">Un club de strip-tease servant également de maison close, sur le thème des voitures et motos (en référence à son nom et au fait que les clients « montent » les strip-teaseuses.)</text:p>
      <text:p text:style-name="P32"/>
      <text:p text:style-name="P33">Ce club a le malheur de se situer dans le sud de la ville, où<text:span text:style-name="T16"> </text:span><text:span text:style-name="T17">il est</text:span><text:span text:style-name="T18"> concurrence avec les robots-putes de divers groupes de proxénétisme d’androïdes, </text:span><text:span text:style-name="T17">et</text:span> divers groupes de criminels para-humains luttent pour le contrôle du territoire, et imposent de lourdes taxes aux commerces sous leur « protection ». Il est au début de l’histoire sous le contrôle des Marchands de Sommeil (appelés aussi « Sleep Merchants » ou « Mercs » car ils travaillent aussi dans l’assassinat pour de l’argent), un groupe de brutes et de mercenaires violents en partenariat avec Alpha pour lutter contre des gangs rivaux.</text:p>
      <text:p text:style-name="P33"/>
      <text:p text:style-name="P34">En conséquence, le club Roaring Rides, comme beaucoup de petits commerces voisins, ne voient pas d’un bon œil l’existence de para-humains et androïdes, les accusant de faire fuir ou voler leur clientèle et de rendre en générale la vie plus difficile à leurs travailleurs.</text:p>
      <text:p text:style-name="P34"/>
      <text:p text:style-name="P35">Amélia visitera cet endroit à plusieurs occasions pour rendre visite à Cindy et développer ses talents de strip-teaseuse <text:span text:style-name="T10">avant de se décider à se lancer dans le porj</text:span></text:p>
      <text:p text:style-name="P20"/>
      <text:h text:style-name="P17" text:outline-level="2"><text:bookmark-start text:name="__RefHeading___Toc715_353095010 Copie 1 Copie 1 Copie 2"/><text:span text:style-name="T19">La maison</text:span> de Léo<text:bookmark-end text:name="__RefHeading___Toc715_353095010 Copie 1 Copie 1 Copie 2"/></text:h>
      <text:p text:style-name="P36"/>
      <text:p text:style-name="P37">Cet endroit est vu très peu dans l’histoire et utilisé lors d’interludes avec Léo lors de ses moments de réflexion sur sa situation et d’introspection. C’est un endroit vétuste et très sobrement décoré, mais Léo met un point d’honneur à garder l’endroit propre pour ne pas <text:span text:style-name="T19">avoir à dépendre d’androïdes de nettoyage</text:span>. L’endroit connaît exceptionnellement peu de technologie au-delà d’une télévision et d’un ordinateur, Léo détestant la présence d’androïdes et d’appareils plus modernes chez lui, allant jusqu’à désactiver ou maquer l<text:span text:style-name="T20">e</text:span>s gadgets « <text:span text:style-name="T21">maison intelligente » </text:span>pré-installés <text:span text:style-name="T22">chez lui</text:span>.</text:p>
      <text:p text:style-name="P38"/>
      <text:h text:style-name="P39" text:outline-level="2"><text:bookmark-start text:name="__RefHeading___Toc715_353095010 Copie 1 Copie 1 Copie 2 Copie 2"/>L<text:span text:style-name="T8">e bordel canin d’Alpha</text:span><text:bookmark-end text:name="__RefHeading___Toc715_353095010 Copie 1 Copie 1 Copie 2 Copie 2"/></text:h>
      <text:p text:style-name="P40"/>
      <text:p text:style-name="P41">Situé au sud-ouest de la ville, non-loin du studio porno et du club de strip-tease où travaille Amélia, le bordel d’Alpha est un réseau souterrain de proxénétisme zoophile et de <text:soft-page-break/>prostitution, financé par les personnalités influentes de la ville et divers gangs para-humains cherchant à dépenser leur argent dans ses spectacles obscènes. Cet endroit ne sera vu que brièvement dans un court épisode où Vulcan et Duster tenteront d’infiltrer ce réseau pour obtenir des informations sur son origine.</text:p>
      <text:p text:style-name="P41"/>
      <text:h text:style-name="P39" text:outline-level="2"><text:bookmark-start text:name="__RefHeading___Toc715_353095010 Copie 1 Copie 1 Copie 2 Copie 2 Copie 2"/>L<text:span text:style-name="T8">e </text:span><text:span text:style-name="T23">repaire des Vipères Noires</text:span><text:bookmark-end text:name="__RefHeading___Toc715_353095010 Copie 1 Copie 1 Copie 2 Copie 2 Copie 2"/></text:h>
      <text:p text:style-name="P40"/>
      <text:p text:style-name="P42">Le repaire du gang de jeunes para-humains est situé à l’ouest de la ville, dans les docks d’un port désaffecté, un endroit à l’abri des regards et suffisamment distant du centre-ville pour leur permettre de semer leurs poursuivants avant leur arrivée. C’est ici qu’Axelle passe le plus clair de son temps libre sous le persona de Cobra, à vandaliser les environs et se battre lors de guerres de gangs avec d’autres groupes para-humains mineurs de la ville. <text:span text:style-name="T24">Cet endroit est peu utilisé, mais sert principalement de point d’évolution d’Axelle, qui remet en question ses désirs et son orientation sexuel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6H42M17S</meta:editing-duration>
    <meta:editing-cycles>37</meta:editing-cycles>
    <meta:generator>LibreOffice/25.2.4.3$Windows_X86_64 LibreOffice_project/33e196637044ead23f5c3226cde09b47731f7e27</meta:generator>
    <meta:creation-date>2026-01-07T21:40:23.199639100</meta:creation-date>
    <dc:title>Format de texte</dc:title>
    <dc:date>2026-01-27T17:43:31.874020800</dc:date>
    <meta:document-statistic meta:table-count="0" meta:image-count="0" meta:object-count="0" meta:page-count="5" meta:paragraph-count="46" meta:word-count="1503" meta:character-count="9376" meta:non-whitespace-character-count="7917"/>
    <meta:template xlink:type="simple" xlink:actuate="onRequest" xlink:title="Format de texte" xlink:href="file:///C:/Users/Clément/AppData/Roaming/LibreOffice/4/user/template/Format%20de%20texte1.ott" meta:date="2026-01-07T21:40:22.904948000"/>
  </office:meta>
</office:document-meta>
</file>