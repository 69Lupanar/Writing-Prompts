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da1f9" officeooo:paragraph-rsid="001da1f9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da1f9" officeooo:paragraph-rsid="001da1f9"/>
    </style:style>
    <style:style style:name="P3" style:family="paragraph" style:parent-style-name="Standard">
      <style:paragraph-properties fo:line-height="115%"/>
      <style:text-properties officeooo:paragraph-rsid="001a089c"/>
    </style:style>
    <style:style style:name="P4" style:family="paragraph" style:parent-style-name="Standard" style:list-style-name="L1">
      <style:paragraph-properties fo:line-height="115%"/>
      <style:text-properties officeooo:rsid="001da1f9" officeooo:paragraph-rsid="001da1f9"/>
    </style:style>
    <style:style style:name="P5" style:family="paragraph" style:parent-style-name="Standard" style:list-style-name="L1">
      <style:paragraph-properties fo:line-height="115%"/>
      <style:text-properties officeooo:rsid="001f04d6" officeooo:paragraph-rsid="001f04d6"/>
    </style:style>
    <style:style style:name="P6" style:family="paragraph" style:parent-style-name="Standard" style:list-style-name="L1">
      <style:paragraph-properties fo:line-height="115%"/>
      <style:text-properties officeooo:rsid="00206419" officeooo:paragraph-rsid="00206419"/>
    </style:style>
    <style:style style:name="P7" style:family="paragraph" style:parent-style-name="Standard" style:list-style-name="L1">
      <style:paragraph-properties fo:line-height="115%"/>
      <style:text-properties officeooo:rsid="002561a1" officeooo:paragraph-rsid="002561a1"/>
    </style:style>
    <style:style style:name="P8" style:family="paragraph" style:parent-style-name="Standard" style:list-style-name="L1">
      <style:paragraph-properties fo:line-height="115%" style:writing-mode="lr-tb" style:writing-mode-automatic="false"/>
      <style:text-properties officeooo:rsid="0027e650" officeooo:paragraph-rsid="0027e650"/>
    </style:style>
    <style:style style:name="T1" style:family="text">
      <style:text-properties officeooo:rsid="001f04d6"/>
    </style:style>
    <style:style style:name="T2" style:family="text">
      <style:text-properties officeooo:rsid="002032b6"/>
    </style:style>
    <style:style style:name="T3" style:family="text">
      <style:text-properties officeooo:rsid="0023c35d"/>
    </style:style>
    <style:style style:name="T4" style:family="text">
      <style:text-properties officeooo:rsid="0025dcca"/>
    </style:style>
    <style:style style:name="T5" style:family="text">
      <style:text-properties officeooo:rsid="00297f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 :</text:p>
      <text:p text:style-name="P1"/>
      <text:p text:style-name="P2"><text:span text:style-name="Strong_20_Emphasis">Theme:</text:span> Gap<text:line-break/><text:span text:style-name="Strong_20_Emphasis">Optional Sub Theme:</text:span> Love Fools (This is entirely opitional)</text:p>
      <text:p text:style-name="P3"/>
      <text:list text:style-name="L1">
        <text:list-item>
          <text:p text:style-name="P4">Scénario dodgeball :</text:p>
          <text:list>
            <text:list-item>
              <text:p text:style-name="P4">Le protag, <text:span text:style-name="T1">A,</text:span> débute en dodgeball, mais n’est en rien un sportif. Son équipe se fait rapidement battre face à l’équipe d’un autre club lors d’une rencontre amicale. <text:span text:style-name="T1">Après avoir été assommé par une balle, il se réveille sur le banc en compagnie de B, la fille de l’équipe adverse qui l’a mis à terre.</text:span></text:p>
            </text:list-item>
            <text:list-item>
              <text:p text:style-name="P5">Le soir, après le match, les deux clubs partent en boîte de nuit pour célébrer leur camaraderie avant le début du tournoi régional auquel ils participent. <text:span text:style-name="T2">A est pris à part par B, qui le trouvait mignon. Les deux discutent un peu, et A apprend que B s’entraîne à de nombreux sports, notamment la boxe française ; son oncle possède un club de gym dédié. A est impressionné par son pedigree, mais se lamente de voir un écart de talent si grand entre les deux, qui lui voulait s’entraîner pour gagner confiance en lui. B lui dit alors de venir faire une session d’entraînement chez elle pour voir si la boxe pourrait lui plaire. A en doute, mais accepte. </text:span><text:span text:style-name="T3">En parallèle, un couple de club profitent de l’occasion pour baiser dans une salle inoccupée ; A et B les surprennent mais B s’éloigne gênée, tandis que A peut les espionner. </text:span></text:p>
            </text:list-item>
            <text:list-item>
              <text:p text:style-name="P6">Les deux personnages en apprennent un peu plus l’un sur l’autre entre eux matchs de boxe. A apprend que le club de boxe de l’oncle de B est en difficulté financière dû au manque de participation, et qu’elle participe aussi à un tournoi de boxe pour gagner assez d’argent pour payer leurs dettes. A est surpris de l’apprendre, et apprendre qu’elle pratique 2 sports dans le but de gagner le décourage un peu plus. <text:span text:style-name="T3">Avant de fermer les portes du club pour la journée, elle l’invite à s’entraîner un peu au dodgeball avec elle à l’arrière du club, et les deux passent un peu de temps ensemble.</text:span></text:p>
            </text:list-item>
            <text:list-item>
              <text:p text:style-name="P7">Le jour du tournoi, l’équipe de A <text:span text:style-name="T4">gagne</text:span> le quart de finale, avant que A ne reçoive un billet de la part de B pour la voir se battre lors d’une compétition de boxe. Il est surpris de voir que le combat se déroule à peine le lendemain <text:s/>du match de dodgeball de B. A déprime un peu suite à sa victoire, mais finit par se ressaisir quand il réalise qu’il est devenu bien meilleur qu’avant, et qu’il prenait le sport trop au sérieux pour pouvoir s’amuser comme avant.</text:p>
            </text:list-item>
            <text:list-item>
              <text:p text:style-name="P7">Il arrive au combat de B en retard, mais parvient à lui donner l’encouragement de gagner. Après une courte discussion et un bisou sur la joue de B, A lui souhaite bonne chance pour la finale.</text:p>
            </text:list-item>
            <text:list-item>
              <text:p text:style-name="P8">Le jour suivant, l’équipe de A perd la demi-finale, mais A ne se morfond pas comme avant, encourageant B lors de la finale. <text:span text:style-name="T5">L’équipe de B remporte le </text:span><text:soft-page-break/><text:span text:style-name="T5">tournoi, et les deux clubs partent célébrer leurs efforts. A et B profitent de l’occasion pour trouver une salle à part. Bien que le couple voisin ait à nouveau profité de l’occasion pour baiser, A et B décident de faire de même. A la fin de l’histoire, alors que le club de B reçoit plus de membres suite à leurs deux victoires consécutives de championnat, A décide de s’inscrire à la boxe pour être plus proche d’ell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3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30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30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3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44M6S</meta:editing-duration>
    <meta:editing-cycles>13</meta:editing-cycles>
    <meta:generator>LibreOffice/26.2.3.2$Windows_X86_64 LibreOffice_project/70e089b17412e4cb7773e41413306b17a2328c34</meta:generator>
    <meta:creation-date>2026-06-06T15:23:06.732691800</meta:creation-date>
    <dc:title>Format de texte</dc:title>
    <dc:date>2026-06-06T16:47:13.939671600</dc:date>
    <meta:document-statistic meta:table-count="0" meta:image-count="0" meta:object-count="0" meta:page-count="2" meta:paragraph-count="9" meta:word-count="565" meta:character-count="3042" meta:non-whitespace-character-count="2491"/>
    <meta:template xlink:type="simple" xlink:actuate="onRequest" xlink:title="Format de texte" xlink:href="file:///C:/Users/Clément/AppData/Roaming/LibreOffice/4/user/template/Format%20de%20texte.ott" meta:date="2026-06-06T15:23:06.341307100"/>
  </office:meta>
</office:document-meta>
</file>