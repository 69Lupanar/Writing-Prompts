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Garamond Premr Pro" svg:font-family="'Garamond Premr Pr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86df99" officeooo:paragraph-rsid="0086df99"/>
    </style:style>
    <style:style style:name="P2" style:family="paragraph" style:parent-style-name="Standard">
      <style:text-properties fo:language="en" fo:country="US" officeooo:rsid="00106f63" officeooo:paragraph-rsid="00106f63"/>
    </style:style>
    <style:style style:name="P3" style:family="paragraph" style:parent-style-name="Subtitle">
      <style:text-properties fo:language="en" fo:country="US" officeooo:rsid="0086eaf6" officeooo:paragraph-rsid="0086eaf6"/>
    </style:style>
    <style:style style:name="P4" style:family="paragraph" style:parent-style-name="Standard">
      <style:text-properties fo:language="en" fo:country="US" officeooo:rsid="00106f63" officeooo:paragraph-rsid="00840176"/>
    </style:style>
    <style:style style:name="P5" style:family="paragraph" style:parent-style-name="Standard">
      <style:text-properties style:font-name="Garamond Premr Pro" fo:language="en" fo:country="US" officeooo:rsid="00732722" officeooo:paragraph-rsid="008401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6eaf6" style:font-style-asian="italic" style:font-style-complex="italic"/>
    </style:style>
    <style:style style:name="T3" style:family="text">
      <style:text-properties fo:font-style="italic" officeooo:rsid="00873b3c" style:font-style-asian="italic" style:font-style-complex="italic"/>
    </style:style>
    <style:style style:name="T4" style:family="text">
      <style:text-properties fo:font-style="italic" officeooo:rsid="0087c3d7" style:font-style-asian="italic" style:font-style-complex="italic"/>
    </style:style>
    <style:style style:name="T5" style:family="text">
      <style:text-properties fo:font-style="italic" officeooo:rsid="008b2a66" style:font-style-asian="italic" style:font-style-complex="italic"/>
    </style:style>
    <style:style style:name="T6" style:family="text">
      <style:text-properties fo:font-style="italic" officeooo:rsid="008b583d" style:font-style-asian="italic" style:font-style-complex="italic"/>
    </style:style>
    <style:style style:name="T7" style:family="text">
      <style:text-properties fo:font-style="italic" officeooo:rsid="008c816e" style:font-style-asian="italic" style:font-style-complex="italic"/>
    </style:style>
    <style:style style:name="T8" style:family="text">
      <style:text-properties fo:font-style="italic" officeooo:rsid="007489e1" style:font-style-asian="italic" style:font-style-complex="italic"/>
    </style:style>
    <style:style style:name="T9" style:family="text">
      <style:text-properties officeooo:rsid="00748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you think love can bloom on a battlefield?</text:p>
      <text:p text:style-name="P2"/>
      <text:p text:style-name="P3">Romance game jam #1</text:p>
      <text:p text:style-name="P2"/>
      <text:p text:style-name="P4"/>
      <text:p text:style-name="P4"/>
      <text:p text:style-name="P5"><text:tab/><text:span text:style-name="T1">“</text:span><text:span text:style-name="T2">After losing consciousness during a dodgeball match, Axel, a mediocre player, wakes up next to Beatrice, the captain of the opposing dodgeball team and an accomplished sportswoman.</text:span><text:span text:style-name="T3"> Questioning his </text:span><text:span text:style-name="T4">own</text:span><text:span text:style-name="T3"> love for the sport, the young boy </text:span><text:span text:style-name="T5">m</text:span><text:span text:style-name="T6">ay</text:span><text:span text:style-name="T3"> well </text:span><text:span text:style-name="T4">have</text:span><text:span text:style-name="T3"> </text:span><text:span text:style-name="T7">just found the</text:span><text:span text:style-name="T3"> </text:span><text:span text:style-name="T7">motivation</text:span><text:span text:style-name="T4"> to push past his limits, in the form of his new athletic friend – and perhaps, he foolishly hopes, a few more opportunities to spend more time with her.</text:span><text:span text:style-name="T8">”</text:span></text:p>
      <text:p text:style-name="P4"/>
      <text:p text:style-name="P5"><text:tab/>Three weeks of incessant research have led Nightingale to an isolated shack in the middle of the woods. <text:span text:style-name="T9">This had to be it.</text:span> <text:span text:style-name="T9">F</text:span>ar away from the prying eyes of the city and the League of Heroes, <text:span text:style-name="T9">close enough to the sea to make a quick escape if needed. The perfect hideou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Garamond Premr Pro" svg:font-family="'Garamond Premr Pr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3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30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30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3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4M29S</meta:editing-duration>
    <meta:editing-cycles>6</meta:editing-cycles>
    <meta:generator>LibreOffice/26.2.3.2$Windows_X86_64 LibreOffice_project/70e089b17412e4cb7773e41413306b17a2328c34</meta:generator>
    <meta:creation-date>2026-06-06T16:50:12.344730600</meta:creation-date>
    <dc:title>Format de texte</dc:title>
    <dc:date>2026-06-06T17:29:44.536177400</dc:date>
    <meta:document-statistic meta:table-count="0" meta:image-count="0" meta:object-count="0" meta:page-count="1" meta:paragraph-count="4" meta:word-count="137" meta:character-count="764" meta:non-whitespace-character-count="628"/>
    <meta:template xlink:type="simple" xlink:actuate="onRequest" xlink:title="Format de texte" xlink:href="../../../../Format%20prompt%20histoire.ott" meta:date="2026-06-06T16:50:11.982652500"/>
  </office:meta>
</office:document-meta>
</file>