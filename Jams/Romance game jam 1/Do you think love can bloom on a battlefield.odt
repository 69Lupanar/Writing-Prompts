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text-properties style:font-name="Garamond Premr Pro" fo:language="en" fo:country="US" officeooo:rsid="00732722" officeooo:paragraph-rsid="00840176"/>
    </style:style>
    <style:style style:name="P6" style:family="paragraph" style:parent-style-name="Standard">
      <style:text-properties style:font-name="Garamond Premr Pro" fo:language="en" fo:country="US" officeooo:rsid="008e3366" officeooo:paragraph-rsid="00840176"/>
    </style:style>
    <style:style style:name="P7" style:family="paragraph" style:parent-style-name="Standard">
      <style:paragraph-properties style:writing-mode="lr-tb" style:writing-mode-automatic="false"/>
      <style:text-properties style:font-name="Garamond Premr Pro" fo:language="en" fo:country="US" officeooo:rsid="0090bdf9" officeooo:paragraph-rsid="0090bdf9"/>
    </style:style>
    <style:style style:name="P8" style:family="paragraph" style:parent-style-name="Standard">
      <style:paragraph-properties style:writing-mode="lr-tb" style:writing-mode-automatic="false"/>
      <style:text-properties style:font-name="Garamond Premr Pro" fo:language="en" fo:country="US" officeooo:rsid="00732722" officeooo:paragraph-rsid="00840176"/>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4"/>
      <text:p text:style-name="P6"><text:tab/>The scent of old, wet cloth clung onto his skin as Axel charged forward, the hard leathery ball in hand. Time was not in his favour; only thirty seconds left before the set was over. If only he could hit one of the support players, or better, catch one of the cannonballs whooshing past his head, then his team might have a chance to turn the match on its head.</text:p>
      <text:p text:style-name="P6"/>
      <text:p text:style-name="P7"><text:tab/>He needed to act fast. In front of him, one of his opponents – the cadet of their team, he remembered – fell on her knees to avoid an incoming attack. Instinctively, Axel raised his hand, his grip on the cloth ball slowly loosening. The nerves in his biceps screamed at the pain after for having endured this never-ending match.</text:p>
      <text:p text:style-name="P7"/>
      <text:p text:style-name="P8"/>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42M57S</meta:editing-duration>
    <meta:editing-cycles>9</meta:editing-cycles>
    <meta:generator>LibreOffice/26.2.3.2$Windows_X86_64 LibreOffice_project/70e089b17412e4cb7773e41413306b17a2328c34</meta:generator>
    <meta:creation-date>2026-06-06T16:50:12.344730600</meta:creation-date>
    <dc:title>Format de texte</dc:title>
    <dc:date>2026-06-10T21:29:41.663953100</dc:date>
    <meta:document-statistic meta:table-count="0" meta:image-count="0" meta:object-count="0" meta:page-count="1" meta:paragraph-count="5" meta:word-count="213" meta:character-count="1185" meta:non-whitespace-character-count="971"/>
    <meta:template xlink:type="simple" xlink:actuate="onRequest" xlink:title="Format de texte" xlink:href="../../../../Format%20prompt%20histoire.ott" meta:date="2026-06-06T16:50:11.982652500"/>
  </office:meta>
</office:document-meta>
</file>