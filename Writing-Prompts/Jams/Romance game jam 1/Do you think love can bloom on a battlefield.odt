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P2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fbe73" style:font-style-asian="normal" style:font-style-complex="normal"/>
    </style:style>
    <style:style style:name="P2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efbe73" style:font-style-asian="normal" style:font-style-complex="normal"/>
    </style:style>
    <style:style style:name="P2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4392d" style:font-style-asian="normal" style:font-style-complex="normal"/>
    </style:style>
    <style:style style:name="P2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fc0c" officeooo:paragraph-rsid="00f4392d" style:font-style-asian="normal" style:font-style-complex="normal"/>
    </style:style>
    <style:style style:name="P2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fec93" style:font-style-asian="normal" style:font-style-complex="normal"/>
    </style:style>
    <style:style style:name="P2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0ffec93" style:font-style-asian="normal" style:font-style-complex="normal"/>
    </style:style>
    <style:style style:name="P2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1172792" style:font-style-asian="normal" style:font-style-complex="normal"/>
    </style:style>
    <style:style style:name="P3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72792" style:font-style-asian="normal" style:font-style-complex="normal"/>
    </style:style>
    <style:style style:name="P3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a63ee" style:font-style-asian="normal" style:font-style-complex="normal"/>
    </style:style>
    <style:style style:name="P3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bb8f6" style:font-style-asian="normal" style:font-style-complex="normal"/>
    </style:style>
    <style:style style:name="P3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ca480" style:font-style-asian="normal" style:font-style-complex="normal"/>
    </style:style>
    <style:style style:name="P3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8cf61" officeooo:paragraph-rsid="011ca480" style:font-style-asian="normal" style:font-style-complex="normal"/>
    </style:style>
    <style:style style:name="P3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224800" style:font-style-asian="normal" style:font-style-complex="normal"/>
    </style:style>
    <style:style style:name="P3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3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36eb82" style:font-style-asian="normal" style:font-style-complex="normal"/>
    </style:style>
    <style:style style:name="P3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6eb82" style:font-style-asian="normal" style:font-style-complex="normal"/>
    </style:style>
    <style:style style:name="P3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be27f" style:font-style-asian="normal" style:font-style-complex="normal"/>
    </style:style>
    <style:style style:name="P4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6f8f" officeooo:paragraph-rsid="01476f8f" style:font-style-asian="normal" style:font-style-complex="normal"/>
    </style:style>
    <style:style style:name="P4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c12a" officeooo:paragraph-rsid="01476f8f" style:font-style-asian="normal" style:font-style-complex="normal"/>
    </style:style>
    <style:style style:name="P4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a0808" officeooo:paragraph-rsid="014a0808" style:font-style-asian="normal" style:font-style-complex="normal"/>
    </style:style>
    <style:style style:name="P4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530fcd" style:font-style-asian="normal" style:font-style-complex="normal"/>
    </style:style>
    <style:style style:name="P4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51cfd4" officeooo:paragraph-rsid="01530fcd" style:font-style-asian="normal" style:font-style-complex="normal"/>
    </style:style>
    <style:style style:name="P45"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4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6fea61" style:font-style-asian="normal" style:font-style-complex="normal"/>
    </style:style>
    <style:style style:name="P4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9b86b" style:font-style-asian="normal" style:font-style-complex="normal"/>
    </style:style>
    <style:style style:name="P4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b588c" style:font-style-asian="normal" style:font-style-complex="normal"/>
    </style:style>
    <style:style style:name="P4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a79ec" style:font-style-asian="normal" style:font-style-complex="normal"/>
    </style:style>
    <style:style style:name="P5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acb59" style:font-style-asian="normal" style:font-style-complex="normal"/>
    </style:style>
    <style:style style:name="P5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58ad4" style:font-style-asian="normal" style:font-style-complex="normal"/>
    </style:style>
    <style:style style:name="P5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3"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9bfc73" style:font-style-asian="normal" style:font-style-complex="normal"/>
    </style:style>
    <style:style style:name="P5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665fa" style:font-style-asian="normal" style:font-style-complex="normal"/>
    </style:style>
    <style:style style:name="P5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3a470" style:font-style-asian="normal" style:font-style-complex="normal"/>
    </style:style>
    <style:style style:name="P5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b0259c" style:font-style-asian="normal" style:font-style-complex="normal"/>
    </style:style>
    <style:style style:name="P5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b90c74" officeooo:paragraph-rsid="01b90c74" style:font-style-asian="normal" style:font-style-complex="normal"/>
    </style:style>
    <style:style style:name="P59"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b90c74" officeooo:paragraph-rsid="01b90c74" style:font-style-asian="normal" style:font-style-complex="normal"/>
    </style:style>
    <style:style style:name="P6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c555fd" style:font-style-asian="normal" style:font-style-complex="normal"/>
    </style:style>
    <style:style style:name="P6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ce989e" style:font-style-asian="normal" style:font-style-complex="normal"/>
    </style:style>
    <style:style style:name="P6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38d04" style:font-style-asian="normal" style:font-style-complex="normal"/>
    </style:style>
    <style:style style:name="P6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af5b6" style:font-style-asian="normal" style:font-style-complex="normal"/>
    </style:style>
    <style:style style:name="P6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e589ee" style:font-style-asian="normal" style:font-style-complex="normal"/>
    </style:style>
    <style:style style:name="P6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f6254" officeooo:paragraph-rsid="01e589ee" style:font-style-asian="normal" style:font-style-complex="normal"/>
    </style:style>
    <style:style style:name="P6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f6254" officeooo:paragraph-rsid="01e740b2" style:font-style-asian="normal" style:font-style-complex="normal"/>
    </style:style>
    <style:style style:name="P6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f6254" style:font-style-asian="normal" style:font-style-complex="normal"/>
    </style:style>
    <style:style style:name="P68"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e05ce5" officeooo:paragraph-rsid="01daf5b6" style:font-style-asian="normal" style:font-style-complex="normal"/>
    </style:style>
    <style:style style:name="P6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cdee3" officeooo:paragraph-rsid="01ecaf45" style:font-style-asian="normal" style:font-style-complex="normal"/>
    </style:style>
    <style:style style:name="P7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cdee3" officeooo:paragraph-rsid="01f73221" style:font-style-asian="normal" style:font-style-complex="normal"/>
    </style:style>
    <style:style style:name="P71"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dcdee3" officeooo:paragraph-rsid="01f73221" style:font-style-asian="normal" style:font-style-complex="normal"/>
    </style:style>
    <style:style style:name="P7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cdee3" officeooo:paragraph-rsid="0205d775" style:font-style-asian="normal" style:font-style-complex="normal"/>
    </style:style>
    <style:style style:name="P7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5d775" officeooo:paragraph-rsid="0205d775" style:font-style-asian="normal" style:font-style-complex="normal"/>
    </style:style>
    <style:style style:name="P7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5d775" officeooo:paragraph-rsid="0207b2f8" style:font-style-asian="normal" style:font-style-complex="normal"/>
    </style:style>
    <style:style style:name="P7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09276f" style:font-style-asian="normal" style:font-style-complex="normal"/>
    </style:style>
    <style:style style:name="P7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0bae76" style:font-style-asian="normal" style:font-style-complex="normal"/>
    </style:style>
    <style:style style:name="P7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0c3dc4" style:font-style-asian="normal" style:font-style-complex="normal"/>
    </style:style>
    <style:style style:name="P7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1f5eb0" style:font-style-asian="normal" style:font-style-complex="normal"/>
    </style:style>
    <style:style style:name="P7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299e34" style:font-style-asian="normal" style:font-style-complex="normal"/>
    </style:style>
    <style:style style:name="P8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299e34" officeooo:paragraph-rsid="02299e34" style:font-style-asian="normal" style:font-style-complex="normal"/>
    </style:style>
    <style:style style:name="P8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299e34" officeooo:paragraph-rsid="023004df" style:font-style-asian="normal" style:font-style-complex="normal"/>
    </style:style>
    <style:style style:name="P8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d7ee7" officeooo:paragraph-rsid="023004df" style:font-style-asian="normal" style:font-style-complex="normal"/>
    </style:style>
    <style:style style:name="P8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1c5992" officeooo:paragraph-rsid="021f5eb0" style:font-style-asian="normal" style:font-style-complex="normal"/>
    </style:style>
    <style:style style:name="P8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1c5992" officeooo:paragraph-rsid="0230487b" style:font-style-asian="normal" style:font-style-complex="normal"/>
    </style:style>
    <style:style style:name="P8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381e1f" officeooo:paragraph-rsid="02381e1f" style:font-style-asian="normal" style:font-style-complex="normal"/>
    </style:style>
    <style:style style:name="P8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39a90d" style:font-style-asian="normal" style:font-style-complex="normal"/>
    </style:style>
    <style:style style:name="P8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1f5eb0" officeooo:paragraph-rsid="0239a90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e5a071"/>
    </style:style>
    <style:style style:name="T47" style:family="text">
      <style:text-properties officeooo:rsid="00c809a3"/>
    </style:style>
    <style:style style:name="T48" style:family="text">
      <style:text-properties officeooo:rsid="00e75002"/>
    </style:style>
    <style:style style:name="T49" style:family="text">
      <style:text-properties officeooo:rsid="00c61727"/>
    </style:style>
    <style:style style:name="T50" style:family="text">
      <style:text-properties fo:font-style="italic" officeooo:rsid="00c58dc1" style:font-style-asian="italic" style:font-style-complex="italic"/>
    </style:style>
    <style:style style:name="T51" style:family="text">
      <style:text-properties officeooo:rsid="00c93aba"/>
    </style:style>
    <style:style style:name="T52" style:family="text">
      <style:text-properties fo:font-style="italic" officeooo:rsid="00c93aba" style:font-style-asian="italic" style:font-style-complex="italic"/>
    </style:style>
    <style:style style:name="T53" style:family="text">
      <style:text-properties officeooo:rsid="00ca137c"/>
    </style:style>
    <style:style style:name="T54" style:family="text">
      <style:text-properties officeooo:rsid="00cb3fef"/>
    </style:style>
    <style:style style:name="T55" style:family="text">
      <style:text-properties officeooo:rsid="00ef56c8"/>
    </style:style>
    <style:style style:name="T56" style:family="text">
      <style:text-properties officeooo:rsid="00ccd4db"/>
    </style:style>
    <style:style style:name="T57" style:family="text">
      <style:text-properties officeooo:rsid="00ce4823"/>
    </style:style>
    <style:style style:name="T58" style:family="text">
      <style:text-properties officeooo:rsid="00ce5fb3"/>
    </style:style>
    <style:style style:name="T59" style:family="text">
      <style:text-properties fo:font-style="normal" style:font-style-asian="normal" style:font-style-complex="normal"/>
    </style:style>
    <style:style style:name="T60" style:family="text">
      <style:text-properties fo:font-style="normal" officeooo:rsid="00ccd4db" style:font-style-asian="normal" style:font-style-complex="normal"/>
    </style:style>
    <style:style style:name="T61" style:family="text">
      <style:text-properties officeooo:rsid="00cb4a5f"/>
    </style:style>
    <style:style style:name="T62" style:family="text">
      <style:text-properties officeooo:rsid="00cc0c36"/>
    </style:style>
    <style:style style:name="T63" style:family="text">
      <style:text-properties fo:font-style="italic" officeooo:rsid="00cc0c36" style:font-style-asian="italic" style:font-style-complex="italic"/>
    </style:style>
    <style:style style:name="T64" style:family="text">
      <style:text-properties fo:font-style="italic" officeooo:rsid="00cc4f69" style:font-style-asian="italic" style:font-style-complex="italic"/>
    </style:style>
    <style:style style:name="T65" style:family="text">
      <style:text-properties officeooo:rsid="00d1b060"/>
    </style:style>
    <style:style style:name="T66" style:family="text">
      <style:text-properties officeooo:rsid="00d38be4"/>
    </style:style>
    <style:style style:name="T67" style:family="text">
      <style:text-properties officeooo:rsid="00d42583"/>
    </style:style>
    <style:style style:name="T68" style:family="text">
      <style:text-properties officeooo:rsid="00d49f77"/>
    </style:style>
    <style:style style:name="T69" style:family="text">
      <style:text-properties officeooo:rsid="00d8d7a8"/>
    </style:style>
    <style:style style:name="T70" style:family="text">
      <style:text-properties officeooo:rsid="00d933ad"/>
    </style:style>
    <style:style style:name="T71" style:family="text">
      <style:text-properties officeooo:rsid="00daadf2"/>
    </style:style>
    <style:style style:name="T72" style:family="text">
      <style:text-properties officeooo:rsid="00d99f0d"/>
    </style:style>
    <style:style style:name="T73" style:family="text">
      <style:text-properties officeooo:rsid="00dd12ad"/>
    </style:style>
    <style:style style:name="T74" style:family="text">
      <style:text-properties officeooo:rsid="00e92fef"/>
    </style:style>
    <style:style style:name="T75" style:family="text">
      <style:text-properties officeooo:rsid="00e05ce5"/>
    </style:style>
    <style:style style:name="T76" style:family="text">
      <style:text-properties officeooo:rsid="00e092fe"/>
    </style:style>
    <style:style style:name="T77" style:family="text">
      <style:text-properties officeooo:rsid="00e223d8"/>
    </style:style>
    <style:style style:name="T78" style:family="text">
      <style:text-properties officeooo:rsid="00e913a0"/>
    </style:style>
    <style:style style:name="T79" style:family="text">
      <style:text-properties officeooo:rsid="00ea830c"/>
    </style:style>
    <style:style style:name="T80" style:family="text">
      <style:text-properties officeooo:rsid="00ea83c2"/>
    </style:style>
    <style:style style:name="T81" style:family="text">
      <style:text-properties officeooo:rsid="00ec375f"/>
    </style:style>
    <style:style style:name="T82" style:family="text">
      <style:text-properties officeooo:rsid="00ed56f9"/>
    </style:style>
    <style:style style:name="T83" style:family="text">
      <style:text-properties officeooo:rsid="00edb740"/>
    </style:style>
    <style:style style:name="T84" style:family="text">
      <style:text-properties officeooo:rsid="00edde8f"/>
    </style:style>
    <style:style style:name="T85" style:family="text">
      <style:text-properties officeooo:rsid="00ef38af"/>
    </style:style>
    <style:style style:name="T86" style:family="text">
      <style:text-properties officeooo:rsid="00efbe73"/>
    </style:style>
    <style:style style:name="T87" style:family="text">
      <style:text-properties officeooo:rsid="00effc0c"/>
    </style:style>
    <style:style style:name="T88" style:family="text">
      <style:text-properties officeooo:rsid="00f43b13"/>
    </style:style>
    <style:style style:name="T89" style:family="text">
      <style:text-properties officeooo:rsid="00f72fc8"/>
    </style:style>
    <style:style style:name="T90" style:family="text">
      <style:text-properties officeooo:rsid="00f48cea"/>
    </style:style>
    <style:style style:name="T91" style:family="text">
      <style:text-properties officeooo:rsid="00f90979"/>
    </style:style>
    <style:style style:name="T92" style:family="text">
      <style:text-properties officeooo:rsid="00f4392d"/>
    </style:style>
    <style:style style:name="T93" style:family="text">
      <style:text-properties officeooo:rsid="00f56c95"/>
    </style:style>
    <style:style style:name="T94" style:family="text">
      <style:text-properties officeooo:rsid="00f26016"/>
    </style:style>
    <style:style style:name="T95" style:family="text">
      <style:text-properties officeooo:rsid="00fb01cb"/>
    </style:style>
    <style:style style:name="T96" style:family="text">
      <style:text-properties officeooo:rsid="00fcbdd2"/>
    </style:style>
    <style:style style:name="T97" style:family="text">
      <style:text-properties officeooo:rsid="00fd753b"/>
    </style:style>
    <style:style style:name="T98" style:family="text">
      <style:text-properties officeooo:rsid="00feaa9d"/>
    </style:style>
    <style:style style:name="T99" style:family="text">
      <style:text-properties officeooo:rsid="00ff6b59"/>
    </style:style>
    <style:style style:name="T100" style:family="text">
      <style:text-properties officeooo:rsid="00ffec93"/>
    </style:style>
    <style:style style:name="T101" style:family="text">
      <style:text-properties officeooo:rsid="0101ef2f"/>
    </style:style>
    <style:style style:name="T102" style:family="text">
      <style:text-properties officeooo:rsid="010464e0"/>
    </style:style>
    <style:style style:name="T103" style:family="text">
      <style:text-properties officeooo:rsid="01064fbe"/>
    </style:style>
    <style:style style:name="T104" style:family="text">
      <style:text-properties officeooo:rsid="0107e7bc"/>
    </style:style>
    <style:style style:name="T105" style:family="text">
      <style:text-properties officeooo:rsid="010946b7"/>
    </style:style>
    <style:style style:name="T106" style:family="text">
      <style:text-properties officeooo:rsid="0109db87"/>
    </style:style>
    <style:style style:name="T107" style:family="text">
      <style:text-properties officeooo:rsid="010b6e9a"/>
    </style:style>
    <style:style style:name="T108" style:family="text">
      <style:text-properties officeooo:rsid="010c8454"/>
    </style:style>
    <style:style style:name="T109" style:family="text">
      <style:text-properties officeooo:rsid="010ff7c4"/>
    </style:style>
    <style:style style:name="T110" style:family="text">
      <style:text-properties officeooo:rsid="0111d8aa"/>
    </style:style>
    <style:style style:name="T111" style:family="text">
      <style:text-properties officeooo:rsid="0116314f"/>
    </style:style>
    <style:style style:name="T112" style:family="text">
      <style:text-properties officeooo:rsid="01129ecb"/>
    </style:style>
    <style:style style:name="T113" style:family="text">
      <style:text-properties officeooo:rsid="01158586"/>
    </style:style>
    <style:style style:name="T114" style:family="text">
      <style:text-properties officeooo:rsid="01138f0d"/>
    </style:style>
    <style:style style:name="T115" style:family="text">
      <style:text-properties officeooo:rsid="01172792"/>
    </style:style>
    <style:style style:name="T116" style:family="text">
      <style:text-properties officeooo:rsid="0118cf61"/>
    </style:style>
    <style:style style:name="T117" style:family="text">
      <style:text-properties officeooo:rsid="011bb8f6"/>
    </style:style>
    <style:style style:name="T118" style:family="text">
      <style:text-properties officeooo:rsid="011a63ee"/>
    </style:style>
    <style:style style:name="T119" style:family="text">
      <style:text-properties officeooo:rsid="011cd737"/>
    </style:style>
    <style:style style:name="T120" style:family="text">
      <style:text-properties officeooo:rsid="0120ab91"/>
    </style:style>
    <style:style style:name="T121" style:family="text">
      <style:text-properties officeooo:rsid="01212ad3"/>
    </style:style>
    <style:style style:name="T122" style:family="text">
      <style:text-properties officeooo:rsid="011ca480"/>
    </style:style>
    <style:style style:name="T123" style:family="text">
      <style:text-properties officeooo:rsid="011de2de"/>
    </style:style>
    <style:style style:name="T124" style:family="text">
      <style:text-properties officeooo:rsid="011f83ac"/>
    </style:style>
    <style:style style:name="T125" style:family="text">
      <style:text-properties officeooo:rsid="01220d2d"/>
    </style:style>
    <style:style style:name="T126" style:family="text">
      <style:text-properties fo:font-style="italic" officeooo:rsid="01220d2d" style:font-style-asian="italic" style:font-style-complex="italic"/>
    </style:style>
    <style:style style:name="T127" style:family="text">
      <style:text-properties officeooo:rsid="01224800"/>
    </style:style>
    <style:style style:name="T128" style:family="text">
      <style:text-properties officeooo:rsid="0130f077"/>
    </style:style>
    <style:style style:name="T129" style:family="text">
      <style:text-properties officeooo:rsid="0132761e"/>
    </style:style>
    <style:style style:name="T130" style:family="text">
      <style:text-properties officeooo:rsid="012312ef"/>
    </style:style>
    <style:style style:name="T131" style:family="text">
      <style:text-properties officeooo:rsid="0124dfed"/>
    </style:style>
    <style:style style:name="T132" style:family="text">
      <style:text-properties officeooo:rsid="01262c2a"/>
    </style:style>
    <style:style style:name="T133" style:family="text">
      <style:text-properties officeooo:rsid="01295c27"/>
    </style:style>
    <style:style style:name="T134" style:family="text">
      <style:text-properties officeooo:rsid="012720be"/>
    </style:style>
    <style:style style:name="T135" style:family="text">
      <style:text-properties officeooo:rsid="012b2c38"/>
    </style:style>
    <style:style style:name="T136" style:family="text">
      <style:text-properties officeooo:rsid="012e7594"/>
    </style:style>
    <style:style style:name="T137" style:family="text">
      <style:text-properties officeooo:rsid="01328549"/>
    </style:style>
    <style:style style:name="T138" style:family="text">
      <style:text-properties officeooo:rsid="0135884c"/>
    </style:style>
    <style:style style:name="T139" style:family="text">
      <style:text-properties officeooo:rsid="01388eb4"/>
    </style:style>
    <style:style style:name="T140" style:family="text">
      <style:text-properties officeooo:rsid="013af4a9"/>
    </style:style>
    <style:style style:name="T141" style:family="text">
      <style:text-properties officeooo:rsid="013be27f"/>
    </style:style>
    <style:style style:name="T142" style:family="text">
      <style:text-properties officeooo:rsid="0138ca07"/>
    </style:style>
    <style:style style:name="T143" style:family="text">
      <style:text-properties officeooo:rsid="013a7c41"/>
    </style:style>
    <style:style style:name="T144" style:family="text">
      <style:text-properties officeooo:rsid="013dd133"/>
    </style:style>
    <style:style style:name="T145" style:family="text">
      <style:text-properties officeooo:rsid="013e9346"/>
    </style:style>
    <style:style style:name="T146" style:family="text">
      <style:text-properties officeooo:rsid="01466a70"/>
    </style:style>
    <style:style style:name="T147" style:family="text">
      <style:text-properties officeooo:rsid="01476f8f"/>
    </style:style>
    <style:style style:name="T148" style:family="text">
      <style:text-properties officeooo:rsid="01485691"/>
    </style:style>
    <style:style style:name="T149" style:family="text">
      <style:text-properties officeooo:rsid="015c2abe"/>
    </style:style>
    <style:style style:name="T150" style:family="text">
      <style:text-properties officeooo:rsid="015ccdd3"/>
    </style:style>
    <style:style style:name="T151" style:family="text">
      <style:text-properties fo:font-style="italic" officeooo:rsid="015ccdd3" style:font-style-asian="italic" style:font-style-complex="italic"/>
    </style:style>
    <style:style style:name="T152" style:family="text">
      <style:text-properties fo:font-style="italic" officeooo:rsid="015e6533" style:font-style-asian="italic" style:font-style-complex="italic"/>
    </style:style>
    <style:style style:name="T153" style:family="text">
      <style:text-properties fo:font-style="italic" officeooo:rsid="015f7a01" style:font-style-asian="italic" style:font-style-complex="italic"/>
    </style:style>
    <style:style style:name="T154" style:family="text">
      <style:text-properties officeooo:rsid="014a3815"/>
    </style:style>
    <style:style style:name="T155" style:family="text">
      <style:text-properties officeooo:rsid="014a3d48"/>
    </style:style>
    <style:style style:name="T156" style:family="text">
      <style:text-properties officeooo:rsid="014b0e69"/>
    </style:style>
    <style:style style:name="T157" style:family="text">
      <style:text-properties officeooo:rsid="014d896f"/>
    </style:style>
    <style:style style:name="T158" style:family="text">
      <style:text-properties officeooo:rsid="014c5507"/>
    </style:style>
    <style:style style:name="T159" style:family="text">
      <style:text-properties officeooo:rsid="014d2f4b"/>
    </style:style>
    <style:style style:name="T160" style:family="text">
      <style:text-properties officeooo:rsid="014f2daa"/>
    </style:style>
    <style:style style:name="T161" style:family="text">
      <style:text-properties officeooo:rsid="014f4882"/>
    </style:style>
    <style:style style:name="T162" style:family="text">
      <style:text-properties officeooo:rsid="01505e24"/>
    </style:style>
    <style:style style:name="T163" style:family="text">
      <style:text-properties officeooo:rsid="0151cfd4"/>
    </style:style>
    <style:style style:name="T164" style:family="text">
      <style:text-properties officeooo:rsid="01530fcd"/>
    </style:style>
    <style:style style:name="T165" style:family="text">
      <style:text-properties officeooo:rsid="016a6605"/>
    </style:style>
    <style:style style:name="T166" style:family="text">
      <style:text-properties officeooo:rsid="016d39b5"/>
    </style:style>
    <style:style style:name="T167" style:family="text">
      <style:text-properties officeooo:rsid="016b941f"/>
    </style:style>
    <style:style style:name="T168" style:family="text">
      <style:text-properties officeooo:rsid="01546296"/>
    </style:style>
    <style:style style:name="T169" style:family="text">
      <style:text-properties officeooo:rsid="0185b289"/>
    </style:style>
    <style:style style:name="T170" style:family="text">
      <style:text-properties officeooo:rsid="018708f4"/>
    </style:style>
    <style:style style:name="T171" style:family="text">
      <style:text-properties officeooo:rsid="0156475d"/>
    </style:style>
    <style:style style:name="T172" style:family="text">
      <style:text-properties officeooo:rsid="01570eba"/>
    </style:style>
    <style:style style:name="T173" style:family="text">
      <style:text-properties officeooo:rsid="017124bd"/>
    </style:style>
    <style:style style:name="T174" style:family="text">
      <style:text-properties officeooo:rsid="01715679"/>
    </style:style>
    <style:style style:name="T175" style:family="text">
      <style:text-properties officeooo:rsid="015fa61e"/>
    </style:style>
    <style:style style:name="T176" style:family="text">
      <style:text-properties officeooo:rsid="016fea61"/>
    </style:style>
    <style:style style:name="T177" style:family="text">
      <style:text-properties officeooo:rsid="016839a8"/>
    </style:style>
    <style:style style:name="T178" style:family="text">
      <style:text-properties officeooo:rsid="016e3fef"/>
    </style:style>
    <style:style style:name="T179" style:family="text">
      <style:text-properties officeooo:rsid="016556bb"/>
    </style:style>
    <style:style style:name="T180" style:family="text">
      <style:text-properties officeooo:rsid="01680db6"/>
    </style:style>
    <style:style style:name="T181" style:family="text">
      <style:text-properties officeooo:rsid="0171dce3"/>
    </style:style>
    <style:style style:name="T182" style:family="text">
      <style:text-properties officeooo:rsid="01726df1"/>
    </style:style>
    <style:style style:name="T183" style:family="text">
      <style:text-properties officeooo:rsid="017294f2"/>
    </style:style>
    <style:style style:name="T184" style:family="text">
      <style:text-properties officeooo:rsid="01788842"/>
    </style:style>
    <style:style style:name="T185" style:family="text">
      <style:text-properties officeooo:rsid="0179b86b"/>
    </style:style>
    <style:style style:name="T186" style:family="text">
      <style:text-properties officeooo:rsid="0175baf9"/>
    </style:style>
    <style:style style:name="T187" style:family="text">
      <style:text-properties officeooo:rsid="017677f6"/>
    </style:style>
    <style:style style:name="T188" style:family="text">
      <style:text-properties officeooo:rsid="01772edc"/>
    </style:style>
    <style:style style:name="T189" style:family="text">
      <style:text-properties officeooo:rsid="017a79ec"/>
    </style:style>
    <style:style style:name="T190" style:family="text">
      <style:text-properties officeooo:rsid="017ba66c"/>
    </style:style>
    <style:style style:name="T191" style:family="text">
      <style:text-properties officeooo:rsid="017be8f8"/>
    </style:style>
    <style:style style:name="T192" style:family="text">
      <style:text-properties officeooo:rsid="017d1963"/>
    </style:style>
    <style:style style:name="T193" style:family="text">
      <style:text-properties officeooo:rsid="017eed54"/>
    </style:style>
    <style:style style:name="T194" style:family="text">
      <style:text-properties officeooo:rsid="01875d2b"/>
    </style:style>
    <style:style style:name="T195" style:family="text">
      <style:text-properties officeooo:rsid="01806683"/>
    </style:style>
    <style:style style:name="T196" style:family="text">
      <style:text-properties officeooo:rsid="0182a758"/>
    </style:style>
    <style:style style:name="T197" style:family="text">
      <style:text-properties officeooo:rsid="018a8356"/>
    </style:style>
    <style:style style:name="T198" style:family="text">
      <style:text-properties officeooo:rsid="01858ad4"/>
    </style:style>
    <style:style style:name="T199" style:family="text">
      <style:text-properties officeooo:rsid="018c9362"/>
    </style:style>
    <style:style style:name="T200" style:family="text">
      <style:text-properties officeooo:rsid="018d253e"/>
    </style:style>
    <style:style style:name="T201" style:family="text">
      <style:text-properties officeooo:rsid="01906cc9"/>
    </style:style>
    <style:style style:name="T202" style:family="text">
      <style:text-properties fo:font-style="italic" officeooo:rsid="01858ad4" style:font-style-asian="italic" style:font-style-complex="italic"/>
    </style:style>
    <style:style style:name="T203" style:family="text">
      <style:text-properties officeooo:rsid="01870c53"/>
    </style:style>
    <style:style style:name="T204" style:family="text">
      <style:text-properties officeooo:rsid="0187109c"/>
    </style:style>
    <style:style style:name="T205" style:family="text">
      <style:text-properties officeooo:rsid="0187ff70"/>
    </style:style>
    <style:style style:name="T206" style:family="text">
      <style:text-properties officeooo:rsid="0188cbd4"/>
    </style:style>
    <style:style style:name="T207" style:family="text">
      <style:text-properties officeooo:rsid="018ee83b"/>
    </style:style>
    <style:style style:name="T208" style:family="text">
      <style:text-properties officeooo:rsid="01901fc1"/>
    </style:style>
    <style:style style:name="T209" style:family="text">
      <style:text-properties officeooo:rsid="018fc66c"/>
    </style:style>
    <style:style style:name="T210" style:family="text">
      <style:text-properties officeooo:rsid="018969c8"/>
    </style:style>
    <style:style style:name="T211" style:family="text">
      <style:text-properties officeooo:rsid="0191240c"/>
    </style:style>
    <style:style style:name="T212" style:family="text">
      <style:text-properties officeooo:rsid="0192c2af"/>
    </style:style>
    <style:style style:name="T213" style:family="text">
      <style:text-properties officeooo:rsid="01943627"/>
    </style:style>
    <style:style style:name="T214" style:family="text">
      <style:text-properties officeooo:rsid="0197aa06"/>
    </style:style>
    <style:style style:name="T215" style:family="text">
      <style:text-properties officeooo:rsid="019919c8"/>
    </style:style>
    <style:style style:name="T216" style:family="text">
      <style:text-properties officeooo:rsid="01997a8c"/>
    </style:style>
    <style:style style:name="T217" style:family="text">
      <style:text-properties officeooo:rsid="019ad427"/>
    </style:style>
    <style:style style:name="T218" style:family="text">
      <style:text-properties fo:font-style="italic" officeooo:rsid="019ad427" style:font-style-asian="italic" style:font-style-complex="italic"/>
    </style:style>
    <style:style style:name="T219" style:family="text">
      <style:text-properties officeooo:rsid="019bfc73"/>
    </style:style>
    <style:style style:name="T220" style:family="text">
      <style:text-properties officeooo:rsid="019d5049"/>
    </style:style>
    <style:style style:name="T221" style:family="text">
      <style:text-properties officeooo:rsid="019e0b1e"/>
    </style:style>
    <style:style style:name="T222" style:family="text">
      <style:text-properties officeooo:rsid="019ff67a"/>
    </style:style>
    <style:style style:name="T223" style:family="text">
      <style:text-properties officeooo:rsid="01a3ec30"/>
    </style:style>
    <style:style style:name="T224" style:family="text">
      <style:text-properties officeooo:rsid="01a8a734"/>
    </style:style>
    <style:style style:name="T225" style:family="text">
      <style:text-properties officeooo:rsid="01a27ceb"/>
    </style:style>
    <style:style style:name="T226" style:family="text">
      <style:text-properties officeooo:rsid="01a6e0f8"/>
    </style:style>
    <style:style style:name="T227" style:family="text">
      <style:text-properties officeooo:rsid="01a9d2f4"/>
    </style:style>
    <style:style style:name="T228" style:family="text">
      <style:text-properties officeooo:rsid="019e84e5"/>
    </style:style>
    <style:style style:name="T229" style:family="text">
      <style:text-properties officeooo:rsid="01abc816"/>
    </style:style>
    <style:style style:name="T230" style:family="text">
      <style:text-properties officeooo:rsid="01ae62d9"/>
    </style:style>
    <style:style style:name="T231" style:family="text">
      <style:text-properties officeooo:rsid="01acbd55"/>
    </style:style>
    <style:style style:name="T232" style:family="text">
      <style:text-properties officeooo:rsid="01b0259c"/>
    </style:style>
    <style:style style:name="T233" style:family="text">
      <style:text-properties officeooo:rsid="01b19e3c"/>
    </style:style>
    <style:style style:name="T234" style:family="text">
      <style:text-properties officeooo:rsid="01b38190"/>
    </style:style>
    <style:style style:name="T235" style:family="text">
      <style:text-properties officeooo:rsid="01b4bb95"/>
    </style:style>
    <style:style style:name="T236" style:family="text">
      <style:text-properties officeooo:rsid="01b65bb8"/>
    </style:style>
    <style:style style:name="T237" style:family="text">
      <style:text-properties officeooo:rsid="01b722ef"/>
    </style:style>
    <style:style style:name="T238" style:family="text">
      <style:text-properties officeooo:rsid="01b90c74"/>
    </style:style>
    <style:style style:name="T239" style:family="text">
      <style:text-properties officeooo:rsid="01b92d84"/>
    </style:style>
    <style:style style:name="T240" style:family="text">
      <style:text-properties officeooo:rsid="01b9b691"/>
    </style:style>
    <style:style style:name="T241" style:family="text">
      <style:text-properties officeooo:rsid="01bb0ac4"/>
    </style:style>
    <style:style style:name="T242" style:family="text">
      <style:text-properties officeooo:rsid="01bc071d"/>
    </style:style>
    <style:style style:name="T243" style:family="text">
      <style:text-properties officeooo:rsid="01be476e"/>
    </style:style>
    <style:style style:name="T244" style:family="text">
      <style:text-properties officeooo:rsid="01be9f0b"/>
    </style:style>
    <style:style style:name="T245" style:family="text">
      <style:text-properties officeooo:rsid="01c26a20"/>
    </style:style>
    <style:style style:name="T246" style:family="text">
      <style:text-properties officeooo:rsid="01c3aa3f"/>
    </style:style>
    <style:style style:name="T247" style:family="text">
      <style:text-properties officeooo:rsid="01c69fbe"/>
    </style:style>
    <style:style style:name="T248" style:family="text">
      <style:text-properties officeooo:rsid="01c815b1"/>
    </style:style>
    <style:style style:name="T249" style:family="text">
      <style:text-properties officeooo:rsid="01c555fd"/>
    </style:style>
    <style:style style:name="T250" style:family="text">
      <style:text-properties officeooo:rsid="01c862f9"/>
    </style:style>
    <style:style style:name="T251" style:family="text">
      <style:text-properties officeooo:rsid="01c91949"/>
    </style:style>
    <style:style style:name="T252" style:family="text">
      <style:text-properties officeooo:rsid="01ca59a1"/>
    </style:style>
    <style:style style:name="T253" style:family="text">
      <style:text-properties officeooo:rsid="01cf07aa"/>
    </style:style>
    <style:style style:name="T254" style:family="text">
      <style:text-properties officeooo:rsid="01d0c0dc"/>
    </style:style>
    <style:style style:name="T255" style:family="text">
      <style:text-properties officeooo:rsid="01d02682"/>
    </style:style>
    <style:style style:name="T256" style:family="text">
      <style:text-properties officeooo:rsid="01d1f194"/>
    </style:style>
    <style:style style:name="T257" style:family="text">
      <style:text-properties officeooo:rsid="01cd0d0a"/>
    </style:style>
    <style:style style:name="T258" style:family="text">
      <style:text-properties officeooo:rsid="01ce989e"/>
    </style:style>
    <style:style style:name="T259" style:family="text">
      <style:text-properties officeooo:rsid="01cb61f8"/>
    </style:style>
    <style:style style:name="T260" style:family="text">
      <style:text-properties officeooo:rsid="01d4af41"/>
    </style:style>
    <style:style style:name="T261" style:family="text">
      <style:text-properties officeooo:rsid="01d66634"/>
    </style:style>
    <style:style style:name="T262" style:family="text">
      <style:text-properties officeooo:rsid="01d70531"/>
    </style:style>
    <style:style style:name="T263" style:family="text">
      <style:text-properties officeooo:rsid="01d762ac"/>
    </style:style>
    <style:style style:name="T264" style:family="text">
      <style:text-properties officeooo:rsid="01d7a4a7"/>
    </style:style>
    <style:style style:name="T265" style:family="text">
      <style:text-properties officeooo:rsid="01d97d94"/>
    </style:style>
    <style:style style:name="T266" style:family="text">
      <style:text-properties officeooo:rsid="01daf5b6"/>
    </style:style>
    <style:style style:name="T267" style:family="text">
      <style:text-properties officeooo:rsid="01d27d87"/>
    </style:style>
    <style:style style:name="T268" style:family="text">
      <style:text-properties officeooo:rsid="01d38d04"/>
    </style:style>
    <style:style style:name="T269" style:family="text">
      <style:text-properties officeooo:rsid="01dbe280"/>
    </style:style>
    <style:style style:name="T270" style:family="text">
      <style:text-properties fo:font-style="italic" officeooo:rsid="01dbe280" style:font-style-asian="italic" style:font-style-complex="italic"/>
    </style:style>
    <style:style style:name="T271" style:family="text">
      <style:text-properties fo:font-style="italic" officeooo:rsid="01df6254" style:font-style-asian="italic" style:font-style-complex="italic"/>
    </style:style>
    <style:style style:name="T272" style:family="text">
      <style:text-properties officeooo:rsid="01df6254"/>
    </style:style>
    <style:style style:name="T273" style:family="text">
      <style:text-properties officeooo:rsid="01e144ad"/>
    </style:style>
    <style:style style:name="T274" style:family="text">
      <style:text-properties officeooo:rsid="01e2113f"/>
    </style:style>
    <style:style style:name="T275" style:family="text">
      <style:text-properties officeooo:rsid="01e740b2"/>
    </style:style>
    <style:style style:name="T276" style:family="text">
      <style:text-properties officeooo:rsid="01ea5f1d"/>
    </style:style>
    <style:style style:name="T277" style:family="text">
      <style:text-properties officeooo:rsid="01eadaf7"/>
    </style:style>
    <style:style style:name="T278" style:family="text">
      <style:text-properties officeooo:rsid="008e3366"/>
    </style:style>
    <style:style style:name="T279" style:family="text">
      <style:text-properties officeooo:rsid="01ecaf45"/>
    </style:style>
    <style:style style:name="T280" style:family="text">
      <style:text-properties officeooo:rsid="0090bdf9"/>
    </style:style>
    <style:style style:name="T281" style:family="text">
      <style:text-properties officeooo:rsid="01ee21c2"/>
    </style:style>
    <style:style style:name="T282" style:family="text">
      <style:text-properties officeooo:rsid="01f359d7"/>
    </style:style>
    <style:style style:name="T283" style:family="text">
      <style:text-properties officeooo:rsid="01f425ef"/>
    </style:style>
    <style:style style:name="T284" style:family="text">
      <style:text-properties officeooo:rsid="01fbbddf"/>
    </style:style>
    <style:style style:name="T285" style:family="text">
      <style:text-properties officeooo:rsid="01f59104"/>
    </style:style>
    <style:style style:name="T286" style:family="text">
      <style:text-properties officeooo:rsid="01f73221"/>
    </style:style>
    <style:style style:name="T287" style:family="text">
      <style:text-properties officeooo:rsid="01f9612f"/>
    </style:style>
    <style:style style:name="T288" style:family="text">
      <style:text-properties officeooo:rsid="01f164d2"/>
    </style:style>
    <style:style style:name="T289" style:family="text">
      <style:text-properties officeooo:rsid="01ef096b"/>
    </style:style>
    <style:style style:name="T290" style:family="text">
      <style:text-properties officeooo:rsid="01f1c1fd"/>
    </style:style>
    <style:style style:name="T291" style:family="text">
      <style:text-properties officeooo:rsid="01f04d80"/>
    </style:style>
    <style:style style:name="T292" style:family="text">
      <style:text-properties officeooo:rsid="01ff8841"/>
    </style:style>
    <style:style style:name="T293" style:family="text">
      <style:text-properties officeooo:rsid="01fd5896"/>
    </style:style>
    <style:style style:name="T294" style:family="text">
      <style:text-properties officeooo:rsid="01fc0d15"/>
    </style:style>
    <style:style style:name="T295" style:family="text">
      <style:text-properties officeooo:rsid="01fe01df"/>
    </style:style>
    <style:style style:name="T296" style:family="text">
      <style:text-properties officeooo:rsid="02012fe5"/>
    </style:style>
    <style:style style:name="T297" style:family="text">
      <style:text-properties officeooo:rsid="0204dbf8"/>
    </style:style>
    <style:style style:name="T298" style:family="text">
      <style:text-properties officeooo:rsid="02030248"/>
    </style:style>
    <style:style style:name="T299" style:family="text">
      <style:text-properties officeooo:rsid="0205d775"/>
    </style:style>
    <style:style style:name="T300" style:family="text">
      <style:text-properties officeooo:rsid="0207b2f8"/>
    </style:style>
    <style:style style:name="T301" style:family="text">
      <style:text-properties officeooo:rsid="020bae76"/>
    </style:style>
    <style:style style:name="T302" style:family="text">
      <style:text-properties officeooo:rsid="0209276f"/>
    </style:style>
    <style:style style:name="T303" style:family="text">
      <style:text-properties officeooo:rsid="020b0527"/>
    </style:style>
    <style:style style:name="T304" style:family="text">
      <style:text-properties officeooo:rsid="020c3dc4"/>
    </style:style>
    <style:style style:name="T305" style:family="text">
      <style:text-properties officeooo:rsid="02107840"/>
    </style:style>
    <style:style style:name="T306" style:family="text">
      <style:text-properties officeooo:rsid="020dc178"/>
    </style:style>
    <style:style style:name="T307" style:family="text">
      <style:text-properties officeooo:rsid="0210bfd1"/>
    </style:style>
    <style:style style:name="T308" style:family="text">
      <style:text-properties officeooo:rsid="021356f7"/>
    </style:style>
    <style:style style:name="T309" style:family="text">
      <style:text-properties officeooo:rsid="020dc6b8"/>
    </style:style>
    <style:style style:name="T310" style:family="text">
      <style:text-properties officeooo:rsid="02130e18"/>
    </style:style>
    <style:style style:name="T311" style:family="text">
      <style:text-properties officeooo:rsid="02146ef6"/>
    </style:style>
    <style:style style:name="T312" style:family="text">
      <style:text-properties officeooo:rsid="02159cff"/>
    </style:style>
    <style:style style:name="T313" style:family="text">
      <style:text-properties officeooo:rsid="020ee42b"/>
    </style:style>
    <style:style style:name="T314" style:family="text">
      <style:text-properties officeooo:rsid="0215a6f0"/>
    </style:style>
    <style:style style:name="T315" style:family="text">
      <style:text-properties officeooo:rsid="02168249"/>
    </style:style>
    <style:style style:name="T316" style:family="text">
      <style:text-properties officeooo:rsid="02194bdd"/>
    </style:style>
    <style:style style:name="T317" style:family="text">
      <style:text-properties officeooo:rsid="021a69fa"/>
    </style:style>
    <style:style style:name="T318" style:family="text">
      <style:text-properties officeooo:rsid="021c3cdf"/>
    </style:style>
    <style:style style:name="T319" style:family="text">
      <style:text-properties fo:font-style="italic" officeooo:rsid="021a69fa" style:font-style-asian="italic" style:font-style-complex="italic"/>
    </style:style>
    <style:style style:name="T320" style:family="text">
      <style:text-properties officeooo:rsid="021f5eb0"/>
    </style:style>
    <style:style style:name="T321" style:family="text">
      <style:text-properties officeooo:rsid="022037c6"/>
    </style:style>
    <style:style style:name="T322" style:family="text">
      <style:text-properties officeooo:rsid="022164a8"/>
    </style:style>
    <style:style style:name="T323" style:family="text">
      <style:text-properties fo:font-style="italic" officeooo:rsid="02226fb1" style:font-style-asian="italic" style:font-style-complex="italic"/>
    </style:style>
    <style:style style:name="T324" style:family="text">
      <style:text-properties officeooo:rsid="02226fb1"/>
    </style:style>
    <style:style style:name="T325" style:family="text">
      <style:text-properties officeooo:rsid="02246f4c"/>
    </style:style>
    <style:style style:name="T326" style:family="text">
      <style:text-properties officeooo:rsid="0225bb94"/>
    </style:style>
    <style:style style:name="T327" style:family="text">
      <style:text-properties officeooo:rsid="0227a47f"/>
    </style:style>
    <style:style style:name="T328" style:family="text">
      <style:text-properties officeooo:rsid="0228f5e6"/>
    </style:style>
    <style:style style:name="T329" style:family="text">
      <style:text-properties officeooo:rsid="02299e34"/>
    </style:style>
    <style:style style:name="T330" style:family="text">
      <style:text-properties officeooo:rsid="022b32c3"/>
    </style:style>
    <style:style style:name="T331" style:family="text">
      <style:text-properties officeooo:rsid="022c0971"/>
    </style:style>
    <style:style style:name="T332" style:family="text">
      <style:text-properties officeooo:rsid="022db251"/>
    </style:style>
    <style:style style:name="T333" style:family="text">
      <style:text-properties officeooo:rsid="022ef7c7"/>
    </style:style>
    <style:style style:name="T334" style:family="text">
      <style:text-properties officeooo:rsid="023004df"/>
    </style:style>
    <style:style style:name="T335" style:family="text">
      <style:text-properties officeooo:rsid="015a858a"/>
    </style:style>
    <style:style style:name="T336" style:family="text">
      <style:text-properties officeooo:rsid="019ed149"/>
    </style:style>
    <style:style style:name="T337" style:family="text">
      <style:text-properties officeooo:rsid="015bc1ea"/>
    </style:style>
    <style:style style:name="T338" style:family="text">
      <style:text-properties officeooo:rsid="0230487b"/>
    </style:style>
    <style:style style:name="T339" style:family="text">
      <style:text-properties fo:font-style="italic" officeooo:rsid="0230487b" style:font-style-asian="italic" style:font-style-complex="italic"/>
    </style:style>
    <style:style style:name="T340" style:family="text">
      <style:text-properties officeooo:rsid="015be452"/>
    </style:style>
    <style:style style:name="T341" style:family="text">
      <style:text-properties officeooo:rsid="02326ea6"/>
    </style:style>
    <style:style style:name="T342" style:family="text">
      <style:text-properties officeooo:rsid="02345468"/>
    </style:style>
    <style:style style:name="T343" style:family="text">
      <style:text-properties officeooo:rsid="02338ccb"/>
    </style:style>
    <style:style style:name="T344" style:family="text">
      <style:text-properties officeooo:rsid="0233a312"/>
    </style:style>
    <style:style style:name="T345" style:family="text">
      <style:text-properties officeooo:rsid="02344290"/>
    </style:style>
    <style:style style:name="T346" style:family="text">
      <style:text-properties officeooo:rsid="0234c0ac"/>
    </style:style>
    <style:style style:name="T347" style:family="text">
      <style:text-properties officeooo:rsid="0236e3ab"/>
    </style:style>
    <style:style style:name="T348" style:family="text">
      <style:text-properties officeooo:rsid="02381e1f"/>
    </style:style>
    <style:style style:name="T349" style:family="text">
      <style:text-properties officeooo:rsid="0238669a"/>
    </style:style>
    <style:style style:name="T350" style:family="text">
      <style:text-properties officeooo:rsid="0238af14"/>
    </style:style>
    <style:style style:name="T351" style:family="text">
      <style:text-properties officeooo:rsid="021dd595"/>
    </style:style>
    <style:style style:name="T352" style:family="text">
      <style:text-properties officeooo:rsid="02398738"/>
    </style:style>
    <style:style style:name="T353" style:family="text">
      <style:text-properties officeooo:rsid="0239a9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I don’t have noodle arms!” Axel suddenly retracts his arms in front of his torso as if he just got caught naked.</text:span></text:p>
      <text:p text:style-name="P13"/>
      <text:p text:style-name="P13"><text:tab/>“<text:span text:style-name="T45">Yes you </text:span><text:span text:style-name="T46">do</text:span><text:span text:style-name="T45">,” she playfully teases him with her elbo</text:span><text:span text:style-name="T47">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text:span><text:span text:style-name="T48">puffing up</text:span><text:span text:style-name="T45"> her chest in the process. Alex catches himself right as his gaze was starting to linger a bit too long </text:span><text:span text:style-name="T49">on</text:span><text:span text:style-name="T45"> </text:span><text:span text:style-name="T50">not her arms</text:span><text:span text:style-name="T45">, but thankfully Beatrice </text:span><text:span text:style-name="T51">doesn’t</text:span><text:span text:style-name="T45"> seem to notice. </text:span></text:p>
      <text:p text:style-name="P13"/>
      <text:p text:style-name="P13"><text:tab/>“<text:span text:style-name="T51">My uncle runs a boxing club,” she explains. “I’ve been at it since I entered middle school. It really builds you mental, too! You quickly learn to be humble after a few jabs in the guts.”</text:span></text:p>
      <text:p text:style-name="P13"/>
      <text:p text:style-name="P13"><text:tab/>“<text:span text:style-name="T51">You do boxing </text:span><text:span text:style-name="T52">and</text:span><text:span text:style-name="T51"> dodgeball?” Axel blinks in surprise. “How many sports do you do actually?”</text:span></text:p>
      <text:p text:style-name="P13"/>
      <text:p text:style-name="P14"><text:tab/>“<text:span text:style-name="T51">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3">Damn, you’re an athlete,” Axel simply answers, back to finding is drink suddenly more interesting. “I thought I had a chance against you this morning, now it’s clear.”</text:span></text:p>
      <text:p text:style-name="P14"/>
      <text:p text:style-name="P14"><text:tab/>“<text:span text:style-name="T53">Don’t say that. Look,” she suddenly fishes for his phone in his pocket, and without his input, starts typing frenetically on the screen.</text:span></text:p>
      <text:p text:style-name="P14"/>
      <text:p text:style-name="P14"><text:tab/>“<text:span text:style-name="T53">You live in this town, right?”</text:span></text:p>
      <text:p text:style-name="P14"/>
      <text:p text:style-name="P14"><text:tab/>“<text:span text:style-name="T53">Uh, yeah,” he hesitates. “But what are you…”</text:span></text:p>
      <text:p text:style-name="P14"/>
      <text:p text:style-name="P14"><text:tab/>“<text:span text:style-name="T53">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3">B-But why?” he blurts out, surprised at the abrupt gesture.</text:span></text:p>
      <text:p text:style-name="P14"/>
      <text:p text:style-name="P14"><text:tab/>“<text:span text:style-name="T53">You said you can’t throw to save your life. So we’re gonna take an hour to </text:span><text:span text:style-name="T54">make sure you can at least beat a little girl” she jokes. “Who knows, maybe you’ll end up liking boxing more than dodgeball and you’ll join our club?”</text:span></text:p>
      <text:p text:style-name="P14"/>
      <text:p text:style-name="P14"><text:tab/>“<text:span text:style-name="T54">Yeah, right,” he rolls his eyes. “No way that’s gonna happen.”</text:span></text:p>
      <text:p text:style-name="P14"/>
      <text:p text:style-name="P14"><text:tab/>“<text:span text:style-name="T54">No way to know until you try,” she smiles – Alex suddenly felt more comfortable focusing on his glass – before downing her last bottle. “Just give it a go with me. As a way to apologize for knocking you out during ou</text:span><text:span text:style-name="T55">r</text:span><text:span text:style-name="T54"> match.”</text:span></text:p>
      <text:p text:style-name="P15"/>
      <text:p text:style-name="P16"><text:tab/><text:span text:style-name="T56">For a moment, he </text:span><text:span text:style-name="T57">considers simply</text:span><text:span text:style-name="T56"> refusing. The prospect of getting humiliated </text:span><text:span text:style-name="T57">once again didn’t really appeal to him. </text:span><text:span text:style-name="T58">His neighbour had joined her hands nervously behind her head to try and play it cool, allowing to catch a brief glimpse of the toned muscles on her midriff</text:span><text:span text:style-name="T56">. </text:span><text:span text:style-name="T58">The sight made him a bit queasy and forget what the topic of the discussion was for a second.</text:span></text:p>
      <text:p text:style-name="P16"/>
      <text:p text:style-name="P16"><text:tab/>“<text:span text:style-name="T56">Fine, I guess…” he sheepishly accepts, </text:span><text:span text:style-name="T58">prying his eyes away from – Wait, did she do that on purpose?</text:span></text:p>
      <text:p text:style-name="P16"/>
      <text:p text:style-name="P17"><text:span text:style-name="T59"><text:tab/>“</text:span><text:span text:style-name="T60">Great!” </text:span></text:p>
      <text:p text:style-name="P18"/>
      <text:p text:style-name="P17"><text:span text:style-name="T60"><text:tab/></text:span><text:span text:style-name="T61">With that, she pats him affectionately on the back and grabs her sports bag at her feet. </text:span><text:span text:style-name="T56">She seems genuinely glad he said yes.</text:span></text:p>
      <text:p text:style-name="P14"/>
      <text:p text:style-name="P14"><text:tab/>“<text:span text:style-name="T61">Well, I have to go,” she waves a hand at him. “And don’t you dare stand me up on this one!”</text:span></text:p>
      <text:p text:style-name="P14"/>
      <text:p text:style-name="P14"><text:tab/><text:span text:style-name="T62">She leaves the room to go home, leaving Alex alone with his thoughts. His phone still in hand, he couldn’t help but staring at her number, still not believing this was real.</text:span></text:p>
      <text:p text:style-name="P14"><text:soft-page-break/></text:p>
      <text:p text:style-name="P14"><text:tab/><text:span text:style-name="T63">Wait, did she set me up on a date? </text:span><text:span text:style-name="T62">Alex suddenly realized, the heat rising to his cheeks. </text:span><text:span text:style-name="T63">No, no, stop dreaming, man. </text:span><text:span text:style-name="T64">You’re just going to a sparring session, nothing more. With a girl that could punch all your teeth out, no need to worry here.</text:span></text:p>
      <text:p text:style-name="P19"/>
      <text:p text:style-name="P19"><text:tab/><text:span text:style-name="T65">He sighs, and grabs his bag as well to take his leave. On his way out, he hears giggles coming from the restroom, </text:span><text:span text:style-name="T66">coming from Leo and the girl he picked, who visibly are having way more fun than he does right now. Repressing the bitter feeling gripping his throat – and a blush, after hearing what they were getting up to – </text:span><text:span text:style-name="T67">he turns his back to the colorful lights of the bar and ventures into the </text:span><text:span text:style-name="T68">moonless night.</text:span></text:p>
      <text:p text:style-name="P19"/>
      <text:p text:style-name="P20">***</text:p>
      <text:p text:style-name="P20"/>
      <text:p text:style-name="P19"><text:tab/><text:span text:style-name="T69">Axel still isn’t sure if accepting Beatrice’s offer was a good idea. </text:span><text:span text:style-name="T70">T</text:span><text:span text:style-name="T69">he prospect of being beaten up for free didn’t match his description of a good time. </text:span><text:span text:style-name="T70">But it would have been impolite to ignore her, especially after she called him an hour earlier to make sure he wouldn’t back out at the last moment. She </text:span><text:span text:style-name="T71">sneakily took the chance</text:span><text:span text:style-name="T70"> last evening to take his number, too – the young boy didn’t know what to make of this information.</text:span></text:p>
      <text:p text:style-name="P19"/>
      <text:p text:style-name="P19"><text:tab/><text:span text:style-name="T72">The place itself wasn’t much – it looked like any school gym his class used to go in high school; maybe a bit cleaner and better maintained, as the paint seemed fresh and untainted by the black taint of exhaust gas. </text:span><text:span text:style-name="T73">From the outside, he could already hear the muffled calls and screams of the various trainees already at work.</text:span></text:p>
      <text:p text:style-name="P19"/>
      <text:p text:style-name="P21"><text:tab/>Stepping in<text:span text:style-name="T74">side</text:span>, he <text:span text:style-name="T74">is</text:span> glad to see the place ha<text:span text:style-name="T74">s</text:span> an AC installed. Still, the fusty smell was no different to the one in his dodgeball club, a mixture of old clothes and rubber <text:span text:style-name="T75">balls wore down</text:span> <text:span text:style-name="T76">by</text:span> years of abuse.</text:p>
      <text:p text:style-name="P21"/>
      <text:p text:style-name="P22"><text:tab/>Beatrice was already <text:span text:style-name="T77">on the ring. Axel walk</text:span><text:span text:style-name="T74">s</text:span><text:span text:style-name="T77"> up to the center of the gym, where multiple </text:span><text:span text:style-name="T78">duos </text:span><text:span text:style-name="T79">were</text:span><text:span text:style-name="T78"> </text:span><text:span text:style-name="T79">trading blows in a friendly spar</text:span><text:span text:style-name="T80">ring sessio</text:span><text:span text:style-name="T81">n</text:span><text:span text:style-name="T78">. The big girl, </text:span><text:span text:style-name="T74">wearing a red leather helmet and gloves,</text:span><text:span text:style-name="T78"> is up against </text:span><text:span text:style-name="T74">a man much older than her; given his more casual outfit, he could only be her teacher; maybe her uncle?</text:span></text:p>
      <text:p text:style-name="P22"/>
      <text:p text:style-name="P22"><text:tab/><text:span text:style-name="T82">Her opponent made quick work of her, however; </text:span><text:span text:style-name="T83">as she seemingly takes note of Axel’s presence, the </text:span><text:span text:style-name="T84">man sweeps her leg with a powerful kick and sends her head making acquaintances with the floor. The poor girl picks herself back up with a grunt, her traits contorted by exhaustion.</text:span></text:p>
      <text:p text:style-name="P22"/>
      <text:p text:style-name="P22"><text:tab/>“<text:span text:style-name="T84">Never </text:span><text:span text:style-name="T85">turn your back on your opponent,” the older man sighs. “Do you think that will be enough this time?”</text:span></text:p>
      <text:p text:style-name="P22"/>
      <text:p text:style-name="P22"><text:tab/>“<text:span text:style-name="T85">I didn’t turn my back.” she coughs </text:span><text:span text:style-name="T86">as she removes her helmet</text:span><text:span text:style-name="T85">. “I just thought I saw…”</text:span></text:p>
      <text:p text:style-name="P22"/>
      <text:p text:style-name="P22"><text:tab/><text:span text:style-name="T85">Her eyes scan the room, and her face lights up as soon as she spots Axel. </text:span><text:span text:style-name="T86">She trots up to him and gives him a light tap on the shoulder as a welcome gesture.</text:span></text:p>
      <text:p text:style-name="P22"><text:soft-page-break/></text:p>
      <text:p text:style-name="P22"><text:tab/>“<text:span text:style-name="T86">Hey Bee, uh, nice outfit,” he struggles to find the words. “Suits you.”</text:span></text:p>
      <text:p text:style-name="P22"/>
      <text:p text:style-name="P22"><text:tab/>“<text:span text:style-name="T86">Oh yeah, I dressed up to the nines waiting for you,” she smirks.</text:span></text:p>
      <text:p text:style-name="P22"/>
      <text:p text:style-name="P23"><text:tab/><text:span text:style-name="T86">He probably shouldn’t have said anything, but her appreciating for his attempt eases him up nonetheless. </text:span></text:p>
      <text:p text:style-name="P24"/>
      <text:p text:style-name="P24"><text:tab/>Behind her, the old man removes his helmet and extends his hand. His weathered skin and greying temples betrayed his age and fatigue, though the latter was probably more due to the extensive hour he spent coaching his students.</text:p>
      <text:p text:style-name="P24"/>
      <text:p text:style-name="P24"><text:tab/>“You must be Axel,” he greets him as the young man shakes his hand. “Bee couldn’t stop talking about you all day yesterday.”</text:p>
      <text:p text:style-name="P24"/>
      <text:p text:style-name="P25"><text:tab/>“<text:span text:style-name="T87">For fuck’s sake Bob, I told you about him only once!” Beatrice says as she plants her elbow in his side to make him quiet. </text:span></text:p>
      <text:p text:style-name="P25"/>
      <text:p text:style-name="P26"><text:tab/>“<text:span text:style-name="T88">You really thought I would</text:span><text:span text:style-name="T89">n’t notice</text:span><text:span text:style-name="T88"> </text:span><text:span text:style-name="T90">you being glued on your phone all last week? </text:span><text:span text:style-name="T91">You saw he didn’t come to the club...</text:span><text:span text:style-name="T92">”</text:span></text:p>
      <text:p text:style-name="P26"/>
      <text:p text:style-name="P26"><text:tab/>“<text:span text:style-name="T93">W</text:span>hy are you like this?”</text:p>
      <text:p text:style-name="P24"/>
      <text:p text:style-name="P24"><text:tab/>“’<text:span text:style-name="T87">Cause it’s about time you brought a friend to watch your matches. And ‘cause your mom won’t stop pestering you about it, y’know?”</text:span></text:p>
      <text:p text:style-name="P24"/>
      <text:p text:style-name="P24"><text:tab/>“<text:span text:style-name="T87">It’s none of her business,” the young girl retorts, hiding her face in her gloves to mask her embarrassment. Axel preferred changing the topic of the discussion before his blush became too evident:</text:span></text:p>
      <text:p text:style-name="P24"/>
      <text:p text:style-name="P24"><text:tab/>“<text:span text:style-name="T87">So, uh, you’re her uncle?” he asks. “This is your club?”</text:span></text:p>
      <text:p text:style-name="P24"/>
      <text:p text:style-name="P24"><text:tab/>“<text:span text:style-name="T94">Yup! I’m Bob, the owner of this club. You interested in boxing? We also do Savate to get the kids to work their legs too. But my big ol’ brute here...” Bob says as he ruffles his protege’s hair. “… Prefers to punch instead of working on her footwork.”</text:span></text:p>
      <text:p text:style-name="P24"/>
      <text:p text:style-name="P24"><text:tab/>“<text:span text:style-name="T94">I don’t need footwork if my opponent is already down,” she teases him in return.</text:span></text:p>
      <text:p text:style-name="P24"/>
      <text:p text:style-name="P24"><text:tab/>“<text:span text:style-name="T94">And you’ll never hit anything if he puts you down first. Anyway, you’re interested, Axel? Or did you just want to pay </text:span><text:span text:style-name="T92">Bee a visit?”</text:span></text:p>
      <text:p text:style-name="P24"/>
      <text:p text:style-name="P24"><text:tab/>“<text:span text:style-name="T92">Uh, actually…” he starts.</text:span></text:p>
      <text:p text:style-name="P24"/>
      <text:p text:style-name="P24"><text:tab/>“<text:span text:style-name="T92">He feels a bit down after losing out dodgeball match </text:span><text:span text:style-name="T95">the other day,” Beatrice </text:span><text:soft-page-break/><text:span text:style-name="T95">interrupts him. “So I invited him here for a sparring match to make him feel better!”</text:span></text:p>
      <text:p text:style-name="P24"/>
      <text:p text:style-name="P24"><text:tab/>“<text:span text:style-name="T95">Uh… Yeah, kinda,” he finishes, though he would have preferred not to pass as a sore loser. “But I think I’ll just sit and watch you guys have a fight…”</text:span></text:p>
      <text:p text:style-name="P24"/>
      <text:p text:style-name="P24"><text:tab/>“<text:span text:style-name="T95">No way,” she rebukes him.</text:span></text:p>
      <text:p text:style-name="P24"/>
      <text:p text:style-name="P24"><text:tab/><text:span text:style-name="T95">Beatrice dives for her bag at the feet of one of the corners of the ring, and brandishes a while helmet </text:span><text:span text:style-name="T96">similar to</text:span><text:span text:style-name="T95"> hers as well as a pair of gloves, </text:span><text:span text:style-name="T96">both </text:span><text:span text:style-name="T95">worn down and yellowed by </text:span><text:span text:style-name="T96">abuse</text:span><text:span text:style-name="T95"> over the years.</text:span></text:p>
      <text:p text:style-name="P24"/>
      <text:p text:style-name="P24"><text:tab/>“<text:span text:style-name="T97">I don’t know you</text:span><text:span text:style-name="T98">r</text:span><text:span text:style-name="T97"> size, but I think these should fit,” she proudly declares.</text:span></text:p>
      <text:p text:style-name="P24"/>
      <text:p text:style-name="P24"><text:tab/>“<text:span text:style-name="T99">No, really, I insist…”</text:span></text:p>
      <text:p text:style-name="P24"/>
      <text:p text:style-name="P24"><text:tab/>“<text:span text:style-name="T99">Yeah, I insist too,” she says as she drags him to the bench. “</text:span><text:span text:style-name="T100">Bob, do you mind if I skip for today to teach him instead?”</text:span></text:p>
      <text:p text:style-name="P24"/>
      <text:p text:style-name="P27"><text:tab/>“<text:span text:style-name="T100">Sure, big girl, knock him out.” </text:span></text:p>
      <text:p text:style-name="P27"/>
      <text:p text:style-name="P28"><text:tab/>With an amused grin, he turns tail to examine the rest of his students. Beatrice then drags Axel once again to a more secluded corner of the gym, away from the prying eyes and ears of her <text:span text:style-name="T101">now curious</text:span> cadets.</text:p>
      <text:p text:style-name="P28"/>
      <text:p text:style-name="P28"><text:tab/>“<text:span text:style-name="T102">Alright,” she says while raising her fists. “What’s the first rule of dodgeball?”</text:span></text:p>
      <text:p text:style-name="P28"/>
      <text:p text:style-name="P28"><text:tab/>“… <text:span text:style-name="T102">The heck this has to do with boxing?” Axel replies with a deadpan look.</text:span></text:p>
      <text:p text:style-name="P28"/>
      <text:p text:style-name="P28"><text:tab/>“<text:span text:style-name="T102">Boxing, dodgeball, it’s all the same. And the first rule is?”</text:span></text:p>
      <text:p text:style-name="P28"/>
      <text:p text:style-name="P28"><text:tab/>“<text:span text:style-name="T102">Uh… Dodge?”</text:span></text:p>
      <text:p text:style-name="P28"/>
      <text:p text:style-name="P28"><text:tab/>“<text:span text:style-name="T102">Wrong!”</text:span></text:p>
      <text:p text:style-name="P28"/>
      <text:p text:style-name="P28"><text:tab/><text:span text:style-name="T103">With that, she starts light jabs straight in his face; not hard enough to hurt him, but enough to make him stumble backwards while trying to hide his face from the flurry of fists flying his way.</text:span></text:p>
      <text:p text:style-name="P28"/>
      <text:p text:style-name="P28"><text:tab/>“<text:span text:style-name="T103">Hey! Stop!” he protests.</text:span></text:p>
      <text:p text:style-name="P28"/>
      <text:p text:style-name="P28"><text:tab/>“<text:span text:style-name="T104">Don’t look away from your opponent,” Beatrice speaks out. “How are you going to catch the ball if you never keep an eye on it?”</text:span></text:p>
      <text:p text:style-name="P28"/>
      <text:p text:style-name="P28"><text:tab/>“<text:span text:style-name="T104">You’re supposed to dodge the ball, </text:span><text:span text:style-name="T105">not</text:span><text:span text:style-name="T104"> – hey!” he stammers as his improvised coach </text:span><text:soft-page-break/><text:span text:style-name="T104">jabs him in the ribs.</text:span></text:p>
      <text:p text:style-name="P28"/>
      <text:p text:style-name="P28"><text:tab/>“<text:span text:style-name="T104">You’re never gonna win </text:span><text:span text:style-name="T106">anything by just dodging. You gotta be willing to put yourself out on the open. Taking risks.</text:span><text:span text:style-name="T104">” </text:span><text:span text:style-name="T106">Her rhythm intensifies. “And getting hurt.”</text:span></text:p>
      <text:p text:style-name="P28"/>
      <text:p text:style-name="P28"><text:tab/><text:span text:style-name="T107">She decides to stop once she sees Axel doesn’t respond to her jabs in kind, </text:span><text:span text:style-name="T108">preferring to rub his aching arms.</text:span></text:p>
      <text:p text:style-name="P28"/>
      <text:p text:style-name="P28"><text:tab/>“<text:span text:style-name="T109">Why did you choose to pick dodgeball, by the way?” Beatrice simply </text:span><text:span text:style-name="T110">asks</text:span><text:span text:style-name="T109">.</text:span></text:p>
      <text:p text:style-name="P28"/>
      <text:p text:style-name="P28"><text:tab/>“<text:span text:style-name="T110">Why do you ask?”</text:span></text:p>
      <text:p text:style-name="P28"/>
      <text:p text:style-name="P29"><text:tab/>“<text:span text:style-name="T111">Y</text:span><text:span text:style-name="T112">ou can’t handle </text:span><text:span text:style-name="T113">a jab in the guts</text:span><text:span text:style-name="T114">, </text:span><text:span text:style-name="T111">yet</text:span><text:span text:style-name="T114"> you play a game where </text:span><text:span text:style-name="T113">everyone tries to give each other a concussion. </text:span><text:span text:style-name="T115">Why?</text:span><text:span text:style-name="T113">”</text:span></text:p>
      <text:p text:style-name="P30"/>
      <text:p text:style-name="P30"><text:tab/>“<text:span text:style-name="T115">Because…” Axel takes a moment get his breath back. “I don’t know? My parents wanted me to pick up a sport before graduating. Some members of the clubs showed up at my uni to give us flyers. I went there to give it a try, ‘cuz why not? Why is this important?”</text:span></text:p>
      <text:p text:style-name="P30"/>
      <text:p text:style-name="P30"><text:tab/>“<text:span text:style-name="T115">What did you find interesting about it?”</text:span></text:p>
      <text:p text:style-name="P30"/>
      <text:p text:style-name="P30"><text:tab/>“<text:span text:style-name="T115">Uh, I don’t know?” he repeated. “I’ve never been in a sports club before. Leo and the others sold me that we would get to pummel kids during out matches. (He smirks.) I thought ‘yeah, could have some fun for once’, and so I tried it out? Didn’t give it much more thought than that.”</text:span></text:p>
      <text:p text:style-name="P30"/>
      <text:p text:style-name="P30"><text:tab/>“<text:span text:style-name="T115">So you do play for fun, right?”</text:span></text:p>
      <text:p text:style-name="P30"/>
      <text:p text:style-name="P30"><text:tab/>“<text:span text:style-name="T115">Well yeah, of course. I would have bailed after the first day if I didn’t. </text:span><text:span text:style-name="T116">It’s just…</text:span><text:span text:style-name="T115">”</text:span></text:p>
      <text:p text:style-name="P30"/>
      <text:p text:style-name="P30"><text:tab/><text:span text:style-name="T116">Axel hesitates to find the words.</text:span></text:p>
      <text:p text:style-name="P30"/>
      <text:p text:style-name="P31"><text:tab/>“<text:span text:style-name="T117">I didn’t ask to participate in the regionals. </text:span><text:span text:style-name="T118">It’s them who want to play in this damn tournament, </text:span><text:span text:style-name="T119">not me</text:span><text:span text:style-name="T118">. They added me to </text:span><text:span text:style-name="T120">fill</text:span><text:span text:style-name="T118"> the roster because we don’t have enough players in our club, </text:span><text:span text:style-name="T121">not because I’m good.</text:span><text:span text:style-name="T118">”</text:span></text:p>
      <text:p text:style-name="P31"/>
      <text:p text:style-name="P31"><text:tab/>“<text:span text:style-name="T117">Or maybe they added you because they enjoy spending time with you? Sometimes it’s that simple. No need to imagine problems where there are none.”</text:span></text:p>
      <text:p text:style-name="P31"/>
      <text:p text:style-name="P32"><text:tab/>“<text:span text:style-name="T117">Yeah, but it’s important to them. And I don’t want to disap</text:span><text:span text:style-name="T122">p</text:span><text:span text:style-name="T117">oint them, but that’s what’s gonna happen. I’m not an athlete, </text:span><text:span text:style-name="T122">I couldn’t catch a ball to save my life. I couldn’t even hit anyone during ou</text:span><text:span text:style-name="T123">r</text:span><text:span text:style-name="T122"> match the other day...”</text:span></text:p>
      <text:p text:style-name="P32"/>
      <text:p text:style-name="P32"/>
      <text:p text:style-name="P30"><text:soft-page-break/></text:p>
      <text:p text:style-name="P32"><text:tab/>“<text:span text:style-name="T118">Jesus Christ,” Beatrice sighs and throws her hands in the air</text:span><text:span text:style-name="T116">. “</text:span><text:span text:style-name="T118">You’re </text:span><text:span text:style-name="T117">still </text:span><text:span text:style-name="T124">making that face because of</text:span><text:span text:style-name="T117"> that one match</text:span><text:span text:style-name="T118">? </text:span><text:span text:style-name="T117">What’s your reaction gonna </text:span><text:span text:style-name="T124">be </text:span><text:span text:style-name="T117">once you’re in the actual tournament? You think you can win with that mentality?</text:span><text:span text:style-name="T118">”</text:span></text:p>
      <text:p text:style-name="P33"/>
      <text:p text:style-name="P33"><text:tab/>“<text:span text:style-name="T116">I know I sound like a sore loser, but it’s just…” </text:span></text:p>
      <text:p text:style-name="P34"/>
      <text:p text:style-name="P34"><text:tab/><text:span text:style-name="T122">He hesitates once again. His fingers hurt with how hard he clenches his fists in frustration.</text:span></text:p>
      <text:p text:style-name="P34"/>
      <text:p text:style-name="P34"><text:tab/>“It just feels <text:span text:style-name="T122">terrible</text:span> when you give your best, and your best just isn’t good enough.”</text:p>
      <text:p text:style-name="P33"/>
      <text:p text:style-name="P33"><text:tab/>“<text:span text:style-name="T116">Why are you so convinced what you are isn’t good enough?”</text:span></text:p>
      <text:p text:style-name="P33"/>
      <text:p text:style-name="P32"><text:tab/>“<text:span text:style-name="T122">Because we lost anyway, </text:span><text:span text:style-name="T124">and that’s all that matters</text:span><text:span text:style-name="T117">.</text:span><text:span text:style-name="T118"> </text:span><text:span text:style-name="T117">A</text:span><text:span text:style-name="T118">nd I feel like shit for letting the others down, </text:span><text:span text:style-name="T117">because I’m not good enough</text:span><text:span text:style-name="T118">. </text:span><text:span text:style-name="T117">There, I said it, happy?</text:span><text:span text:style-name="T118">” he answers, raising his voice a bit higher than he intended. </text:span></text:p>
      <text:p text:style-name="P30"/>
      <text:p text:style-name="P30"><text:tab/><text:span text:style-name="T117">Axel goes back </text:span><text:span text:style-name="T120">and sits on</text:span><text:span text:style-name="T117"> the bench. Beatrice stays quiet for a few seconds, </text:span><text:span text:style-name="T120">because making a beeline to her uncle. They exchange words Axel cannot hear, before she disappears in a neighbouring room. Axel sighs and starts removing his gear, thinking she was done for the day. </text:span><text:span text:style-name="T125">But then, as he was about to grab his bag, here she comes with a light jog, two leather balls in her hands. The young man barely has the time to bring his hands closer to catch the cannonball his friend threw at his face. And even after an hour of boxing, she was still full of energy – Axel almost tripped due to the strength of the throw.</text:span></text:p>
      <text:p text:style-name="P30"/>
      <text:p text:style-name="P30"><text:tab/>“<text:span text:style-name="T125">So you </text:span><text:span text:style-name="T126">can</text:span><text:span text:style-name="T125"> catch a ball,” she points out.</text:span></text:p>
      <text:p text:style-name="P30"/>
      <text:p text:style-name="P30"><text:tab/>“… ‘<text:span text:style-name="T125">Twas just a reflex. I didn’t think about it.”</text:span></text:p>
      <text:p text:style-name="P30"/>
      <text:p text:style-name="P30"><text:tab/>“<text:span text:style-name="T125">Then stop thinking. It doesn’t suit you.” she smirks. “Follow me, we’re gonna train in the back”.</text:span></text:p>
      <text:p text:style-name="P30"/>
      <text:p text:style-name="P35"><text:tab/><text:span text:style-name="T127">Axel begrudgingly follows her outside, he who had hoped he would not have to deal with the heat again for a while. </text:span></text:p>
      <text:p text:style-name="P36"/>
      <text:p text:style-name="P36"><text:tab/>The back <text:span text:style-name="T128">room</text:span> of the gym wasn’t <text:span text:style-name="T129">much smaller than the previous room</text:span>; basically a continuation of the <text:span text:style-name="T128">main gym, now used mainly as a storage room for the students’ equipment</text:span>. The place wasn’t <text:span text:style-name="T129">well tidied up</text:span>, but at least it was <text:span text:style-name="T129">away from any pair of prying eyes</text:span>. Beatrice <text:span text:style-name="T130">places</text:span> <text:span text:style-name="T130">him back against the wall and gives him one of her balls before planting herself in front of him ten meters away.</text:span></text:p>
      <text:p text:style-name="P36"/>
      <text:p text:style-name="P36"><text:tab/>“<text:span text:style-name="T131">During our match, I noticed you tend to go back up when your opponent has the ball,” she says, raising her voice a bit so he can hear her clearly. “That’s fine if you intend to catch, </text:span><text:soft-page-break/><text:span text:style-name="T131">but </text:span><text:span text:style-name="T132">that won’t be enough if they just gang up on you. So now with the wall behind you, you won’t be able to run away anymore.”</text:span></text:p>
      <text:p text:style-name="P36"/>
      <text:p text:style-name="P36"><text:tab/><text:span text:style-name="T132">She punches the ball with one hand in a thunderous ‘thud’ sound.</text:span></text:p>
      <text:p text:style-name="P36"/>
      <text:p text:style-name="P36"><text:tab/>“<text:span text:style-name="T132">So you dodge the ball by the side and you throw them back to me. If you try to block or catch’em </text:span><text:span text:style-name="T133">mid air</text:span><text:span text:style-name="T132"> I’ll stop holding back </text:span><text:span text:style-name="T134">until you dodge them again</text:span><text:span text:style-name="T132">, capische?”</text:span></text:p>
      <text:p text:style-name="P36"/>
      <text:p text:style-name="P36"><text:tab/><text:span text:style-name="T134">Axel wasn’t so sure this was a good method for training; not that he could voice his opinion, as the first ball already shot towards </text:span><text:span text:style-name="T133">his face</text:span><text:span text:style-name="T134"> in a blur. </text:span><text:span text:style-name="T133">He dodged, barely, and the impact against the wall sent a shockwave drilling into his ears.</text:span></text:p>
      <text:p text:style-name="P36"/>
      <text:p text:style-name="P36"><text:tab/>“<text:span text:style-name="T135">Hey! Just… Just be gentle, okay?” he pleads.</text:span></text:p>
      <text:p text:style-name="P36"/>
      <text:p text:style-name="P37"><text:tab/><text:span text:style-name="T135">In front of him, Beatrice adorn</text:span><text:span text:style-name="T136">s</text:span><text:span text:style-name="T135"> a predatory grin. </text:span><text:span text:style-name="T128">The ball rolls at her feet, which she picks and throws back at </text:span><text:span text:style-name="T137">him with her full strength. Again, Axel barely has the time to react before it hits his left leg with an explosive sound. </text:span><text:span text:style-name="T138">With a grunt, he throws it back. </text:span></text:p>
      <text:p text:style-name="P38"/>
      <text:p text:style-name="P38"><text:tab/>As their little game goes on, Axel could feel the strain on its body <text:span text:style-name="T139">starting to gnaw at his </text:span><text:span text:style-name="T140">knees</text:span>. For the next ones, he has to throw his entire weight on the ground as Beatrice picks up the pace of her throws, getting faster and stronger by the minute. <text:span text:style-name="T141">S</text:span><text:span text:style-name="T142">eeing the determination in her eyes refrains him from complaining.</text:span></text:p>
      <text:p text:style-name="P38"/>
      <text:p text:style-name="P39"><text:tab/><text:span text:style-name="T142">Eventually, they settled on </text:span><text:span text:style-name="T143">a somewhat comfortable pace. </text:span><text:span text:style-name="T141">Axel could see Beatrice was </text:span><text:span text:style-name="T144">more</text:span><text:span text:style-name="T141"> having fun than actually training him, even if the</text:span><text:span text:style-name="T142"> </text:span><text:span text:style-name="T141">exercise itself</text:span><text:span text:style-name="T142"> was not much different from what he was used to. </text:span><text:span text:style-name="T144">Eventually, he caught himself throwing the ball back in an attempt to hit her, and the session quickly turned into a faux dodgeball match. </text:span><text:span text:style-name="T145">For a brief moment, he felt his step quicker and his body lighter, as if the memory of his previous defeat was nothing but a distant nightmare weighing on his shoulders.</text:span></text:p>
      <text:p text:style-name="P39"/>
      <text:p text:style-name="P39"><text:tab/>“<text:span text:style-name="T146">Bee!” </text:span><text:span text:style-name="T147">a voice calls out to her.</text:span></text:p>
      <text:p text:style-name="P39"/>
      <text:p text:style-name="P40"><text:tab/>The sound of the door knob turning fills the room before a head peeks out from the doorway; it was her uncle.</text:p>
      <text:p text:style-name="P40"/>
      <text:p text:style-name="P40"><text:tab/>“It’s time to go home, big girl,” Bob declares. “The others are packing their bags already. You’ll give him cooties later.”</text:p>
      <text:p text:style-name="P40"/>
      <text:p text:style-name="P40"><text:tab/>“Bob, god dammit!” she snaps back, but he is already gone.</text:p>
      <text:p text:style-name="P40"/>
      <text:p text:style-name="P40"><text:tab/>She buries her beet-red face in her hands in embarrassment, and Alex tries to think of anything to skip this awkward moment.</text:p>
      <text:p text:style-name="P41"><text:tab/></text:p>
      <text:p text:style-name="P41"><text:tab/>“So, ah, <text:span text:style-name="T148">I’ll be on my way then.</text:span> <text:span text:style-name="T148">See you at the tournament?”</text:span></text:p>
      <text:p text:style-name="P41"><text:soft-page-break/></text:p>
      <text:p text:style-name="P41"><text:tab/>“<text:span text:style-name="T148">Y-</text:span><text:span text:style-name="T149">Y</text:span><text:span text:style-name="T148">eah, see ya,” she answers, but seemingly finds the other side of the room more interesting.</text:span></text:p>
      <text:p text:style-name="P41"/>
      <text:p text:style-name="P41"><text:tab/><text:span text:style-name="T148">Axel returns to the main room </text:span><text:span text:style-name="T149">before the situation becomes </text:span><text:span text:style-name="T150">even worse</text:span><text:span text:style-name="T148">. Most of the students were already gone. He makes a beeline for the bench where he left his bag, </text:span><text:span text:style-name="T149">still unable the shake off the </text:span><text:span text:style-name="T150">fuzzy feeling inside his chest.</text:span></text:p>
      <text:p text:style-name="P41"/>
      <text:p text:style-name="P41"><text:tab/><text:span text:style-name="T151">It was just because Bob likes to mess with her, right?</text:span><text:span text:style-name="T150"> He thought to himself. </text:span><text:span text:style-name="T151">She didn’t really </text:span><text:span text:style-name="T152">try to</text:span><text:span text:style-name="T151">… No, no, forget it.</text:span><text:span text:style-name="T152"> Not a chance </text:span><text:span text:style-name="T153">she would be..</text:span><text:span text:style-name="T152">.</text:span></text:p>
      <text:p text:style-name="P41"/>
      <text:p text:style-name="P41"><text:tab/>“<text:span text:style-name="T148">Wait!”</text:span></text:p>
      <text:p text:style-name="P41"/>
      <text:p text:style-name="P41"><text:tab/><text:span text:style-name="T148">She rushes to the other side of the room where her own bag was, grabs something inside one of its pockets, and runs back to Axel with some sort of paper in her hand.</text:span></text:p>
      <text:p text:style-name="P41"/>
      <text:p text:style-name="P41"><text:tab/>“<text:span text:style-name="T148">There you go. I got a free ticket from the organizers, so I thought you might need to think about something else for a change.”</text:span></text:p>
      <text:p text:style-name="P41"/>
      <text:p text:style-name="P42">Axel grabs the paper, and raises an eyebrow when he sees the title for the event she was attending.</text:p>
      <text:p text:style-name="P42"/>
      <text:p text:style-name="P42"><text:tab/>“You’re having a boxing tournament too?”</text:p>
      <text:p text:style-name="P42"/>
      <text:p text:style-name="P42"><text:tab/>“Yup!” she proudly exclaims with her hands on her hips. “And you <text:span text:style-name="T1">have</text:span> to come and watch it!”</text:p>
      <text:p text:style-name="P42"/>
      <text:p text:style-name="P42"><text:tab/>“Where on earth do you find the energy to compete in two sports?”</text:p>
      <text:p text:style-name="P42"/>
      <text:p text:style-name="P42"><text:tab/>“Well, you gotta have a cause to fight for,” she smiles, being so corny Axel can’t help himself but smile. “But seriously. It’s mostly to help my uncle out.”</text:p>
      <text:p text:style-name="P42"/>
      <text:p text:style-name="P42"><text:tab/>“Why?”</text:p>
      <text:p text:style-name="P42"/>
      <text:p text:style-name="P42"><text:tab/>“Well,” she gestures him to follow her outside to make sure no one would hear her. “You noticed how few students this place has?”</text:p>
      <text:p text:style-name="P42"/>
      <text:p text:style-name="P42"><text:tab/>“Uh, not really. I always thought this was normal for fighting clubs.”</text:p>
      <text:p text:style-name="P42"/>
      <text:p text:style-name="P42"><text:tab/>“Nah. Bob used to have more students back when I started. <text:span text:style-name="T154">But recently there’s been a new sports club opening a few blocks away. The owner is super rich and it’s starting to outdo smaller clubs like ours in the area. But the tournament offers some cash as prize for the winner, so I hope it’ll help my unc’ stay afloat for a while.”</text:span></text:p>
      <text:p text:style-name="P42"/>
      <text:p text:style-name="P42"><text:tab/>“… <text:span text:style-name="T154">Wow, that’s really noble of you. Your uncle is lucky to have you.” Axel comments, </text:span><text:soft-page-break/><text:span text:style-name="T154">impressed.</text:span></text:p>
      <text:p text:style-name="P42"/>
      <text:p text:style-name="P42"><text:tab/>“<text:span text:style-name="T154">It’s nothing really, I’m just helping out my family, is all,” she answers, trying to sound unfazed, but the faint blush on her cheeks shows she appreciates the compliment.</text:span></text:p>
      <text:p text:style-name="P36"/>
      <text:p text:style-name="P36"><text:tab/>“… <text:span text:style-name="T154">But,” he continues. “That’s only if you win. You don’t know who’s gonna be up against you. What if they’ve trained since they’re born, type of boxer? You’re just gonna get smacked onto the ground.”</text:span></text:p>
      <text:p text:style-name="P36"/>
      <text:p text:style-name="P36"><text:tab/>“<text:span text:style-name="T154">Well I’ll smack them harder,” she says. “That’s the only shot I get of making the daughter of Mr. ‘I-shit-gold-all-day’ eat back her own shit.”</text:span></text:p>
      <text:p text:style-name="P36"/>
      <text:p text:style-name="P36"><text:tab/>“<text:span text:style-name="T154">Oh, you know her?”</text:span></text:p>
      <text:p text:style-name="P36"/>
      <text:p text:style-name="P36"><text:tab/>“<text:span text:style-name="T154">Met her a few times during inter-club events” she growls. “Dumb bitch thinks she’s the shit </text:span><text:span text:style-name="T155">because her dad hired a pro boxer for her. She’s insufferable to everyone. Honestly I just to be next week already.”</text:span></text:p>
      <text:p text:style-name="P36"/>
      <text:p text:style-name="P36"><text:tab/>“<text:span text:style-name="T155">You’re pumped up for this? Not anxious or anything?”</text:span></text:p>
      <text:p text:style-name="P36"/>
      <text:p text:style-name="P36"><text:tab/>“<text:span text:style-name="T155">Nah, because I’ll win,” she half-jokes, making herself giggle.</text:span></text:p>
      <text:p text:style-name="P36"/>
      <text:p text:style-name="P36"><text:tab/><text:span text:style-name="T155">Axel can’t help himself but smile at seeing her laugh.She wasn’t feeling any kind of pressure for the tournament; she was looking forward to it with joy, even though the odds were against her. Her confidence makes him envious. </text:span></text:p>
      <text:p text:style-name="P36"/>
      <text:p text:style-name="P36"><text:tab/>“<text:span text:style-name="T156">Bee, I never asked, but… Why did you pick up boxing to begin with?”</text:span></text:p>
      <text:p text:style-name="P36"/>
      <text:p text:style-name="P36"><text:tab/>“<text:span text:style-name="T156">Because it’s fun!” she simply replies. “I get to see the family more often, I learn to defend myself, and I get to kick ass. And where else could I get this body of dreams?”</text:span></text:p>
      <text:p text:style-name="P36"/>
      <text:p text:style-name="P36"><text:tab/><text:span text:style-name="T156">She flexes her arm as to prove her point, but Axel knows it was just a lighthearted joke. Still, seeing her biceps reminds him of the time at that bar where he got to peek at her abs, and the mental image of her toned, athletic body marked with battle scars and ripped muscles, makes him feel </text:span><text:span text:style-name="T157">fuzzy</text:span><text:span text:style-name="T158"> inside, despite his best attempts at self-control.</text:span></text:p>
      <text:p text:style-name="P36"/>
      <text:p text:style-name="P36"><text:tab/>“<text:span text:style-name="T159">But,” he focuses back on the conversation. “</text:span><text:span text:style-name="T160">What if you get hurt so badly you can’t fight anymore?”</text:span></text:p>
      <text:p text:style-name="P36"/>
      <text:p text:style-name="P36"><text:tab/>“<text:span text:style-name="T160">Then so what? It doesn’t matter. It’s not the end result that keeps me going, it’s the people who support me, my parents, the friends I made at the gym. It’s seeing how much I kick ass now compared to when I started. Can you believe I was as scrawny back then as you are now?”</text:span></text:p>
      <text:p text:style-name="P36"/>
      <text:p text:style-name="P36"><text:tab/>“<text:span text:style-name="T160">Hey, I’m not scrawny!” Axel protests.</text:span></text:p>
      <text:p text:style-name="P36"><text:soft-page-break/></text:p>
      <text:p text:style-name="P36"><text:tab/>“<text:span text:style-name="T161">Yes you are, you throw like a girl,” she playfully elbows him, clearly not really serious about it. “But really, it’s really satisfying when you see how far you’ve come. So what if you get hurt, or never win tournaments? What matters is </text:span><text:span text:style-name="T162">to see how much better you’ve become at the things you love. It’s</text:span><text:span text:style-name="T161"> the journey, not the destination.”</text:span></text:p>
      <text:p text:style-name="P36"/>
      <text:p text:style-name="P36"><text:tab/>“… <text:span text:style-name="T163">I see.”</text:span></text:p>
      <text:p text:style-name="P36"/>
      <text:p text:style-name="P43"><text:tab/><text:span text:style-name="T163">There was an honesty in her words that makes Axel hesitate. </text:span><text:span text:style-name="T164">He who has been a slow learner and a mediocre player his entire life, he has never been the fastest, the strongest, nor the smartest of players, never managing once to see what little good his efforts produced</text:span><text:span text:style-name="T163">. </text:span><text:span text:style-name="T164">The fear of failing his friends and family has always been the chain holding him back. Could he actually do it?</text:span></text:p>
      <text:p text:style-name="P43"/>
      <text:p text:style-name="P43"><text:tab/>“<text:span text:style-name="T165">Yeah, we all get setbacks from time to time”, she resumes after a pause. “And </text:span><text:span text:style-name="T166">yeah,</text:span><text:span text:style-name="T165"> it sucks. There were fights I lost where I just wanted to just throw in the towel and give up. But what would that change? Would that be really all I’m capable for? Would I be okay to live with the idea that I abandoned the people who gave me a chance? I don’t want to be a waste of time to my uncle, and I want to accomplish something I’ll still be proud of in ten years. So what if it hurts? What if I lose? </text:span><text:span text:style-name="T167">I’ll just try again. </text:span><text:span text:style-name="T165">It’s still miles better than abandoning those who trusted me.”</text:span></text:p>
      <text:p text:style-name="P43"/>
      <text:p text:style-name="P43"><text:tab/><text:span text:style-name="T168">As he stared at the road in front of his feet, he felt Beatrice’s massive hand land on his back. The impact makes him almost fall over.</text:span></text:p>
      <text:p text:style-name="P43"/>
      <text:p text:style-name="P43"><text:tab/>“<text:span text:style-name="T168">Alright, I’ll go join my uncle in the car.” she declares. “See ya at the tournament.”</text:span></text:p>
      <text:p text:style-name="P43"/>
      <text:p text:style-name="P43"><text:tab/><text:span text:style-name="T168">She waves at him, then adds:</text:span></text:p>
      <text:p text:style-name="P43"/>
      <text:p text:style-name="P43"><text:tab/>“<text:span text:style-name="T169">That was fun. We should do that more often. </text:span><text:span text:style-name="T168">And stop thinking about it </text:span><text:span text:style-name="T170">all</text:span><text:span text:style-name="T168">. Told you it doesn’t suit you.”</text:span></text:p>
      <text:p text:style-name="P44"/>
      <text:p text:style-name="P44"><text:tab/><text:span text:style-name="T171">Axel watches her walk back up to the gym for a while, until she disappears by the front door, before going on his way as well. </text:span>A part of him still couldn’t shake off the feeling of inadequacy ingrained in him, but that <text:span text:style-name="T172">nagging voice in his head</text:span> was no longer as loud as before.</text:p>
      <text:p text:style-name="P44"/>
      <text:p text:style-name="P36"/>
      <text:p text:style-name="P45">***</text:p>
      <text:p text:style-name="P45"/>
      <text:p text:style-name="P46"><text:tab/><text:span text:style-name="T173">They won the qua</text:span><text:span text:style-name="T174">r</text:span><text:span text:style-name="T173">ter-finals. A victory by a single set of difference, but a victory nonetheless. </text:span><text:span text:style-name="T175">Axel wipes the sweat off his face, </text:span><text:span text:style-name="T176">eyes</text:span><text:span text:style-name="T175"> </text:span><text:span text:style-name="T177">fix</text:span><text:span text:style-name="T178">at</text:span><text:span text:style-name="T177">ed on the scoreboard.</text:span><text:span text:style-name="T179"> </text:span><text:span text:style-name="T180">His tinnitus </text:span><text:span text:style-name="T179">from the intense effort</text:span><text:span text:style-name="T180"> drowned the screams of joy of his comrades. </text:span><text:span text:style-name="T181">He doesn’t share the</text:span><text:span text:style-name="T182">ir</text:span><text:span text:style-name="T181"> enthusiasm, however; it was too good to be true, </text:span><text:span text:style-name="T182">he </text:span><text:span text:style-name="T183">feels.</text:span></text:p>
      <text:p text:style-name="P46"/>
      <text:p text:style-name="P46"><text:tab/>“<text:span text:style-name="T184">Hey Axel!” his friend Leo called him over. “You’re still up for the party tonight? Told’ya we’d pass!”</text:span></text:p>
      <text:p text:style-name="P46"><text:soft-page-break/></text:p>
      <text:p text:style-name="P47"><text:tab/>“<text:span text:style-name="T184">Oh, uhm, </text:span><text:span text:style-name="T185">yeah, sure. Give me a second.</text:span><text:span text:style-name="T184">” </text:span></text:p>
      <text:p text:style-name="P47"/>
      <text:p text:style-name="P48"><text:span text:style-name="T184"><text:tab/></text:span><text:span text:style-name="T186">He eventually joins the others in the boys’ locker room and collapses on the closest bench, the exhaustion finally catching up to him. The adrenaline that kept him going for minutes on end finally recedes, leaving place to… Contentment? </text:span><text:span text:style-name="T187">He couldn’t describe it with words. He was happy the match was over, and he knows he should be celebrating with the others, but he doesn’t want to get his hopes up. Their victory only leaves a bitter taste in his mouth, like it was a stroke of dumb luck.</text:span></text:p>
      <text:p text:style-name="P47"/>
      <text:p text:style-name="P49"><text:tab/><text:span text:style-name="T187">His hand reflexively reaches for his bag and dives for a crumpled piece of paper. </text:span><text:span text:style-name="T188">He couldn’t tell why he feels the need to look back at Beatrice’s invitation all of a sudden, </text:span><text:span text:style-name="T184">but the mere sight of it makes his heart sink. </text:span><text:span text:style-name="T185">The due date for her boxing match was today, the same day as his own dodgeball match. Hers had probably already started by now.</text:span></text:p>
      <text:p text:style-name="P49"/>
      <text:p text:style-name="P49"><text:tab/>“<text:span text:style-name="T189">What’s that?” Leo asks, inching closer to take a better look.</text:span></text:p>
      <text:p text:style-name="P49"/>
      <text:p text:style-name="P49"><text:tab/>“<text:span text:style-name="T190">Just something Bee gave me.”</text:span></text:p>
      <text:p text:style-name="P49"/>
      <text:p text:style-name="P49"><text:tab/>“<text:span text:style-name="T190">Bee?”</text:span></text:p>
      <text:p text:style-name="P49"/>
      <text:p text:style-name="P49"><text:tab/>“<text:span text:style-name="T190">Beatrice, the captain of the Hyenas, you remember? We had a match with them </text:span><text:span text:style-name="T191">a while ago</text:span><text:span text:style-name="T190">.”</text:span></text:p>
      <text:p text:style-name="P46"/>
      <text:p text:style-name="P46"><text:tab/>“<text:span text:style-name="T191">Oh yeah, them. </text:span><text:span text:style-name="T192">They’re in the tournament too. Maybe we’ll see them in the finals.”</text:span></text:p>
      <text:p text:style-name="P46"/>
      <text:p text:style-name="P46"><text:tab/>“<text:span text:style-name="T192">If we get there, that is.”</text:span></text:p>
      <text:p text:style-name="P46"/>
      <text:p text:style-name="P46"><text:tab/>“<text:span text:style-name="T192">Geez man,” Leo sighs. “I don’t wanna hear you bring down the mood tonight, so cheer up for tonight, will you?”</text:span></text:p>
      <text:p text:style-name="P46"/>
      <text:p text:style-name="P46"><text:tab/>“<text:span text:style-name="T192">Oh, uhm, about the party…”</text:span></text:p>
      <text:p text:style-name="P46"/>
      <text:p text:style-name="P46"><text:tab/>“<text:span text:style-name="T192">Wait, that’s a ticket for a boxing match?” Leo asks after deciphering the paper. He pries it from Axel’s hands to take a better look. “Oh, that girl does boxing too? That explains why she’s goddamn ripped. Wait, the date’s today?”</text:span></text:p>
      <text:p text:style-name="P46"/>
      <text:p text:style-name="P46"><text:tab/><text:span text:style-name="T192">Axel takes the ticket back and shoves it in his bag.</text:span></text:p>
      <text:p text:style-name="P46"/>
      <text:p text:style-name="P46"><text:tab/>“<text:span text:style-name="T192">Oh okay, I didn’t know you promised her to see her match,” Leo says. “I’ll tell the others you’ll be busy for tonight.”</text:span></text:p>
      <text:p text:style-name="P46"/>
      <text:p text:style-name="P46"><text:tab/>“<text:span text:style-name="T192">Actually...” Leo hesitates. “I… Don’t know if I’ll go.”</text:span></text:p>
      <text:p text:style-name="P46"/>
      <text:p text:style-name="P46"><text:soft-page-break/><text:tab/>“<text:span text:style-name="T192">What?” Leo exclaims. “Why? She’s the one who gave it to you, right?”</text:span></text:p>
      <text:p text:style-name="P46"/>
      <text:p text:style-name="P46"><text:tab/>“<text:span text:style-name="T192">Yeah, but… </text:span><text:span text:style-name="T193">I don’t know jack about boxing, I’m not even interested by it. I don’t even know why she bothered giving this to me.”</text:span></text:p>
      <text:p text:style-name="P46"/>
      <text:p text:style-name="P46"><text:tab/>“<text:span text:style-name="T193">Dude, you serious? A girl just gave you a ticket to watch her fight at her tournament and you’re gonna dip? Wait, you’ve been at her club before?”</text:span></text:p>
      <text:p text:style-name="P46"/>
      <text:p text:style-name="P46"><text:tab/>“<text:span text:style-name="T193">Yeah, she called me last week to come over and take a jab at boxing. But I suck at it, obviously.”</text:span></text:p>
      <text:p text:style-name="P46"/>
      <text:p text:style-name="P46"><text:tab/><text:span text:style-name="T193">Leo stares at him in disbelief for a couple of seconds, before bursting into laughter. His sudden reaction catches Axel off-guard.</text:span></text:p>
      <text:p text:style-name="P46"/>
      <text:p text:style-name="P46"><text:tab/>“<text:span text:style-name="T193">W-What?” Axel asks defensively.</text:span></text:p>
      <text:p text:style-name="P46"/>
      <text:p text:style-name="P46"><text:tab/>“<text:span text:style-name="T193">My dude, you’re one dense motherfucker,” Leo manages to spit between two fits of giggles. “So you’re telling me a girl – that’s </text:span><text:span text:style-name="T194">jacked</text:span><text:span text:style-name="T193"> as fuck – gave you her number, took you on a date at her club, and you still not see where she’s going with that ticket?”</text:span></text:p>
      <text:p text:style-name="P46"/>
      <text:p text:style-name="P46"><text:tab/><text:span text:style-name="T193">Axel could feel the heat rise up to his cheeks.</text:span></text:p>
      <text:p text:style-name="P46"/>
      <text:p text:style-name="P46"><text:tab/>“<text:span text:style-name="T193">N-No way dude, you’re just imagining things,” he replies.</text:span></text:p>
      <text:p text:style-name="P46"/>
      <text:p text:style-name="P46"><text:tab/>“<text:span text:style-name="T195">Dude, she likes you,” Leo simply states. “</text:span><text:span text:style-name="T196">Go ahead dude, I’ll tell the others you’re busy for today.”</text:span></text:p>
      <text:p text:style-name="P46"/>
      <text:p text:style-name="P50"><text:span text:style-name="T197"><text:tab/></text:span>For a moment, Axel could only stutter. </text:p>
      <text:p text:style-name="P50"/>
      <text:p text:style-name="P51"><text:tab/>“<text:span text:style-name="T198">B-But…” he stammers, struggling for words. “I-I don’t even do boxing. And I’m not even a good dodgeball player.”</text:span></text:p>
      <text:p text:style-name="P51"/>
      <text:p text:style-name="P51"><text:tab/><text:span text:style-name="T199">H</text:span><text:span text:style-name="T198">e trie</text:span><text:span text:style-name="T199">s</text:span><text:span text:style-name="T198"> to come up with something, anything that could rationally refute his friend’s assumption. His mind </text:span><text:span text:style-name="T200">goes</text:span><text:span text:style-name="T198"> blank, in turmoil with all the emotions </text:span><text:span text:style-name="T201">and intrusive thoughts racing in his head.</text:span></text:p>
      <text:p text:style-name="P51"/>
      <text:p text:style-name="P51"><text:tab/>“<text:span text:style-name="T194">Y</text:span><text:span text:style-name="T198">ou think she sent </text:span><text:span text:style-name="T202">me</text:span><text:span text:style-name="T198"> a ticket?” Leo resumes. “Nah </text:span><text:span text:style-name="T203">bro</text:span><text:span text:style-name="T198">, listen. </text:span><text:span text:style-name="T169">Girls don’t care if you’re good about sports. </text:span><text:span text:style-name="T204">Make her spend a good time whenever you’re around, and make her know you enjoy her presence. That’s enough to make </text:span><text:span text:style-name="T205">her</text:span><text:span text:style-name="T204"> happy</text:span><text:span text:style-name="T203">.”</text:span></text:p>
      <text:p text:style-name="P51"/>
      <text:p text:style-name="P51"><text:tab/>“<text:span text:style-name="T206">You can’t even keep a girl for longer than a week,” Axel points out.</text:span></text:p>
      <text:p text:style-name="P51"/>
      <text:p text:style-name="P51"><text:tab/>“<text:span text:style-name="T206">I still fuck </text:span><text:span text:style-name="T207">more</text:span><text:span text:style-name="T206"> often than you do.”</text:span></text:p>
      <text:p text:style-name="P51"/>
      <text:p text:style-name="P51"><text:soft-page-break/><text:tab/>“<text:span text:style-name="T206">Fuck you too, bro”, Axel lightly punches him in the shoulder, making his friend laugh.</text:span></text:p>
      <text:p text:style-name="P51"/>
      <text:p text:style-name="P51"><text:tab/>“<text:span text:style-name="T206">Hey, it’s because I chose to, okay?” Leo says. “But really, Axel. Stop imagining the worst. She probably doesn’t have many people cheering her during her matches. She’ll be thrilled to have you around. Don’t worry about the party and just </text:span><text:span text:style-name="T208">g</text:span><text:span text:style-name="T206">o </text:span><text:span text:style-name="T209">support</text:span><text:span text:style-name="T206"> her. You’ll regret it if you don’t.”</text:span></text:p>
      <text:p text:style-name="P51"/>
      <text:p text:style-name="P52"><text:tab/><text:span text:style-name="T210">With that, Leo gives him a</text:span><text:span text:style-name="T209">n</text:span><text:span text:style-name="T210"> encouraging pat on the back and goes off to join the rest of the team. </text:span><text:span text:style-name="T197">Axel’s gaze rests on his ticket, his mind in turmoil from the overload of emotions. </text:span>Up until now, his brain couldn’t to connect the dots when deciphering Beatrice’s surprising friendliness towards him. Or rather, it <text:span text:style-name="T1">refused</text:span> to do so. Axel simply couldn’t conceive the idea that a girl so fit and bubbly could have even a passing interest in someone like him. <text:span text:style-name="T201">He had buried his feelings</text:span> as deep as he could, never entertaining the shadow of a chance with someone like her.</text:p>
      <text:p text:style-name="P52"/>
      <text:p text:style-name="P52"><text:tab/><text:span text:style-name="T211">But now... He wasn’t so sure. He has never had high hopes for… Well, anything, by fear of being disappointed and hurt. </text:span><text:span text:style-name="T212">He thought his team would have never had a chance in this tournament, and yet… He wouldn’t say he became optimistic overnight, but it was the first time he was proud of what he accomplished. He feels like his team could actually pull it off. And Beatrice… Just thinking about her makes him feel warm and fuzzy in a way he hasn’t really allowed himself to feel since his first rejection in elementary school.</text:span></text:p>
      <text:p text:style-name="P52"/>
      <text:p text:style-name="P52"><text:tab/><text:span text:style-name="T212">Snapping out of his thoughts, Axel stuffs the ticket and his pocket and heads for the exit, </text:span><text:span text:style-name="T213">this </text:span><text:span text:style-name="T212">time with his head held high and his heart full of hope.</text:span></text:p>
      <text:p text:style-name="P52"/>
      <text:p text:style-name="P53">***</text:p>
      <text:p text:style-name="P53"/>
      <text:p text:style-name="P52"><text:tab/><text:span text:style-name="T214">Dusk was falling by the time he arrives to Bob’s gym. The heat had thankfully been receding on the way there, so Axel </text:span><text:span text:style-name="T215">isn’t</text:span><text:span text:style-name="T214"> as drenched in sweat as he dreaded to be. </text:span><text:span text:style-name="T216">Still, it is too late to encourage Beatrice before the match; it had already started for a while, and Axel fears it might already be over.</text:span></text:p>
      <text:p text:style-name="P52"/>
      <text:p text:style-name="P52"><text:tab/><text:span text:style-name="T216">Axel slams the double door open on his path. The place was a bit more crowded than usual, mostly by parents and boxing enthusiasts who came to cheer on the new generations. </text:span><text:span text:style-name="T217">Some of the students were already packing their bags. Axel’s heart misses a beat.</text:span></text:p>
      <text:p text:style-name="P52"/>
      <text:p text:style-name="P52"><text:tab/><text:span text:style-name="T218">Shit, it’s too late already?</text:span><text:span text:style-name="T217"> He thinks, elbowing a buff guy as the pushes through the crowd. </text:span><text:span text:style-name="T218">No, no way. I promised her I would come. I need to see her.</text:span></text:p>
      <text:p text:style-name="P52"/>
      <text:p text:style-name="P52"><text:tab/><text:span text:style-name="T217">He </text:span><text:span text:style-name="T219">pushes past the crowd with a profusion of sorries and elbows, until he finally reaches the main room. A couple of wooden benches and chairs are strewn about the place as makeshift bleachers for the public to watch the finals.</text:span></text:p>
      <text:p text:style-name="P52"/>
      <text:p text:style-name="P54"><text:tab/><text:span text:style-name="T220">And sure enough, it is her. Axel feels the weight on his shoulders evaporating as the big girl trades blows with her opponent, a stocky but no less muscular girl than her; was she the girl </text:span><text:soft-page-break/><text:span text:style-name="T220">Beatrice told him about?</text:span></text:p>
      <text:p text:style-name="P54"/>
      <text:p text:style-name="P54"><text:tab/><text:span text:style-name="T220">However, his bliss is short lived when he sees the girl’s tibia impacting his friend’s head in a flash. The ‘thud’ could be heard from across the room, and makes Axel’s blood freeze in his veins. He </text:span><text:span text:style-name="T221">can only watch,</text:span><text:span text:style-name="T220"> powerless, as Beatrice collapses onto the ground, her body wracked with tremors.</text:span></text:p>
      <text:p text:style-name="P54"/>
      <text:p text:style-name="P55"><text:tab/><text:span text:style-name="T221">The referee starts the countdown, and Beatrice struggles to regain her balance on all four limbs. Unkempt hair covers her eyes. Axel tries to cheer her up, but his voice gets drowned out by the cheers and comments of the other spectators.</text:span><text:span text:style-name="T222"> </text:span></text:p>
      <text:p text:style-name="P55"/>
      <text:p text:style-name="P55"><text:span text:style-name="T223"><text:tab/></text:span><text:span text:style-name="T224">The sight of what’s left of his friend on the ring pinches his heart. </text:span><text:span text:style-name="T223">He who thought of her as an invincible juggernaut, Axel has never seen her so fragile.</text:span><text:span text:style-name="T221"> The poor girl probably didn’t even register he was here. </text:span><text:span text:style-name="T222">After five gruelingly long seconds, Beatrice does manage to rise to her feet, </text:span><text:span text:style-name="T224">but h</text:span><text:span text:style-name="T222">er stance is unsteady and her eyes glassy, </text:span><text:span text:style-name="T225">staring into the void before her</text:span><text:span text:style-name="T222">; the shock took a heavy toll on her. </text:span><text:span text:style-name="T226">She was about to collapse again. </text:span><text:span text:style-name="T224">He needs to tell her he is there. No matter if she gets knocked out again, </text:span><text:span text:style-name="T227">he wants her to</text:span><text:span text:style-name="T224"> know she isn’t alone in this fight.</text:span></text:p>
      <text:p text:style-name="P56"/>
      <text:p text:style-name="P56"><text:span text:style-name="T222"><text:tab/></text:span><text:span text:style-name="T228">Axel </text:span><text:span text:style-name="T221">raises his hands to try and amplify the sound of his voice, and screams </text:span><text:span text:style-name="T224">her name</text:span><text:span text:style-name="T221"> at the </text:span><text:span text:style-name="T229">bottom</text:span><text:span text:style-name="T221"> of his lungs, </text:span><text:span text:style-name="T230">not caring if he</text:span><text:span text:style-name="T231"> looks silly doing this. </text:span><text:span text:style-name="T230">Beatrice freezes, </text:span><text:span text:style-name="T232">raising her head to face the crowd, her drained gaze passing over the crowd. Axel shouts, once more. She then stops.</text:span></text:p>
      <text:p text:style-name="P56"/>
      <text:p text:style-name="P57"><text:tab/><text:span text:style-name="T232">She sees him. With her eyes lighting up with a newfound energy, she looks like a deer caught in the headlights. Axel swings his arms up in her air to make sure he caught her attention, and she tiredly waves back in retu</text:span><text:span text:style-name="T233">rn with a smile that makes his heart melt.</text:span></text:p>
      <text:p text:style-name="P57"/>
      <text:p text:style-name="P57"><text:tab/><text:span text:style-name="T234">Beatrice takes back her position on the ring. This time, she’s no longer shaking. Her stance is straight and steady, fists at eye-level. She </text:span><text:span text:style-name="T235">slowly</text:span><text:span text:style-name="T234"> advances to her opponent as the referee makes way to the duel. The whistle is blown, and the fighters start trading blows anew.</text:span></text:p>
      <text:p text:style-name="P57"/>
      <text:p text:style-name="P57"><text:tab/><text:span text:style-name="T235">Axel holds his breath as Beatrice lunges at her foe, </text:span><text:span text:style-name="T236">stopping short of a feet to begin a feint at her head before aiming for her abdomen. </text:span><text:span text:style-name="T237">Her opponents blocks it in the nick of time, but staggers under the giantess’ strength. A flurry of blows makes her retreat further. There was no longer any strategy to Beatrice’s attacks; the girl was determined to overwhelm her before the timer runs out.</text:span></text:p>
      <text:p text:style-name="P57"/>
      <text:p text:style-name="P57"><text:tab/><text:span text:style-name="T237">However, it becomes quickly clear the combat has taken a large toll on her body. Her footing is unsteady, her landings inaccurate. She struggles more and more to keep her guard up. </text:span><text:span text:style-name="T238">With the</text:span><text:span text:style-name="T237"> blow to her head, as well as the exhaustion from fighting for so long, </text:span><text:span text:style-name="T238">her arms probably feel like they were loaded with lead.</text:span></text:p>
      <text:p text:style-name="P57"/>
      <text:p text:style-name="P58"><text:tab/>Her opponent must have sensed her weakness,<text:span text:style-name="T237"> as </text:span>she<text:span text:style-name="T237"> </text:span><text:span text:style-name="T239">goes on </text:span><text:span text:style-name="T237">the offensive more and more </text:span>frequently, returning her blows <text:span text:style-name="T239">until Beatrice gets forced</text:span> into one of the corners of the ring. <text:span text:style-name="T240">The bigger girl tries a desperate left hook to create some distance; her fist only meets empty air, as </text:span><text:soft-page-break/><text:span text:style-name="T240">her rival crouches to bury hers into her chest. Beatrice gasps under the pain, and her guard falters for a brief moment; long enough for the second punch to connect with her chin in an uppercut.</text:span></text:p>
      <text:p text:style-name="P58"/>
      <text:p text:style-name="P58"><text:tab/><text:span text:style-name="T240">Axel watches powerless as his friend </text:span><text:span text:style-name="T241">convulses under the shock, her limbs going limp. Her body collapses once again, but this time, she doesn’t </text:span><text:span text:style-name="T242">get back up.</text:span></text:p>
      <text:p text:style-name="P58"/>
      <text:p text:style-name="P59">***</text:p>
      <text:p text:style-name="P59"/>
      <text:p text:style-name="P58"><text:tab/><text:span text:style-name="T243">Axel </text:span><text:span text:style-name="T244">prances along the corridor connecting the infirmary to the rest of the gym. He has </text:span><text:span text:style-name="T243">lost count of how long he waited </text:span><text:span text:style-name="T244">there; every second felt like an eternity. </text:span><text:span text:style-name="T245">Each time he tried to sit and calm down, he was tapping his foot absentmindedly, to go back to walking immediately afterwards</text:span><text:span text:style-name="T244">. </text:span><text:span text:style-name="T245">Worry was etched onto his face, the thought of Beatrice getting hurt gnawing more at his mind than he expected. He knows she is a boxer – doubling as a dodgeball player, no less – but actually seeing a knockout in person felt surreal to him.</text:span></text:p>
      <text:p text:style-name="P58"/>
      <text:p text:style-name="P58"><text:tab/><text:span text:style-name="T246">The door to the infirmary opens only a couple of minutes after his arrival. Bob and a nurse exit the room, both surprised to see the girl had a visitor.</text:span></text:p>
      <text:p text:style-name="P58"/>
      <text:p text:style-name="P58"><text:tab/>“<text:span text:style-name="T246">Oh, hey Alex,” Bob greets him. “I thought you wouldn’t come.”</text:span></text:p>
      <text:p text:style-name="P58"/>
      <text:p text:style-name="P58"><text:tab/>“<text:span text:style-name="T246">Hey Bob, uh, sorry about that,” the young man replies. “My dodgeball match was right on the same day. Is she okay? Can I see her?”</text:span></text:p>
      <text:p text:style-name="P58"/>
      <text:p text:style-name="P58"><text:tab/>“<text:span text:style-name="T246">Not yet,” the nurse besides them responds. “She will be perfectly fine in a couple of hours, don’t worry about that. She just needs some rest.”</text:span></text:p>
      <text:p text:style-name="P58"/>
      <text:p text:style-name="P58"><text:tab/>“<text:span text:style-name="T246">Okay, thank you. So, uh, I’ll stay here if that’s okay? You’re not gonna close this soon, right?”</text:span></text:p>
      <text:p text:style-name="P58"/>
      <text:p text:style-name="P58"><text:tab/>“No, you’re right,” Bob answers. <text:span text:style-name="T247">H</text:span><text:span text:style-name="T248">e</text:span><text:span text:style-name="T249"> gestures for the nurse to go ahead without him</text:span>. “It was just the semi-finals, there are still two matches to be hold in the gym. <text:span text:style-name="T249">You can stay and wait for her if you wish so.</text:span>”</text:p>
      <text:p text:style-name="P46"/>
      <text:p text:style-name="P60"><text:tab/>“<text:span text:style-name="T249">Thank you,” Axel says, relieved.</text:span></text:p>
      <text:p text:style-name="P60"/>
      <text:p text:style-name="P60"><text:tab/>“<text:span text:style-name="T249">It’s nice of you to look for her. </text:span><text:span text:style-name="T250">She was afraid you would forget to visit us, but I’m glad you did.”</text:span></text:p>
      <text:p text:style-name="P60"/>
      <text:p text:style-name="P60"><text:tab/>“<text:span text:style-name="T250">It’s nothing, really, I promised her is all.”</text:span></text:p>
      <text:p text:style-name="P60"/>
      <text:p text:style-name="P60"><text:tab/>“<text:span text:style-name="T250">Nah, it’s not nothing. I can tell you she’s been stressing all day about it. She tries to hide it, but she doesn’t have many kids her age who share her passion for sports. </text:span><text:span text:style-name="T251">She often has to spar with me because of my other students are too young to bear her strength.”</text:span></text:p>
      <text:p text:style-name="P60"/>
      <text:p text:style-name="P61"><text:soft-page-break/><text:tab/>“… <text:span text:style-name="T252">I see,” Axel simply replies.</text:span></text:p>
      <text:p text:style-name="P61"/>
      <text:p text:style-name="P61"><text:tab/>“<text:span text:style-name="T253">I’ll catch up to the doc’,” Bob says. “Be nice with her, she’ll probably feel really weak for a while. </text:span><text:span text:style-name="T254">You should come visit us sometime soon. Even if you don’t join our gym, Bee would love to train at dodgeball with you again.</text:span><text:span text:style-name="T253">”</text:span></text:p>
      <text:p text:style-name="P61"/>
      <text:p text:style-name="P61"><text:tab/>“<text:span text:style-name="T253">Will do. Thanks Bob.”</text:span></text:p>
      <text:p text:style-name="P61"/>
      <text:p text:style-name="P62"><text:tab/><text:span text:style-name="T253">With that, the old man turns tail, leaving Axel alone in the corridor. </text:span><text:span text:style-name="T255">He sits back on the bench, no longer stressed about his friend’s state. </text:span><text:span text:style-name="T256">He spends a moment mulling over what Bob has just told him about Beatrice.</text:span><text:span text:style-name="T252"> He only saw </text:span><text:span text:style-name="T256">her</text:span><text:span text:style-name="T252"> strength at work twice since he first met her, but he never imagined people to be driven away by her. Ever since he played against her, he’</text:span><text:span text:style-name="T257">s always seen</text:span><text:span text:style-name="T252"> her </text:span><text:span text:style-name="T257">as a star athlete</text:span><text:span text:style-name="T252">, the kind </text:span><text:span text:style-name="T257">born once in a generation. </text:span><text:span text:style-name="T258">She was strong, hardy, steadfast</text:span><text:span text:style-name="T257">. </text:span><text:span text:style-name="T258">The kind others</text:span><text:span text:style-name="T252"> look up </text:span><text:span text:style-name="T257">to,</text:span><text:span text:style-name="T252"> but never </text:span><text:span text:style-name="T259">manage to surpass </text:span><text:span text:style-name="T258">once</text:span><text:span text:style-name="T259"> in their career</text:span><text:span text:style-name="T252">. </text:span></text:p>
      <text:p text:style-name="P62"/>
      <text:p text:style-name="P62"><text:tab/>“<text:span text:style-name="T260">Boo!” a voice rings behind him as his vision goes dark.</text:span></text:p>
      <text:p text:style-name="P62"/>
      <text:p text:style-name="P62"><text:tab/><text:span text:style-name="T261">Axel screams and tries to remove the hands covering his eyes, before calming down when he realizes who the voice belongs to.</text:span></text:p>
      <text:p text:style-name="P62"/>
      <text:p text:style-name="P62"><text:tab/>“<text:span text:style-name="T261">Bee, you should be in bed!”</text:span></text:p>
      <text:p text:style-name="P62"/>
      <text:p text:style-name="P62"><text:tab/>“<text:span text:style-name="T262">Nah, you’d leave before I’d wake up,” she objects, releasing him from her grip.</text:span></text:p>
      <text:p text:style-name="P62"/>
      <text:p text:style-name="P62"><text:tab/><text:span text:style-name="T263">Axel turns back to face her. Her head is covered with bandages and bruises, and her eyes betray a fatigue very uncommon with her. But her smile reassures him she is safe and sound.</text:span></text:p>
      <text:p text:style-name="P62"/>
      <text:p text:style-name="P62"><text:tab/>“<text:span text:style-name="T263">See?” Beatrice says, extending her arms. “I’m perfectly fine.”</text:span></text:p>
      <text:p text:style-name="P62"/>
      <text:p text:style-name="P62"><text:tab/>“<text:span text:style-name="T263">Sure, big girl,</text:span>” <text:span text:style-name="T263">he can’t help himself but smile at her blatant lie. “But seriously, are you okay? </text:span><text:span text:style-name="T264">I saw the match, and I came here as soon as I could.</text:span><text:span text:style-name="T263">”</text:span></text:p>
      <text:p text:style-name="P62"/>
      <text:p text:style-name="P62"><text:tab/>“<text:span text:style-name="T264">Aww, you worried about me?”</text:span></text:p>
      <text:p text:style-name="P62"/>
      <text:p text:style-name="P62"><text:tab/>“<text:span text:style-name="T264">I-It’s not that,” he blurts out, no expecting her to tease him this way. “It’s just, I saw you getting knocked out and Bob was dragging you away, I thought it was worse than I imagined.”</text:span></text:p>
      <text:p text:style-name="P62"/>
      <text:p text:style-name="P62"><text:tab/>“<text:span text:style-name="T264">Mmh-hmm.” she simply emotes, sitting besides him. Her hand was dangerously close to his, he notices.</text:span></text:p>
      <text:p text:style-name="P62"/>
      <text:p text:style-name="P62"><text:tab/>“<text:span text:style-name="T264">A-Anyway, I’m sorry I didn’t come sooner,” he replies, looking away before any intrusive thoughts invade his second brain. “I know this was important to you.”</text:span></text:p>
      <text:p text:style-name="P62"/>
      <text:p text:style-name="P62"><text:tab/>“<text:span text:style-name="T264">No, don’t apologize, Axel. I know it was on the same day as your semi-finals. I </text:span><text:soft-page-break/><text:span text:style-name="T264">couldn’t free a better date for a ticket.”</text:span></text:p>
      <text:p text:style-name="P62"/>
      <text:p text:style-name="P62"><text:tab/><text:span text:style-name="T264">She kicks her legs in the air while absentmindedly scratching a band-aid on her hand. She looks like a cute giant child in this pose; it only takes a glance for Axel to stat blushing.</text:span></text:p>
      <text:p text:style-name="P62"/>
      <text:p text:style-name="P62"><text:tab/>“<text:span text:style-name="T264">I mean,” she continues. “I didn’t invite you to watch me lose, anyway. I must have looked lame on the ring after losing so quickly.”</text:span></text:p>
      <text:p text:style-name="P62"/>
      <text:p text:style-name="P62"><text:tab/>“<text:span text:style-name="T264">Oh no, no,” he reassures her. “You did great. </text:span><text:span text:style-name="T265">I wouldn’t have done better, that’s for sure.</text:span><text:span text:style-name="T264">”</text:span></text:p>
      <text:p text:style-name="P62"/>
      <text:p text:style-name="P62"><text:tab/><text:span text:style-name="T265">She chuckles, certainly imagining him face off one of the prodigies of the tournament and getting bodied in the first round.</text:span></text:p>
      <text:p text:style-name="P62"/>
      <text:p text:style-name="P63"><text:tab/>“<text:span text:style-name="T265">You’re kind,” she picks the conversation back up. “I’m </text:span><text:span text:style-name="T266">fine, I’m</text:span><text:span text:style-name="T265"> just sad about my uncle, </text:span><text:span text:style-name="T266">is all</text:span><text:span text:style-name="T265">. I really wanted to earn the cash prize for him. </text:span><text:span text:style-name="T266">He really struggles getting new members. Some parents register their kids for self-defense class, but most others chicken out after they take a beating. I tried to bring in other students from high school, but, I guess I scare them because I’m so good!</text:span><text:span text:style-name="T265">”</text:span></text:p>
      <text:p text:style-name="P63"/>
      <text:p text:style-name="P63"><text:tab/><text:span text:style-name="T266">She ends with a fake laugh, but Axel saw the issue really bothered her. He had the time to ponder about it before her uncle left. Looking at how vulnerable she is now, head low and covered in bandages, h</text:span><text:span text:style-name="T267">e was wrong to see her as this insurmountable monster he could never hope to compete with.</text:span><text:span text:style-name="T252"> </text:span><text:span text:style-name="T258">Even with her recent defeat, she was still way out of his league in his eyes; </text:span><text:span text:style-name="T268">b</text:span><text:span text:style-name="T258">ut he no longer feels discouraged when he thinks about her. </text:span><text:span text:style-name="T260">No, inste</text:span><text:span text:style-name="T269">ad, he felt…</text:span></text:p>
      <text:p text:style-name="P63"/>
      <text:p text:style-name="P63"><text:tab/>“<text:span text:style-name="T269">But that’s okay!” the tall girl suddenly says as she stands up and stretches her arms. “There’s still the dodgeball tournament, right? There’s still the cash prize there I can grab. You haven’t been eliminated yet, reassure me?”</text:span></text:p>
      <text:p text:style-name="P63"/>
      <text:p text:style-name="P63"><text:tab/>“<text:span text:style-name="T269">Not yet,” he answers.</text:span></text:p>
      <text:p text:style-name="P63"/>
      <text:p text:style-name="P63"><text:tab/>“<text:span text:style-name="T269">The answer is ‘in your dreams, Bee’. I want to you to give everything you have for your next match, y’hear me?”</text:span></text:p>
      <text:p text:style-name="P63"/>
      <text:p text:style-name="P63"><text:tab/>“<text:span text:style-name="T269">Heh. Sure Bee,” he rolls his eyes with a faint smile. “But are you sure this is a good idea for you to participate? You just got totaled not even half an hour ago. Your team doesn’t have a substitute for you?”</text:span></text:p>
      <text:p text:style-name="P63"/>
      <text:p text:style-name="P63"><text:tab/>“<text:span text:style-name="T269">Nah, we don’t. And I can’t abandon the girls like that, that would be scummy of me.”</text:span></text:p>
      <text:p text:style-name="P63"/>
      <text:p text:style-name="P63"><text:tab/>“<text:span text:style-name="T269">When is your next match?”</text:span></text:p>
      <text:p text:style-name="P63"/>
      <text:p text:style-name="P63"><text:tab/>“<text:span text:style-name="T269">Tomorrow,” she sheepishly says.</text:span></text:p>
      <text:p text:style-name="P63"><text:soft-page-break/></text:p>
      <text:p text:style-name="P63"><text:tab/>“<text:span text:style-name="T269">Tomo – Are you kidding me? You’re gonna play in that state? You have a death wish or what?”</text:span></text:p>
      <text:p text:style-name="P63"/>
      <text:p text:style-name="P63"><text:tab/>“<text:span text:style-name="T269">Relax, it’s fine. I’ll just sleep it away and I’ll be fine by this evening, you’ll see.”</text:span></text:p>
      <text:p text:style-name="P63"/>
      <text:p text:style-name="P63"><text:tab/>“<text:span text:style-name="T269">Holy shit, you </text:span><text:span text:style-name="T270">do</text:span><text:span text:style-name="T269"> have a death wish.”</text:span></text:p>
      <text:p text:style-name="P63"/>
      <text:p text:style-name="P64"><text:tab/>“<text:span text:style-name="T269">Well, you can’t stop me,” she teases him. “Because we </text:span><text:span text:style-name="T271">have</text:span><text:span text:style-name="T272"> to face off against</text:span><text:span text:style-name="T269"> each other in the finals. But seriously,” she says. “It was nice seeing you. I’m glad you came to see me.”</text:span></text:p>
      <text:p text:style-name="P64"/>
      <text:p text:style-name="P65"><text:tab/>She yawns and <text:span text:style-name="T273">inadvertently lifts her shirt when she</text:span> stretches her arms, letting Axel notice another bruise on her abdomen.</text:p>
      <text:p text:style-name="P65"/>
      <text:p text:style-name="P66"><text:span text:style-name="T274"><text:tab/>“But </text:span><text:span text:style-name="T275">for real,</text:span><text:span text:style-name="T269"> I’m </text:span><text:span text:style-name="T275">done,” </text:span><text:span text:style-name="T269">She elbows him in the ribs, then turns to reach the door to the infirmary. “I’ll go get as much sleep as I can.”</text:span></text:p>
      <text:p text:style-name="P66"/>
      <text:p text:style-name="P66"><text:tab/>“<text:span text:style-name="T276">Yeah, take care.”</text:span></text:p>
      <text:p text:style-name="P67"/>
      <text:p text:style-name="P63"><text:tab/><text:span text:style-name="T269">Beatrice </text:span><text:span text:style-name="T277">smiles</text:span><text:span text:style-name="T269">, th</text:span><text:span text:style-name="T276">e</text:span><text:span text:style-name="T269">n simply waves at him before returning to the infirmary. Axel takes this as his cue to leave the gym, the weight in his stomach finally gone, replaced by a warmth making his step light as a feather.</text:span></text:p>
      <text:p text:style-name="P63"/>
      <text:p text:style-name="P68">***</text:p>
      <text:p text:style-name="P68"/>
      <text:p text:style-name="P69"><text:tab/><text:span text:style-name="T278">The scent of old, wet cloth clung</text:span><text:span text:style-name="T9">s </text:span><text:span text:style-name="T278">onto his skin as Axel charge</text:span><text:span text:style-name="T9">s</text:span><text:span text:style-name="T278"> forward. </text:span></text:p>
      <text:p text:style-name="P69"/>
      <text:p text:style-name="P69"><text:span text:style-name="T278"><text:tab/></text:span><text:span text:style-name="T279">He is painfully aware of how familiar this situation is to him. The timer is running out, his target on his knees to </text:span><text:span text:style-name="T280">avoid an incoming attack, </text:span><text:span text:style-name="T279">and a looming shadow is rushing his way. Despite his best efforts, he has fallen for the same bait from that fateful match. The time spent since he first met Beatrice feels like an eternity, despite their friendly match happening barely a month ago. Axel wasn’t delusional; no amount of training would be enough in a single month. But he had just hoped he would bring a bit more spectacle than last time.</text:span></text:p>
      <text:p text:style-name="P69"/>
      <text:p text:style-name="P69"><text:tab/><text:span text:style-name="T279">The result was predictable. The referee blows his whistle, and just like that, it was over. </text:span><text:span text:style-name="T281">The opposing teams cheers and screams in joy at their advancement to the finals of the tournament. Axel’s team joins their celebration in good sportsmanship, but they were no less bitter about their loss, and left the field with their heads low.</text:span></text:p>
      <text:p text:style-name="P69"/>
      <text:p text:style-name="P69"><text:tab/>“<text:span text:style-name="T282">Axel!”</text:span></text:p>
      <text:p text:style-name="P69"/>
      <text:p text:style-name="P69"><text:tab/><text:span text:style-name="T282">Beatrice was standing on the edge of the bleachers, near the door leading to the locker rooms. They exchange a wave of the hand, and the big girl climbs down the stairs to meet him halfway through the corridor. </text:span><text:span text:style-name="T283">He notices she was wearing her Hyenas uniform, and reminded </text:span><text:soft-page-break/><text:span text:style-name="T283">himself her match was </text:span><text:span text:style-name="T284">coming up</text:span><text:span text:style-name="T283"> </text:span><text:span text:style-name="T285">next </text:span><text:span text:style-name="T283">right after his.</text:span></text:p>
      <text:p text:style-name="P69"/>
      <text:p text:style-name="P69"><text:tab/>“<text:span text:style-name="T285">Man, I wish you didn’t see that,” Axel says, scratching his hair in embarrassment.</text:span></text:p>
      <text:p text:style-name="P69"/>
      <text:p text:style-name="P69"><text:tab/>“<text:span text:style-name="T285">Well, we’re even on that point, then,” she says. “But you did well.”</text:span></text:p>
      <text:p text:style-name="P69"/>
      <text:p text:style-name="P69"><text:tab/>“<text:span text:style-name="T285">Thank you. I know your match is next so that was a given, but I’m glad you came to see mine.”</text:span></text:p>
      <text:p text:style-name="P69"/>
      <text:p text:style-name="P69"><text:tab/>“<text:span text:style-name="T285">Of course!” she smiles, and Axel’s heart skips a beat. “Did you have fun at least, this time?”</text:span></text:p>
      <text:p text:style-name="P69"/>
      <text:p text:style-name="P69"><text:tab/>“<text:span text:style-name="T285">I… </text:span><text:span text:style-name="T286">Yeah, that was fun,</text:span><text:span text:style-name="T285">” </text:span><text:span text:style-name="T286">he finally admits, letting Bee have her smirk of approval. “I don’t like matches that tense or serious, honestly. But yeah, it was fun to play tonight. I’m just a bit sad for the others, is all.”</text:span></text:p>
      <text:p text:style-name="P69"/>
      <text:p text:style-name="P70"><text:tab/><text:span text:style-name="T287">H</text:span><text:span text:style-name="T288">e empathizes with his teammates; this tournament was their key to the nationals. It was their dream, and he was glad they shared it with them.</text:span><text:span text:style-name="T289"> </text:span><text:span text:style-name="T290">But f</text:span><text:span text:style-name="T291">or the first time since he started dodgeball, </text:span><text:span text:style-name="T288">he doesn’t follow suit with a knot in his stomach. Instead, he feels… Closure? Peace? </text:span><text:span text:style-name="T282">He could finally breath at ease after a defeat, without a care in the world about what would happen next.</text:span></text:p>
      <text:p text:style-name="P70"/>
      <text:p text:style-name="P70"><text:tab/><text:span text:style-name="T292">Yes, he had fun. </text:span><text:span text:style-name="T293">That was all thanks to her.</text:span></text:p>
      <text:p text:style-name="P70"/>
      <text:p text:style-name="P70"><text:tab/><text:span text:style-name="T284">The whistle blows again, signaling the next team to suit up for the upcoming match. </text:span><text:span text:style-name="T294">Beatrice stretches, then turns back to join her group of friends waiting for her by their own lockers.</text:span></text:p>
      <text:p text:style-name="P70"/>
      <text:p text:style-name="P70"><text:tab/>“<text:span text:style-name="T294">Hey Bee,” Axel stops her.</text:span></text:p>
      <text:p text:style-name="P70"/>
      <text:p text:style-name="P70"><text:tab/><text:span text:style-name="T294">She turns around.</text:span></text:p>
      <text:p text:style-name="P70"/>
      <text:p text:style-name="P70"><text:tab/>“<text:span text:style-name="T294">Yah?”</text:span></text:p>
      <text:p text:style-name="P70"/>
      <text:p text:style-name="P70"><text:tab/>“<text:span text:style-name="T294">I’ll be cheering for you too”, he smiles in turn. “So smoke their asses for me in <text:s/>revenge, okay?”</text:span></text:p>
      <text:p text:style-name="P70"/>
      <text:p text:style-name="P70"><text:tab/><text:span text:style-name="T293">He offers her a fist bump, which she returns eagerly with a smile. The contact makes his shudder with glee as he watches her </text:span><text:span text:style-name="T295">huddle with her team. He sighs of longing, indulging himself with the sight of her chiseled body for a little while longer, before leaving in turn to join his own friends.</text:span></text:p>
      <text:p text:style-name="P70"/>
      <text:p text:style-name="P71">***</text:p>
      <text:p text:style-name="P71"/>
      <text:p text:style-name="P70"><text:tab/>“<text:span text:style-name="T296">So what are you gonna do with the remaining cash?”</text:span></text:p>
      <text:p text:style-name="P70"><text:soft-page-break/></text:p>
      <text:p text:style-name="P70"><text:tab/><text:span text:style-name="T296">Beatrice takes a sip of her soda, taking the time to think about the question, </text:span><text:span text:style-name="T297">basking in the fresh wind caressing the balcony</text:span><text:span text:style-name="T296">.</text:span></text:p>
      <text:p text:style-name="P70"/>
      <text:p text:style-name="P70"><text:tab/>“<text:span text:style-name="T298">Dunno</text:span><text:span text:style-name="T296">… Bob doesn’t want to take it all. </text:span><text:span text:style-name="T298">He’s gonna buy some supplies for maintaining the place, but that’s it. I’m probably gonna use the rest for ads for the gym. Dad would want me to keep it for myself, or invest in the future, but I don’t have it in me to bother with that crap.”</text:span></text:p>
      <text:p text:style-name="P70"/>
      <text:p text:style-name="P70"><text:tab/>“<text:span text:style-name="T297">You can give it to me, y’know,” Axel teases her.</text:span></text:p>
      <text:p text:style-name="P70"/>
      <text:p text:style-name="P70"><text:tab/>“<text:span text:style-name="T297">Pfft, yeah right. The day you join our club, maybe.”</text:span></text:p>
      <text:p text:style-name="P70"/>
      <text:p text:style-name="P70"><text:tab/>“<text:span text:style-name="T297">Maybe I will.”</text:span></text:p>
      <text:p text:style-name="P70"/>
      <text:p text:style-name="P70"><text:tab/>“...<text:span text:style-name="T297">What?” she stares at him. “You’re joking?”</text:span></text:p>
      <text:p text:style-name="P70"/>
      <text:p text:style-name="P70"><text:tab/><text:span text:style-name="T297">Axel looks around. He wasn’t sure how to approach the deal. Inside the bar, the other members of their respective teams had either vacated the place, or gathered around the large TV to watch the replay of the regionals. Making sure no one was eavesdropping on them, he takes the plunge:</text:span></text:p>
      <text:p text:style-name="P70"/>
      <text:p text:style-name="P70"><text:tab/>“<text:span text:style-name="T297">Nah. It just got me thinking. </text:span><text:span text:style-name="T299">When I started dodgeball, I knew barely jack about the sport. I spent my whole scholarship behind a desk, and I couldn’t even complete a set without having a heatstroke. I kept losing, so I half-assed all our sessions. I secretly hoped the guys would see me for what I am, and stop involving me in their training for the tournament. I didn’t even like this sport, my parents wanted me to practice a sport in my free time.”</text:span></text:p>
      <text:p text:style-name="P70"/>
      <text:p text:style-name="P70"><text:tab/>“<text:span text:style-name="T299">Don’t say all that,” Beatrice retorts.</text:span></text:p>
      <text:p text:style-name="P70"/>
      <text:p text:style-name="P70"><text:tab/>“<text:span text:style-name="T299">No, it’s the truth. But it doesn’t matter now. Thanks to you.”</text:span></text:p>
      <text:p text:style-name="P70"/>
      <text:p text:style-name="P70"><text:tab/>“<text:span text:style-name="T299">Thanks to me?”</text:span></text:p>
      <text:p text:style-name="P70"/>
      <text:p text:style-name="P72"><text:tab/>“<text:span text:style-name="T299">Yeah. It’s the first time in my life I really want to get better at something and accomplish more than just the basics. I want to get stronger physically, too. I’ve called Bob this morning, he said it was a-okay for me to start next week.”</text:span></text:p>
      <text:p text:style-name="P73"/>
      <text:p text:style-name="P73"><text:tab/>“Really? That’s great!” Beatrice exclaims.</text:p>
      <text:p text:style-name="P73"/>
      <text:p text:style-name="P74"><text:tab/>She embraces him, <text:span text:style-name="T300">overjoyed to finally have a partner to spar with after so long</text:span>. It was a friendly embrace, but Axel felt the heat rising rapidly in him. He loved being so close to her, feeling her muscles tense beneath the thin fabric of her clothes, smelling her perfume she puts on after a<text:span text:style-name="T301">z</text:span> shower. <text:span text:style-name="T300">He loved seeing her so giddy and joyful when she wins a match, her confidence that </text:span><text:soft-page-break/><text:span text:style-name="T300">everything will be alright in the end; a trait that led her to victory multiple times. He loved… Her.</text:span></text:p>
      <text:p text:style-name="P74"/>
      <text:p text:style-name="P74"><text:tab/>“<text:span text:style-name="T300">Yeah, but…” Axel separates them after a moment. “The real reason is, I want to spend more time with you, </text:span><text:span text:style-name="T302">Bee.</text:span><text:span text:style-name="T300">”</text:span> </text:p>
      <text:p text:style-name="P74"/>
      <text:p text:style-name="P75">She suddenly draws back on step, surprised at the sudden delivery. Axel focuses all his willpower to look at her face to face.</text:p>
      <text:p text:style-name="P75"/>
      <text:p text:style-name="P76"><text:tab/>“<text:span text:style-name="T303">Yeah, I… I-I really loved our time together.</text:span><text:span text:style-name="T299"> You’re so passionate about sports, yo</text:span><text:span text:style-name="T301">u trained with me</text:span><text:span text:style-name="T299"> even though you had nothing to gain by doing so. </text:span><text:span text:style-name="T304">You’re cute, you’re funny and every time we say goodbye I </text:span><text:span text:style-name="T305">start tracking</text:span><text:span text:style-name="T304"> the time left before we meet again. I-I know it’s stupid when I say it out loud, but…”</text:span></text:p>
      <text:p text:style-name="P76"/>
      <text:p text:style-name="P77"><text:span text:style-name="T304"><text:s/><text:tab/>Beatrice quickly catches up where he was going. He’s never seen her blush before, and that only makes his heart melt even more.</text:span></text:p>
      <text:p text:style-name="P76"/>
      <text:p text:style-name="P76"><text:tab/>“<text:span text:style-name="T304">Axel, I…”</text:span></text:p>
      <text:p text:style-name="P76"/>
      <text:p text:style-name="P76"><text:tab/>“<text:span text:style-name="T304">I’ll never say it if I stop right now”, he says. “</text:span><text:span text:style-name="T306">Listen, Bee, I… I like you. I want to spend more time with you. Even if I’m shit at sports, even if I never win, I always have a good day when you’re here encouraging me. I-I know I’m not the </text:span><text:span text:style-name="T307">beefiest nor</text:span><text:span text:style-name="T306"> fittest guy in our team, but…”</text:span></text:p>
      <text:p text:style-name="P76"/>
      <text:p text:style-name="P76"><text:tab/>“<text:span text:style-name="T306">Oh, shut up.”</text:span></text:p>
      <text:p text:style-name="P76"/>
      <text:p text:style-name="P76"><text:tab/><text:span text:style-name="T306">Beatrice suddenly </text:span><text:span text:style-name="T308">cradles his face</text:span><text:span text:style-name="T306"> in her hands. </text:span><text:span text:style-name="T309">All his thoughts melt in an instant when </text:span><text:span text:style-name="T305">she presses her lips against his. </text:span><text:span text:style-name="T310">The contact sends a shock wave through his spine and </text:span><text:span text:style-name="T311">liquefies his muscles</text:span><text:span text:style-name="T310">.</text:span><text:span text:style-name="T309"> </text:span><text:span text:style-name="T305">T</text:span><text:span text:style-name="T309">he smell of her perfume hits him harder than before </text:span><text:span text:style-name="T311">and fills his entire universe. For a brief moment, time seems to stop, his brain incapable of processing the world beyond their bodies pressed against each other</text:span><text:span text:style-name="T309">.</text:span></text:p>
      <text:p text:style-name="P76"/>
      <text:p text:style-name="P76"><text:tab/>“<text:span text:style-name="T310">I don’t invite just about any boy in my uncle’s club,” she says </text:span><text:span text:style-name="T312">after releasing him</text:span><text:span text:style-name="T310">. “</text:span><text:span text:style-name="T313">You think I would have tried to rope you in if I didn’t like you?”</text:span></text:p>
      <text:p text:style-name="P76"/>
      <text:p text:style-name="P76"><text:tab/><text:span text:style-name="T314">Axel doesn’t respond immediately, instead staring into the void and stuttering a string of syllables that desperately try to sound like words. He must sport a very funny face, given how Beatrice laughs at his lack of coherent response.</text:span></text:p>
      <text:p text:style-name="P76"/>
      <text:p text:style-name="P76"><text:tab/>“<text:span text:style-name="T314">Jeez, Axel,” she resumes after a coughing fit, “I’m a girl, not some kind of greek goddess. Just talk to me man.”</text:span></text:p>
      <text:p text:style-name="P76"/>
      <text:p text:style-name="P76"><text:tab/><text:span text:style-name="T314">As she catches her breath, Axel tries to come up with a way to rejoin the conversation without getting awkward.</text:span></text:p>
      <text:p text:style-name="P76"/>
      <text:p text:style-name="P76"><text:tab/>“<text:span text:style-name="T315">Why… I just… Big…”</text:span></text:p>
      <text:p text:style-name="P76"><text:soft-page-break/></text:p>
      <text:p text:style-name="P76"><text:tab/><text:span text:style-name="T315">Beatrice goes back into laughter, but manages to recompose herself rapidly.</text:span></text:p>
      <text:p text:style-name="P76"/>
      <text:p text:style-name="P76"><text:tab/>“<text:span text:style-name="T315">I like you too, silly,” she then says to try and calm him down. “</text:span><text:span text:style-name="T316">I don’t need a reason to justify myself with. You’ve worked hard for this tournament, I saw it. You could have given up at any time, but you didn’t for your friends’ sake. That’s really sweet.”</text:span></text:p>
      <text:p text:style-name="P76"/>
      <text:p text:style-name="P78"><text:tab/><text:span text:style-name="T317">She then catches him before he can respond, and kisses him once more. The feeling of her soft lips is still as intoxicating as </text:span><text:span text:style-name="T318">the first time</text:span><text:span text:style-name="T317">. Despite her strength, his now girlfriend – and </text:span><text:span text:style-name="T319">wow</text:span><text:span text:style-name="T317"> was that a realization to have, he thinks – shows a remarkable tenderness </text:span><text:span text:style-name="T318">she’s never shown beforehand</text:span><text:span text:style-name="T317">. </text:span><text:span text:style-name="T318">Axel gathers what little will he has left to return the embrace, cradling her massive back and pressing his tongue inside her mouth.</text:span></text:p>
      <text:p text:style-name="P78"/>
      <text:p text:style-name="P78"><text:tab/>“<text:span text:style-name="T320">Axel?” Beatrice suddenly says after preemptively breaking the kiss.</text:span></text:p>
      <text:p text:style-name="P78"/>
      <text:p text:style-name="P78"><text:tab/><text:span text:style-name="T320">Axel could feel the </text:span><text:span text:style-name="T321">problem before she points it out. </text:span><text:span text:style-name="T322">He had tried to keep it under control ever since his feelings for Beatrice became clear, but now, with the confession and her returning his love, the emotional baggage was too heavy to bear.</text:span></text:p>
      <text:p text:style-name="P78"/>
      <text:p text:style-name="P78"><text:tab/>“<text:span text:style-name="T322">I-I’m sorry!” he stammers as he tries his best to conceal it as quickly as possible. “It’s just a reaction… Shit, not now…”</text:span></text:p>
      <text:p text:style-name="P78"/>
      <text:p text:style-name="P78"><text:tab/>“<text:span text:style-name="T322">It’s fine, really,” Beatrice reassures him as she looks away with her face red as a beet. “That’s just boy stuff, that happens.”</text:span></text:p>
      <text:p text:style-name="P78"/>
      <text:p text:style-name="P78"><text:tab/><text:span text:style-name="T323">Great, now I just want to bury myself in shame</text:span><text:span text:style-name="T324">, Axel sighs internally.</text:span></text:p>
      <text:p text:style-name="P78"/>
      <text:p text:style-name="P78"><text:tab/><text:span text:style-name="T324">He turns away for a couple seconds to try and hide his erection, having ruined the sentimental moment he was sharing with Beatrice. </text:span><text:span text:style-name="T325">But before the situation turns awkward, he feels her hand brushing against his forearm. He turns back to face Beatrice, and while she still isn’t looking at him, the blush on her face is far from gone.</text:span></text:p>
      <text:p text:style-name="P78"/>
      <text:p text:style-name="P78"><text:tab/>“<text:span text:style-name="T325">Do… You wanna do it?”</text:span></text:p>
      <text:p text:style-name="P78"/>
      <text:p text:style-name="P78"><text:tab/>“… <text:span text:style-name="T325">What?” he freezes, realizing what she just said.</text:span></text:p>
      <text:p text:style-name="P78"/>
      <text:p text:style-name="P78"><text:tab/>“<text:span text:style-name="T325">Come on, don’t make this weird. Do you want it or not?”</text:span></text:p>
      <text:p text:style-name="P78"/>
      <text:p text:style-name="P78"><text:tab/>“<text:span text:style-name="T325">Y-Yeah… I mean, you’re cute and all, but you don’t have to force yourself this soon.”</text:span></text:p>
      <text:p text:style-name="P78"/>
      <text:p text:style-name="P78"><text:tab/>“<text:span text:style-name="T325">I want this,” she simply retorts. “Do you?”</text:span></text:p>
      <text:p text:style-name="P78"/>
      <text:p text:style-name="P78"><text:tab/><text:span text:style-name="T325">Axel pauses for a moment, considering the implication of what she just said. Then, he takes her hand gripping his forearm with his other hand. They walk silently, still awkwardly </text:span><text:soft-page-break/><text:span text:style-name="T325">avoiding eye contact, praying no one would see them on their way to the bathrooms.</text:span></text:p>
      <text:p text:style-name="P78"/>
      <text:p text:style-name="P78"><text:tab/><text:span text:style-name="T326">Axel pushes the door as quietly as possible, hoping whoever was in there wouldn’t be noticed of their presence. Unfortunately for the couple, another one was present on the scene, and the moans </text:span><text:span text:style-name="T327">they hear leave no doubt about the identity of the occupants.</text:span></text:p>
      <text:p text:style-name="P78"/>
      <text:p text:style-name="P78"><text:tab/>“<text:span text:style-name="T327">Shit, Leo’s here again,” Axel whispers at Beatrice. “We’ll go somewhere else.”</text:span></text:p>
      <text:p text:style-name="P78"/>
      <text:p text:style-name="P78"><text:tab/><text:span text:style-name="T327">As he’s about to leave, his companion tightens her grip on his fingers.</text:span></text:p>
      <text:p text:style-name="P78"/>
      <text:p text:style-name="P78"><text:tab/>“<text:span text:style-name="T327">It’s fine,” she whispers in turn, a sly smile drawn on her face. “We’ll just avoid making any noise.”</text:span></text:p>
      <text:p text:style-name="P78"/>
      <text:p text:style-name="P78"><text:tab/><text:span text:style-name="T327">Axel is pretty sure her idea will fall part right after the first touch, but he obliges as she tugs him towards the farthest closet. Just like </text:span><text:span text:style-name="T328">him, his partner trembles, her skin glittering with sweat under the heat and the weight of the moment. H</text:span><text:span text:style-name="T327">e has been refraining his feelings for far too long, and he needs release. Now.</text:span></text:p>
      <text:p text:style-name="P78"/>
      <text:p text:style-name="P78"><text:tab/><text:span text:style-name="T329">They quietly enter the closet. The moans from the other side of the door make Axel a bit ill at ease, he who always made sure to give his friend enough space to avoid accidentally stumbling upon his next feverish adventure.</text:span></text:p>
      <text:p text:style-name="P78"/>
      <text:p text:style-name="P79"><text:tab/><text:span text:style-name="T329">Beatrice, however, does not spend as much time worrying about the details, instead bringing Axel close to her as her hands explore his body underneath his clothes. Her chest pressed against his back, Axel could feel her perky tits through the fabric, as her hands glide further and further down until their reach inside his shirt. Beatrice has always been forward with him, but seeing her being this enterprising, he wonders how long she had been keeping her lust in check waiting for a moment like this. </text:span></text:p>
      <text:p text:style-name="P80"/>
      <text:p text:style-name="P80"><text:tab/>The fact he was the target of her affection only encourages him. He turns back to face her and plants a quick peck on her lips. Before she can react, he plunges his face in her chest, using his hands to fondle her pair while he plants more kisses in her neck. The assault doesn’t deter her however, as her hands resume their search of her target.</text:p>
      <text:p text:style-name="P80"/>
      <text:p text:style-name="P80"><text:tab/>Axel can’t help but release a moan when she finds it and gives it a preliminary tug. The couple goes dead silent, but their neighbours don’t seem to have heard it – or care for that matter, more preoccupied by their own <text:span text:style-name="T330">romps. </text:span><text:span text:style-name="T331">Satisfied by his reaction, Beatrice rubs his erect cock a bit faster, delighted to see the results on his face.</text:span></text:p>
      <text:p text:style-name="P80"/>
      <text:p text:style-name="P80"><text:tab/><text:span text:style-name="T331">Axel pants as he takes off her bra. She does the same with his short and boxers, leaving his cock spring free out in the open. Their exchange continues for a while, Axel continuously stripping her while depositing little kisses of affection on her neck, and Beatrice getting rougher and rougher on his cock by the second, until he has to push her back.</text:span></text:p>
      <text:p text:style-name="P80"/>
      <text:p text:style-name="P80"><text:soft-page-break/><text:tab/>“<text:span text:style-name="T331">I can’t…” he pants, looking for a second breath. “I’m almost there. I want to… Go further.”</text:span></text:p>
      <text:p text:style-name="P80"/>
      <text:p text:style-name="P80"><text:tab/><text:span text:style-name="T331">Beatrice understands the message, and sits on the reservoir of the toilet, feet lying on the lid, so that she stands at his height. Axel’s hands move on their own to caress her abdomen, marveling at the perfect body in front of him, bewildered someone like him could catch a girl like her.</text:span></text:p>
      <text:p text:style-name="P80"/>
      <text:p text:style-name="P80"><text:tab/>“<text:span text:style-name="T331">Come on, stop staring,” she whispers. “I’m getting a bit self-conscious here.”</text:span></text:p>
      <text:p text:style-name="P80"/>
      <text:p text:style-name="P80"><text:tab/><text:span text:style-name="T331">Axel obliges. He was no longer thinking, throwing all his doubts and worries away. He aligns his cock to her entrance as he gets closer, and the sensation of her lower lips wrapping around his cock almost sends him over the edge. </text:span><text:span text:style-name="T332">He grits his teeth, and grabs her legs, feeling her powerful muscles bulge at his contact.</text:span></text:p>
      <text:p text:style-name="P80"/>
      <text:p text:style-name="P80"><text:tab/><text:span text:style-name="T333">He thrusts. Slowly, but that is enough for Beatrice to let out a gasp in turn. She covers her mouth with her hand, hoping she was not too loud, but that doesn’t stop Axel from continuing his assault on her private parts, rocking her body against the stall and making little ‘thuds’ at each impact.</text:span></text:p>
      <text:p text:style-name="P80"/>
      <text:p text:style-name="P81"><text:tab/><text:span text:style-name="T333">Her insides feel incredible. </text:span><text:span text:style-name="T334">He slides in and out without difficulty, the poor girl already dripping wet. Axel</text:span><text:span text:style-name="T335"> </text:span><text:span text:style-name="T334">spreads her legs further apart</text:span><text:span text:style-name="T335"> give himself more room to push. Without further ado, the pair begins their push and pull, the room soon filled with the sound of their hips smacking against each other, </text:span><text:span text:style-name="T336">only </text:span><text:span text:style-name="T335">drowned </text:span><text:span text:style-name="T337">out</text:span><text:span text:style-name="T335"> by moans </text:span><text:span text:style-name="T338">and silenced by their lips intermittently interlocking with each other</text:span><text:span text:style-name="T335">.</text:span></text:p>
      <text:p text:style-name="P81"/>
      <text:p text:style-name="P81"><text:tab/><text:span text:style-name="T338">Eventually, the need for release becomes too strong. Axel buries his head in Beatrice’s cleavage, the big girl wrapping her arms around him in a silent understanding. He buries his cock as deep as possible inside her canal, and lets his body to the rest.</text:span></text:p>
      <text:p text:style-name="P82"/>
      <text:p text:style-name="P83"/>
      <text:p text:style-name="P84"><text:tab/>Their cuddling lasts for a while longer this time, until the lack of air forces them to break apart again. <text:span text:style-name="T337">Finally a while flash blinds him as his shaft pulsates, sending thick ropes of cum inside </text:span><text:span text:style-name="T338">his girlfriend’s</text:span><text:span text:style-name="T337"> vagina. </text:span><text:span text:style-name="T338">Beatrice</text:span><text:span text:style-name="T337"> bucks up, growling under the feeling of her cunt filled with the semen of a </text:span><text:span text:style-name="T338">boy – </text:span><text:span text:style-name="T339">her</text:span><text:span text:style-name="T338"> boyfriend, and hers alone</text:span><text:span text:style-name="T337">. </text:span><text:span text:style-name="T340">Both let out </text:span><text:span text:style-name="T338">gasps</text:span><text:span text:style-name="T340"> of pleasure as they orgasm at the same time, leaving a sticky white mess of semen mixed up with her girl juices.</text:span></text:p>
      <text:p text:style-name="P84"/>
      <text:p text:style-name="P84"><text:tab/><text:span text:style-name="T338">Finally, they break apart, both covered in sweat and bodily fluids. </text:span><text:span text:style-name="T341">Just at this moment, someone hits the door behind them like a drum, and a familiar voice echoes in the stall:</text:span></text:p>
      <text:p text:style-name="P84"/>
      <text:p text:style-name="P84"><text:tab/>“<text:span text:style-name="T341">Go ahead </text:span><text:span text:style-name="T342">dude</text:span><text:span text:style-name="T341">, rock her shit, it’s not your mom!”</text:span></text:p>
      <text:p text:style-name="P84"/>
      <text:p text:style-name="P84"><text:tab/><text:span text:style-name="T341">It </text:span><text:span text:style-name="T343">is</text:span><text:span text:style-name="T341"> Leo’s voice, followed by the voice of whichever girl had tickled his fancy today. </text:span><text:span text:style-name="T343">Mortified, both Axel and Beatrice awkwardly stand silent inside the stall, cursing themselves for </text:span><text:soft-page-break/><text:span text:style-name="T344">having been so loud.</text:span></text:p>
      <text:p text:style-name="P84"/>
      <text:p text:style-name="P84"><text:tab/>“<text:span text:style-name="T345">Dude, piss off!” Axel finally says </text:span><text:span text:style-name="T346">after another salvo of ‘encouragements’</text:span><text:span text:style-name="T345">.</text:span></text:p>
      <text:p text:style-name="P84"/>
      <text:p text:style-name="P84"><text:tab/>“<text:span text:style-name="T345">Holy shit, it’s you Axel? You finally scored? With who?”</text:span></text:p>
      <text:p text:style-name="P84"/>
      <text:p text:style-name="P84"><text:tab/>“<text:span text:style-name="T345">Must be Bee,” Leo’s girlfriend says. “Couldn’t stop holding ou</text:span><text:span text:style-name="T347">r</text:span><text:span text:style-name="T345"> ears about him since day one.”</text:span></text:p>
      <text:p text:style-name="P84"><text:tab/></text:p>
      <text:p text:style-name="P84"><text:tab/>“<text:span text:style-name="T345">I never did that!” Beatrice squealed in embarrassment, realizing too late she just outed herself.</text:span></text:p>
      <text:p text:style-name="P84"/>
      <text:p text:style-name="P84"><text:tab/>“<text:span text:style-name="T345">Holy shit, it’s really her!” her friend laughs. “Well, enjoy your time together!”</text:span></text:p>
      <text:p text:style-name="P84"/>
      <text:p text:style-name="P84"><text:tab/><text:span text:style-name="T345">The couple exits the scene sharing laughters. Beatrice sits back on the toilet, hiding her face in her hands. </text:span><text:span text:style-name="T348">It’s only after their echoes die in the corridor that the duo finally relaxes, and Axel even allows himself a nervous chuckle over being caught red-handed. Beatrice pouts, but even she ends up joining him after a few seconds.</text:span></text:p>
      <text:p text:style-name="P84"/>
      <text:p text:style-name="P84"><text:tab/>“<text:span text:style-name="T348">Now everyone knows.”</text:span></text:p>
      <text:p text:style-name="P84"/>
      <text:p text:style-name="P84"><text:tab/>“<text:span text:style-name="T348">I’m fine with that,” says Beatrice while picking up her clothes. “I just wish they wouldn’t be jerks about it.”</text:span></text:p>
      <text:p text:style-name="P84"/>
      <text:p text:style-name="P84"><text:tab/>“<text:span text:style-name="T348">It’s Leo, I know him. He does this just to screw with us, he doesn’t mean it.”</text:span></text:p>
      <text:p text:style-name="P84"/>
      <text:p text:style-name="P85"><text:tab/>They then spend the next minute slowly dressing up in a comfortable silence, still basking in the afterglow of their <text:span text:style-name="T349">little</text:span> act together – and the recent adrenaline. Axel couldn’t help himself from peeking at his partner’s body from time to time; a view he knows he’ll never get tired of.</text:p>
      <text:p text:style-name="P85"/>
      <text:p text:style-name="P85"><text:tab/><text:span text:style-name="T349">Once they are finished, Beatrice surprises Axel by hugging him tightly, which he quickly returned. She risks a hand on his head, slowly caressing his hair. There isn’t anything carnal about </text:span><text:span text:style-name="T350">the moment</text:span><text:span text:style-name="T349">, nor is there anything more to say; they are simply finding comfort in each other’s presence.</text:span></text:p>
      <text:p text:style-name="P76"/>
      <text:p text:style-name="P76"><text:tab/>“<text:span text:style-name="T351">I,” Axel starts. “I honestly don’t know what I would have said if you had refused </text:span><text:span text:style-name="T350">me</text:span><text:span text:style-name="T351">. I mean, I didn’t expect you to accept me, but…”</text:span></text:p>
      <text:p text:style-name="P76"/>
      <text:p text:style-name="P76"><text:tab/>“<text:span text:style-name="T351">So? We would still remain friends like nothing had happened,” Beatrice confidently answers. “Don’t stress yourself with ‘what ifs’, Axel.”</text:span></text:p>
      <text:p text:style-name="P76"/>
      <text:p text:style-name="P76"><text:tab/><text:span text:style-name="T320">They </text:span><text:span text:style-name="T352">return to cuddling in silence, only to be broken a few seconds later by a feminine giggling.</text:span></text:p>
      <text:p text:style-name="P76"><text:soft-page-break/></text:p>
      <text:p text:style-name="P76"><text:tab/>“<text:span text:style-name="T352">Tee hee.”</text:span></text:p>
      <text:p text:style-name="P76"/>
      <text:p text:style-name="P76"><text:tab/>“<text:span text:style-name="T352">What’s going on?”</text:span></text:p>
      <text:p text:style-name="P76"/>
      <text:p text:style-name="P86"><text:tab/><text:span text:style-name="T320">“I have a boyfriend.” Beatrice squeals with happiness, </text:span><text:span text:style-name="T352">tightening her grip on her man like a giant plush.</text:span></text:p>
      <text:p text:style-name="P87"/>
      <text:p text:style-name="P87"><text:tab/><text:span text:style-name="T353">He chuckles, and rests in head in her neck. They stay like this in a while, enjoying the silence together. The location may not be what Axel had in mind for a first date, but neither of them seem to care; for his part, he is more than satisfied from the outcome.</text:span></text:p>
      <text:p text:style-name="P87"/>
      <text:p text:style-name="P87"><text:tab/>“<text:span text:style-name="T353">You know we’re gonna have to go back to the hall and confront the others, right?” Axel asks.</text:span></text:p>
      <text:p text:style-name="P87"/>
      <text:p text:style-name="P87"><text:tab/>“<text:span text:style-name="T353">Looking forward to it,” she grunts in anticipated annoyance.</text:span></text:p>
      <text:p text:style-name="P87"/>
      <text:p text:style-name="P87"><text:tab/><text:span text:style-name="T353">Yeah, they could stay here a bit longer.</text:span></text:p>
      <text:p text:style-name="P70"/>
      <text:p text:style-name="P70"/>
      <text:p text:style-name="P69"/>
      <text:p text:style-name="P69"><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2DT21H43M31S</meta:editing-duration>
    <meta:editing-cycles>380</meta:editing-cycles>
    <meta:generator>LibreOffice/26.2.3.2$Windows_X86_64 LibreOffice_project/70e089b17412e4cb7773e41413306b17a2328c34</meta:generator>
    <meta:creation-date>2026-06-06T16:50:12.344730600</meta:creation-date>
    <dc:title>Format de texte</dc:title>
    <dc:date>2026-06-27T22:49:27.540840000</dc:date>
    <meta:document-statistic meta:table-count="0" meta:image-count="0" meta:object-count="0" meta:page-count="30" meta:paragraph-count="403" meta:word-count="11543" meta:character-count="62975" meta:non-whitespace-character-count="51401"/>
    <meta:template xlink:type="simple" xlink:actuate="onRequest" xlink:title="Format de texte" xlink:href="../../../../Format%20prompt%20histoire.ott" meta:date="2026-06-06T16:50:11.982652500"/>
  </office:meta>
</office:document-meta>
</file>