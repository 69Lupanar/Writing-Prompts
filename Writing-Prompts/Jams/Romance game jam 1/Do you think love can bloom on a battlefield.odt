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36eb82" style:font-style-asian="normal" style:font-style-complex="normal"/>
    </style:style>
    <style:style style:name="P3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6eb82" style:font-style-asian="normal" style:font-style-complex="normal"/>
    </style:style>
    <style:style style:name="P3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be27f" style:font-style-asian="normal" style:font-style-complex="normal"/>
    </style:style>
    <style:style style:name="P4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6f8f" officeooo:paragraph-rsid="01476f8f" style:font-style-asian="normal" style:font-style-complex="normal"/>
    </style:style>
    <style:style style:name="P4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c12a" officeooo:paragraph-rsid="01476f8f" style:font-style-asian="normal" style:font-style-complex="normal"/>
    </style:style>
    <style:style style:name="P4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a0808" officeooo:paragraph-rsid="014a0808" style:font-style-asian="normal" style:font-style-complex="normal"/>
    </style:style>
    <style:style style:name="P4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530fcd" style:font-style-asian="normal" style:font-style-complex="normal"/>
    </style:style>
    <style:style style:name="P4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51cfd4" officeooo:paragraph-rsid="01530fcd" style:font-style-asian="normal" style:font-style-complex="normal"/>
    </style:style>
    <style:style style:name="P4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4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6fea61" style:font-style-asian="normal" style:font-style-complex="normal"/>
    </style:style>
    <style:style style:name="P4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9b86b" style:font-style-asian="normal" style:font-style-complex="normal"/>
    </style:style>
    <style:style style:name="P4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b588c" style:font-style-asian="normal" style:font-style-complex="normal"/>
    </style:style>
    <style:style style:name="P4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7a79ec" style:font-style-asian="normal" style:font-style-complex="normal"/>
    </style:style>
    <style:style style:name="P5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acb59" style:font-style-asian="normal" style:font-style-complex="normal"/>
    </style:style>
    <style:style style:name="P5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858ad4" style:font-style-asian="normal" style:font-style-complex="normal"/>
    </style:style>
    <style:style style:name="P5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3"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846148" officeooo:paragraph-rsid="01906cc9" style:font-style-asian="normal" style:font-style-complex="normal"/>
    </style:style>
    <style:style style:name="P5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9bfc73" style:font-style-asian="normal" style:font-style-complex="normal"/>
    </style:style>
    <style:style style:name="P5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665fa" style:font-style-asian="normal" style:font-style-complex="normal"/>
    </style:style>
    <style:style style:name="P5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9bfc73" officeooo:paragraph-rsid="01a3a47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30f077"/>
    </style:style>
    <style:style style:name="T129" style:family="text">
      <style:text-properties officeooo:rsid="0132761e"/>
    </style:style>
    <style:style style:name="T130" style:family="text">
      <style:text-properties officeooo:rsid="012312ef"/>
    </style:style>
    <style:style style:name="T131" style:family="text">
      <style:text-properties officeooo:rsid="0124dfed"/>
    </style:style>
    <style:style style:name="T132" style:family="text">
      <style:text-properties officeooo:rsid="01262c2a"/>
    </style:style>
    <style:style style:name="T133" style:family="text">
      <style:text-properties officeooo:rsid="01295c27"/>
    </style:style>
    <style:style style:name="T134" style:family="text">
      <style:text-properties officeooo:rsid="012720be"/>
    </style:style>
    <style:style style:name="T135" style:family="text">
      <style:text-properties officeooo:rsid="012b2c38"/>
    </style:style>
    <style:style style:name="T136" style:family="text">
      <style:text-properties officeooo:rsid="012e7594"/>
    </style:style>
    <style:style style:name="T137" style:family="text">
      <style:text-properties officeooo:rsid="01328549"/>
    </style:style>
    <style:style style:name="T138" style:family="text">
      <style:text-properties officeooo:rsid="0135884c"/>
    </style:style>
    <style:style style:name="T139" style:family="text">
      <style:text-properties officeooo:rsid="01388eb4"/>
    </style:style>
    <style:style style:name="T140" style:family="text">
      <style:text-properties officeooo:rsid="013af4a9"/>
    </style:style>
    <style:style style:name="T141" style:family="text">
      <style:text-properties officeooo:rsid="013be27f"/>
    </style:style>
    <style:style style:name="T142" style:family="text">
      <style:text-properties officeooo:rsid="0138ca07"/>
    </style:style>
    <style:style style:name="T143" style:family="text">
      <style:text-properties officeooo:rsid="013a7c41"/>
    </style:style>
    <style:style style:name="T144" style:family="text">
      <style:text-properties officeooo:rsid="013dd133"/>
    </style:style>
    <style:style style:name="T145" style:family="text">
      <style:text-properties officeooo:rsid="013e9346"/>
    </style:style>
    <style:style style:name="T146" style:family="text">
      <style:text-properties officeooo:rsid="01466a70"/>
    </style:style>
    <style:style style:name="T147" style:family="text">
      <style:text-properties officeooo:rsid="01476f8f"/>
    </style:style>
    <style:style style:name="T148" style:family="text">
      <style:text-properties officeooo:rsid="01485691"/>
    </style:style>
    <style:style style:name="T149" style:family="text">
      <style:text-properties officeooo:rsid="015c2abe"/>
    </style:style>
    <style:style style:name="T150" style:family="text">
      <style:text-properties officeooo:rsid="015ccdd3"/>
    </style:style>
    <style:style style:name="T151" style:family="text">
      <style:text-properties fo:font-style="italic" officeooo:rsid="015ccdd3" style:font-style-asian="italic" style:font-style-complex="italic"/>
    </style:style>
    <style:style style:name="T152" style:family="text">
      <style:text-properties fo:font-style="italic" officeooo:rsid="015e6533" style:font-style-asian="italic" style:font-style-complex="italic"/>
    </style:style>
    <style:style style:name="T153" style:family="text">
      <style:text-properties fo:font-style="italic" officeooo:rsid="015f7a01" style:font-style-asian="italic" style:font-style-complex="italic"/>
    </style:style>
    <style:style style:name="T154" style:family="text">
      <style:text-properties officeooo:rsid="014a3815"/>
    </style:style>
    <style:style style:name="T155" style:family="text">
      <style:text-properties officeooo:rsid="014a3d48"/>
    </style:style>
    <style:style style:name="T156" style:family="text">
      <style:text-properties officeooo:rsid="014b0e69"/>
    </style:style>
    <style:style style:name="T157" style:family="text">
      <style:text-properties officeooo:rsid="014d896f"/>
    </style:style>
    <style:style style:name="T158" style:family="text">
      <style:text-properties officeooo:rsid="014c5507"/>
    </style:style>
    <style:style style:name="T159" style:family="text">
      <style:text-properties officeooo:rsid="014d2f4b"/>
    </style:style>
    <style:style style:name="T160" style:family="text">
      <style:text-properties officeooo:rsid="014f2daa"/>
    </style:style>
    <style:style style:name="T161" style:family="text">
      <style:text-properties officeooo:rsid="014f4882"/>
    </style:style>
    <style:style style:name="T162" style:family="text">
      <style:text-properties officeooo:rsid="01505e24"/>
    </style:style>
    <style:style style:name="T163" style:family="text">
      <style:text-properties officeooo:rsid="0151cfd4"/>
    </style:style>
    <style:style style:name="T164" style:family="text">
      <style:text-properties officeooo:rsid="01530fcd"/>
    </style:style>
    <style:style style:name="T165" style:family="text">
      <style:text-properties officeooo:rsid="016a6605"/>
    </style:style>
    <style:style style:name="T166" style:family="text">
      <style:text-properties officeooo:rsid="016d39b5"/>
    </style:style>
    <style:style style:name="T167" style:family="text">
      <style:text-properties officeooo:rsid="016b941f"/>
    </style:style>
    <style:style style:name="T168" style:family="text">
      <style:text-properties officeooo:rsid="01546296"/>
    </style:style>
    <style:style style:name="T169" style:family="text">
      <style:text-properties officeooo:rsid="0185b289"/>
    </style:style>
    <style:style style:name="T170" style:family="text">
      <style:text-properties officeooo:rsid="018708f4"/>
    </style:style>
    <style:style style:name="T171" style:family="text">
      <style:text-properties officeooo:rsid="0156475d"/>
    </style:style>
    <style:style style:name="T172" style:family="text">
      <style:text-properties officeooo:rsid="01570eba"/>
    </style:style>
    <style:style style:name="T173" style:family="text">
      <style:text-properties officeooo:rsid="017124bd"/>
    </style:style>
    <style:style style:name="T174" style:family="text">
      <style:text-properties officeooo:rsid="01715679"/>
    </style:style>
    <style:style style:name="T175" style:family="text">
      <style:text-properties officeooo:rsid="015fa61e"/>
    </style:style>
    <style:style style:name="T176" style:family="text">
      <style:text-properties officeooo:rsid="016fea61"/>
    </style:style>
    <style:style style:name="T177" style:family="text">
      <style:text-properties officeooo:rsid="016839a8"/>
    </style:style>
    <style:style style:name="T178" style:family="text">
      <style:text-properties officeooo:rsid="016e3fef"/>
    </style:style>
    <style:style style:name="T179" style:family="text">
      <style:text-properties officeooo:rsid="016556bb"/>
    </style:style>
    <style:style style:name="T180" style:family="text">
      <style:text-properties officeooo:rsid="01680db6"/>
    </style:style>
    <style:style style:name="T181" style:family="text">
      <style:text-properties officeooo:rsid="0171dce3"/>
    </style:style>
    <style:style style:name="T182" style:family="text">
      <style:text-properties officeooo:rsid="01726df1"/>
    </style:style>
    <style:style style:name="T183" style:family="text">
      <style:text-properties officeooo:rsid="017294f2"/>
    </style:style>
    <style:style style:name="T184" style:family="text">
      <style:text-properties officeooo:rsid="01788842"/>
    </style:style>
    <style:style style:name="T185" style:family="text">
      <style:text-properties officeooo:rsid="0179b86b"/>
    </style:style>
    <style:style style:name="T186" style:family="text">
      <style:text-properties officeooo:rsid="0175baf9"/>
    </style:style>
    <style:style style:name="T187" style:family="text">
      <style:text-properties officeooo:rsid="017677f6"/>
    </style:style>
    <style:style style:name="T188" style:family="text">
      <style:text-properties officeooo:rsid="01772edc"/>
    </style:style>
    <style:style style:name="T189" style:family="text">
      <style:text-properties officeooo:rsid="017a79ec"/>
    </style:style>
    <style:style style:name="T190" style:family="text">
      <style:text-properties officeooo:rsid="017ba66c"/>
    </style:style>
    <style:style style:name="T191" style:family="text">
      <style:text-properties officeooo:rsid="017be8f8"/>
    </style:style>
    <style:style style:name="T192" style:family="text">
      <style:text-properties officeooo:rsid="017d1963"/>
    </style:style>
    <style:style style:name="T193" style:family="text">
      <style:text-properties officeooo:rsid="017eed54"/>
    </style:style>
    <style:style style:name="T194" style:family="text">
      <style:text-properties officeooo:rsid="01875d2b"/>
    </style:style>
    <style:style style:name="T195" style:family="text">
      <style:text-properties officeooo:rsid="01806683"/>
    </style:style>
    <style:style style:name="T196" style:family="text">
      <style:text-properties officeooo:rsid="0182a758"/>
    </style:style>
    <style:style style:name="T197" style:family="text">
      <style:text-properties officeooo:rsid="018a8356"/>
    </style:style>
    <style:style style:name="T198" style:family="text">
      <style:text-properties officeooo:rsid="01858ad4"/>
    </style:style>
    <style:style style:name="T199" style:family="text">
      <style:text-properties officeooo:rsid="018c9362"/>
    </style:style>
    <style:style style:name="T200" style:family="text">
      <style:text-properties officeooo:rsid="018d253e"/>
    </style:style>
    <style:style style:name="T201" style:family="text">
      <style:text-properties officeooo:rsid="01906cc9"/>
    </style:style>
    <style:style style:name="T202" style:family="text">
      <style:text-properties fo:font-style="italic" officeooo:rsid="01858ad4" style:font-style-asian="italic" style:font-style-complex="italic"/>
    </style:style>
    <style:style style:name="T203" style:family="text">
      <style:text-properties officeooo:rsid="01870c53"/>
    </style:style>
    <style:style style:name="T204" style:family="text">
      <style:text-properties officeooo:rsid="0187109c"/>
    </style:style>
    <style:style style:name="T205" style:family="text">
      <style:text-properties officeooo:rsid="0187ff70"/>
    </style:style>
    <style:style style:name="T206" style:family="text">
      <style:text-properties officeooo:rsid="0188cbd4"/>
    </style:style>
    <style:style style:name="T207" style:family="text">
      <style:text-properties officeooo:rsid="018ee83b"/>
    </style:style>
    <style:style style:name="T208" style:family="text">
      <style:text-properties officeooo:rsid="01901fc1"/>
    </style:style>
    <style:style style:name="T209" style:family="text">
      <style:text-properties officeooo:rsid="018fc66c"/>
    </style:style>
    <style:style style:name="T210" style:family="text">
      <style:text-properties officeooo:rsid="018969c8"/>
    </style:style>
    <style:style style:name="T211" style:family="text">
      <style:text-properties officeooo:rsid="0191240c"/>
    </style:style>
    <style:style style:name="T212" style:family="text">
      <style:text-properties officeooo:rsid="0192c2af"/>
    </style:style>
    <style:style style:name="T213" style:family="text">
      <style:text-properties officeooo:rsid="01943627"/>
    </style:style>
    <style:style style:name="T214" style:family="text">
      <style:text-properties officeooo:rsid="0197aa06"/>
    </style:style>
    <style:style style:name="T215" style:family="text">
      <style:text-properties officeooo:rsid="019919c8"/>
    </style:style>
    <style:style style:name="T216" style:family="text">
      <style:text-properties officeooo:rsid="01997a8c"/>
    </style:style>
    <style:style style:name="T217" style:family="text">
      <style:text-properties officeooo:rsid="019ad427"/>
    </style:style>
    <style:style style:name="T218" style:family="text">
      <style:text-properties fo:font-style="italic" officeooo:rsid="019ad427" style:font-style-asian="italic" style:font-style-complex="italic"/>
    </style:style>
    <style:style style:name="T219" style:family="text">
      <style:text-properties officeooo:rsid="019bfc73"/>
    </style:style>
    <style:style style:name="T220" style:family="text">
      <style:text-properties officeooo:rsid="019d5049"/>
    </style:style>
    <style:style style:name="T221" style:family="text">
      <style:text-properties officeooo:rsid="019e0b1e"/>
    </style:style>
    <style:style style:name="T222" style:family="text">
      <style:text-properties officeooo:rsid="019ff67a"/>
    </style:style>
    <style:style style:name="T223" style:family="text">
      <style:text-properties officeooo:rsid="01a3ec30"/>
    </style:style>
    <style:style style:name="T224" style:family="text">
      <style:text-properties officeooo:rsid="01a8a734"/>
    </style:style>
    <style:style style:name="T225" style:family="text">
      <style:text-properties officeooo:rsid="01a27ceb"/>
    </style:style>
    <style:style style:name="T226" style:family="text">
      <style:text-properties officeooo:rsid="01a6e0f8"/>
    </style:style>
    <style:style style:name="T227" style:family="text">
      <style:text-properties officeooo:rsid="01a9d2f4"/>
    </style:style>
    <style:style style:name="T228" style:family="text">
      <style:text-properties officeooo:rsid="019e84e5"/>
    </style:style>
    <style:style style:name="T229" style:family="text">
      <style:text-properties officeooo:rsid="01abc816"/>
    </style:style>
    <style:style style:name="T230" style:family="text">
      <style:text-properties officeooo:rsid="01acb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text:span></text:p>
      <text:p text:style-name="P30"/>
      <text:p text:style-name="P35"><text:tab/><text:span text:style-name="T127">Axel begrudgingly follows her outside, he who had hoped he would not have to deal with the heat again for a while. </text:span></text:p>
      <text:p text:style-name="P36"/>
      <text:p text:style-name="P36"><text:tab/>The back <text:span text:style-name="T128">room</text:span> of the gym wasn’t <text:span text:style-name="T129">much smaller than the previous room</text:span>; basically a continuation of the <text:span text:style-name="T128">main gym, now used mainly as a storage room for the students’ equipment</text:span>. The place wasn’t <text:span text:style-name="T129">well tidied up</text:span>, but at least it was <text:span text:style-name="T129">away from any pair of prying eyes</text:span>. Beatrice <text:span text:style-name="T130">places</text:span> <text:span text:style-name="T130">him back against the wall and gives him one of her balls before planting herself in front of him ten meters away.</text:span></text:p>
      <text:p text:style-name="P36"/>
      <text:p text:style-name="P36"><text:tab/>“<text:span text:style-name="T131">During our match, I noticed you tend to go back up when your opponent has the ball,” she says, raising her voice a bit so he can hear her clearly. “That’s fine if you intend to catch, </text:span><text:soft-page-break/><text:span text:style-name="T131">but </text:span><text:span text:style-name="T132">that won’t be enough if they just gang up on you. So now with the wall behind you, you won’t be able to run away anymore.”</text:span></text:p>
      <text:p text:style-name="P36"/>
      <text:p text:style-name="P36"><text:tab/><text:span text:style-name="T132">She punches the ball with one hand in a thunderous ‘thud’ sound.</text:span></text:p>
      <text:p text:style-name="P36"/>
      <text:p text:style-name="P36"><text:tab/>“<text:span text:style-name="T132">So you dodge the ball by the side and you throw them back to me. If you try to block or catch’em </text:span><text:span text:style-name="T133">mid air</text:span><text:span text:style-name="T132"> I’ll stop holding back </text:span><text:span text:style-name="T134">until you dodge them again</text:span><text:span text:style-name="T132">, capische?”</text:span></text:p>
      <text:p text:style-name="P36"/>
      <text:p text:style-name="P36"><text:tab/><text:span text:style-name="T134">Axel wasn’t so sure this was a good method for training; not that he could voice his opinion, as the first ball already shot towards </text:span><text:span text:style-name="T133">his face</text:span><text:span text:style-name="T134"> in a blur. </text:span><text:span text:style-name="T133">He dodged, barely, and the impact against the wall sent a shockwave drilling into his ears.</text:span></text:p>
      <text:p text:style-name="P36"/>
      <text:p text:style-name="P36"><text:tab/>“<text:span text:style-name="T135">Hey! Just… Just be gentle, okay?” he pleads.</text:span></text:p>
      <text:p text:style-name="P36"/>
      <text:p text:style-name="P37"><text:tab/><text:span text:style-name="T135">In front of him, Beatrice adorn</text:span><text:span text:style-name="T136">s</text:span><text:span text:style-name="T135"> a predatory grin. </text:span><text:span text:style-name="T128">The ball rolls at her feet, which she picks and throws back at </text:span><text:span text:style-name="T137">him with her full strength. Again, Axel barely has the time to react before it hits his left leg with an explosive sound. </text:span><text:span text:style-name="T138">With a grunt, he throws it back. </text:span></text:p>
      <text:p text:style-name="P38"/>
      <text:p text:style-name="P38"><text:tab/>As their little game goes on, Axel could feel the strain on its body <text:span text:style-name="T139">starting to gnaw at his </text:span><text:span text:style-name="T140">knees</text:span>. For the next ones, he has to throw his entire weight on the ground as Beatrice picks up the pace of her throws, getting faster and stronger by the minute. <text:span text:style-name="T141">S</text:span><text:span text:style-name="T142">eeing the determination in her eyes refrains him from complaining.</text:span></text:p>
      <text:p text:style-name="P38"/>
      <text:p text:style-name="P39"><text:tab/><text:span text:style-name="T142">Eventually, they settled on </text:span><text:span text:style-name="T143">a somewhat comfortable pace. </text:span><text:span text:style-name="T141">Axel could see Beatrice was </text:span><text:span text:style-name="T144">more</text:span><text:span text:style-name="T141"> having fun than actually training him, even if the</text:span><text:span text:style-name="T142"> </text:span><text:span text:style-name="T141">exercise itself</text:span><text:span text:style-name="T142"> was not much different from what he was used to. </text:span><text:span text:style-name="T144">Eventually, he caught himself throwing the ball back in an attempt to hit her, and the session quickly turned into a faux dodgeball match. </text:span><text:span text:style-name="T145">For a brief moment, he felt his step quicker and his body lighter, as if the memory of his previous defeat was nothing but a distant nightmare weighing on his shoulders.</text:span></text:p>
      <text:p text:style-name="P39"/>
      <text:p text:style-name="P39"><text:tab/>“<text:span text:style-name="T146">Bee!” </text:span><text:span text:style-name="T147">a voice calls out to her.</text:span></text:p>
      <text:p text:style-name="P39"/>
      <text:p text:style-name="P40"><text:tab/>The sound of the door knob turning fills the room before a head peeks out from the doorway; it was her uncle.</text:p>
      <text:p text:style-name="P40"/>
      <text:p text:style-name="P40"><text:tab/>“It’s time to go home, big girl,” Bob declares. “The others are packing their bags already. You’ll give him cooties later.”</text:p>
      <text:p text:style-name="P40"/>
      <text:p text:style-name="P40"><text:tab/>“Bob, god dammit!” she snaps back, but he is already gone.</text:p>
      <text:p text:style-name="P40"/>
      <text:p text:style-name="P40"><text:tab/>She buries her beet-red face in her hands in embarrassment, and Alex tries to think of anything to skip this awkward moment.</text:p>
      <text:p text:style-name="P41"><text:tab/></text:p>
      <text:p text:style-name="P41"><text:tab/>“So, ah, <text:span text:style-name="T148">I’ll be on my way then.</text:span> <text:span text:style-name="T148">See you at the tournament?”</text:span></text:p>
      <text:p text:style-name="P41"><text:soft-page-break/></text:p>
      <text:p text:style-name="P41"><text:tab/>“<text:span text:style-name="T148">Y-</text:span><text:span text:style-name="T149">Y</text:span><text:span text:style-name="T148">eah, see ya,” she answers, but seemingly finds the other side of the room more interesting.</text:span></text:p>
      <text:p text:style-name="P41"/>
      <text:p text:style-name="P41"><text:tab/><text:span text:style-name="T148">Axel returns to the main room </text:span><text:span text:style-name="T149">before the situation becomes </text:span><text:span text:style-name="T150">even worse</text:span><text:span text:style-name="T148">. Most of the students were already gone. He makes a beeline for the bench where he left his bag, </text:span><text:span text:style-name="T149">still unable the shake off the </text:span><text:span text:style-name="T150">fuzzy feeling inside his chest.</text:span></text:p>
      <text:p text:style-name="P41"/>
      <text:p text:style-name="P41"><text:tab/><text:span text:style-name="T151">It was just because Bob likes to mess with her, right?</text:span><text:span text:style-name="T150"> He thought to himself. </text:span><text:span text:style-name="T151">She didn’t really </text:span><text:span text:style-name="T152">try to</text:span><text:span text:style-name="T151">… No, no, forget it.</text:span><text:span text:style-name="T152"> Not a chance </text:span><text:span text:style-name="T153">she would be..</text:span><text:span text:style-name="T152">.</text:span></text:p>
      <text:p text:style-name="P41"/>
      <text:p text:style-name="P41"><text:tab/>“<text:span text:style-name="T148">Wait!”</text:span></text:p>
      <text:p text:style-name="P41"/>
      <text:p text:style-name="P41"><text:tab/><text:span text:style-name="T148">She rushes to the other side of the room where her own bag was, grabs something inside one of its pockets, and runs back to Axel with some sort of paper in her hand.</text:span></text:p>
      <text:p text:style-name="P41"/>
      <text:p text:style-name="P41"><text:tab/>“<text:span text:style-name="T148">There you go. I got a free ticket from the organizers, so I thought you might need to think about something else for a change.”</text:span></text:p>
      <text:p text:style-name="P41"/>
      <text:p text:style-name="P42">Axel grabs the paper, and raises an eyebrow when he sees the title for the event she was attending.</text:p>
      <text:p text:style-name="P42"/>
      <text:p text:style-name="P42"><text:tab/>“You’re having a boxing tournament too?”</text:p>
      <text:p text:style-name="P42"/>
      <text:p text:style-name="P42"><text:tab/>“Yup!” she proudly exclaims with her hands on her hips. “And you <text:span text:style-name="T1">have</text:span> to come and watch it!”</text:p>
      <text:p text:style-name="P42"/>
      <text:p text:style-name="P42"><text:tab/>“Where on earth do you find the energy to compete in two sports?”</text:p>
      <text:p text:style-name="P42"/>
      <text:p text:style-name="P42"><text:tab/>“Well, you gotta have a cause to fight for,” she smiles, being so corny Axel can’t help himself but smile. “But seriously. It’s mostly to help my uncle out.”</text:p>
      <text:p text:style-name="P42"/>
      <text:p text:style-name="P42"><text:tab/>“Why?”</text:p>
      <text:p text:style-name="P42"/>
      <text:p text:style-name="P42"><text:tab/>“Well,” she gestures him to follow her outside to make sure no one would hear her. “You noticed how few students this place has?”</text:p>
      <text:p text:style-name="P42"/>
      <text:p text:style-name="P42"><text:tab/>“Uh, not really. I always thought this was normal for fighting clubs.”</text:p>
      <text:p text:style-name="P42"/>
      <text:p text:style-name="P42"><text:tab/>“Nah. Bob used to have more students back when I started. <text:span text:style-name="T154">But recently there’s been a new sports club opening a few blocks away. The owner is super rich and it’s starting to outdo smaller clubs like ours in the area. But the tournament offers some cash as prize for the winner, so I hope it’ll help my unc’ stay afloat for a while.”</text:span></text:p>
      <text:p text:style-name="P42"/>
      <text:p text:style-name="P42"><text:tab/>“… <text:span text:style-name="T154">Wow, that’s really noble of you. Your uncle is lucky to have you.” Axel comments, </text:span><text:soft-page-break/><text:span text:style-name="T154">impressed.</text:span></text:p>
      <text:p text:style-name="P42"/>
      <text:p text:style-name="P42"><text:tab/>“<text:span text:style-name="T154">It’s nothing really, I’m just helping out my family, is all,” she answers, trying to sound unfazed, but the faint blush on her cheeks shows she appreciates the compliment.</text:span></text:p>
      <text:p text:style-name="P36"/>
      <text:p text:style-name="P36"><text:tab/>“… <text:span text:style-name="T154">But,” he continues. “That’s only if you win. You don’t know who’s gonna be up against you. What if they’ve trained since they’re born, type of boxer? You’re just gonna get smacked onto the ground.”</text:span></text:p>
      <text:p text:style-name="P36"/>
      <text:p text:style-name="P36"><text:tab/>“<text:span text:style-name="T154">Well I’ll smack them harder,” she says. “That’s the only shot I get of making the daughter of Mr. ‘I-shit-gold-all-day’ eat back her own shit.”</text:span></text:p>
      <text:p text:style-name="P36"/>
      <text:p text:style-name="P36"><text:tab/>“<text:span text:style-name="T154">Oh, you know her?”</text:span></text:p>
      <text:p text:style-name="P36"/>
      <text:p text:style-name="P36"><text:tab/>“<text:span text:style-name="T154">Met her a few times during inter-club events” she growls. “Dumb bitch thinks she’s the shit </text:span><text:span text:style-name="T155">because her dad hired a pro boxer for her. She’s insufferable to everyone. Honestly I just to be next week already.”</text:span></text:p>
      <text:p text:style-name="P36"/>
      <text:p text:style-name="P36"><text:tab/>“<text:span text:style-name="T155">You’re pumped up for this? Not anxious or anything?”</text:span></text:p>
      <text:p text:style-name="P36"/>
      <text:p text:style-name="P36"><text:tab/>“<text:span text:style-name="T155">Nah, because I’ll win,” she half-jokes, making herself giggle.</text:span></text:p>
      <text:p text:style-name="P36"/>
      <text:p text:style-name="P36"><text:tab/><text:span text:style-name="T155">Axel can’t help himself but smile at seeing her laugh.She wasn’t feeling any kind of pressure for the tournament; she was looking forward to it with joy, even though the odds were against her. Her confidence makes him envious. </text:span></text:p>
      <text:p text:style-name="P36"/>
      <text:p text:style-name="P36"><text:tab/>“<text:span text:style-name="T156">Bee, I never asked, but… Why did you pick up boxing to begin with?”</text:span></text:p>
      <text:p text:style-name="P36"/>
      <text:p text:style-name="P36"><text:tab/>“<text:span text:style-name="T156">Because it’s fun!” she simply replies. “I get to see the family more often, I learn to defend myself, and I get to kick ass. And where else could I get this body of dreams?”</text:span></text:p>
      <text:p text:style-name="P36"/>
      <text:p text:style-name="P36"><text:tab/><text:span text:style-name="T156">She flexes her arm as to prove her point, but Axel knows it was just a lighthearted joke. Still, seeing her biceps reminds him of the time at that bar where he got to peek at her abs, and the mental image of her toned, athletic body marked with battle scars and ripped muscles, makes him feel </text:span><text:span text:style-name="T157">fuzzy</text:span><text:span text:style-name="T158"> inside, despite his best attempts at self-control.</text:span></text:p>
      <text:p text:style-name="P36"/>
      <text:p text:style-name="P36"><text:tab/>“<text:span text:style-name="T159">But,” he focuses back on the conversation. “</text:span><text:span text:style-name="T160">What if you get hurt so badly you can’t fight anymore?”</text:span></text:p>
      <text:p text:style-name="P36"/>
      <text:p text:style-name="P36"><text:tab/>“<text:span text:style-name="T160">Then so what? It doesn’t matter. It’s not the end result that keeps me going, it’s the people who support me, my parents, the friends I made at the gym. It’s seeing how much I kick ass now compared to when I started. Can you believe I was as scrawny back then as you are now?”</text:span></text:p>
      <text:p text:style-name="P36"/>
      <text:p text:style-name="P36"><text:tab/>“<text:span text:style-name="T160">Hey, I’m not scrawny!” Axel protests.</text:span></text:p>
      <text:p text:style-name="P36"><text:soft-page-break/></text:p>
      <text:p text:style-name="P36"><text:tab/>“<text:span text:style-name="T161">Yes you are, you throw like a girl,” she playfully elbows him, clearly not really serious about it. “But really, it’s really satisfying when you see how far you’ve come. So what if you get hurt, or never win tournaments? What matters is </text:span><text:span text:style-name="T162">to see how much better you’ve become at the things you love. It’s</text:span><text:span text:style-name="T161"> the journey, not the destination.”</text:span></text:p>
      <text:p text:style-name="P36"/>
      <text:p text:style-name="P36"><text:tab/>“… <text:span text:style-name="T163">I see.”</text:span></text:p>
      <text:p text:style-name="P36"/>
      <text:p text:style-name="P43"><text:tab/><text:span text:style-name="T163">There was an honesty in her words that makes Axel hesitate. </text:span><text:span text:style-name="T164">He who has been a slow learner and a mediocre player his entire life, he has never been the fastest, the strongest, nor the smartest of players, never managing once to see what little good his efforts produced</text:span><text:span text:style-name="T163">. </text:span><text:span text:style-name="T164">The fear of failing his friends and family has always been the chain holding him back. Could he actually do it?</text:span></text:p>
      <text:p text:style-name="P43"/>
      <text:p text:style-name="P43"><text:tab/>“<text:span text:style-name="T165">Yeah, we all get setbacks from time to time”, she resumes after a pause. “And </text:span><text:span text:style-name="T166">yeah,</text:span><text:span text:style-name="T165"> it sucks. There were fights I lost where I just wanted to just throw in the towel and give up. But what would that change? Would that be really all I’m capable for? Would I be okay to live with the idea that I abandoned the people who gave me a chance? I don’t want to be a waste of time to my uncle, and I want to accomplish something I’ll still be proud of in ten years. So what if it hurts? What if I lose? </text:span><text:span text:style-name="T167">I’ll just try again. </text:span><text:span text:style-name="T165">It’s still miles better than abandoning those who trusted me.”</text:span></text:p>
      <text:p text:style-name="P43"/>
      <text:p text:style-name="P43"><text:tab/><text:span text:style-name="T168">As he stared at the road in front of his feet, he felt Beatrice’s massive hand land on his back. The impact makes him almost fall over.</text:span></text:p>
      <text:p text:style-name="P43"/>
      <text:p text:style-name="P43"><text:tab/>“<text:span text:style-name="T168">Alright, I’ll go join my uncle in the car.” she declares. “See ya at the tournament.”</text:span></text:p>
      <text:p text:style-name="P43"/>
      <text:p text:style-name="P43"><text:tab/><text:span text:style-name="T168">She waves at him, then adds:</text:span></text:p>
      <text:p text:style-name="P43"/>
      <text:p text:style-name="P43"><text:tab/>“<text:span text:style-name="T169">That was fun. We should do that more often. </text:span><text:span text:style-name="T168">And stop thinking about it </text:span><text:span text:style-name="T170">all</text:span><text:span text:style-name="T168">. Told you it doesn’t suit you.”</text:span></text:p>
      <text:p text:style-name="P44"/>
      <text:p text:style-name="P44"><text:tab/><text:span text:style-name="T171">Axel watches her walk back up to the gym for a while, until she disappears by the front door, before going on his way as well. </text:span>A part of him still couldn’t shake off the feeling of inadequacy ingrained in him, but that <text:span text:style-name="T172">nagging voice in his head</text:span> was no longer as loud as before.</text:p>
      <text:p text:style-name="P44"/>
      <text:p text:style-name="P36"/>
      <text:p text:style-name="P45">***</text:p>
      <text:p text:style-name="P45"/>
      <text:p text:style-name="P46"><text:tab/><text:span text:style-name="T173">They won the qua</text:span><text:span text:style-name="T174">r</text:span><text:span text:style-name="T173">ter-finals. A victory by a single set of difference, but a victory nonetheless. </text:span><text:span text:style-name="T175">Axel wipes the sweat off his face, </text:span><text:span text:style-name="T176">eyes</text:span><text:span text:style-name="T175"> </text:span><text:span text:style-name="T177">fix</text:span><text:span text:style-name="T178">at</text:span><text:span text:style-name="T177">ed on the scoreboard.</text:span><text:span text:style-name="T179"> </text:span><text:span text:style-name="T180">His tinnitus </text:span><text:span text:style-name="T179">from the intense effort</text:span><text:span text:style-name="T180"> drowned the screams of joy of his comrades. </text:span><text:span text:style-name="T181">He doesn’t share the</text:span><text:span text:style-name="T182">ir</text:span><text:span text:style-name="T181"> enthusiasm, however; it was too good to be true, </text:span><text:span text:style-name="T182">he </text:span><text:span text:style-name="T183">feels.</text:span></text:p>
      <text:p text:style-name="P46"/>
      <text:p text:style-name="P46"><text:tab/>“<text:span text:style-name="T184">Hey Axel!” his friend Leo called him over. “You’re still up for the party tonight? Told’ya we’d pass!”</text:span></text:p>
      <text:p text:style-name="P46"><text:soft-page-break/></text:p>
      <text:p text:style-name="P47"><text:tab/>“<text:span text:style-name="T184">Oh, uhm, </text:span><text:span text:style-name="T185">yeah, sure. Give me a second.</text:span><text:span text:style-name="T184">” </text:span></text:p>
      <text:p text:style-name="P47"/>
      <text:p text:style-name="P48"><text:span text:style-name="T184"><text:tab/></text:span><text:span text:style-name="T186">He eventually joins the others in the boys’ locker room and collapses on the closest bench, the exhaustion finally catching up to him. The adrenaline that kept him going for minutes on end finally recedes, leaving place to… Contentment? </text:span><text:span text:style-name="T187">He couldn’t describe it with words. He was happy the match was over, and he knows he should be celebrating with the others, but he doesn’t want to get his hopes up. Their victory only leaves a bitter taste in his mouth, like it was a stroke of dumb luck.</text:span></text:p>
      <text:p text:style-name="P47"/>
      <text:p text:style-name="P49"><text:tab/><text:span text:style-name="T187">His hand reflexively reaches for his bag and dives for a crumpled piece of paper. </text:span><text:span text:style-name="T188">He couldn’t tell why he feels the need to look back at Beatrice’s invitation all of a sudden, </text:span><text:span text:style-name="T184">but the mere sight of it makes his heart sink. </text:span><text:span text:style-name="T185">The due date for her boxing match was today, the same day as his own dodgeball match. Hers had probably already started by now.</text:span></text:p>
      <text:p text:style-name="P49"/>
      <text:p text:style-name="P49"><text:tab/>“<text:span text:style-name="T189">What’s that?” Leo asks, inching closer to take a better look.</text:span></text:p>
      <text:p text:style-name="P49"/>
      <text:p text:style-name="P49"><text:tab/>“<text:span text:style-name="T190">Just something Bee gave me.”</text:span></text:p>
      <text:p text:style-name="P49"/>
      <text:p text:style-name="P49"><text:tab/>“<text:span text:style-name="T190">Bee?”</text:span></text:p>
      <text:p text:style-name="P49"/>
      <text:p text:style-name="P49"><text:tab/>“<text:span text:style-name="T190">Beatrice, the captain of the Hyenas, you remember? We had a match with them </text:span><text:span text:style-name="T191">a while ago</text:span><text:span text:style-name="T190">.”</text:span></text:p>
      <text:p text:style-name="P46"/>
      <text:p text:style-name="P46"><text:tab/>“<text:span text:style-name="T191">Oh yeah, them. </text:span><text:span text:style-name="T192">They’re in the tournament too. Maybe we’ll see them in the finals.”</text:span></text:p>
      <text:p text:style-name="P46"/>
      <text:p text:style-name="P46"><text:tab/>“<text:span text:style-name="T192">If we get there, that is.”</text:span></text:p>
      <text:p text:style-name="P46"/>
      <text:p text:style-name="P46"><text:tab/>“<text:span text:style-name="T192">Geez man,” Leo sighs. “I don’t wanna hear you bring down the mood tonight, so cheer up for tonight, will you?”</text:span></text:p>
      <text:p text:style-name="P46"/>
      <text:p text:style-name="P46"><text:tab/>“<text:span text:style-name="T192">Oh, uhm, about the party…”</text:span></text:p>
      <text:p text:style-name="P46"/>
      <text:p text:style-name="P46"><text:tab/>“<text:span text:style-name="T192">Wait, that’s a ticket for a boxing match?” Leo asks after deciphering the paper. He pries it from Axel’s hands to take a better look. “Oh, that girl does boxing too? That explains why she’s goddamn ripped. Wait, the date’s today?”</text:span></text:p>
      <text:p text:style-name="P46"/>
      <text:p text:style-name="P46"><text:tab/><text:span text:style-name="T192">Axel takes the ticket back and shoves it in his bag.</text:span></text:p>
      <text:p text:style-name="P46"/>
      <text:p text:style-name="P46"><text:tab/>“<text:span text:style-name="T192">Oh okay, I didn’t know you promised her to see her match,” Leo says. “I’ll tell the others you’ll be busy for tonight.”</text:span></text:p>
      <text:p text:style-name="P46"/>
      <text:p text:style-name="P46"><text:tab/>“<text:span text:style-name="T192">Actually...” Leo hesitates. “I… Don’t know if I’ll go.”</text:span></text:p>
      <text:p text:style-name="P46"/>
      <text:p text:style-name="P46"><text:soft-page-break/><text:tab/>“<text:span text:style-name="T192">What?” Leo exclaims. “Why? She’s the one who gave it to you, right?”</text:span></text:p>
      <text:p text:style-name="P46"/>
      <text:p text:style-name="P46"><text:tab/>“<text:span text:style-name="T192">Yeah, but… </text:span><text:span text:style-name="T193">I don’t know jack about boxing, I’m not even interested by it. I don’t even know why she bothered giving this to me.”</text:span></text:p>
      <text:p text:style-name="P46"/>
      <text:p text:style-name="P46"><text:tab/>“<text:span text:style-name="T193">Dude, you serious? A girl just gave you a ticket to watch her fight at her tournament and you’re gonna dip? Wait, you’ve been at her club before?”</text:span></text:p>
      <text:p text:style-name="P46"/>
      <text:p text:style-name="P46"><text:tab/>“<text:span text:style-name="T193">Yeah, she called me last week to come over and take a jab at boxing. But I suck at it, obviously.”</text:span></text:p>
      <text:p text:style-name="P46"/>
      <text:p text:style-name="P46"><text:tab/><text:span text:style-name="T193">Leo stares at him in disbelief for a couple of seconds, before bursting into laughter. His sudden reaction catches Axel off-guard.</text:span></text:p>
      <text:p text:style-name="P46"/>
      <text:p text:style-name="P46"><text:tab/>“<text:span text:style-name="T193">W-What?” Axel asks defensively.</text:span></text:p>
      <text:p text:style-name="P46"/>
      <text:p text:style-name="P46"><text:tab/>“<text:span text:style-name="T193">My dude, you’re one dense motherfucker,” Leo manages to spit between two fits of giggles. “So you’re telling me a girl – that’s </text:span><text:span text:style-name="T194">jacked</text:span><text:span text:style-name="T193"> as fuck – gave you her number, took you on a date at her club, and you still not see where she’s going with that ticket?”</text:span></text:p>
      <text:p text:style-name="P46"/>
      <text:p text:style-name="P46"><text:tab/><text:span text:style-name="T193">Axel could feel the heat rise up to his cheeks.</text:span></text:p>
      <text:p text:style-name="P46"/>
      <text:p text:style-name="P46"><text:tab/>“<text:span text:style-name="T193">N-No way dude, you’re just imagining things,” he replies.</text:span></text:p>
      <text:p text:style-name="P46"/>
      <text:p text:style-name="P46"><text:tab/>“<text:span text:style-name="T195">Dude, she likes you,” Leo simply states. “</text:span><text:span text:style-name="T196">Go ahead dude, I’ll tell the others you’re busy for today.”</text:span></text:p>
      <text:p text:style-name="P46"/>
      <text:p text:style-name="P50"><text:span text:style-name="T197"><text:tab/></text:span>For a moment, Axel could only stutter. </text:p>
      <text:p text:style-name="P50"/>
      <text:p text:style-name="P51"><text:tab/>“<text:span text:style-name="T198">B-But…” he stammers, struggling for words. “I-I don’t even do boxing. And I’m not even a good dodgeball player.”</text:span></text:p>
      <text:p text:style-name="P51"/>
      <text:p text:style-name="P51"><text:tab/><text:span text:style-name="T199">H</text:span><text:span text:style-name="T198">e trie</text:span><text:span text:style-name="T199">s</text:span><text:span text:style-name="T198"> to come up with something, anything that could rationally refute his friend’s assumption. His mind </text:span><text:span text:style-name="T200">goes</text:span><text:span text:style-name="T198"> blank, in turmoil with all the emotions </text:span><text:span text:style-name="T201">and intrusive thoughts racing in his head.</text:span></text:p>
      <text:p text:style-name="P51"/>
      <text:p text:style-name="P51"><text:tab/>“<text:span text:style-name="T194">Y</text:span><text:span text:style-name="T198">ou think she sent </text:span><text:span text:style-name="T202">me</text:span><text:span text:style-name="T198"> a ticket?” Leo resumes. “Nah </text:span><text:span text:style-name="T203">bro</text:span><text:span text:style-name="T198">, listen. </text:span><text:span text:style-name="T169">Girls don’t care if you’re good about sports. </text:span><text:span text:style-name="T204">Make her spend a good time whenever you’re around, and make her know you enjoy her presence. That’s enough to make </text:span><text:span text:style-name="T205">her</text:span><text:span text:style-name="T204"> happy</text:span><text:span text:style-name="T203">.”</text:span></text:p>
      <text:p text:style-name="P51"/>
      <text:p text:style-name="P51"><text:tab/>“<text:span text:style-name="T206">You can’t even keep a girl for longer than a week,” Axel points out.</text:span></text:p>
      <text:p text:style-name="P51"/>
      <text:p text:style-name="P51"><text:tab/>“<text:span text:style-name="T206">I still fuck </text:span><text:span text:style-name="T207">more</text:span><text:span text:style-name="T206"> often than you do.”</text:span></text:p>
      <text:p text:style-name="P51"/>
      <text:p text:style-name="P51"><text:soft-page-break/><text:tab/>“<text:span text:style-name="T206">Fuck you too, bro”, Axel lightly punches him in the shoulder, making his friend laugh.</text:span></text:p>
      <text:p text:style-name="P51"/>
      <text:p text:style-name="P51"><text:tab/>“<text:span text:style-name="T206">Hey, it’s because I chose to, okay?” Leo says. “But really, Axel. Stop imagining the worst. She probably doesn’t have many people cheering her during her matches. She’ll be thrilled to have you around. Don’t worry about the party and just </text:span><text:span text:style-name="T208">g</text:span><text:span text:style-name="T206">o </text:span><text:span text:style-name="T209">support</text:span><text:span text:style-name="T206"> her. You’ll regret it if you don’t.”</text:span></text:p>
      <text:p text:style-name="P51"/>
      <text:p text:style-name="P52"><text:tab/><text:span text:style-name="T210">With that, Leo gives him a</text:span><text:span text:style-name="T209">n</text:span><text:span text:style-name="T210"> encouraging pat on the back and goes off to join the rest of the team. </text:span><text:span text:style-name="T197">Axel’s gaze rests on his ticket, his mind in turmoil from the overload of emotions. </text:span>Up until now, his brain couldn’t to connect the dots when deciphering Beatrice’s surprising friendliness towards him. Or rather, it <text:span text:style-name="T1">refused</text:span> to do so. Axel simply couldn’t conceive the idea that a girl so fit and bubbly could have even a passing interest in someone like him. <text:span text:style-name="T201">He had buried his feelings</text:span> as deep as he could, never entertaining the shadow of a chance with someone like her.</text:p>
      <text:p text:style-name="P52"/>
      <text:p text:style-name="P52"><text:tab/><text:span text:style-name="T211">But now... He wasn’t so sure. He has never had high hopes for… Well, anything, by fear of being disappointed and hurt. </text:span><text:span text:style-name="T212">He thought his team would have never had a chance in this tournament, and yet… He wouldn’t say he became optimistic overnight, but it was the first time he was proud of what he accomplished. He feels like his team could actually pull it off. And Beatrice… Just thinking about her makes him feel warm and fuzzy in a way he hasn’t really allowed himself to feel since his first rejection in elementary school.</text:span></text:p>
      <text:p text:style-name="P52"/>
      <text:p text:style-name="P52"><text:tab/><text:span text:style-name="T212">Snapping out of his thoughts, Axel stuffs the ticket and his pocket and heads for the exit, </text:span><text:span text:style-name="T213">this </text:span><text:span text:style-name="T212">time with his head held high and his heart full of hope.</text:span></text:p>
      <text:p text:style-name="P52"/>
      <text:p text:style-name="P53">***</text:p>
      <text:p text:style-name="P53"/>
      <text:p text:style-name="P52"><text:tab/><text:span text:style-name="T214">Dusk was falling by the time he arrives to Bob’s gym. The heat had thankfully been receding on the way there, so Axel </text:span><text:span text:style-name="T215">isn’t</text:span><text:span text:style-name="T214"> as drenched in sweat as he dreaded to be. </text:span><text:span text:style-name="T216">Still, it is too late to encourage Beatrice before the match; it had already started for a while, and Axel fears it might already be over.</text:span></text:p>
      <text:p text:style-name="P52"/>
      <text:p text:style-name="P52"><text:tab/><text:span text:style-name="T216">Axel slams the double door open on his path. The place was a bit more crowded than usual, mostly by parents and boxing enthusiasts who came to cheer on the new generations. </text:span><text:span text:style-name="T217">Some of the students were already packing their bags. Axel’s heart misses a beat.</text:span></text:p>
      <text:p text:style-name="P52"/>
      <text:p text:style-name="P52"><text:tab/><text:span text:style-name="T218">Shit, it’s too late already?</text:span><text:span text:style-name="T217"> He thinks, elbowing a buff guy as the pushes through the crowd. </text:span><text:span text:style-name="T218">No, no way. I promised her I would come. I need to see her.</text:span></text:p>
      <text:p text:style-name="P52"/>
      <text:p text:style-name="P52"><text:tab/><text:span text:style-name="T217">He </text:span><text:span text:style-name="T219">pushes past the crowd with a profusion of sorries and elbows, until he finally reaches the main room. A couple of wooden benches and chairs are strewn about the place as makeshift bleachers for the public to watch the finals.</text:span></text:p>
      <text:p text:style-name="P52"/>
      <text:p text:style-name="P54"><text:tab/><text:span text:style-name="T220">And sure enough, it is her. Axel feels the weight on his shoulders evaporating as the big girl trades blows with her opponent, a stocky but no less muscular girl than her; was she the girl </text:span><text:soft-page-break/><text:span text:style-name="T220">Beatrice told him about?</text:span></text:p>
      <text:p text:style-name="P54"/>
      <text:p text:style-name="P54"><text:tab/><text:span text:style-name="T220">However, his bliss is short lived when he sees the girl’s tibia impacting his friend’s head in a flash. The ‘thud’ could be heard from across the room, and makes Axel’s blood freeze in his veins. He </text:span><text:span text:style-name="T221">can only watch,</text:span><text:span text:style-name="T220"> powerless, as Beatrice collapses onto the ground, her body wracked with tremors.</text:span></text:p>
      <text:p text:style-name="P54"/>
      <text:p text:style-name="P55"><text:tab/><text:span text:style-name="T221">The referee starts the countdown, and Beatrice struggles to regain her balance on all four limbs. Unkempt hair covers her eyes. Axel tries to cheer her up, but his voice gets drowned out by the cheers and comments of the other spectators.</text:span><text:span text:style-name="T222"> </text:span></text:p>
      <text:p text:style-name="P55"/>
      <text:p text:style-name="P55"><text:span text:style-name="T223"><text:tab/></text:span><text:span text:style-name="T224">The sight of what’s left of his friend on the ring pinches his heart. </text:span><text:span text:style-name="T223">He who thought of her as an invincible juggernaut, Axel has never seen her so fragile.</text:span><text:span text:style-name="T221"> The poor girl probably didn’t even register he was here. </text:span><text:span text:style-name="T222">After five gruelingly long seconds, Beatrice does manage to rise to her feet, </text:span><text:span text:style-name="T224">but h</text:span><text:span text:style-name="T222">er stance is unsteady and her eyes glassy, </text:span><text:span text:style-name="T225">staring into the void before her</text:span><text:span text:style-name="T222">; the shock took a heavy toll on her. </text:span><text:span text:style-name="T226">She was about to collapse again. </text:span><text:span text:style-name="T224">He needs to tell her he is there. No matter if she gets knocked out again, </text:span><text:span text:style-name="T227">he wants her to</text:span><text:span text:style-name="T224"> know she isn’t alone in this fight.</text:span></text:p>
      <text:p text:style-name="P56"/>
      <text:p text:style-name="P56"><text:span text:style-name="T222"><text:tab/></text:span><text:span text:style-name="T228">Axel </text:span><text:span text:style-name="T221">raises his hands to try and amplify the sound of his voice, and screams </text:span><text:span text:style-name="T224">her name</text:span><text:span text:style-name="T221"> at the </text:span><text:span text:style-name="T229">bottom</text:span><text:span text:style-name="T221"> of his lungs. </text:span><text:span text:style-name="T230">He thinks he probably looks silly doing this, but he doesn’t care anymore.</text:span></text:p>
      <text:p text:style-name="P4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DT21H59M25S</meta:editing-duration>
    <meta:editing-cycles>260</meta:editing-cycles>
    <meta:generator>LibreOffice/26.2.3.2$Windows_X86_64 LibreOffice_project/70e089b17412e4cb7773e41413306b17a2328c34</meta:generator>
    <meta:creation-date>2026-06-06T16:50:12.344730600</meta:creation-date>
    <dc:title>Format de texte</dc:title>
    <dc:date>2026-06-24T01:55:14.318439300</dc:date>
    <meta:document-statistic meta:table-count="0" meta:image-count="0" meta:object-count="0" meta:page-count="18" meta:paragraph-count="242" meta:word-count="6778" meta:character-count="36737" meta:non-whitespace-character-count="29939"/>
    <meta:template xlink:type="simple" xlink:actuate="onRequest" xlink:title="Format de texte" xlink:href="../../../../Format%20prompt%20histoire.ott" meta:date="2026-06-06T16:50:11.982652500"/>
  </office:meta>
</office:document-meta>
</file>