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36eb82" style:font-style-asian="normal" style:font-style-complex="normal"/>
    </style:style>
    <style:style style:name="P3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6eb82" style:font-style-asian="normal" style:font-style-complex="normal"/>
    </style:style>
    <style:style style:name="P3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36eb82" officeooo:paragraph-rsid="013be27f" style:font-style-asian="normal" style:font-style-complex="normal"/>
    </style:style>
    <style:style style:name="P4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6f8f" officeooo:paragraph-rsid="01476f8f" style:font-style-asian="normal" style:font-style-complex="normal"/>
    </style:style>
    <style:style style:name="P4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7c12a" officeooo:paragraph-rsid="01476f8f" style:font-style-asian="normal" style:font-style-complex="normal"/>
    </style:style>
    <style:style style:name="P4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4a0808" officeooo:paragraph-rsid="014a0808" style:font-style-asian="normal" style:font-style-complex="normal"/>
    </style:style>
    <style:style style:name="P4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530fcd" style:font-style-asian="normal" style:font-style-complex="normal"/>
    </style:style>
    <style:style style:name="P4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51cfd4" officeooo:paragraph-rsid="01530fcd" style:font-style-asian="normal" style:font-style-complex="normal"/>
    </style:style>
    <style:style style:name="P45"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4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16fea6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30f077"/>
    </style:style>
    <style:style style:name="T129" style:family="text">
      <style:text-properties officeooo:rsid="0132761e"/>
    </style:style>
    <style:style style:name="T130" style:family="text">
      <style:text-properties officeooo:rsid="012312ef"/>
    </style:style>
    <style:style style:name="T131" style:family="text">
      <style:text-properties officeooo:rsid="0124dfed"/>
    </style:style>
    <style:style style:name="T132" style:family="text">
      <style:text-properties officeooo:rsid="01262c2a"/>
    </style:style>
    <style:style style:name="T133" style:family="text">
      <style:text-properties officeooo:rsid="01295c27"/>
    </style:style>
    <style:style style:name="T134" style:family="text">
      <style:text-properties officeooo:rsid="012720be"/>
    </style:style>
    <style:style style:name="T135" style:family="text">
      <style:text-properties officeooo:rsid="012b2c38"/>
    </style:style>
    <style:style style:name="T136" style:family="text">
      <style:text-properties officeooo:rsid="012e7594"/>
    </style:style>
    <style:style style:name="T137" style:family="text">
      <style:text-properties officeooo:rsid="01328549"/>
    </style:style>
    <style:style style:name="T138" style:family="text">
      <style:text-properties officeooo:rsid="0135884c"/>
    </style:style>
    <style:style style:name="T139" style:family="text">
      <style:text-properties officeooo:rsid="01388eb4"/>
    </style:style>
    <style:style style:name="T140" style:family="text">
      <style:text-properties officeooo:rsid="013af4a9"/>
    </style:style>
    <style:style style:name="T141" style:family="text">
      <style:text-properties officeooo:rsid="013be27f"/>
    </style:style>
    <style:style style:name="T142" style:family="text">
      <style:text-properties officeooo:rsid="0138ca07"/>
    </style:style>
    <style:style style:name="T143" style:family="text">
      <style:text-properties officeooo:rsid="013a7c41"/>
    </style:style>
    <style:style style:name="T144" style:family="text">
      <style:text-properties officeooo:rsid="013dd133"/>
    </style:style>
    <style:style style:name="T145" style:family="text">
      <style:text-properties officeooo:rsid="013e9346"/>
    </style:style>
    <style:style style:name="T146" style:family="text">
      <style:text-properties officeooo:rsid="01466a70"/>
    </style:style>
    <style:style style:name="T147" style:family="text">
      <style:text-properties officeooo:rsid="01476f8f"/>
    </style:style>
    <style:style style:name="T148" style:family="text">
      <style:text-properties officeooo:rsid="01485691"/>
    </style:style>
    <style:style style:name="T149" style:family="text">
      <style:text-properties officeooo:rsid="015c2abe"/>
    </style:style>
    <style:style style:name="T150" style:family="text">
      <style:text-properties officeooo:rsid="015ccdd3"/>
    </style:style>
    <style:style style:name="T151" style:family="text">
      <style:text-properties fo:font-style="italic" officeooo:rsid="015ccdd3" style:font-style-asian="italic" style:font-style-complex="italic"/>
    </style:style>
    <style:style style:name="T152" style:family="text">
      <style:text-properties fo:font-style="italic" officeooo:rsid="015e6533" style:font-style-asian="italic" style:font-style-complex="italic"/>
    </style:style>
    <style:style style:name="T153" style:family="text">
      <style:text-properties fo:font-style="italic" officeooo:rsid="015f7a01" style:font-style-asian="italic" style:font-style-complex="italic"/>
    </style:style>
    <style:style style:name="T154" style:family="text">
      <style:text-properties officeooo:rsid="014a3815"/>
    </style:style>
    <style:style style:name="T155" style:family="text">
      <style:text-properties officeooo:rsid="014a3d48"/>
    </style:style>
    <style:style style:name="T156" style:family="text">
      <style:text-properties officeooo:rsid="014b0e69"/>
    </style:style>
    <style:style style:name="T157" style:family="text">
      <style:text-properties officeooo:rsid="014d896f"/>
    </style:style>
    <style:style style:name="T158" style:family="text">
      <style:text-properties officeooo:rsid="014c5507"/>
    </style:style>
    <style:style style:name="T159" style:family="text">
      <style:text-properties officeooo:rsid="014d2f4b"/>
    </style:style>
    <style:style style:name="T160" style:family="text">
      <style:text-properties officeooo:rsid="014f2daa"/>
    </style:style>
    <style:style style:name="T161" style:family="text">
      <style:text-properties officeooo:rsid="014f4882"/>
    </style:style>
    <style:style style:name="T162" style:family="text">
      <style:text-properties officeooo:rsid="01505e24"/>
    </style:style>
    <style:style style:name="T163" style:family="text">
      <style:text-properties officeooo:rsid="0151cfd4"/>
    </style:style>
    <style:style style:name="T164" style:family="text">
      <style:text-properties officeooo:rsid="01530fcd"/>
    </style:style>
    <style:style style:name="T165" style:family="text">
      <style:text-properties officeooo:rsid="016a6605"/>
    </style:style>
    <style:style style:name="T166" style:family="text">
      <style:text-properties officeooo:rsid="016d39b5"/>
    </style:style>
    <style:style style:name="T167" style:family="text">
      <style:text-properties officeooo:rsid="016b941f"/>
    </style:style>
    <style:style style:name="T168" style:family="text">
      <style:text-properties officeooo:rsid="01546296"/>
    </style:style>
    <style:style style:name="T169" style:family="text">
      <style:text-properties officeooo:rsid="0156475d"/>
    </style:style>
    <style:style style:name="T170" style:family="text">
      <style:text-properties officeooo:rsid="01570eba"/>
    </style:style>
    <style:style style:name="T171" style:family="text">
      <style:text-properties officeooo:rsid="015fa61e"/>
    </style:style>
    <style:style style:name="T172" style:family="text">
      <style:text-properties officeooo:rsid="016fea61"/>
    </style:style>
    <style:style style:name="T173" style:family="text">
      <style:text-properties officeooo:rsid="016839a8"/>
    </style:style>
    <style:style style:name="T174" style:family="text">
      <style:text-properties officeooo:rsid="016e3fef"/>
    </style:style>
    <style:style style:name="T175" style:family="text">
      <style:text-properties officeooo:rsid="016556bb"/>
    </style:style>
    <style:style style:name="T176" style:family="text">
      <style:text-properties officeooo:rsid="01680d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text:span></text:p>
      <text:p text:style-name="P30"/>
      <text:p text:style-name="P35"><text:tab/><text:span text:style-name="T127">Axel begrudgingly follows her outside, he who had hoped he would not have to deal with the heat again for a while. </text:span></text:p>
      <text:p text:style-name="P36"/>
      <text:p text:style-name="P36"><text:tab/>The back <text:span text:style-name="T128">room</text:span> of the gym wasn’t <text:span text:style-name="T129">much smaller than the previous room</text:span>; basically a continuation of the <text:span text:style-name="T128">main gym, now used mainly as a storage room for the students’ equipment</text:span>. The place wasn’t <text:span text:style-name="T129">well tidied up</text:span>, but at least it was <text:span text:style-name="T129">away from any pair of prying eyes</text:span>. Beatrice <text:span text:style-name="T130">places</text:span> <text:span text:style-name="T130">him back against the wall and gives him one of her balls before planting herself in front of him ten meters away.</text:span></text:p>
      <text:p text:style-name="P36"/>
      <text:p text:style-name="P36"><text:tab/>“<text:span text:style-name="T131">During our match, I noticed you tend to go back up when your opponent has the ball,” she says, raising her voice a bit so he can hear her clearly. “That’s fine if you intend to catch, </text:span><text:soft-page-break/><text:span text:style-name="T131">but </text:span><text:span text:style-name="T132">that won’t be enough if they just gang up on you. So now with the wall behind you, you won’t be able to run away anymore.”</text:span></text:p>
      <text:p text:style-name="P36"/>
      <text:p text:style-name="P36"><text:tab/><text:span text:style-name="T132">She punches the ball with one hand in a thunderous ‘thud’ sound.</text:span></text:p>
      <text:p text:style-name="P36"/>
      <text:p text:style-name="P36"><text:tab/>“<text:span text:style-name="T132">So you dodge the ball by the side and you throw them back to me. If you try to block or catch’em </text:span><text:span text:style-name="T133">mid air</text:span><text:span text:style-name="T132"> I’ll stop holding back </text:span><text:span text:style-name="T134">until you dodge them again</text:span><text:span text:style-name="T132">, capische?”</text:span></text:p>
      <text:p text:style-name="P36"/>
      <text:p text:style-name="P36"><text:tab/><text:span text:style-name="T134">Axel wasn’t so sure this was a good method for training; not that he could voice his opinion, as the first ball already shot towards </text:span><text:span text:style-name="T133">his face</text:span><text:span text:style-name="T134"> in a blur. </text:span><text:span text:style-name="T133">He dodged, barely, and the impact against the wall sent a shockwave drilling into his ears.</text:span></text:p>
      <text:p text:style-name="P36"/>
      <text:p text:style-name="P36"><text:tab/>“<text:span text:style-name="T135">Hey! Just… Just be gentle, okay?” he pleads.</text:span></text:p>
      <text:p text:style-name="P36"/>
      <text:p text:style-name="P37"><text:tab/><text:span text:style-name="T135">In front of him, Beatrice adorn</text:span><text:span text:style-name="T136">s</text:span><text:span text:style-name="T135"> a predatory grin. </text:span><text:span text:style-name="T128">The ball rolls at her feet, which she picks and throws back at </text:span><text:span text:style-name="T137">him with her full strength. Again, Axel barely has the time to react before it hits his left leg with an explosive sound. </text:span><text:span text:style-name="T138">With a grunt, he throws it back. </text:span></text:p>
      <text:p text:style-name="P38"/>
      <text:p text:style-name="P38"><text:tab/>As their little game goes on, Axel could feel the strain on its body <text:span text:style-name="T139">starting to gnaw at his </text:span><text:span text:style-name="T140">knees</text:span>. For the next ones, he has to throw his entire weight on the ground as Beatrice picks up the pace of her throws, getting faster and stronger by the minute. <text:span text:style-name="T141">S</text:span><text:span text:style-name="T142">eeing the determination in her eyes refrains him from complaining.</text:span></text:p>
      <text:p text:style-name="P38"/>
      <text:p text:style-name="P39"><text:tab/><text:span text:style-name="T142">Eventually, they settled on </text:span><text:span text:style-name="T143">a somewhat comfortable pace. </text:span><text:span text:style-name="T141">Axel could see Beatrice was </text:span><text:span text:style-name="T144">more</text:span><text:span text:style-name="T141"> having fun than actually training him, even if the</text:span><text:span text:style-name="T142"> </text:span><text:span text:style-name="T141">exercise itself</text:span><text:span text:style-name="T142"> was not much different from what he was used to. </text:span><text:span text:style-name="T144">Eventually, he caught himself throwing the ball back in an attempt to hit her, and the session quickly turned into a faux dodgeball match. </text:span><text:span text:style-name="T145">For a brief moment, he felt his step quicker and his body lighter, as if the memory of his previous defeat was nothing but a distant nightmare weighing on his shoulders.</text:span></text:p>
      <text:p text:style-name="P39"/>
      <text:p text:style-name="P39"><text:tab/>“<text:span text:style-name="T146">Bee!” </text:span><text:span text:style-name="T147">a voice calls out to her.</text:span></text:p>
      <text:p text:style-name="P39"/>
      <text:p text:style-name="P40"><text:tab/>The sound of the door knob turning fills the room before a head peeks out from the doorway; it was her uncle.</text:p>
      <text:p text:style-name="P40"/>
      <text:p text:style-name="P40"><text:tab/>“It’s time to go home, big girl,” Bob declares. “The others are packing their bags already. You’ll give him cooties later.”</text:p>
      <text:p text:style-name="P40"/>
      <text:p text:style-name="P40"><text:tab/>“Bob, god dammit!” she snaps back, but he is already gone.</text:p>
      <text:p text:style-name="P40"/>
      <text:p text:style-name="P40"><text:tab/>She buries her beet-red face in her hands in embarrassment, and Alex tries to think of anything to skip this awkward moment.</text:p>
      <text:p text:style-name="P41"><text:tab/></text:p>
      <text:p text:style-name="P41"><text:tab/>“So, ah, <text:span text:style-name="T148">I’ll be on my way then.</text:span> <text:span text:style-name="T148">See you at the tournament?”</text:span></text:p>
      <text:p text:style-name="P41"><text:soft-page-break/></text:p>
      <text:p text:style-name="P41"><text:tab/>“<text:span text:style-name="T148">Y-</text:span><text:span text:style-name="T149">Y</text:span><text:span text:style-name="T148">eah, see ya,” she answers, but seemingly finds the other side of the room more interesting.</text:span></text:p>
      <text:p text:style-name="P41"/>
      <text:p text:style-name="P41"><text:tab/><text:span text:style-name="T148">Axel returns to the main room </text:span><text:span text:style-name="T149">before the situation becomes </text:span><text:span text:style-name="T150">even worse</text:span><text:span text:style-name="T148">. Most of the students were already gone. He makes a beeline for the bench where he left his bag, </text:span><text:span text:style-name="T149">still unable the shake off the </text:span><text:span text:style-name="T150">fuzzy feeling inside his chest.</text:span></text:p>
      <text:p text:style-name="P41"/>
      <text:p text:style-name="P41"><text:tab/><text:span text:style-name="T151">It was just because Bob likes to mess with her, right?</text:span><text:span text:style-name="T150"> He thought to himself. </text:span><text:span text:style-name="T151">She didn’t really </text:span><text:span text:style-name="T152">try to</text:span><text:span text:style-name="T151">… No, no, forget it.</text:span><text:span text:style-name="T152"> Not a chance </text:span><text:span text:style-name="T153">she would be..</text:span><text:span text:style-name="T152">.</text:span></text:p>
      <text:p text:style-name="P41"/>
      <text:p text:style-name="P41"><text:tab/>“<text:span text:style-name="T148">Wait!”</text:span></text:p>
      <text:p text:style-name="P41"/>
      <text:p text:style-name="P41"><text:tab/><text:span text:style-name="T148">She rushes to the other side of the room where her own bag was, grabs something inside one of its pockets, and runs back to Axel with some sort of paper in her hand.</text:span></text:p>
      <text:p text:style-name="P41"/>
      <text:p text:style-name="P41"><text:tab/>“<text:span text:style-name="T148">There you go. I got a free ticket from the organizers, so I thought you might need to think about something else for a change.”</text:span></text:p>
      <text:p text:style-name="P41"/>
      <text:p text:style-name="P42">Axel grabs the paper, and raises an eyebrow when he sees the title for the event she was attending.</text:p>
      <text:p text:style-name="P42"/>
      <text:p text:style-name="P42"><text:tab/>“You’re having a boxing tournament too?”</text:p>
      <text:p text:style-name="P42"/>
      <text:p text:style-name="P42"><text:tab/>“Yup!” she proudly exclaims with her hands on her hips. “And you <text:span text:style-name="T1">have</text:span> to come and watch it!”</text:p>
      <text:p text:style-name="P42"/>
      <text:p text:style-name="P42"><text:tab/>“Where on earth do you find the energy to compete in two sports?”</text:p>
      <text:p text:style-name="P42"/>
      <text:p text:style-name="P42"><text:tab/>“Well, you gotta have a cause to fight for,” she smiles, being so corny Axel can’t help himself but smile. “But seriously. It’s mostly to help my uncle out.”</text:p>
      <text:p text:style-name="P42"/>
      <text:p text:style-name="P42"><text:tab/>“Why?”</text:p>
      <text:p text:style-name="P42"/>
      <text:p text:style-name="P42"><text:tab/>“Well,” she gestures him to follow her outside to make sure no one would hear her. “You noticed how few students this place has?”</text:p>
      <text:p text:style-name="P42"/>
      <text:p text:style-name="P42"><text:tab/>“Uh, not really. I always thought this was normal for fighting clubs.”</text:p>
      <text:p text:style-name="P42"/>
      <text:p text:style-name="P42"><text:tab/>“Nah. Bob used to have more students back when I started. <text:span text:style-name="T154">But recently there’s been a new sports club opening a few blocks away. The owner is super rich and it’s starting to outdo smaller clubs like ours in the area. But the tournament offers some cash as prize for the winner, so I hope it’ll help my unc’ stay afloat for a while.”</text:span></text:p>
      <text:p text:style-name="P42"/>
      <text:p text:style-name="P42"><text:tab/>“… <text:span text:style-name="T154">Wow, that’s really noble of you. Your uncle is lucky to have you.” Axel comments, </text:span><text:soft-page-break/><text:span text:style-name="T154">impressed.</text:span></text:p>
      <text:p text:style-name="P42"/>
      <text:p text:style-name="P42"><text:tab/>“<text:span text:style-name="T154">It’s nothing really, I’m just helping out my family, is all,” she answers, trying to sound unfazed, but the faint blush on her cheeks shows she appreciates the compliment.</text:span></text:p>
      <text:p text:style-name="P36"/>
      <text:p text:style-name="P36"><text:tab/>“… <text:span text:style-name="T154">But,” he continues. “That’s only if you win. You don’t know who’s gonna be up against you. What if they’ve trained since they’re born, type of boxer? You’re just gonna get smacked onto the ground.”</text:span></text:p>
      <text:p text:style-name="P36"/>
      <text:p text:style-name="P36"><text:tab/>“<text:span text:style-name="T154">Well I’ll smack them harder,” she says. “That’s the only shot I get of making the daughter of Mr. ‘I-shit-gold-all-day’ eat back her own shit.”</text:span></text:p>
      <text:p text:style-name="P36"/>
      <text:p text:style-name="P36"><text:tab/>“<text:span text:style-name="T154">Oh, you know her?”</text:span></text:p>
      <text:p text:style-name="P36"/>
      <text:p text:style-name="P36"><text:tab/>“<text:span text:style-name="T154">Met her a few times during inter-club events” she growls. “Dumb bitch thinks she’s the shit </text:span><text:span text:style-name="T155">because her dad hired a pro boxer for her. She’s insufferable to everyone. Honestly I just to be next week already.”</text:span></text:p>
      <text:p text:style-name="P36"/>
      <text:p text:style-name="P36"><text:tab/>“<text:span text:style-name="T155">You’re pumped up for this? Not anxious or anything?”</text:span></text:p>
      <text:p text:style-name="P36"/>
      <text:p text:style-name="P36"><text:tab/>“<text:span text:style-name="T155">Nah, because I’ll win,” she half-jokes, making herself giggle.</text:span></text:p>
      <text:p text:style-name="P36"/>
      <text:p text:style-name="P36"><text:tab/><text:span text:style-name="T155">Axel can’t help himself but smile at seeing her laugh.She wasn’t feeling any kind of pressure for the tournament; she was looking forward to it with joy, even though the odds were against her. Her confidence makes him envious. </text:span></text:p>
      <text:p text:style-name="P36"/>
      <text:p text:style-name="P36"><text:tab/>“<text:span text:style-name="T156">Bee, I never asked, but… Why did you pick up boxing to begin with?”</text:span></text:p>
      <text:p text:style-name="P36"/>
      <text:p text:style-name="P36"><text:tab/>“<text:span text:style-name="T156">Because it’s fun!” she simply replies. “I get to see the family more often, I learn to defend myself, and I get to kick ass. And where else could I get this body of dreams?”</text:span></text:p>
      <text:p text:style-name="P36"/>
      <text:p text:style-name="P36"><text:tab/><text:span text:style-name="T156">She flexes her arm as to prove her point, but Axel knows it was just a lighthearted joke. Still, seeing her biceps reminds him of the time at that bar where he got to peek at her abs, and the mental image of her toned, athletic body marked with battle scars and ripped muscles, makes him feel </text:span><text:span text:style-name="T157">fuzzy</text:span><text:span text:style-name="T158"> inside, despite his best attempts at self-control.</text:span></text:p>
      <text:p text:style-name="P36"/>
      <text:p text:style-name="P36"><text:tab/>“<text:span text:style-name="T159">But,” he focuses back on the conversation. “</text:span><text:span text:style-name="T160">What if you get hurt so badly you can’t fight anymore?”</text:span></text:p>
      <text:p text:style-name="P36"/>
      <text:p text:style-name="P36"><text:tab/>“<text:span text:style-name="T160">Then so what? It doesn’t matter. It’s not the end result that keeps me going, it’s the people who support me, my parents, the friends I made at the gym. It’s seeing how much I kick ass now compared to when I started. Can you believe I was as scrawny back then as you are now?”</text:span></text:p>
      <text:p text:style-name="P36"/>
      <text:p text:style-name="P36"><text:tab/>“<text:span text:style-name="T160">Hey, I’m not scrawny!” Axel protests.</text:span></text:p>
      <text:p text:style-name="P36"><text:soft-page-break/></text:p>
      <text:p text:style-name="P36"><text:tab/>“<text:span text:style-name="T161">Yes you are, you throw like a girl,” she playfully elbows him, clearly not really serious about it. “But really, it’s really satisfying when you see how far you’ve come. So what if you get hurt, or never win tournaments? What matters is </text:span><text:span text:style-name="T162">to see how much better you’ve become at the things you love. It’s</text:span><text:span text:style-name="T161"> the journey, not the destination.”</text:span></text:p>
      <text:p text:style-name="P36"/>
      <text:p text:style-name="P36"><text:tab/>“… <text:span text:style-name="T163">I see.”</text:span></text:p>
      <text:p text:style-name="P36"/>
      <text:p text:style-name="P43"><text:tab/><text:span text:style-name="T163">There was an honesty in her words that makes Axel hesitate. </text:span><text:span text:style-name="T164">He who has been a slow learner and a mediocre player his entire life, he has never been the fastest, the strongest, nor the smartest of players, never managing once to see what little good his efforts produced</text:span><text:span text:style-name="T163">. </text:span><text:span text:style-name="T164">The fear of failing his friends and family has always been the chain holding him back. Could he actually do it?</text:span></text:p>
      <text:p text:style-name="P43"/>
      <text:p text:style-name="P43"><text:tab/>“<text:span text:style-name="T165">Yeah, we all get setbacks from time to time”, she resumes after a pause. “And </text:span><text:span text:style-name="T166">yeah,</text:span><text:span text:style-name="T165"> it sucks. There were fights I lost where I just wanted to just throw in the towel and give up. But what would that change? Would that be really all I’m capable for? Would I be okay to live with the idea that I abandoned the people who gave me a chance? I don’t want to be a waste of time to my uncle, and I want to accomplish something I’ll still be proud of in ten years. So what if it hurts? What if I lose? </text:span><text:span text:style-name="T167">I’ll just try again. </text:span><text:span text:style-name="T165">It’s still miles better than abandoning those who trusted me.”</text:span></text:p>
      <text:p text:style-name="P43"/>
      <text:p text:style-name="P43"><text:tab/><text:span text:style-name="T168">As he stared at the road in front of his feet, he felt Beatrice’s massive hand land on his back. The impact makes him almost fall over.</text:span></text:p>
      <text:p text:style-name="P43"/>
      <text:p text:style-name="P43"><text:tab/>“<text:span text:style-name="T168">Alright, I’ll go join my uncle in the car.” she declares. “See ya at the tournament.”</text:span></text:p>
      <text:p text:style-name="P43"/>
      <text:p text:style-name="P43"><text:tab/><text:span text:style-name="T168">She waves at him, then adds:</text:span></text:p>
      <text:p text:style-name="P43"/>
      <text:p text:style-name="P43"><text:tab/>“<text:span text:style-name="T168">And stop thinking about it. Told you it doesn’t suit you.”</text:span></text:p>
      <text:p text:style-name="P44"/>
      <text:p text:style-name="P44"><text:tab/><text:span text:style-name="T169">Axel watches her walk back up to the gym for a while, until she disappears by the front door, before going on his way as well. </text:span>A part of him still couldn’t shake off the feeling of inadequacy ingrained in him, but that <text:span text:style-name="T170">nagging voice in his head</text:span> was no longer as loud as before.</text:p>
      <text:p text:style-name="P44"/>
      <text:p text:style-name="P36"/>
      <text:p text:style-name="P45">***</text:p>
      <text:p text:style-name="P45"/>
      <text:p text:style-name="P46"><text:tab/><text:span text:style-name="T171">Axel wipes the sweat off his face, </text:span><text:span text:style-name="T172">eyes</text:span><text:span text:style-name="T171"> </text:span><text:span text:style-name="T173">fix</text:span><text:span text:style-name="T174">at</text:span><text:span text:style-name="T173">ed on the scoreboard.</text:span><text:span text:style-name="T175"> </text:span><text:span text:style-name="T176">His tinnitus </text:span><text:span text:style-name="T175">from the intense effort</text:span><text:span text:style-name="T176"> drowned the screams of joy of his comrades.</text:span></text:p>
      <text:p text:style-name="P46"/>
      <text:p text:style-name="P4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DT11H7M42S</meta:editing-duration>
    <meta:editing-cycles>197</meta:editing-cycles>
    <meta:generator>LibreOffice/26.2.3.2$Windows_X86_64 LibreOffice_project/70e089b17412e4cb7773e41413306b17a2328c34</meta:generator>
    <meta:creation-date>2026-06-06T16:50:12.344730600</meta:creation-date>
    <dc:title>Format de texte</dc:title>
    <dc:date>2026-06-21T18:03:17.445518200</dc:date>
    <meta:document-statistic meta:table-count="0" meta:image-count="0" meta:object-count="0" meta:page-count="14" meta:paragraph-count="195" meta:word-count="5318" meta:character-count="28756" meta:non-whitespace-character-count="23422"/>
    <meta:template xlink:type="simple" xlink:actuate="onRequest" xlink:title="Format de texte" xlink:href="../../../../Format%20prompt%20histoire.ott" meta:date="2026-06-06T16:50:11.982652500"/>
  </office:meta>
</office:document-meta>
</file>