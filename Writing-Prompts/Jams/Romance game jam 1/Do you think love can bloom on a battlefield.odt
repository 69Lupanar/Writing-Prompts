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text-properties style:font-name="Garamond Premr Pro" fo:language="en" fo:country="US" officeooo:rsid="00732722" officeooo:paragraph-rsid="00840176"/>
    </style:style>
    <style:style style:name="P6" style:family="paragraph" style:parent-style-name="Standard">
      <style:text-properties style:font-name="Garamond Premr Pro" fo:language="en" fo:country="US" officeooo:rsid="008e3366" officeooo:paragraph-rsid="00840176"/>
    </style:style>
    <style:style style:name="P7" style:family="paragraph" style:parent-style-name="Standard">
      <style:paragraph-properties style:writing-mode="lr-tb" style:writing-mode-automatic="false"/>
      <style:text-properties style:font-name="Garamond Premr Pro" fo:language="en" fo:country="US" officeooo:rsid="0090bdf9" officeooo:paragraph-rsid="0090bdf9"/>
    </style:style>
    <style:style style:name="P8" style:family="paragraph" style:parent-style-name="Standard">
      <style:paragraph-properties fo:text-align="center" style:justify-single-word="false" style:writing-mode="lr-tb" style:writing-mode-automatic="false"/>
      <style:text-properties style:font-name="Garamond Premr Pro" fo:language="en" fo:country="US" officeooo:rsid="0090bdf9" officeooo:paragraph-rsid="0090bdf9"/>
    </style:style>
    <style:style style:name="P9" style:family="paragraph" style:parent-style-name="Standard">
      <style:paragraph-properties fo:text-align="left" style:justify-single-word="false" style:writing-mode="lr-tb" style:writing-mode-automatic="false"/>
      <style:text-properties style:font-name="Garamond Premr Pro" fo:language="en" fo:country="US" officeooo:rsid="00732722" officeooo:paragraph-rsid="009725dd"/>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style:style style:name="T9" style:family="text">
      <style:text-properties officeooo:rsid="0093a86b"/>
    </style:style>
    <style:style style:name="T10" style:family="text">
      <style:text-properties officeooo:rsid="00935599"/>
    </style:style>
    <style:style style:name="T11" style:family="text">
      <style:text-properties officeooo:rsid="00958024"/>
    </style:style>
    <style:style style:name="T12" style:family="text">
      <style:text-properties officeooo:rsid="009725dd"/>
    </style:style>
    <style:style style:name="T13" style:family="text">
      <style:text-properties officeooo:rsid="0097882c"/>
    </style:style>
    <style:style style:name="T14" style:family="text">
      <style:text-properties officeooo:rsid="009b57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4"/>
      <text:p text:style-name="P6"><text:tab/>The scent of old, wet cloth clung onto his skin as Axel charged forward. Time was not in his favour; only thirty seconds left before the set was over. If only he could hit one of the support players, or better, catch one of the cannonballs whooshing past his head, then his team might have a chance to turn the match on its head.</text:p>
      <text:p text:style-name="P6"/>
      <text:p text:style-name="P7"><text:tab/>He needed to act fast. In front of him, one of his opponents – the cadet of their team, he remembered – fell on her knees to avoid an incoming attack. Instinctively, Axel raised his hand, his grip on the cloth ball slowly loosening. The nerves in his biceps screamed <text:span text:style-name="T9">in</text:span> pain for having endured this never-ending match.</text:p>
      <text:p text:style-name="P7"/>
      <text:p text:style-name="P7"><text:tab/><text:span text:style-name="T10">In the corner of his eye, the immense silhouette of the enemy captain crossed the attack line. A looming shadow rushed his way, too fast for him to dodge in time. </text:span><text:span text:style-name="T11">His vision flashed red, </text:span><text:span text:style-name="T12">and before he knew it, it was already over</text:span><text:span text:style-name="T11">.</text:span></text:p>
      <text:p text:style-name="P7"/>
      <text:p text:style-name="P8">***</text:p>
      <text:p text:style-name="P8"/>
      <text:p text:style-name="P9"><text:tab/><text:span text:style-name="T13">Axe</text:span><text:span text:style-name="T14">l was woken up by the coldness of the rough bench he was laid on as a makeshift stretcher. His ears still ringing a shrill whistle, he had to take several attempts before managing to s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H3M41S</meta:editing-duration>
    <meta:editing-cycles>19</meta:editing-cycles>
    <meta:generator>LibreOffice/26.2.3.2$Windows_X86_64 LibreOffice_project/70e089b17412e4cb7773e41413306b17a2328c34</meta:generator>
    <meta:creation-date>2026-06-06T16:50:12.344730600</meta:creation-date>
    <dc:title>Format de texte</dc:title>
    <dc:date>2026-06-11T21:59:47.513147200</dc:date>
    <meta:document-statistic meta:table-count="0" meta:image-count="0" meta:object-count="0" meta:page-count="1" meta:paragraph-count="8" meta:word-count="286" meta:character-count="1568" meta:non-whitespace-character-count="1282"/>
    <meta:template xlink:type="simple" xlink:actuate="onRequest" xlink:title="Format de texte" xlink:href="../../../../Format%20prompt%20histoire.ott" meta:date="2026-06-06T16:50:11.982652500"/>
  </office:meta>
</office:document-meta>
</file>