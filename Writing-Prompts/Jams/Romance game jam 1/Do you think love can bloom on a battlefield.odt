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
      <text:p text:style-name="P24"/>
      <text:p text:style-name="P24"><text:tab/></text:p>
      <text:p text:style-name="P22"/>
      <text:p text:style-name="P22"><text:tab/></text:p>
      <text:p text:style-name="P22"/>
      <text:p text:style-name="P22"><text:tab/></text:p>
      <text:p text:style-name="P22"/>
      <text:p text:style-name="P2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4H43M11S</meta:editing-duration>
    <meta:editing-cycles>113</meta:editing-cycles>
    <meta:generator>LibreOffice/26.2.3.2$Windows_X86_64 LibreOffice_project/70e089b17412e4cb7773e41413306b17a2328c34</meta:generator>
    <meta:creation-date>2026-06-06T16:50:12.344730600</meta:creation-date>
    <dc:title>Format de texte</dc:title>
    <dc:date>2026-06-16T21:09:02.894464200</dc:date>
    <meta:document-statistic meta:table-count="0" meta:image-count="0" meta:object-count="0" meta:page-count="8" meta:paragraph-count="107" meta:word-count="2882" meta:character-count="15690" meta:non-whitespace-character-count="12795"/>
    <meta:template xlink:type="simple" xlink:actuate="onRequest" xlink:title="Format de texte" xlink:href="../../../../Format%20prompt%20histoire.ott" meta:date="2026-06-06T16:50:11.982652500"/>
  </office:meta>
</office:document-meta>
</file>