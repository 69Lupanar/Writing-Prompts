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c809a3"/>
    </style:style>
    <style:style style:name="T47" style:family="text">
      <style:text-properties officeooo:rsid="00c61727"/>
    </style:style>
    <style:style style:name="T48" style:family="text">
      <style:text-properties fo:font-style="italic" officeooo:rsid="00c58dc1" style:font-style-asian="italic" style:font-style-complex="italic"/>
    </style:style>
    <style:style style:name="T49" style:family="text">
      <style:text-properties officeooo:rsid="00c93aba"/>
    </style:style>
    <style:style style:name="T50" style:family="text">
      <style:text-properties fo:font-style="italic" officeooo:rsid="00c93aba" style:font-style-asian="italic" style:font-style-complex="italic"/>
    </style:style>
    <style:style style:name="T51" style:family="text">
      <style:text-properties officeooo:rsid="00ca137c"/>
    </style:style>
    <style:style style:name="T52" style:family="text">
      <style:text-properties officeooo:rsid="00cb3fef"/>
    </style:style>
    <style:style style:name="T53" style:family="text">
      <style:text-properties officeooo:rsid="00ccd4db"/>
    </style:style>
    <style:style style:name="T54" style:family="text">
      <style:text-properties officeooo:rsid="00ce4823"/>
    </style:style>
    <style:style style:name="T55" style:family="text">
      <style:text-properties officeooo:rsid="00ce5fb3"/>
    </style:style>
    <style:style style:name="T56" style:family="text">
      <style:text-properties fo:font-style="normal" style:font-style-asian="normal" style:font-style-complex="normal"/>
    </style:style>
    <style:style style:name="T57" style:family="text">
      <style:text-properties fo:font-style="normal" officeooo:rsid="00ccd4db" style:font-style-asian="normal" style:font-style-complex="normal"/>
    </style:style>
    <style:style style:name="T58" style:family="text">
      <style:text-properties officeooo:rsid="00cb4a5f"/>
    </style:style>
    <style:style style:name="T59" style:family="text">
      <style:text-properties officeooo:rsid="00cc0c36"/>
    </style:style>
    <style:style style:name="T60" style:family="text">
      <style:text-properties fo:font-style="italic" officeooo:rsid="00cc0c36" style:font-style-asian="italic" style:font-style-complex="italic"/>
    </style:style>
    <style:style style:name="T61" style:family="text">
      <style:text-properties fo:font-style="italic" officeooo:rsid="00cc4f69" style:font-style-asian="italic" style:font-style-complex="italic"/>
    </style:style>
    <style:style style:name="T62" style:family="text">
      <style:text-properties officeooo:rsid="00d1b060"/>
    </style:style>
    <style:style style:name="T63" style:family="text">
      <style:text-properties officeooo:rsid="00d38be4"/>
    </style:style>
    <style:style style:name="T64" style:family="text">
      <style:text-properties officeooo:rsid="00d42583"/>
    </style:style>
    <style:style style:name="T65" style:family="text">
      <style:text-properties officeooo:rsid="00d49f77"/>
    </style:style>
    <style:style style:name="T66" style:family="text">
      <style:text-properties officeooo:rsid="00d8d7a8"/>
    </style:style>
    <style:style style:name="T67" style:family="text">
      <style:text-properties officeooo:rsid="00d933ad"/>
    </style:style>
    <style:style style:name="T68" style:family="text">
      <style:text-properties officeooo:rsid="00daadf2"/>
    </style:style>
    <style:style style:name="T69" style:family="text">
      <style:text-properties officeooo:rsid="00d99f0d"/>
    </style:style>
    <style:style style:name="T70" style:family="text">
      <style:text-properties officeooo:rsid="00dd12ad"/>
    </style:style>
    <style:style style:name="T71" style:family="text">
      <style:text-properties officeooo:rsid="00e05ce5"/>
    </style:style>
    <style:style style:name="T72" style:family="text">
      <style:text-properties officeooo:rsid="00e092fe"/>
    </style:style>
    <style:style style:name="T73" style:family="text">
      <style:text-properties officeooo:rsid="00e223d8"/>
    </style:style>
    <style:style style:name="T74" style:family="text">
      <style:text-properties officeooo:rsid="00e2f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Did you just… I don’t have noodle arms!” Axel suddenly retracts his arms in front of his torso as if he just got caught naked.</text:span></text:p>
      <text:p text:style-name="P13"/>
      <text:p text:style-name="P13"><text:tab/>“<text:span text:style-name="T45">Yes you have,” she playfully teases him with her elbo</text:span><text:span text:style-name="T46">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raising her chest in the process. Alex catches himself right as his gaze was starting to linger a bit too long </text:span><text:span text:style-name="T47">on</text:span><text:span text:style-name="T45"> </text:span><text:span text:style-name="T48">not her arms</text:span><text:span text:style-name="T45">, but thankfully Beatrice </text:span><text:span text:style-name="T49">doesn’t</text:span><text:span text:style-name="T45"> seem to notice. </text:span></text:p>
      <text:p text:style-name="P13"/>
      <text:p text:style-name="P13"><text:tab/>“<text:span text:style-name="T49">My uncle runs a boxing club,” she explains. “I’ve been at it since I entered middle school. It really builds you mental, too! You quickly learn to be humble after a few jabs in the guts.”</text:span></text:p>
      <text:p text:style-name="P13"/>
      <text:p text:style-name="P13"><text:tab/>“<text:span text:style-name="T49">You do boxing </text:span><text:span text:style-name="T50">and</text:span><text:span text:style-name="T49"> dodgeball?” Axel blinks in surprise. “How many sports do you do actually?”</text:span></text:p>
      <text:p text:style-name="P13"/>
      <text:p text:style-name="P14"><text:tab/>“<text:span text:style-name="T49">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1">Damn, you’re an athlete,” Axel simply answers, back to finding is drink suddenly more interesting. “I thought I had a chance against you this morning, now it’s clear.”</text:span></text:p>
      <text:p text:style-name="P14"/>
      <text:p text:style-name="P14"><text:tab/>“<text:span text:style-name="T51">Don’t say that. Look,” she suddenly fishes for his phone in his pocket, and without his input, starts typing frenetically on the screen.</text:span></text:p>
      <text:p text:style-name="P14"/>
      <text:p text:style-name="P14"><text:tab/>“<text:span text:style-name="T51">You live in this town, right?”</text:span></text:p>
      <text:p text:style-name="P14"/>
      <text:p text:style-name="P14"><text:tab/>“<text:span text:style-name="T51">Uh, yeah,” he hesitates. “But what are you…”</text:span></text:p>
      <text:p text:style-name="P14"/>
      <text:p text:style-name="P14"><text:tab/>“<text:span text:style-name="T51">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1">B-But why?” he blurts out, surprised at the abrupt gesture.</text:span></text:p>
      <text:p text:style-name="P14"/>
      <text:p text:style-name="P14"><text:tab/>“<text:span text:style-name="T51">You said you can’t throw to save your life. So we’re gonna take an hour to </text:span><text:span text:style-name="T52">make sure you can at least beat a little girl” she jokes. “Who knows, maybe you’ll end up liking boxing more than dodgeball and you’ll join our club?”</text:span></text:p>
      <text:p text:style-name="P14"/>
      <text:p text:style-name="P14"><text:tab/>“<text:span text:style-name="T52">Yeah, right,” he rolls his eyes. “No way that’s gonna happen.”</text:span></text:p>
      <text:p text:style-name="P14"/>
      <text:p text:style-name="P14"><text:tab/>“<text:span text:style-name="T52">No way to know until you try,” she smiles – Alex suddenly felt more comfortable focusing on his glass – before downing her last bottle. “Just give it a go with me. As a way to apologize for knocking you out during out match.”</text:span></text:p>
      <text:p text:style-name="P15"/>
      <text:p text:style-name="P16"><text:tab/><text:span text:style-name="T53">For a moment, he </text:span><text:span text:style-name="T54">considers simply</text:span><text:span text:style-name="T53"> refusing. The prospect of getting humiliated </text:span><text:span text:style-name="T54">once again didn’t really appeal to him. </text:span><text:span text:style-name="T55">His neighbour had joined her hands nervously behind her head to try and play it cool, allowing to catch a brief glimpse of the toned muscles on her midriff</text:span><text:span text:style-name="T53">. </text:span><text:span text:style-name="T55">The sight made him a bit queasy and forget what the topic of the discussion was for a second.</text:span></text:p>
      <text:p text:style-name="P16"/>
      <text:p text:style-name="P16"><text:tab/>“<text:span text:style-name="T53">Fine, I guess…” he sheepishly accepts, </text:span><text:span text:style-name="T55">prying his eyes away from – Wait, did she do that on purpose?</text:span></text:p>
      <text:p text:style-name="P16"/>
      <text:p text:style-name="P17"><text:span text:style-name="T56"><text:tab/>“</text:span><text:span text:style-name="T57">Great!” </text:span></text:p>
      <text:p text:style-name="P18"/>
      <text:p text:style-name="P17"><text:span text:style-name="T57"><text:tab/></text:span><text:span text:style-name="T58">With that, she pats him affectionately on the back and grabs her sports bag at her feet. </text:span><text:span text:style-name="T53">She seems genuinely glad he said yes.</text:span></text:p>
      <text:p text:style-name="P14"/>
      <text:p text:style-name="P14"><text:tab/>“<text:span text:style-name="T58">Well, I have to go,” she waves a hand at him. “And don’t you dare stand me up on this one!”</text:span></text:p>
      <text:p text:style-name="P14"/>
      <text:p text:style-name="P14"><text:tab/><text:span text:style-name="T59">She leaves the room to go home, leaving Alex alone with his thoughts. His phone still in hand, he couldn’t help but staring at her number, still not believing this was real.</text:span></text:p>
      <text:p text:style-name="P14"><text:soft-page-break/></text:p>
      <text:p text:style-name="P14"><text:tab/><text:span text:style-name="T60">Wait, did she set me up on a date? </text:span><text:span text:style-name="T59">Alex suddenly realized, the heat rising to his cheeks. </text:span><text:span text:style-name="T60">No, no, stop dreaming, man. </text:span><text:span text:style-name="T61">You’re just going to a sparring session, nothing more. With a girl that could punch all your teeth out, no need to worry here.</text:span></text:p>
      <text:p text:style-name="P19"/>
      <text:p text:style-name="P19"><text:tab/><text:span text:style-name="T62">He sighs, and grabs his bag as well to take his leave. On his way out, he hears giggles coming from the restroom, </text:span><text:span text:style-name="T63">coming from Leo and the girl he picked, who visibly are having way more fun than he does right now. Repressing the bitter feeling gripping his throat – and a blush, after hearing what they were getting up to – </text:span><text:span text:style-name="T64">he turns his back to the colorful lights of the bar and ventures into the </text:span><text:span text:style-name="T65">moonless night.</text:span></text:p>
      <text:p text:style-name="P19"/>
      <text:p text:style-name="P20">***</text:p>
      <text:p text:style-name="P20"/>
      <text:p text:style-name="P19"><text:tab/><text:span text:style-name="T66">Axel still isn’t sure if accepting Beatrice’s offer was a good idea. </text:span><text:span text:style-name="T67">T</text:span><text:span text:style-name="T66">he prospect of being beaten up for free didn’t match his description of a good time. </text:span><text:span text:style-name="T67">But it would have been impolite to ignore her, especially after she called him an hour earlier to make sure he wouldn’t back out at the last moment. She </text:span><text:span text:style-name="T68">sneakily took the chance</text:span><text:span text:style-name="T67"> last evening to take his number, too – the young boy didn’t know what to make of this information.</text:span></text:p>
      <text:p text:style-name="P19"/>
      <text:p text:style-name="P19"><text:tab/><text:span text:style-name="T69">The place itself wasn’t much – it looked like any school gym his class used to go in high school; maybe a bit cleaner and better maintained, as the paint seemed fresh and untainted by the black taint of exhaust gas. </text:span><text:span text:style-name="T70">From the outside, he could already hear the muffled calls and screams of the various trainees already at work.</text:span></text:p>
      <text:p text:style-name="P19"/>
      <text:p text:style-name="P21"><text:tab/>Stepping in, he was glad to see the place had an AC installed. Still, the fusty smell was no different to the one in his dodgeball club, a mixture of old clothes and rubber <text:span text:style-name="T71">balls wore down</text:span> <text:span text:style-name="T72">by</text:span> years of abuse.</text:p>
      <text:p text:style-name="P21"/>
      <text:p text:style-name="P22">Beatrice was already <text:span text:style-name="T73">on the ring. Axel walked up to the center of the gym, where multiple sparring session were already started. </text:span><text:span text:style-name="T74">His frie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2H49M32S</meta:editing-duration>
    <meta:editing-cycles>84</meta:editing-cycles>
    <meta:generator>LibreOffice/26.2.3.2$Windows_X86_64 LibreOffice_project/70e089b17412e4cb7773e41413306b17a2328c34</meta:generator>
    <meta:creation-date>2026-06-06T16:50:12.344730600</meta:creation-date>
    <dc:title>Format de texte</dc:title>
    <dc:date>2026-06-14T21:03:30.740790200</dc:date>
    <meta:document-statistic meta:table-count="0" meta:image-count="0" meta:object-count="0" meta:page-count="6" meta:paragraph-count="75" meta:word-count="2216" meta:character-count="12116" meta:non-whitespace-character-count="9895"/>
    <meta:template xlink:type="simple" xlink:actuate="onRequest" xlink:title="Format de texte" xlink:href="../../../../Format%20prompt%20histoire.ott" meta:date="2026-06-06T16:50:11.982652500"/>
  </office:meta>
</office:document-meta>
</file>