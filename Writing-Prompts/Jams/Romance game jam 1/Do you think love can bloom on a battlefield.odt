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language="en" fo:country="US" officeooo:rsid="0086df99" officeooo:paragraph-rsid="0086df99"/>
    </style:style>
    <style:style style:name="P2" style:family="paragraph" style:parent-style-name="Standard">
      <style:text-properties fo:language="en" fo:country="US" officeooo:rsid="00106f63" officeooo:paragraph-rsid="00106f63"/>
    </style:style>
    <style:style style:name="P3" style:family="paragraph" style:parent-style-name="Subtitle">
      <style:text-properties fo:language="en" fo:country="US" officeooo:rsid="0086eaf6" officeooo:paragraph-rsid="0086eaf6"/>
    </style:style>
    <style:style style:name="P4" style:family="paragraph" style:parent-style-name="Standard">
      <style:text-properties fo:language="en" fo:country="US" officeooo:rsid="00106f63" officeooo:paragraph-rsid="00840176"/>
    </style:style>
    <style:style style:name="P5" style:family="paragraph" style:parent-style-name="Standard">
      <style:paragraph-properties fo:text-align="justify" style:justify-single-word="false"/>
      <style:text-properties style:font-name="Garamond Premr Pro" fo:language="en" fo:country="US" officeooo:rsid="00732722" officeooo:paragraph-rsid="00840176"/>
    </style:style>
    <style:style style:name="P6" style:family="paragraph" style:parent-style-name="Standard">
      <style:paragraph-properties fo:text-align="justify" style:justify-single-word="false"/>
      <style:text-properties fo:language="en" fo:country="US" officeooo:rsid="00106f63" officeooo:paragraph-rsid="00840176"/>
    </style:style>
    <style:style style:name="P7" style:family="paragraph" style:parent-style-name="Standard">
      <style:paragraph-properties fo:text-align="justify" style:justify-single-word="false"/>
      <style:text-properties style:font-name="Garamond Premr Pro" fo:language="en" fo:country="US" officeooo:rsid="008e3366" officeooo:paragraph-rsid="00840176"/>
    </style:style>
    <style:style style:name="P8" style:family="paragraph" style:parent-style-name="Standard">
      <style:paragraph-properties fo:text-align="justify" style:justify-single-word="false" style:writing-mode="lr-tb" style:writing-mode-automatic="false"/>
      <style:text-properties style:font-name="Garamond Premr Pro" fo:language="en" fo:country="US" officeooo:rsid="0090bdf9" officeooo:paragraph-rsid="0090bdf9"/>
    </style:style>
    <style:style style:name="P9" style:family="paragraph" style:parent-style-name="Standard">
      <style:paragraph-properties fo:text-align="justify" style:justify-single-word="false" style:writing-mode="lr-tb" style:writing-mode-automatic="false"/>
      <style:text-properties style:font-name="Garamond Premr Pro" fo:language="en" fo:country="US" officeooo:rsid="00732722" officeooo:paragraph-rsid="009f284e"/>
    </style:style>
    <style:style style:name="P10" style:family="paragraph" style:parent-style-name="Standard">
      <style:paragraph-properties fo:text-align="justify" style:justify-single-word="false" style:writing-mode="lr-tb" style:writing-mode-automatic="false"/>
      <style:text-properties style:font-name="Garamond Premr Pro" fo:language="en" fo:country="US" officeooo:rsid="009f284e" officeooo:paragraph-rsid="009f284e"/>
    </style:style>
    <style:style style:name="P11" style:family="paragraph" style:parent-style-name="Standard">
      <style:paragraph-properties fo:text-align="justify" style:justify-single-word="false" style:writing-mode="lr-tb" style:writing-mode-automatic="false"/>
      <style:text-properties style:font-name="Garamond Premr Pro" fo:language="en" fo:country="US" officeooo:rsid="00a6be2e" officeooo:paragraph-rsid="00a6be2e"/>
    </style:style>
    <style:style style:name="P12" style:family="paragraph" style:parent-style-name="Standard">
      <style:paragraph-properties fo:text-align="justify" style:justify-single-word="false" style:writing-mode="lr-tb" style:writing-mode-automatic="false"/>
      <style:text-properties style:font-name="Garamond Premr Pro" fo:language="en" fo:country="US" officeooo:rsid="00a6be2e" officeooo:paragraph-rsid="00af948b"/>
    </style:style>
    <style:style style:name="P13" style:family="paragraph" style:parent-style-name="Standard">
      <style:paragraph-properties fo:text-align="justify" style:justify-single-word="false" style:writing-mode="lr-tb" style:writing-mode-automatic="false"/>
      <style:text-properties style:font-name="Garamond Premr Pro" fo:language="en" fo:country="US" officeooo:rsid="00bb136e" officeooo:paragraph-rsid="00bb136e"/>
    </style:style>
    <style:style style:name="P14" style:family="paragraph" style:parent-style-name="Standard">
      <style:paragraph-properties fo:text-align="justify" style:justify-single-word="false" style:writing-mode="lr-tb" style:writing-mode-automatic="false"/>
      <style:text-properties style:font-name="Garamond Premr Pro" fo:language="en" fo:country="US" officeooo:rsid="00bb136e" officeooo:paragraph-rsid="00c93aba"/>
    </style:style>
    <style:style style:name="P15" style:family="paragraph" style:parent-style-name="Standard">
      <style:paragraph-properties fo:text-align="justify" style:justify-single-word="false" style:writing-mode="lr-tb" style:writing-mode-automatic="false"/>
      <style:text-properties style:font-name="Garamond Premr Pro" fo:language="en" fo:country="US" fo:font-style="italic" officeooo:rsid="00cc4f69" officeooo:paragraph-rsid="00c93aba" style:font-style-asian="italic" style:font-style-complex="italic"/>
    </style:style>
    <style:style style:name="P1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cc4f69" officeooo:paragraph-rsid="00ccd4db" style:font-style-asian="normal" style:font-style-complex="normal"/>
    </style:style>
    <style:style style:name="P17" style:family="paragraph" style:parent-style-name="Standard">
      <style:paragraph-properties fo:text-align="justify" style:justify-single-word="false" style:writing-mode="lr-tb" style:writing-mode-automatic="false"/>
      <style:text-properties style:font-name="Garamond Premr Pro" fo:language="en" fo:country="US" officeooo:rsid="00cc4f69" officeooo:paragraph-rsid="00ccd4db"/>
    </style:style>
    <style:style style:name="P18"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ccd4db" officeooo:paragraph-rsid="00ccd4db" style:font-style-asian="normal" style:font-style-complex="normal"/>
    </style:style>
    <style:style style:name="P19"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cc4f69" officeooo:paragraph-rsid="00c93aba" style:font-style-asian="normal" style:font-style-complex="normal"/>
    </style:style>
    <style:style style:name="P20" style:family="paragraph" style:parent-style-name="Standard">
      <style:paragraph-properties fo:text-align="center" style:justify-single-word="false" style:writing-mode="lr-tb" style:writing-mode-automatic="false"/>
      <style:text-properties style:font-name="Garamond Premr Pro" fo:language="en" fo:country="US" fo:font-style="normal" officeooo:rsid="00cc4f69" officeooo:paragraph-rsid="00c93aba" style:font-style-asian="normal" style:font-style-complex="normal"/>
    </style:style>
    <style:style style:name="P21"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dd8f9f" officeooo:paragraph-rsid="00dd8f9f" style:font-style-asian="normal" style:font-style-complex="normal"/>
    </style:style>
    <style:style style:name="P22"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0e05ce5" style:font-style-asian="normal" style:font-style-complex="normal"/>
    </style:style>
    <style:style style:name="P23"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05ce5" officeooo:paragraph-rsid="00efbe73" style:font-style-asian="normal" style:font-style-complex="normal"/>
    </style:style>
    <style:style style:name="P24"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fbe73" officeooo:paragraph-rsid="00efbe73" style:font-style-asian="normal" style:font-style-complex="normal"/>
    </style:style>
    <style:style style:name="P25"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fbe73" officeooo:paragraph-rsid="00f4392d" style:font-style-asian="normal" style:font-style-complex="normal"/>
    </style:style>
    <style:style style:name="P2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ffc0c" officeooo:paragraph-rsid="00f4392d" style:font-style-asian="normal" style:font-style-complex="normal"/>
    </style:style>
    <style:style style:name="P27"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efbe73" officeooo:paragraph-rsid="00ffec93" style:font-style-asian="normal" style:font-style-complex="normal"/>
    </style:style>
    <style:style style:name="P28"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ffec93" officeooo:paragraph-rsid="00ffec93" style:font-style-asian="normal" style:font-style-complex="normal"/>
    </style:style>
    <style:style style:name="P29"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0ffec93" officeooo:paragraph-rsid="01172792" style:font-style-asian="normal" style:font-style-complex="normal"/>
    </style:style>
    <style:style style:name="P30"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58586" officeooo:paragraph-rsid="01172792" style:font-style-asian="normal" style:font-style-complex="normal"/>
    </style:style>
    <style:style style:name="P31"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58586" officeooo:paragraph-rsid="011a63ee" style:font-style-asian="normal" style:font-style-complex="normal"/>
    </style:style>
    <style:style style:name="P32"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58586" officeooo:paragraph-rsid="011bb8f6" style:font-style-asian="normal" style:font-style-complex="normal"/>
    </style:style>
    <style:style style:name="P33"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58586" officeooo:paragraph-rsid="011ca480" style:font-style-asian="normal" style:font-style-complex="normal"/>
    </style:style>
    <style:style style:name="P34"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8cf61" officeooo:paragraph-rsid="011ca480" style:font-style-asian="normal" style:font-style-complex="normal"/>
    </style:style>
    <style:style style:name="P35"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158586" officeooo:paragraph-rsid="01224800" style:font-style-asian="normal" style:font-style-complex="normal"/>
    </style:style>
    <style:style style:name="P36" style:family="paragraph" style:parent-style-name="Standard">
      <style:paragraph-properties fo:text-align="justify" style:justify-single-word="false" style:writing-mode="lr-tb" style:writing-mode-automatic="false"/>
      <style:text-properties style:font-name="Garamond Premr Pro" fo:language="en" fo:country="US" fo:font-style="normal" officeooo:rsid="01224800" officeooo:paragraph-rsid="01224800" style:font-style-asian="normal" style:font-style-complex="normal"/>
    </style:style>
    <style:style style:name="P37" style:family="paragraph" style:parent-style-name="Standard">
      <style:paragraph-properties fo:text-align="center" style:justify-single-word="false" style:writing-mode="lr-tb" style:writing-mode-automatic="false"/>
      <style:text-properties style:font-name="Garamond Premr Pro" fo:language="en" fo:country="US" fo:font-style="normal" officeooo:rsid="01224800" officeooo:paragraph-rsid="01224800" style:font-style-asian="normal" style:font-style-complex="normal"/>
    </style:style>
    <style:style style:name="P38" style:family="paragraph" style:parent-style-name="Standard">
      <style:paragraph-properties fo:text-align="left" style:justify-single-word="false" style:writing-mode="lr-tb" style:writing-mode-automatic="false"/>
      <style:text-properties style:font-name="Garamond Premr Pro" fo:language="en" fo:country="US" fo:font-style="normal" officeooo:rsid="01224800" officeooo:paragraph-rsid="01224800"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86eaf6" style:font-style-asian="italic" style:font-style-complex="italic"/>
    </style:style>
    <style:style style:name="T3" style:family="text">
      <style:text-properties fo:font-style="italic" officeooo:rsid="00873b3c" style:font-style-asian="italic" style:font-style-complex="italic"/>
    </style:style>
    <style:style style:name="T4" style:family="text">
      <style:text-properties fo:font-style="italic" officeooo:rsid="0087c3d7" style:font-style-asian="italic" style:font-style-complex="italic"/>
    </style:style>
    <style:style style:name="T5" style:family="text">
      <style:text-properties fo:font-style="italic" officeooo:rsid="008b2a66" style:font-style-asian="italic" style:font-style-complex="italic"/>
    </style:style>
    <style:style style:name="T6" style:family="text">
      <style:text-properties fo:font-style="italic" officeooo:rsid="008b583d" style:font-style-asian="italic" style:font-style-complex="italic"/>
    </style:style>
    <style:style style:name="T7" style:family="text">
      <style:text-properties fo:font-style="italic" officeooo:rsid="008c816e" style:font-style-asian="italic" style:font-style-complex="italic"/>
    </style:style>
    <style:style style:name="T8" style:family="text">
      <style:text-properties fo:font-style="italic" officeooo:rsid="007489e1" style:font-style-asian="italic" style:font-style-complex="italic"/>
    </style:style>
    <style:style style:name="T9" style:family="text">
      <style:text-properties officeooo:rsid="00aa203e"/>
    </style:style>
    <style:style style:name="T10" style:family="text">
      <style:text-properties officeooo:rsid="0093a86b"/>
    </style:style>
    <style:style style:name="T11" style:family="text">
      <style:text-properties officeooo:rsid="00935599"/>
    </style:style>
    <style:style style:name="T12" style:family="text">
      <style:text-properties officeooo:rsid="00958024"/>
    </style:style>
    <style:style style:name="T13" style:family="text">
      <style:text-properties officeooo:rsid="009725dd"/>
    </style:style>
    <style:style style:name="T14" style:family="text">
      <style:text-properties officeooo:rsid="009ce413"/>
    </style:style>
    <style:style style:name="T15" style:family="text">
      <style:text-properties officeooo:rsid="0097882c"/>
    </style:style>
    <style:style style:name="T16" style:family="text">
      <style:text-properties officeooo:rsid="009b5792"/>
    </style:style>
    <style:style style:name="T17" style:family="text">
      <style:text-properties officeooo:rsid="00aba805"/>
    </style:style>
    <style:style style:name="T18" style:family="text">
      <style:text-properties officeooo:rsid="009e399c"/>
    </style:style>
    <style:style style:name="T19" style:family="text">
      <style:text-properties officeooo:rsid="009ed33b"/>
    </style:style>
    <style:style style:name="T20" style:family="text">
      <style:text-properties officeooo:rsid="009f284e"/>
    </style:style>
    <style:style style:name="T21" style:family="text">
      <style:text-properties officeooo:rsid="00a35ba0"/>
    </style:style>
    <style:style style:name="T22" style:family="text">
      <style:text-properties officeooo:rsid="00a1bc25"/>
    </style:style>
    <style:style style:name="T23" style:family="text">
      <style:text-properties officeooo:rsid="00a07dce"/>
    </style:style>
    <style:style style:name="T24" style:family="text">
      <style:text-properties officeooo:rsid="00ad1963"/>
    </style:style>
    <style:style style:name="T25" style:family="text">
      <style:text-properties officeooo:rsid="00a6be2e"/>
    </style:style>
    <style:style style:name="T26" style:family="text">
      <style:text-properties officeooo:rsid="00a71aa8"/>
    </style:style>
    <style:style style:name="T27" style:family="text">
      <style:text-properties fo:font-style="italic" officeooo:rsid="00aa203e" style:font-style-asian="italic" style:font-style-complex="italic"/>
    </style:style>
    <style:style style:name="T28" style:family="text">
      <style:text-properties officeooo:rsid="00af948b"/>
    </style:style>
    <style:style style:name="T29" style:family="text">
      <style:text-properties officeooo:rsid="00b17601"/>
    </style:style>
    <style:style style:name="T30" style:family="text">
      <style:text-properties officeooo:rsid="00b1a202"/>
    </style:style>
    <style:style style:name="T31" style:family="text">
      <style:text-properties fo:font-style="italic" officeooo:rsid="00b1a202" style:font-style-asian="italic" style:font-style-complex="italic"/>
    </style:style>
    <style:style style:name="T32" style:family="text">
      <style:text-properties officeooo:rsid="00b2d9d6"/>
    </style:style>
    <style:style style:name="T33" style:family="text">
      <style:text-properties officeooo:rsid="00b64e33"/>
    </style:style>
    <style:style style:name="T34" style:family="text">
      <style:text-properties officeooo:rsid="00c1d6f2"/>
    </style:style>
    <style:style style:name="T35" style:family="text">
      <style:text-properties fo:font-style="italic" officeooo:rsid="00b64e33" style:font-style-asian="italic" style:font-style-complex="italic"/>
    </style:style>
    <style:style style:name="T36" style:family="text">
      <style:text-properties officeooo:rsid="00b80b06"/>
    </style:style>
    <style:style style:name="T37" style:family="text">
      <style:text-properties officeooo:rsid="00b878bd"/>
    </style:style>
    <style:style style:name="T38" style:family="text">
      <style:text-properties officeooo:rsid="00b8832f"/>
    </style:style>
    <style:style style:name="T39" style:family="text">
      <style:text-properties officeooo:rsid="00b93919"/>
    </style:style>
    <style:style style:name="T40" style:family="text">
      <style:text-properties officeooo:rsid="00bb136e"/>
    </style:style>
    <style:style style:name="T41" style:family="text">
      <style:text-properties officeooo:rsid="00c44f53"/>
    </style:style>
    <style:style style:name="T42" style:family="text">
      <style:text-properties officeooo:rsid="00c55153"/>
    </style:style>
    <style:style style:name="T43" style:family="text">
      <style:text-properties officeooo:rsid="00bfc227"/>
    </style:style>
    <style:style style:name="T44" style:family="text">
      <style:text-properties officeooo:rsid="00c55a22"/>
    </style:style>
    <style:style style:name="T45" style:family="text">
      <style:text-properties officeooo:rsid="00c58dc1"/>
    </style:style>
    <style:style style:name="T46" style:family="text">
      <style:text-properties officeooo:rsid="00e5a071"/>
    </style:style>
    <style:style style:name="T47" style:family="text">
      <style:text-properties officeooo:rsid="00c809a3"/>
    </style:style>
    <style:style style:name="T48" style:family="text">
      <style:text-properties officeooo:rsid="00e75002"/>
    </style:style>
    <style:style style:name="T49" style:family="text">
      <style:text-properties officeooo:rsid="00c61727"/>
    </style:style>
    <style:style style:name="T50" style:family="text">
      <style:text-properties fo:font-style="italic" officeooo:rsid="00c58dc1" style:font-style-asian="italic" style:font-style-complex="italic"/>
    </style:style>
    <style:style style:name="T51" style:family="text">
      <style:text-properties officeooo:rsid="00c93aba"/>
    </style:style>
    <style:style style:name="T52" style:family="text">
      <style:text-properties fo:font-style="italic" officeooo:rsid="00c93aba" style:font-style-asian="italic" style:font-style-complex="italic"/>
    </style:style>
    <style:style style:name="T53" style:family="text">
      <style:text-properties officeooo:rsid="00ca137c"/>
    </style:style>
    <style:style style:name="T54" style:family="text">
      <style:text-properties officeooo:rsid="00cb3fef"/>
    </style:style>
    <style:style style:name="T55" style:family="text">
      <style:text-properties officeooo:rsid="00ef56c8"/>
    </style:style>
    <style:style style:name="T56" style:family="text">
      <style:text-properties officeooo:rsid="00ccd4db"/>
    </style:style>
    <style:style style:name="T57" style:family="text">
      <style:text-properties officeooo:rsid="00ce4823"/>
    </style:style>
    <style:style style:name="T58" style:family="text">
      <style:text-properties officeooo:rsid="00ce5fb3"/>
    </style:style>
    <style:style style:name="T59" style:family="text">
      <style:text-properties fo:font-style="normal" style:font-style-asian="normal" style:font-style-complex="normal"/>
    </style:style>
    <style:style style:name="T60" style:family="text">
      <style:text-properties fo:font-style="normal" officeooo:rsid="00ccd4db" style:font-style-asian="normal" style:font-style-complex="normal"/>
    </style:style>
    <style:style style:name="T61" style:family="text">
      <style:text-properties officeooo:rsid="00cb4a5f"/>
    </style:style>
    <style:style style:name="T62" style:family="text">
      <style:text-properties officeooo:rsid="00cc0c36"/>
    </style:style>
    <style:style style:name="T63" style:family="text">
      <style:text-properties fo:font-style="italic" officeooo:rsid="00cc0c36" style:font-style-asian="italic" style:font-style-complex="italic"/>
    </style:style>
    <style:style style:name="T64" style:family="text">
      <style:text-properties fo:font-style="italic" officeooo:rsid="00cc4f69" style:font-style-asian="italic" style:font-style-complex="italic"/>
    </style:style>
    <style:style style:name="T65" style:family="text">
      <style:text-properties officeooo:rsid="00d1b060"/>
    </style:style>
    <style:style style:name="T66" style:family="text">
      <style:text-properties officeooo:rsid="00d38be4"/>
    </style:style>
    <style:style style:name="T67" style:family="text">
      <style:text-properties officeooo:rsid="00d42583"/>
    </style:style>
    <style:style style:name="T68" style:family="text">
      <style:text-properties officeooo:rsid="00d49f77"/>
    </style:style>
    <style:style style:name="T69" style:family="text">
      <style:text-properties officeooo:rsid="00d8d7a8"/>
    </style:style>
    <style:style style:name="T70" style:family="text">
      <style:text-properties officeooo:rsid="00d933ad"/>
    </style:style>
    <style:style style:name="T71" style:family="text">
      <style:text-properties officeooo:rsid="00daadf2"/>
    </style:style>
    <style:style style:name="T72" style:family="text">
      <style:text-properties officeooo:rsid="00d99f0d"/>
    </style:style>
    <style:style style:name="T73" style:family="text">
      <style:text-properties officeooo:rsid="00dd12ad"/>
    </style:style>
    <style:style style:name="T74" style:family="text">
      <style:text-properties officeooo:rsid="00e92fef"/>
    </style:style>
    <style:style style:name="T75" style:family="text">
      <style:text-properties officeooo:rsid="00e05ce5"/>
    </style:style>
    <style:style style:name="T76" style:family="text">
      <style:text-properties officeooo:rsid="00e092fe"/>
    </style:style>
    <style:style style:name="T77" style:family="text">
      <style:text-properties officeooo:rsid="00e223d8"/>
    </style:style>
    <style:style style:name="T78" style:family="text">
      <style:text-properties officeooo:rsid="00e913a0"/>
    </style:style>
    <style:style style:name="T79" style:family="text">
      <style:text-properties officeooo:rsid="00ea830c"/>
    </style:style>
    <style:style style:name="T80" style:family="text">
      <style:text-properties officeooo:rsid="00ea83c2"/>
    </style:style>
    <style:style style:name="T81" style:family="text">
      <style:text-properties officeooo:rsid="00ec375f"/>
    </style:style>
    <style:style style:name="T82" style:family="text">
      <style:text-properties officeooo:rsid="00ed56f9"/>
    </style:style>
    <style:style style:name="T83" style:family="text">
      <style:text-properties officeooo:rsid="00edb740"/>
    </style:style>
    <style:style style:name="T84" style:family="text">
      <style:text-properties officeooo:rsid="00edde8f"/>
    </style:style>
    <style:style style:name="T85" style:family="text">
      <style:text-properties officeooo:rsid="00ef38af"/>
    </style:style>
    <style:style style:name="T86" style:family="text">
      <style:text-properties officeooo:rsid="00efbe73"/>
    </style:style>
    <style:style style:name="T87" style:family="text">
      <style:text-properties officeooo:rsid="00effc0c"/>
    </style:style>
    <style:style style:name="T88" style:family="text">
      <style:text-properties officeooo:rsid="00f43b13"/>
    </style:style>
    <style:style style:name="T89" style:family="text">
      <style:text-properties officeooo:rsid="00f72fc8"/>
    </style:style>
    <style:style style:name="T90" style:family="text">
      <style:text-properties officeooo:rsid="00f48cea"/>
    </style:style>
    <style:style style:name="T91" style:family="text">
      <style:text-properties officeooo:rsid="00f90979"/>
    </style:style>
    <style:style style:name="T92" style:family="text">
      <style:text-properties officeooo:rsid="00f4392d"/>
    </style:style>
    <style:style style:name="T93" style:family="text">
      <style:text-properties officeooo:rsid="00f56c95"/>
    </style:style>
    <style:style style:name="T94" style:family="text">
      <style:text-properties officeooo:rsid="00f26016"/>
    </style:style>
    <style:style style:name="T95" style:family="text">
      <style:text-properties officeooo:rsid="00fb01cb"/>
    </style:style>
    <style:style style:name="T96" style:family="text">
      <style:text-properties officeooo:rsid="00fcbdd2"/>
    </style:style>
    <style:style style:name="T97" style:family="text">
      <style:text-properties officeooo:rsid="00fd753b"/>
    </style:style>
    <style:style style:name="T98" style:family="text">
      <style:text-properties officeooo:rsid="00feaa9d"/>
    </style:style>
    <style:style style:name="T99" style:family="text">
      <style:text-properties officeooo:rsid="00ff6b59"/>
    </style:style>
    <style:style style:name="T100" style:family="text">
      <style:text-properties officeooo:rsid="00ffec93"/>
    </style:style>
    <style:style style:name="T101" style:family="text">
      <style:text-properties officeooo:rsid="0101ef2f"/>
    </style:style>
    <style:style style:name="T102" style:family="text">
      <style:text-properties officeooo:rsid="010464e0"/>
    </style:style>
    <style:style style:name="T103" style:family="text">
      <style:text-properties officeooo:rsid="01064fbe"/>
    </style:style>
    <style:style style:name="T104" style:family="text">
      <style:text-properties officeooo:rsid="0107e7bc"/>
    </style:style>
    <style:style style:name="T105" style:family="text">
      <style:text-properties officeooo:rsid="010946b7"/>
    </style:style>
    <style:style style:name="T106" style:family="text">
      <style:text-properties officeooo:rsid="0109db87"/>
    </style:style>
    <style:style style:name="T107" style:family="text">
      <style:text-properties officeooo:rsid="010b6e9a"/>
    </style:style>
    <style:style style:name="T108" style:family="text">
      <style:text-properties officeooo:rsid="010c8454"/>
    </style:style>
    <style:style style:name="T109" style:family="text">
      <style:text-properties officeooo:rsid="010ff7c4"/>
    </style:style>
    <style:style style:name="T110" style:family="text">
      <style:text-properties officeooo:rsid="0111d8aa"/>
    </style:style>
    <style:style style:name="T111" style:family="text">
      <style:text-properties officeooo:rsid="0116314f"/>
    </style:style>
    <style:style style:name="T112" style:family="text">
      <style:text-properties officeooo:rsid="01129ecb"/>
    </style:style>
    <style:style style:name="T113" style:family="text">
      <style:text-properties officeooo:rsid="01158586"/>
    </style:style>
    <style:style style:name="T114" style:family="text">
      <style:text-properties officeooo:rsid="01138f0d"/>
    </style:style>
    <style:style style:name="T115" style:family="text">
      <style:text-properties officeooo:rsid="01172792"/>
    </style:style>
    <style:style style:name="T116" style:family="text">
      <style:text-properties officeooo:rsid="0118cf61"/>
    </style:style>
    <style:style style:name="T117" style:family="text">
      <style:text-properties officeooo:rsid="011bb8f6"/>
    </style:style>
    <style:style style:name="T118" style:family="text">
      <style:text-properties officeooo:rsid="011a63ee"/>
    </style:style>
    <style:style style:name="T119" style:family="text">
      <style:text-properties officeooo:rsid="011cd737"/>
    </style:style>
    <style:style style:name="T120" style:family="text">
      <style:text-properties officeooo:rsid="0120ab91"/>
    </style:style>
    <style:style style:name="T121" style:family="text">
      <style:text-properties officeooo:rsid="01212ad3"/>
    </style:style>
    <style:style style:name="T122" style:family="text">
      <style:text-properties officeooo:rsid="011ca480"/>
    </style:style>
    <style:style style:name="T123" style:family="text">
      <style:text-properties officeooo:rsid="011de2de"/>
    </style:style>
    <style:style style:name="T124" style:family="text">
      <style:text-properties officeooo:rsid="011f83ac"/>
    </style:style>
    <style:style style:name="T125" style:family="text">
      <style:text-properties officeooo:rsid="01220d2d"/>
    </style:style>
    <style:style style:name="T126" style:family="text">
      <style:text-properties fo:font-style="italic" officeooo:rsid="01220d2d" style:font-style-asian="italic" style:font-style-complex="italic"/>
    </style:style>
    <style:style style:name="T127" style:family="text">
      <style:text-properties officeooo:rsid="01224800"/>
    </style:style>
    <style:style style:name="T128" style:family="text">
      <style:text-properties officeooo:rsid="012312ef"/>
    </style:style>
    <style:style style:name="T129" style:family="text">
      <style:text-properties officeooo:rsid="0124dfed"/>
    </style:style>
    <style:style style:name="T130" style:family="text">
      <style:text-properties officeooo:rsid="01262c2a"/>
    </style:style>
    <style:style style:name="T131" style:family="text">
      <style:text-properties officeooo:rsid="01295c27"/>
    </style:style>
    <style:style style:name="T132" style:family="text">
      <style:text-properties officeooo:rsid="012720be"/>
    </style:style>
    <style:style style:name="T133" style:family="text">
      <style:text-properties officeooo:rsid="012b2c38"/>
    </style:style>
    <style:style style:name="T134" style:family="text">
      <style:text-properties officeooo:rsid="012e75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 you think love can bloom on a battlefield?</text:p>
      <text:p text:style-name="P2"/>
      <text:p text:style-name="P3">Romance game jam #1</text:p>
      <text:p text:style-name="P2"/>
      <text:p text:style-name="P4"/>
      <text:p text:style-name="P5"><text:tab/><text:span text:style-name="T1">“</text:span><text:span text:style-name="T2">After losing consciousness during a dodgeball match, Axel, a mediocre player, wakes up next to Beatrice, the captain of the opposing dodgeball team and an accomplished sportswoman.</text:span><text:span text:style-name="T3"> Questioning his </text:span><text:span text:style-name="T4">own</text:span><text:span text:style-name="T3"> love for the sport, the young boy </text:span><text:span text:style-name="T5">m</text:span><text:span text:style-name="T6">ay</text:span><text:span text:style-name="T3"> well </text:span><text:span text:style-name="T4">have</text:span><text:span text:style-name="T3"> </text:span><text:span text:style-name="T7">just found the</text:span><text:span text:style-name="T3"> </text:span><text:span text:style-name="T7">motivation</text:span><text:span text:style-name="T4"> to push past his limits, in the form of his new athletic friend – and perhaps, he foolishly hopes, a few more opportunities to spend more time with her.</text:span><text:span text:style-name="T8">”</text:span></text:p>
      <text:p text:style-name="P6"/>
      <text:p text:style-name="P7"><text:tab/>The scent of old, wet cloth clung<text:span text:style-name="T9">s </text:span>onto his skin as Axel charge<text:span text:style-name="T9">s</text:span> forward. Time <text:span text:style-name="T9">is</text:span> not in his favour; only thirty seconds left before the set was over. If only he could hit one of the support players, or better, catch one of the cannonballs whooshing past his head, then his team might have a chance to turn the match on its head.</text:p>
      <text:p text:style-name="P7"/>
      <text:p text:style-name="P8"><text:tab/>He need<text:span text:style-name="T9">s </text:span>to act fast. In front of him, one of his opponents – the cadet of their team, he remembered – fell on her knees to avoid an incoming attack. Instinctively, Axel raise<text:span text:style-name="T9">s</text:span> his hand, his grip on the cloth ball slowly loosening. The nerves in his biceps scream <text:span text:style-name="T10">in</text:span> pain for having endured this never-ending match.</text:p>
      <text:p text:style-name="P8"/>
      <text:p text:style-name="P8"><text:tab/><text:span text:style-name="T11">In the corner of his eye, the immense silhouette of the enemy captain </text:span><text:span text:style-name="T9">reaches</text:span><text:span text:style-name="T11"> the attack line. A looming shadow rushe</text:span><text:span text:style-name="T9">s</text:span><text:span text:style-name="T11"> his way, too fast for him to dodge in time. </text:span><text:span text:style-name="T12">His vision flashe</text:span><text:span text:style-name="T9">s</text:span><text:span text:style-name="T12"> red, </text:span><text:span text:style-name="T13">and before he knew it, it was already over</text:span><text:span text:style-name="T12">.</text:span></text:p>
      <text:p text:style-name="P8"/>
      <text:p text:style-name="P8">***</text:p>
      <text:p text:style-name="P8"/>
      <text:p text:style-name="P9"><text:tab/><text:span text:style-name="T14">When </text:span><text:span text:style-name="T15">Axe</text:span><text:span text:style-name="T16">l </text:span><text:span text:style-name="T14">w</text:span><text:span text:style-name="T17">akes</text:span><text:span text:style-name="T16"> up, </text:span><text:span text:style-name="T14">he f</text:span><text:span text:style-name="T17">inds</text:span><text:span text:style-name="T14"> himself</text:span><text:span text:style-name="T16"> laid on </text:span><text:span text:style-name="T14">a cold bench</text:span><text:span text:style-name="T16">. His ears still </text:span><text:span text:style-name="T17">whistling</text:span><text:span text:style-name="T16"> </text:span><text:span text:style-name="T18">from the concussion</text:span><text:span text:style-name="T16">, he </text:span><text:span text:style-name="T17">needs</text:span><text:span text:style-name="T16"> several attempts before managing to sit. </text:span><text:span text:style-name="T19">Someone near the locker room call</text:span><text:span text:style-name="T17">s</text:span><text:span text:style-name="T19"> him out, but he couldn’t figure out the words. </text:span></text:p>
      <text:p text:style-name="P9"/>
      <text:p text:style-name="P9"><text:tab/>“<text:span text:style-name="T20">You’re awake.” a feminine voice </text:span><text:span text:style-name="T17">rings</text:span><text:span text:style-name="T20">. “I didn’t hurt you, right?”</text:span></text:p>
      <text:p text:style-name="P9"/>
      <text:p text:style-name="P10">A blur of blue and yellow <text:span text:style-name="T17">grows</text:span> bigger in the corner of his vision. It <text:span text:style-name="T17">takes</text:span> him some time to readjust and finally give a face to the girl that knocked him out; it was the captain of the opposing team, <text:span text:style-name="T21">still</text:span> wearing <text:span text:style-name="T22">her</text:span> <text:span text:style-name="T23">sports </text:span>uniform that gave her the appearance of a giant child.</text:p>
      <text:p text:style-name="P10"/>
      <text:p text:style-name="P10"><text:tab/>“You’re big.” he simply mutter<text:span text:style-name="T24">s</text:span>.</text:p>
      <text:p text:style-name="P10"/>
      <text:p text:style-name="P10"><text:soft-page-break/><text:tab/>She blink<text:span text:style-name="T24">s,</text:span> caught off guard by his unrelated comment.</text:p>
      <text:p text:style-name="P10"/>
      <text:p text:style-name="P10"><text:tab/>“What?”</text:p>
      <text:p text:style-name="P10"/>
      <text:p text:style-name="P10"><text:tab/>“Uh, I mean you’re huge,” he stammer<text:span text:style-name="T24">s</text:span>. “<text:span text:style-name="T25">It’s just, it’s not what I meant. I mean… You’re tall, is all.”</text:span></text:p>
      <text:p text:style-name="P10"/>
      <text:p text:style-name="P11">The young boy buries his face in his hands, cursing internally for letting <text:span text:style-name="T24">his</text:span> intrusive thoughts win. However, he only g<text:span text:style-name="T24">ets</text:span> a playful laugh in response; surprisingly cheerful and high-pitched for someone <text:span text:style-name="T24">her</text:span> size.</text:p>
      <text:p text:style-name="P11"/>
      <text:p text:style-name="P11"><text:tab/>“<text:span text:style-name="T26">I hit you a bit too hard I see.” she wave</text:span><text:span text:style-name="T24">s it</text:span><text:span text:style-name="T9"> </text:span><text:span text:style-name="T26">off before extending a hand to help him stand up. “You’re Axel, right? Sorry for the throw, I don’t realize my strength sometimes.”</text:span></text:p>
      <text:p text:style-name="P11"/>
      <text:p text:style-name="P11"><text:tab/><text:span text:style-name="T26">Axel’s gaze eventually steadie</text:span><text:span text:style-name="T24">s</text:span><text:span text:style-name="T26"> and scan</text:span><text:span text:style-name="T24">s</text:span><text:span text:style-name="T26"> the room. They </text:span><text:span text:style-name="T24">are</text:span><text:span text:style-name="T26"> still in the main playground of the gym, but their teammates are nowhere to be seen.</text:span></text:p>
      <text:p text:style-name="P11"/>
      <text:p text:style-name="P11"><text:tab/>“<text:span text:style-name="T26">The match, how did it went?”</text:span></text:p>
      <text:p text:style-name="P11"/>
      <text:p text:style-name="P11"><text:tab/>“<text:span text:style-name="T26">The Hyenas won the second set,” she declare</text:span><text:span text:style-name="T9">s</text:span><text:span text:style-name="T26">. “Sorry dude.”</text:span></text:p>
      <text:p text:style-name="P11"/>
      <text:p text:style-name="P11"><text:tab/>“<text:span text:style-name="T9">It’s fine. Figured as much.”</text:span></text:p>
      <text:p text:style-name="P11"/>
      <text:p text:style-name="P12"><text:tab/>“<text:span text:style-name="T9">Don’t say that.” She lifts him up with one hand and </text:span><text:span text:style-name="T27">wow</text:span><text:span text:style-name="T9"> she was strong, Alex thought. </text:span><text:span text:style-name="T17">Now looking at them, </text:span><text:span text:style-name="T9">her</text:span><text:span text:style-name="T20"> biceps were probably more developed than his thighs. He suddenly felt a bit better about his defeat.</text:span></text:p>
      <text:p text:style-name="P12"/>
      <text:p text:style-name="P12"><text:tab/>“<text:span text:style-name="T28">I’m Beatrice,” she introduces herself. “</text:span><text:span text:style-name="T29">You can call me Bee. </text:span><text:span text:style-name="T28">I’m the captain of the Hyenas. </text:span><text:span text:style-name="T29">It was a good match, don’t feel bad about it. It was your first regional match?”</text:span></text:p>
      <text:p text:style-name="P12"/>
      <text:p text:style-name="P12"><text:tab/>“<text:span text:style-name="T29">Mine, yes. I’m new to dodgeball. I knew we were gonna get slammed, but not that hard honestly,” he laughed off, hoping not to come as bitter as it sounded in his head.</text:span></text:p>
      <text:p text:style-name="P12"/>
      <text:p text:style-name="P12"><text:tab/>“<text:span text:style-name="T29">We all gotta start somewhere,” Beatrice simply answers, giving him a pat on the back. “Come on, let’s get dressed, there’s still the after-work party to go to.”</text:span></text:p>
      <text:p text:style-name="P12"/>
      <text:p text:style-name="P12"><text:tab/><text:span text:style-name="T29">She leaves him with a great leap towards the locker room. Axel massages his forehead, still not completely recovered from the missile he just ate a few minutes ago. </text:span><text:span text:style-name="T30">For a while, he simply stares at the direction Beatrice ran to, the memory of her strong grip still imprinted on his hand.</text:span></text:p>
      <text:p text:style-name="P12"/>
      <text:p text:style-name="P12"><text:tab/><text:span text:style-name="T31">She’s got a cute voice</text:span><text:span text:style-name="T30">, was all he could think of, before groggily limping after her.</text:span></text:p>
      <text:p text:style-name="P12"/>
      <text:p text:style-name="P12">***</text:p>
      <text:p text:style-name="P12"/>
      <text:p text:style-name="P12"><text:soft-page-break/><text:tab/>“<text:span text:style-name="T32">So, uh, why ‘the Hyenas’?”</text:span></text:p>
      <text:p text:style-name="P12"/>
      <text:p text:style-name="P12"><text:tab/>“<text:span text:style-name="T33">It’s our previous captain who got the idea,” Beatrice said, taking a sip of her soda. “So basically, the previous members of the team really got a kick of smashing newbies at dodgeball, so much you could hear them </text:span><text:span text:style-name="T34">laugh</text:span><text:span text:style-name="T33"> like hyenas before a match. No really, I swear it’s true!”</text:span></text:p>
      <text:p text:style-name="P12"/>
      <text:p text:style-name="P12"><text:tab/>“<text:span text:style-name="T33">Oh, so that’s why you girls made that weird </text:span><text:span text:style-name="T34">cackling sound</text:span><text:span text:style-name="T33"> after the huddle,” Axel chuckled.</text:span></text:p>
      <text:p text:style-name="P12"/>
      <text:p text:style-name="P12"><text:tab/>“<text:span text:style-name="T33">Come on dude, I don’t </text:span><text:span text:style-name="T35">cackle</text:span><text:span text:style-name="T33">,” she retorts, but struggles to keep a straight face.</text:span></text:p>
      <text:p text:style-name="P12"/>
      <text:p text:style-name="P12"><text:tab/>“<text:span text:style-name="T36">She didn’t play with you this morning?”</text:span></text:p>
      <text:p text:style-name="P12"/>
      <text:p text:style-name="P12"><text:tab/>“<text:span text:style-name="T36">Nah, she graduated. Her and all her friends from high school. Went off to different schools, but I heard some of them have tried setting up dodgeball clubs where they live now. We weren’t happy to see them go, but that’s life for you.”</text:span></text:p>
      <text:p text:style-name="P12"/>
      <text:p text:style-name="P12"><text:tab/>“<text:span text:style-name="T36">And so she named you captain.”</text:span></text:p>
      <text:p text:style-name="P12"/>
      <text:p text:style-name="P12"><text:tab/>“<text:span text:style-name="T36">Yeah. I was surprised at first, she knew how shy I was at the time, and she made me lead the entire team like I had done that my entire life.”</text:span></text:p>
      <text:p text:style-name="P12"/>
      <text:p text:style-name="P12"><text:tab/>“<text:span text:style-name="T36">I mean, you’re probably the best player in your team, so it’s not like she made a mistake.”</text:span></text:p>
      <text:p text:style-name="P12"/>
      <text:p text:style-name="P12"><text:tab/>“<text:span text:style-name="T36">Oh, there’s a lot more that goes into being a good captain,” she says, emptying her drink in one go. “Being good at the game isn’t the most important. What matters is you have the mindset for it. Be confident and communicate with your teammates, all that stuff.”</text:span></text:p>
      <text:p text:style-name="P12"/>
      <text:p text:style-name="P12"><text:tab/>“<text:span text:style-name="T37">And humble.”</text:span></text:p>
      <text:p text:style-name="P12"/>
      <text:p text:style-name="P12"><text:tab/>“<text:span text:style-name="T37">Hey man, I’m serious,” she chuckles, burying her elbow in his side. “I needed time to work this out, too.”</text:span></text:p>
      <text:p text:style-name="P12"/>
      <text:p text:style-name="P12"><text:tab/><text:span text:style-name="T38">Alex slowly finishes his drink, glancing at the rest of their teammates across the room. Their dodgeball club had located a private room in a nearby bar for their teams to enjoy some leisure time after their friendly match. The regional tournament would begin soon, and both teams needed the entertainment to warm up, and the drinks to cool off.</text:span></text:p>
      <text:p text:style-name="P12"/>
      <text:p text:style-name="P12"><text:tab/><text:span text:style-name="T39">His friend Leo dissapeared who knows where a few minutes ago with a girl from the Hyenas. As usual from him; he never managed to keep them for long though. </text:span><text:span text:style-name="T40">In fact, most of the other players who accompanied them went home a while ago, leaving only a handful of customers left. </text:span><text:span text:style-name="T41">He soon realized he was alone with Beatrice, who seemed content with just downing another </text:span><text:span text:style-name="T42">bottle</text:span><text:span text:style-name="T41"> of soda like it was water.</text:span></text:p>
      <text:p text:style-name="P12"><text:soft-page-break/></text:p>
      <text:p text:style-name="P13"><text:tab/>“<text:span text:style-name="T42">I haven’t been playing dodgeball for that long,</text:span>” Axel <text:span text:style-name="T42">says,</text:span> <text:span text:style-name="T42">staring</text:span> <text:span text:style-name="T43">at</text:span> the bottom of his drink. “<text:span text:style-name="T42">I don’t even know why Leo selected me for the tournament. I know it’s much more important for him than it is to me.</text:span>”</text:p>
      <text:p text:style-name="P13"/>
      <text:p text:style-name="P13"><text:tab/>“<text:span text:style-name="T42">You’re thinking too much about it. If he accepted you, then you’re stronger than you probably think.”</text:span></text:p>
      <text:p text:style-name="P13"/>
      <text:p text:style-name="P13"><text:tab/>“<text:span text:style-name="T42">I’ve been training for like, two months. </text:span><text:span text:style-name="T44">Our last green member started two years ago. You won’t become a good shooter by only practicing once a week-end for two months.”</text:span></text:p>
      <text:p text:style-name="P13"/>
      <text:p text:style-name="P13"><text:tab/><text:span text:style-name="T44">He absently flexes his arm in front of her as if to illustrate his point. He freezes as Beatrice suddenly grabs his forearm and lifts it under the yellowish bulbs of the ceiling, letting her gaze meander on his constitution. He didn’t think of her capable of being this delicate given her stature, and yet her fingers </text:span><text:span text:style-name="T45">brush</text:span><text:span text:style-name="T44"> slowly </text:span><text:span text:style-name="T45">against</text:span><text:span text:style-name="T44"> his muscles, pinching </text:span><text:span text:style-name="T45">softly </text:span><text:span text:style-name="T44">at some </text:span><text:span text:style-name="T45">various</text:span><text:span text:style-name="T44"> </text:span><text:span text:style-name="T45">sections</text:span><text:span text:style-name="T44"> on his muscles to test their reaction. </text:span><text:span text:style-name="T45">The process only lasts a handful of seconds; enough time for his neighbour to formulate her verdict:</text:span></text:p>
      <text:p text:style-name="P13"/>
      <text:p text:style-name="P13"><text:tab/>“<text:span text:style-name="T45">Why don’t you come boxing with me sometime soon?” she says ever so casually. “You’ll get your noodle arms in shape faster this way.”</text:span></text:p>
      <text:p text:style-name="P13"/>
      <text:p text:style-name="P13"><text:tab/>“<text:span text:style-name="T45">I don’t have noodle arms!” Axel suddenly retracts his arms in front of his torso as if he just got caught naked.</text:span></text:p>
      <text:p text:style-name="P13"/>
      <text:p text:style-name="P13"><text:tab/>“<text:span text:style-name="T45">Yes you </text:span><text:span text:style-name="T46">do</text:span><text:span text:style-name="T45">,” she playfully teases him with her elbo</text:span><text:span text:style-name="T47">w</text:span><text:span text:style-name="T45">.</text:span></text:p>
      <text:p text:style-name="P13"/>
      <text:p text:style-name="P13"><text:tab/>“<text:span text:style-name="T45">Do you even know anything about boxing, Bee?”</text:span></text:p>
      <text:p text:style-name="P13"/>
      <text:p text:style-name="P13"><text:tab/>“<text:span text:style-name="T45">Of course, where do you think I got these puppies, duh?” she boasts, flexing her arms to inflate her biceps, inadvertently </text:span><text:span text:style-name="T48">puffing up</text:span><text:span text:style-name="T45"> her chest in the process. Alex catches himself right as his gaze was starting to linger a bit too long </text:span><text:span text:style-name="T49">on</text:span><text:span text:style-name="T45"> </text:span><text:span text:style-name="T50">not her arms</text:span><text:span text:style-name="T45">, but thankfully Beatrice </text:span><text:span text:style-name="T51">doesn’t</text:span><text:span text:style-name="T45"> seem to notice. </text:span></text:p>
      <text:p text:style-name="P13"/>
      <text:p text:style-name="P13"><text:tab/>“<text:span text:style-name="T51">My uncle runs a boxing club,” she explains. “I’ve been at it since I entered middle school. It really builds you mental, too! You quickly learn to be humble after a few jabs in the guts.”</text:span></text:p>
      <text:p text:style-name="P13"/>
      <text:p text:style-name="P13"><text:tab/>“<text:span text:style-name="T51">You do boxing </text:span><text:span text:style-name="T52">and</text:span><text:span text:style-name="T51"> dodgeball?” Axel blinks in surprise. “How many sports do you do actually?”</text:span></text:p>
      <text:p text:style-name="P13"/>
      <text:p text:style-name="P14"><text:tab/>“<text:span text:style-name="T51">I didn’t want to do either at first,” she continues. “My dad wanted me to be able to stand up to boys in case something happens to me, so off to boxing it was. And my uncle wanted me to meet people my age, so off to dodgball it was.”</text:span></text:p>
      <text:p text:style-name="P14"/>
      <text:p text:style-name="P14"><text:soft-page-break/><text:tab/>“<text:span text:style-name="T53">Damn, you’re an athlete,” Axel simply answers, back to finding is drink suddenly more interesting. “I thought I had a chance against you this morning, now it’s clear.”</text:span></text:p>
      <text:p text:style-name="P14"/>
      <text:p text:style-name="P14"><text:tab/>“<text:span text:style-name="T53">Don’t say that. Look,” she suddenly fishes for his phone in his pocket, and without his input, starts typing frenetically on the screen.</text:span></text:p>
      <text:p text:style-name="P14"/>
      <text:p text:style-name="P14"><text:tab/>“<text:span text:style-name="T53">You live in this town, right?”</text:span></text:p>
      <text:p text:style-name="P14"/>
      <text:p text:style-name="P14"><text:tab/>“<text:span text:style-name="T53">Uh, yeah,” he hesitates. “But what are you…”</text:span></text:p>
      <text:p text:style-name="P14"/>
      <text:p text:style-name="P14"><text:tab/>“<text:span text:style-name="T53">Here,” she exclaims almost proudly, handing him his phone back. “I’ve given you my unc’s address. That’s where the club is, too. If you ever get lost, I’ve given you my number too so I can pick you up if you need it.”</text:span></text:p>
      <text:p text:style-name="P14"/>
      <text:p text:style-name="P14"><text:tab/>“<text:span text:style-name="T53">B-But why?” he blurts out, surprised at the abrupt gesture.</text:span></text:p>
      <text:p text:style-name="P14"/>
      <text:p text:style-name="P14"><text:tab/>“<text:span text:style-name="T53">You said you can’t throw to save your life. So we’re gonna take an hour to </text:span><text:span text:style-name="T54">make sure you can at least beat a little girl” she jokes. “Who knows, maybe you’ll end up liking boxing more than dodgeball and you’ll join our club?”</text:span></text:p>
      <text:p text:style-name="P14"/>
      <text:p text:style-name="P14"><text:tab/>“<text:span text:style-name="T54">Yeah, right,” he rolls his eyes. “No way that’s gonna happen.”</text:span></text:p>
      <text:p text:style-name="P14"/>
      <text:p text:style-name="P14"><text:tab/>“<text:span text:style-name="T54">No way to know until you try,” she smiles – Alex suddenly felt more comfortable focusing on his glass – before downing her last bottle. “Just give it a go with me. As a way to apologize for knocking you out during ou</text:span><text:span text:style-name="T55">r</text:span><text:span text:style-name="T54"> match.”</text:span></text:p>
      <text:p text:style-name="P15"/>
      <text:p text:style-name="P16"><text:tab/><text:span text:style-name="T56">For a moment, he </text:span><text:span text:style-name="T57">considers simply</text:span><text:span text:style-name="T56"> refusing. The prospect of getting humiliated </text:span><text:span text:style-name="T57">once again didn’t really appeal to him. </text:span><text:span text:style-name="T58">His neighbour had joined her hands nervously behind her head to try and play it cool, allowing to catch a brief glimpse of the toned muscles on her midriff</text:span><text:span text:style-name="T56">. </text:span><text:span text:style-name="T58">The sight made him a bit queasy and forget what the topic of the discussion was for a second.</text:span></text:p>
      <text:p text:style-name="P16"/>
      <text:p text:style-name="P16"><text:tab/>“<text:span text:style-name="T56">Fine, I guess…” he sheepishly accepts, </text:span><text:span text:style-name="T58">prying his eyes away from – Wait, did she do that on purpose?</text:span></text:p>
      <text:p text:style-name="P16"/>
      <text:p text:style-name="P17"><text:span text:style-name="T59"><text:tab/>“</text:span><text:span text:style-name="T60">Great!” </text:span></text:p>
      <text:p text:style-name="P18"/>
      <text:p text:style-name="P17"><text:span text:style-name="T60"><text:tab/></text:span><text:span text:style-name="T61">With that, she pats him affectionately on the back and grabs her sports bag at her feet. </text:span><text:span text:style-name="T56">She seems genuinely glad he said yes.</text:span></text:p>
      <text:p text:style-name="P14"/>
      <text:p text:style-name="P14"><text:tab/>“<text:span text:style-name="T61">Well, I have to go,” she waves a hand at him. “And don’t you dare stand me up on this one!”</text:span></text:p>
      <text:p text:style-name="P14"/>
      <text:p text:style-name="P14"><text:tab/><text:span text:style-name="T62">She leaves the room to go home, leaving Alex alone with his thoughts. His phone still in hand, he couldn’t help but staring at her number, still not believing this was real.</text:span></text:p>
      <text:p text:style-name="P14"><text:soft-page-break/></text:p>
      <text:p text:style-name="P14"><text:tab/><text:span text:style-name="T63">Wait, did she set me up on a date? </text:span><text:span text:style-name="T62">Alex suddenly realized, the heat rising to his cheeks. </text:span><text:span text:style-name="T63">No, no, stop dreaming, man. </text:span><text:span text:style-name="T64">You’re just going to a sparring session, nothing more. With a girl that could punch all your teeth out, no need to worry here.</text:span></text:p>
      <text:p text:style-name="P19"/>
      <text:p text:style-name="P19"><text:tab/><text:span text:style-name="T65">He sighs, and grabs his bag as well to take his leave. On his way out, he hears giggles coming from the restroom, </text:span><text:span text:style-name="T66">coming from Leo and the girl he picked, who visibly are having way more fun than he does right now. Repressing the bitter feeling gripping his throat – and a blush, after hearing what they were getting up to – </text:span><text:span text:style-name="T67">he turns his back to the colorful lights of the bar and ventures into the </text:span><text:span text:style-name="T68">moonless night.</text:span></text:p>
      <text:p text:style-name="P19"/>
      <text:p text:style-name="P20">***</text:p>
      <text:p text:style-name="P20"/>
      <text:p text:style-name="P19"><text:tab/><text:span text:style-name="T69">Axel still isn’t sure if accepting Beatrice’s offer was a good idea. </text:span><text:span text:style-name="T70">T</text:span><text:span text:style-name="T69">he prospect of being beaten up for free didn’t match his description of a good time. </text:span><text:span text:style-name="T70">But it would have been impolite to ignore her, especially after she called him an hour earlier to make sure he wouldn’t back out at the last moment. She </text:span><text:span text:style-name="T71">sneakily took the chance</text:span><text:span text:style-name="T70"> last evening to take his number, too – the young boy didn’t know what to make of this information.</text:span></text:p>
      <text:p text:style-name="P19"/>
      <text:p text:style-name="P19"><text:tab/><text:span text:style-name="T72">The place itself wasn’t much – it looked like any school gym his class used to go in high school; maybe a bit cleaner and better maintained, as the paint seemed fresh and untainted by the black taint of exhaust gas. </text:span><text:span text:style-name="T73">From the outside, he could already hear the muffled calls and screams of the various trainees already at work.</text:span></text:p>
      <text:p text:style-name="P19"/>
      <text:p text:style-name="P21"><text:tab/>Stepping in<text:span text:style-name="T74">side</text:span>, he <text:span text:style-name="T74">is</text:span> glad to see the place ha<text:span text:style-name="T74">s</text:span> an AC installed. Still, the fusty smell was no different to the one in his dodgeball club, a mixture of old clothes and rubber <text:span text:style-name="T75">balls wore down</text:span> <text:span text:style-name="T76">by</text:span> years of abuse.</text:p>
      <text:p text:style-name="P21"/>
      <text:p text:style-name="P22"><text:tab/>Beatrice was already <text:span text:style-name="T77">on the ring. Axel walk</text:span><text:span text:style-name="T74">s</text:span><text:span text:style-name="T77"> up to the center of the gym, where multiple </text:span><text:span text:style-name="T78">duos </text:span><text:span text:style-name="T79">were</text:span><text:span text:style-name="T78"> </text:span><text:span text:style-name="T79">trading blows in a friendly spar</text:span><text:span text:style-name="T80">ring sessio</text:span><text:span text:style-name="T81">n</text:span><text:span text:style-name="T78">. The big girl, </text:span><text:span text:style-name="T74">wearing a red leather helmet and gloves,</text:span><text:span text:style-name="T78"> is up against </text:span><text:span text:style-name="T74">a man much older than her; given his more casual outfit, he could only be her teacher; maybe her uncle?</text:span></text:p>
      <text:p text:style-name="P22"/>
      <text:p text:style-name="P22"><text:tab/><text:span text:style-name="T82">Her opponent made quick work of her, however; </text:span><text:span text:style-name="T83">as she seemingly takes note of Axel’s presence, the </text:span><text:span text:style-name="T84">man sweeps her leg with a powerful kick and sends her head making acquaintances with the floor. The poor girl picks herself back up with a grunt, her traits contorted by exhaustion.</text:span></text:p>
      <text:p text:style-name="P22"/>
      <text:p text:style-name="P22"><text:tab/>“<text:span text:style-name="T84">Never </text:span><text:span text:style-name="T85">turn your back on your opponent,” the older man sighs. “Do you think that will be enough this time?”</text:span></text:p>
      <text:p text:style-name="P22"/>
      <text:p text:style-name="P22"><text:tab/>“<text:span text:style-name="T85">I didn’t turn my back.” she coughs </text:span><text:span text:style-name="T86">as she removes her helmet</text:span><text:span text:style-name="T85">. “I just thought I saw…”</text:span></text:p>
      <text:p text:style-name="P22"/>
      <text:p text:style-name="P22"><text:tab/><text:span text:style-name="T85">Her eyes scan the room, and her face lights up as soon as she spots Axel. </text:span><text:span text:style-name="T86">She trots up to him and gives him a light tap on the shoulder as a welcome gesture.</text:span></text:p>
      <text:p text:style-name="P22"><text:soft-page-break/></text:p>
      <text:p text:style-name="P22"><text:tab/>“<text:span text:style-name="T86">Hey Bee, uh, nice outfit,” he struggles to find the words. “Suits you.”</text:span></text:p>
      <text:p text:style-name="P22"/>
      <text:p text:style-name="P22"><text:tab/>“<text:span text:style-name="T86">Oh yeah, I dressed up to the nines waiting for you,” she smirks.</text:span></text:p>
      <text:p text:style-name="P22"/>
      <text:p text:style-name="P23"><text:tab/><text:span text:style-name="T86">He probably shouldn’t have said anything, but her appreciating for his attempt eases him up nonetheless. </text:span></text:p>
      <text:p text:style-name="P24"/>
      <text:p text:style-name="P24"><text:tab/>Behind her, the old man removes his helmet and extends his hand. His weathered skin and greying temples betrayed his age and fatigue, though the latter was probably more due to the extensive hour he spent coaching his students.</text:p>
      <text:p text:style-name="P24"/>
      <text:p text:style-name="P24"><text:tab/>“You must be Axel,” he greets him as the young man shakes his hand. “Bee couldn’t stop talking about you all day yesterday.”</text:p>
      <text:p text:style-name="P24"/>
      <text:p text:style-name="P25"><text:tab/>“<text:span text:style-name="T87">For fuck’s sake Bob, I told you about him only once!” Beatrice says as she plants her elbow in his side to make him quiet. </text:span></text:p>
      <text:p text:style-name="P25"/>
      <text:p text:style-name="P26"><text:tab/>“<text:span text:style-name="T88">You really thought I would</text:span><text:span text:style-name="T89">n’t notice</text:span><text:span text:style-name="T88"> </text:span><text:span text:style-name="T90">you being glued on your phone all last week? </text:span><text:span text:style-name="T91">You saw he didn’t come to the club...</text:span><text:span text:style-name="T92">”</text:span></text:p>
      <text:p text:style-name="P26"/>
      <text:p text:style-name="P26"><text:tab/>“<text:span text:style-name="T93">W</text:span>hy are you like this?”</text:p>
      <text:p text:style-name="P24"/>
      <text:p text:style-name="P24"><text:tab/>“’<text:span text:style-name="T87">Cause it’s about time you brought a friend to watch your matches. And ‘cause your mom won’t stop pestering you about it, y’know?”</text:span></text:p>
      <text:p text:style-name="P24"/>
      <text:p text:style-name="P24"><text:tab/>“<text:span text:style-name="T87">It’s none of her business,” the young girl retorts, hiding her face in her gloves to mask her embarrassment. Axel preferred changing the topic of the discussion before his blush became too evident:</text:span></text:p>
      <text:p text:style-name="P24"/>
      <text:p text:style-name="P24"><text:tab/>“<text:span text:style-name="T87">So, uh, you’re her uncle?” he asks. “This is your club?”</text:span></text:p>
      <text:p text:style-name="P24"/>
      <text:p text:style-name="P24"><text:tab/>“<text:span text:style-name="T94">Yup! I’m Bob, the owner of this club. You interested in boxing? We also do Savate to get the kids to work their legs too. But my big ol’ brute here...” Bob says as he ruffles his protege’s hair. “… Prefers to punch instead of working on her footwork.”</text:span></text:p>
      <text:p text:style-name="P24"/>
      <text:p text:style-name="P24"><text:tab/>“<text:span text:style-name="T94">I don’t need footwork if my opponent is already down,” she teases him in return.</text:span></text:p>
      <text:p text:style-name="P24"/>
      <text:p text:style-name="P24"><text:tab/>“<text:span text:style-name="T94">And you’ll never hit anything if he puts you down first. Anyway, you’re interested, Axel? Or did you just want to pay </text:span><text:span text:style-name="T92">Bee a visit?”</text:span></text:p>
      <text:p text:style-name="P24"/>
      <text:p text:style-name="P24"><text:tab/>“<text:span text:style-name="T92">Uh, actually…” he starts.</text:span></text:p>
      <text:p text:style-name="P24"/>
      <text:p text:style-name="P24"><text:tab/>“<text:span text:style-name="T92">He feels a bit down after losing out dodgeball match </text:span><text:span text:style-name="T95">the other day,” Beatrice </text:span><text:soft-page-break/><text:span text:style-name="T95">interrupts him. “So I invited him here for a sparring match to make him feel better!”</text:span></text:p>
      <text:p text:style-name="P24"/>
      <text:p text:style-name="P24"><text:tab/>“<text:span text:style-name="T95">Uh… Yeah, kinda,” he finishes, though he would have preferred not to pass as a sore loser. “But I think I’ll just sit and watch you guys have a fight…”</text:span></text:p>
      <text:p text:style-name="P24"/>
      <text:p text:style-name="P24"><text:tab/>“<text:span text:style-name="T95">No way,” she rebukes him.</text:span></text:p>
      <text:p text:style-name="P24"/>
      <text:p text:style-name="P24"><text:tab/><text:span text:style-name="T95">Beatrice dives for her bag at the feet of one of the corners of the ring, and brandishes a while helmet </text:span><text:span text:style-name="T96">similar to</text:span><text:span text:style-name="T95"> hers as well as a pair of gloves, </text:span><text:span text:style-name="T96">both </text:span><text:span text:style-name="T95">worn down and yellowed by </text:span><text:span text:style-name="T96">abuse</text:span><text:span text:style-name="T95"> over the years.</text:span></text:p>
      <text:p text:style-name="P24"/>
      <text:p text:style-name="P24"><text:tab/>“<text:span text:style-name="T97">I don’t know you</text:span><text:span text:style-name="T98">r</text:span><text:span text:style-name="T97"> size, but I think these should fit,” she proudly declares.</text:span></text:p>
      <text:p text:style-name="P24"/>
      <text:p text:style-name="P24"><text:tab/>“<text:span text:style-name="T99">No, really, I insist…”</text:span></text:p>
      <text:p text:style-name="P24"/>
      <text:p text:style-name="P24"><text:tab/>“<text:span text:style-name="T99">Yeah, I insist too,” she says as she drags him to the bench. “</text:span><text:span text:style-name="T100">Bob, do you mind if I skip for today to teach him instead?”</text:span></text:p>
      <text:p text:style-name="P24"/>
      <text:p text:style-name="P27"><text:tab/>“<text:span text:style-name="T100">Sure, big girl, knock him out.” </text:span></text:p>
      <text:p text:style-name="P27"/>
      <text:p text:style-name="P28"><text:tab/>With an amused grin, he turns tail to examine the rest of his students. Beatrice then drags Axel once again to a more secluded corner of the gym, away from the prying eyes and ears of her <text:span text:style-name="T101">now curious</text:span> cadets.</text:p>
      <text:p text:style-name="P28"/>
      <text:p text:style-name="P28"><text:tab/>“<text:span text:style-name="T102">Alright,” she says while raising her fists. “What’s the first rule of dodgeball?”</text:span></text:p>
      <text:p text:style-name="P28"/>
      <text:p text:style-name="P28"><text:tab/>“… <text:span text:style-name="T102">The heck this has to do with boxing?” Axel replies with a deadpan look.</text:span></text:p>
      <text:p text:style-name="P28"/>
      <text:p text:style-name="P28"><text:tab/>“<text:span text:style-name="T102">Boxing, dodgeball, it’s all the same. And the first rule is?”</text:span></text:p>
      <text:p text:style-name="P28"/>
      <text:p text:style-name="P28"><text:tab/>“<text:span text:style-name="T102">Uh… Dodge?”</text:span></text:p>
      <text:p text:style-name="P28"/>
      <text:p text:style-name="P28"><text:tab/>“<text:span text:style-name="T102">Wrong!”</text:span></text:p>
      <text:p text:style-name="P28"/>
      <text:p text:style-name="P28"><text:tab/><text:span text:style-name="T103">With that, she starts light jabs straight in his face; not hard enough to hurt him, but enough to make him stumble backwards while trying to hide his face from the flurry of fists flying his way.</text:span></text:p>
      <text:p text:style-name="P28"/>
      <text:p text:style-name="P28"><text:tab/>“<text:span text:style-name="T103">Hey! Stop!” he protests.</text:span></text:p>
      <text:p text:style-name="P28"/>
      <text:p text:style-name="P28"><text:tab/>“<text:span text:style-name="T104">Don’t look away from your opponent,” Beatrice speaks out. “How are you going to catch the ball if you never keep an eye on it?”</text:span></text:p>
      <text:p text:style-name="P28"/>
      <text:p text:style-name="P28"><text:tab/>“<text:span text:style-name="T104">You’re supposed to dodge the ball, </text:span><text:span text:style-name="T105">not</text:span><text:span text:style-name="T104"> – hey!” he stammers as his improvised coach </text:span><text:soft-page-break/><text:span text:style-name="T104">jabs him in the ribs.</text:span></text:p>
      <text:p text:style-name="P28"/>
      <text:p text:style-name="P28"><text:tab/>“<text:span text:style-name="T104">You’re never gonna win </text:span><text:span text:style-name="T106">anything by just dodging. You gotta be willing to put yourself out on the open. Taking risks.</text:span><text:span text:style-name="T104">” </text:span><text:span text:style-name="T106">Her rhythm intensifies. “And getting hurt.”</text:span></text:p>
      <text:p text:style-name="P28"/>
      <text:p text:style-name="P28"><text:tab/><text:span text:style-name="T107">She decides to stop once she sees Axel doesn’t respond to her jabs in kind, </text:span><text:span text:style-name="T108">preferring to rub his aching arms.</text:span></text:p>
      <text:p text:style-name="P28"/>
      <text:p text:style-name="P28"><text:tab/>“<text:span text:style-name="T109">Why did you choose to pick dodgeball, by the way?” Beatrice simply </text:span><text:span text:style-name="T110">asks</text:span><text:span text:style-name="T109">.</text:span></text:p>
      <text:p text:style-name="P28"/>
      <text:p text:style-name="P28"><text:tab/>“<text:span text:style-name="T110">Why do you ask?”</text:span></text:p>
      <text:p text:style-name="P28"/>
      <text:p text:style-name="P29"><text:tab/>“<text:span text:style-name="T111">Y</text:span><text:span text:style-name="T112">ou can’t handle </text:span><text:span text:style-name="T113">a jab in the guts</text:span><text:span text:style-name="T114">, </text:span><text:span text:style-name="T111">yet</text:span><text:span text:style-name="T114"> you play a game where </text:span><text:span text:style-name="T113">everyone tries to give each other a concussion. </text:span><text:span text:style-name="T115">Why?</text:span><text:span text:style-name="T113">”</text:span></text:p>
      <text:p text:style-name="P30"/>
      <text:p text:style-name="P30"><text:tab/>“<text:span text:style-name="T115">Because…” Axel takes a moment get his breath back. “I don’t know? My parents wanted me to pick up a sport before graduating. Some members of the clubs showed up at my uni to give us flyers. I went there to give it a try, ‘cuz why not? Why is this important?”</text:span></text:p>
      <text:p text:style-name="P30"/>
      <text:p text:style-name="P30"><text:tab/>“<text:span text:style-name="T115">What did you find interesting about it?”</text:span></text:p>
      <text:p text:style-name="P30"/>
      <text:p text:style-name="P30"><text:tab/>“<text:span text:style-name="T115">Uh, I don’t know?” he repeated. “I’ve never been in a sports club before. Leo and the others sold me that we would get to pummel kids during out matches. (He smirks.) I thought ‘yeah, could have some fun for once’, and so I tried it out? Didn’t give it much more thought than that.”</text:span></text:p>
      <text:p text:style-name="P30"/>
      <text:p text:style-name="P30"><text:tab/>“<text:span text:style-name="T115">So you do play for fun, right?”</text:span></text:p>
      <text:p text:style-name="P30"/>
      <text:p text:style-name="P30"><text:tab/>“<text:span text:style-name="T115">Well yeah, of course. I would have bailed after the first day if I didn’t. </text:span><text:span text:style-name="T116">It’s just…</text:span><text:span text:style-name="T115">”</text:span></text:p>
      <text:p text:style-name="P30"/>
      <text:p text:style-name="P30"><text:tab/><text:span text:style-name="T116">Axel hesitates to find the words.</text:span></text:p>
      <text:p text:style-name="P30"/>
      <text:p text:style-name="P31"><text:tab/>“<text:span text:style-name="T117">I didn’t ask to participate in the regionals. </text:span><text:span text:style-name="T118">It’s them who want to play in this damn tournament, </text:span><text:span text:style-name="T119">not me</text:span><text:span text:style-name="T118">. They added me to </text:span><text:span text:style-name="T120">fill</text:span><text:span text:style-name="T118"> the roster because we don’t have enough players in our club, </text:span><text:span text:style-name="T121">not because I’m good.</text:span><text:span text:style-name="T118">”</text:span></text:p>
      <text:p text:style-name="P31"/>
      <text:p text:style-name="P31"><text:tab/>“<text:span text:style-name="T117">Or maybe they added you because they enjoy spending time with you? Sometimes it’s that simple. No need to imagine problems where there are none.”</text:span></text:p>
      <text:p text:style-name="P31"/>
      <text:p text:style-name="P32"><text:tab/>“<text:span text:style-name="T117">Yeah, but it’s important to them. And I don’t want to disap</text:span><text:span text:style-name="T122">p</text:span><text:span text:style-name="T117">oint them, but that’s what’s gonna happen. I’m not an athlete, </text:span><text:span text:style-name="T122">I couldn’t catch a ball to save my life. I couldn’t even hit anyone during ou</text:span><text:span text:style-name="T123">r</text:span><text:span text:style-name="T122"> match the other day...”</text:span></text:p>
      <text:p text:style-name="P32"/>
      <text:p text:style-name="P32"/>
      <text:p text:style-name="P30"><text:soft-page-break/></text:p>
      <text:p text:style-name="P32"><text:tab/>“<text:span text:style-name="T118">Jesus Christ,” Beatrice sighs and throws her hands in the air</text:span><text:span text:style-name="T116">. “</text:span><text:span text:style-name="T118">You’re </text:span><text:span text:style-name="T117">still </text:span><text:span text:style-name="T124">making that face because of</text:span><text:span text:style-name="T117"> that one match</text:span><text:span text:style-name="T118">? </text:span><text:span text:style-name="T117">What’s your reaction gonna </text:span><text:span text:style-name="T124">be </text:span><text:span text:style-name="T117">once you’re in the actual tournament? You think you can win with that mentality?</text:span><text:span text:style-name="T118">”</text:span></text:p>
      <text:p text:style-name="P33"/>
      <text:p text:style-name="P33"><text:tab/>“<text:span text:style-name="T116">I know I sound like a sore loser, but it’s just…” </text:span></text:p>
      <text:p text:style-name="P34"/>
      <text:p text:style-name="P34"><text:tab/><text:span text:style-name="T122">He hesitates once again. His fingers hurt with how hard he clenches his fists in frustration.</text:span></text:p>
      <text:p text:style-name="P34"/>
      <text:p text:style-name="P34"><text:tab/>“It just feels <text:span text:style-name="T122">terrible</text:span> when you give your best, and your best just isn’t good enough.”</text:p>
      <text:p text:style-name="P33"/>
      <text:p text:style-name="P33"><text:tab/>“<text:span text:style-name="T116">Why are you so convinced what you are isn’t good enough?”</text:span></text:p>
      <text:p text:style-name="P33"/>
      <text:p text:style-name="P32"><text:tab/>“<text:span text:style-name="T122">Because we lost anyway, </text:span><text:span text:style-name="T124">and that’s all that matters</text:span><text:span text:style-name="T117">.</text:span><text:span text:style-name="T118"> </text:span><text:span text:style-name="T117">A</text:span><text:span text:style-name="T118">nd I feel like shit for letting the others down, </text:span><text:span text:style-name="T117">because I’m not good enough</text:span><text:span text:style-name="T118">. </text:span><text:span text:style-name="T117">There, I said it, happy?</text:span><text:span text:style-name="T118">” he answers, raising his voice a bit higher than he intended. </text:span></text:p>
      <text:p text:style-name="P30"/>
      <text:p text:style-name="P30"><text:tab/><text:span text:style-name="T117">Axel goes back </text:span><text:span text:style-name="T120">and sits on</text:span><text:span text:style-name="T117"> the bench. Beatrice stays quiet for a few seconds, </text:span><text:span text:style-name="T120">because making a beeline to her uncle. They exchange words Axel cannot hear, before she disappears in a neighbouring room. Axel sighs and starts removing his gear, thinking she was done for the day. </text:span><text:span text:style-name="T125">But then, as he was about to grab his bag, here she comes with a light jog, two leather balls in her hands. The young man barely has the time to bring his hands closer to catch the cannonball his friend threw at his face. And even after an hour of boxing, she was still full of energy – Axel almost tripped due to the strength of the throw.</text:span></text:p>
      <text:p text:style-name="P30"/>
      <text:p text:style-name="P30"><text:tab/>“<text:span text:style-name="T125">So you </text:span><text:span text:style-name="T126">can</text:span><text:span text:style-name="T125"> catch a ball,” she points out.</text:span></text:p>
      <text:p text:style-name="P30"/>
      <text:p text:style-name="P30"><text:tab/>“… ‘<text:span text:style-name="T125">Twas just a reflex. I didn’t think about it.”</text:span></text:p>
      <text:p text:style-name="P30"/>
      <text:p text:style-name="P30"><text:tab/>“<text:span text:style-name="T125">Then stop thinking. It doesn’t suit you.” she smirks. “Follow me, we’re gonna train in the back alley”.</text:span></text:p>
      <text:p text:style-name="P30"/>
      <text:p text:style-name="P35"><text:tab/><text:span text:style-name="T127">Axel begrudgingly follows her outside, he who had hoped he would not have to deal with the heat again for a while. </text:span></text:p>
      <text:p text:style-name="P36"/>
      <text:p text:style-name="P36"><text:tab/>The backyard of the gym wasn’t large; basically a continuation of the parking lot from the front facade. The place wasn’t very clean, but at least it was empty. Beatrice <text:span text:style-name="T128">places</text:span> <text:span text:style-name="T128">him back against the wall and gives him one of her balls before planting herself in front of him ten meters away.</text:span></text:p>
      <text:p text:style-name="P36"/>
      <text:p text:style-name="P36"><text:tab/>“<text:span text:style-name="T129">During our match, I noticed you tend to go back up when your opponent has the ball,” she says, raising her voice a bit so he can hear her clearly. “That’s fine if you intend to catch, but </text:span><text:span text:style-name="T130">that won’t be enough if they just gang up on you. So now with the wall behind you, you won’t </text:span><text:soft-page-break/><text:span text:style-name="T130">be able to run away anymore.”</text:span></text:p>
      <text:p text:style-name="P36"/>
      <text:p text:style-name="P36"><text:tab/><text:span text:style-name="T130">She punches the ball with one hand in a thunderous ‘thud’ sound.</text:span></text:p>
      <text:p text:style-name="P36"/>
      <text:p text:style-name="P36"><text:tab/>“<text:span text:style-name="T130">So you dodge the ball by the side and you throw them back to me. If you try to block or catch’em </text:span><text:span text:style-name="T131">mid air</text:span><text:span text:style-name="T130"> I’ll stop holding back </text:span><text:span text:style-name="T132">until you dodge them again</text:span><text:span text:style-name="T130">, capische?”</text:span></text:p>
      <text:p text:style-name="P36"/>
      <text:p text:style-name="P36"><text:tab/><text:span text:style-name="T132">Axel wasn’t so sure this was a good method for training; not that he could voice his opinion, as the first ball already shot towards </text:span><text:span text:style-name="T131">his face</text:span><text:span text:style-name="T132"> in a blur. </text:span><text:span text:style-name="T131">He dodged, barely, and the impact against the wall sent a shockwave drilling into his ears.</text:span></text:p>
      <text:p text:style-name="P36"/>
      <text:p text:style-name="P36"><text:tab/>“<text:span text:style-name="T133">Hey! Just… Just be gentle, okay?” he pleads.</text:span></text:p>
      <text:p text:style-name="P36"/>
      <text:p text:style-name="P36"><text:tab/><text:span text:style-name="T133">In front of him, Beatrice adorn</text:span><text:span text:style-name="T134">s</text:span><text:span text:style-name="T133"> a predatory grin.</text:span></text:p>
      <text:p text:style-name="P36"/>
      <text:p text:style-name="P36"/>
      <text:p text:style-name="P37">***</text:p>
      <text:p text:style-name="P37"/>
      <text:p text:style-name="P38"/>
      <text:p text:style-name="P30"/>
      <text:p text:style-name="P31"><text:tab/><text:span text:style-name="T118"> </text:span></text:p>
      <text:p text:style-name="P28"/>
      <text:p text:style-name="P24"/>
      <text:p text:style-name="P24"><text:tab/></text:p>
      <text:p text:style-name="P22"/>
      <text:p text:style-name="P22"><text:tab/></text:p>
      <text:p text:style-name="P22"/>
      <text:p text:style-name="P22"><text:tab/></text:p>
      <text:p text:style-name="P22"/>
      <text:p text:style-name="P22"><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30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30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30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3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16H31M26S</meta:editing-duration>
    <meta:editing-cycles>146</meta:editing-cycles>
    <meta:generator>LibreOffice/26.2.3.2$Windows_X86_64 LibreOffice_project/70e089b17412e4cb7773e41413306b17a2328c34</meta:generator>
    <meta:creation-date>2026-06-06T16:50:12.344730600</meta:creation-date>
    <dc:title>Format de texte</dc:title>
    <dc:date>2026-06-20T12:12:01.160382400</dc:date>
    <meta:document-statistic meta:table-count="0" meta:image-count="0" meta:object-count="0" meta:page-count="11" meta:paragraph-count="150" meta:word-count="3885" meta:character-count="21064" meta:non-whitespace-character-count="17160"/>
    <meta:template xlink:type="simple" xlink:actuate="onRequest" xlink:title="Format de texte" xlink:href="../../../../Format%20prompt%20histoire.ott" meta:date="2026-06-06T16:50:11.982652500"/>
  </office:meta>
</office:document-meta>
</file>