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6c50" officeooo:paragraph-rsid="00186c50"/>
    </style:style>
    <style:style style:name="P2" style:family="paragraph" style:parent-style-name="Standard">
      <style:text-properties officeooo:paragraph-rsid="00106f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text:p>
      <text:p text:style-name="P1">Un jeune homme part à la gym pour se muscler afin d’impressionner les filles de son bahut. Il trouve une gym près de chez lui où il attire l’oeil de la fille de la propriétaire, une amatrice elle aussi de musculation, avec qui il a régulièrement du sexe pendant leurs séances. Ils auront aussi l’occasion de se voir en dehors de la gym, chacun découvrant un aspect plus doux de l’autre.</text:p>
      <text:p text:style-name="P1">Le message de l’histoire est qu’il n’y a pas besoin d’être un macho musclé pour attirer les filles, mais au contraire d’être doux, fiable, et s’intéresser à l’autr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M29S</meta:editing-duration>
    <meta:editing-cycles>2</meta:editing-cycles>
    <meta:generator>LibreOffice/25.2.4.3$Windows_X86_64 LibreOffice_project/33e196637044ead23f5c3226cde09b47731f7e27</meta:generator>
    <meta:creation-date>2025-10-12T13:12:04.074223100</meta:creation-date>
    <dc:title>Format de texte</dc:title>
    <dc:date>2025-10-12T13:14:32.884310600</dc:date>
    <meta:document-statistic meta:table-count="0" meta:image-count="0" meta:object-count="0" meta:page-count="1" meta:paragraph-count="3" meta:word-count="101" meta:character-count="558" meta:non-whitespace-character-count="460"/>
    <meta:template xlink:type="simple" xlink:actuate="onRequest" xlink:title="Format de texte" xlink:href="file:///C:/Users/Clément/AppData/Roaming/LibreOffice/4/user/template/Format%20de%20texte1.ott" meta:date="2025-10-12T13:12:03.692520300"/>
  </office:meta>
</office:document-meta>
</file>