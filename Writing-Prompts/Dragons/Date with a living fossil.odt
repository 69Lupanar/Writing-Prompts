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1410ae6" officeooo:paragraph-rsid="01410ae6"/>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988903" officeooo:paragraph-rsid="00988903"/>
    </style:style>
    <style:style style:name="P4" style:family="paragraph" style:parent-style-name="Standard">
      <style:text-properties style:font-name="Garamond Premr Pro" fo:language="en" fo:country="US" fo:font-style="italic" officeooo:rsid="0098e835" officeooo:paragraph-rsid="00840176" style:font-style-asian="italic" style:font-style-complex="italic"/>
    </style:style>
    <style:style style:name="P5" style:family="paragraph" style:parent-style-name="Standard">
      <style:text-properties fo:language="en" fo:country="US" officeooo:rsid="00106f63" officeooo:paragraph-rsid="00840176"/>
    </style:style>
    <style:style style:name="P6" style:family="paragraph" style:parent-style-name="Standard">
      <style:text-properties style:font-name="Garamond Premr Pro" fo:language="en" fo:country="US" officeooo:rsid="00732722" officeooo:paragraph-rsid="00840176"/>
    </style:style>
    <style:style style:name="P7" style:family="paragraph" style:parent-style-name="Standard">
      <style:text-properties style:font-name="Garamond Premr Pro" fo:language="en" fo:country="US" officeooo:rsid="00732722" officeooo:paragraph-rsid="00999da1"/>
    </style:style>
    <style:style style:name="P8" style:family="paragraph" style:parent-style-name="Standard">
      <style:text-properties style:font-name="Garamond Premr Pro" fo:language="en" fo:country="US" officeooo:rsid="00999da1" officeooo:paragraph-rsid="00999da1"/>
    </style:style>
    <style:style style:name="P9" style:family="paragraph" style:parent-style-name="Standard">
      <style:paragraph-properties fo:text-align="center" style:justify-single-word="false"/>
      <style:text-properties style:font-name="Garamond Premr Pro" fo:language="en" fo:country="US" officeooo:rsid="00999da1" officeooo:paragraph-rsid="00999da1"/>
    </style:style>
    <style:style style:name="P10" style:family="paragraph" style:parent-style-name="Standard">
      <style:text-properties style:font-name="Garamond Premr Pro" fo:language="en" fo:country="US" officeooo:rsid="00999da1" officeooo:paragraph-rsid="009d724f"/>
    </style:style>
    <style:style style:name="P11" style:family="paragraph" style:parent-style-name="Standard">
      <style:text-properties style:font-name="Garamond Premr Pro" fo:language="en" fo:country="US" officeooo:rsid="00999da1" officeooo:paragraph-rsid="009c76a6"/>
    </style:style>
    <style:style style:name="P12" style:family="paragraph" style:parent-style-name="Standard">
      <style:text-properties style:font-name="Garamond Premr Pro" fo:language="en" fo:country="US" officeooo:rsid="009fad12" officeooo:paragraph-rsid="009fad12"/>
    </style:style>
    <style:style style:name="P13" style:family="paragraph" style:parent-style-name="Standard">
      <style:text-properties style:font-name="Garamond Premr Pro" fo:language="en" fo:country="US" officeooo:rsid="009fad12" officeooo:paragraph-rsid="00ad868b"/>
    </style:style>
    <style:style style:name="P14" style:family="paragraph" style:parent-style-name="Standard">
      <style:text-properties style:font-name="Garamond Premr Pro" fo:language="en" fo:country="US" officeooo:rsid="00732722" officeooo:paragraph-rsid="00c574ac"/>
    </style:style>
    <style:style style:name="P15" style:family="paragraph" style:parent-style-name="Standard">
      <style:text-properties style:font-name="Garamond Premr Pro" fo:language="en" fo:country="US" officeooo:rsid="00732722" officeooo:paragraph-rsid="00b95297"/>
    </style:style>
    <style:style style:name="P16" style:family="paragraph" style:parent-style-name="Standard">
      <style:text-properties style:font-name="Garamond Premr Pro" fo:language="en" fo:country="US" officeooo:rsid="00732722" officeooo:paragraph-rsid="00be6fdf"/>
    </style:style>
    <style:style style:name="P17" style:family="paragraph" style:parent-style-name="Standard">
      <style:text-properties style:font-name="Garamond Premr Pro" fo:language="en" fo:country="US" officeooo:rsid="00732722" officeooo:paragraph-rsid="00e6b0a7"/>
    </style:style>
    <style:style style:name="P18" style:family="paragraph" style:parent-style-name="Standard">
      <style:text-properties style:font-name="Garamond Premr Pro" fo:language="en" fo:country="US" officeooo:rsid="00732722" officeooo:paragraph-rsid="012ce136"/>
    </style:style>
    <style:style style:name="P19" style:family="paragraph" style:parent-style-name="Standard">
      <style:text-properties style:font-name="Garamond Premr Pro" fo:language="en" fo:country="US" officeooo:rsid="00732722" officeooo:paragraph-rsid="013af181"/>
    </style:style>
    <style:style style:name="P20" style:family="paragraph" style:parent-style-name="Standard">
      <style:text-properties style:font-name="Garamond Premr Pro" fo:language="en" fo:country="US" officeooo:rsid="00732722" officeooo:paragraph-rsid="013c5dd9"/>
    </style:style>
    <style:style style:name="P21" style:family="paragraph" style:parent-style-name="Standard">
      <style:text-properties style:font-name="Garamond Premr Pro" fo:language="en" fo:country="US" officeooo:rsid="013d7ee7" officeooo:paragraph-rsid="013d7ee7"/>
    </style:style>
    <style:style style:name="P22" style:family="paragraph" style:parent-style-name="Standard">
      <style:text-properties style:font-name="Garamond Premr Pro" fo:language="en" fo:country="US" officeooo:rsid="015d6555" officeooo:paragraph-rsid="015d6555"/>
    </style:style>
    <style:style style:name="P23" style:family="paragraph" style:parent-style-name="Standard">
      <style:text-properties officeooo:paragraph-rsid="015d6555"/>
    </style:style>
    <style:style style:name="P24" style:family="paragraph" style:parent-style-name="Standard">
      <style:text-properties style:font-name="Garamond Premr Pro" fo:font-size="13pt" fo:language="en" fo:country="US" officeooo:rsid="015d6555" officeooo:paragraph-rsid="015d6555"/>
    </style:style>
    <style:style style:name="T1" style:family="text">
      <style:text-properties officeooo:rsid="0142dc10"/>
    </style:style>
    <style:style style:name="T2" style:family="text">
      <style:text-properties officeooo:rsid="01a35060"/>
    </style:style>
    <style:style style:name="T3" style:family="text">
      <style:text-properties officeooo:rsid="01631ba4"/>
    </style:style>
    <style:style style:name="T4" style:family="text">
      <style:text-properties officeooo:rsid="0161a1b4"/>
    </style:style>
    <style:style style:name="T5" style:family="text">
      <style:text-properties officeooo:rsid="0098e835"/>
    </style:style>
    <style:style style:name="T6" style:family="text">
      <style:text-properties officeooo:rsid="0163ec00"/>
    </style:style>
    <style:style style:name="T7" style:family="text">
      <style:text-properties officeooo:rsid="0164f4bb"/>
    </style:style>
    <style:style style:name="T8" style:family="text">
      <style:text-properties officeooo:rsid="01667ea4"/>
    </style:style>
    <style:style style:name="T9" style:family="text">
      <style:text-properties officeooo:rsid="00999da1"/>
    </style:style>
    <style:style style:name="T10" style:family="text">
      <style:text-properties officeooo:rsid="016816ca"/>
    </style:style>
    <style:style style:name="T11" style:family="text">
      <style:text-properties officeooo:rsid="0169c0c1"/>
    </style:style>
    <style:style style:name="T12" style:family="text">
      <style:text-properties officeooo:rsid="016a3617"/>
    </style:style>
    <style:style style:name="T13" style:family="text">
      <style:text-properties officeooo:rsid="016b2c06"/>
    </style:style>
    <style:style style:name="T14" style:family="text">
      <style:text-properties officeooo:rsid="009b02b7"/>
    </style:style>
    <style:style style:name="T15" style:family="text">
      <style:text-properties officeooo:rsid="009c76a6"/>
    </style:style>
    <style:style style:name="T16" style:family="text">
      <style:text-properties officeooo:rsid="016da778"/>
    </style:style>
    <style:style style:name="T17" style:family="text">
      <style:text-properties officeooo:rsid="016fa405"/>
    </style:style>
    <style:style style:name="T18" style:family="text">
      <style:text-properties officeooo:rsid="011f0806"/>
    </style:style>
    <style:style style:name="T19" style:family="text">
      <style:text-properties officeooo:rsid="0120f1bc"/>
    </style:style>
    <style:style style:name="T20" style:family="text">
      <style:text-properties officeooo:rsid="01705676"/>
    </style:style>
    <style:style style:name="T21" style:family="text">
      <style:text-properties officeooo:rsid="009d724f"/>
    </style:style>
    <style:style style:name="T22" style:family="text">
      <style:text-properties officeooo:rsid="01723f48"/>
    </style:style>
    <style:style style:name="T23" style:family="text">
      <style:text-properties officeooo:rsid="009eab75"/>
    </style:style>
    <style:style style:name="T24" style:family="text">
      <style:text-properties officeooo:rsid="00a0b007"/>
    </style:style>
    <style:style style:name="T25" style:family="text">
      <style:text-properties officeooo:rsid="00a0f8a5"/>
    </style:style>
    <style:style style:name="T26" style:family="text">
      <style:text-properties officeooo:rsid="0173496f"/>
    </style:style>
    <style:style style:name="T27" style:family="text">
      <style:text-properties officeooo:rsid="0174e2b1"/>
    </style:style>
    <style:style style:name="T28" style:family="text">
      <style:text-properties officeooo:rsid="00acc24e"/>
    </style:style>
    <style:style style:name="T29" style:family="text">
      <style:text-properties officeooo:rsid="00b05ccc"/>
    </style:style>
    <style:style style:name="T30" style:family="text">
      <style:text-properties officeooo:rsid="00a2b83e"/>
    </style:style>
    <style:style style:name="T31" style:family="text">
      <style:text-properties officeooo:rsid="00af349a"/>
    </style:style>
    <style:style style:name="T32" style:family="text">
      <style:text-properties officeooo:rsid="00b1961e"/>
    </style:style>
    <style:style style:name="T33" style:family="text">
      <style:text-properties officeooo:rsid="00a3ed43"/>
    </style:style>
    <style:style style:name="T34" style:family="text">
      <style:text-properties officeooo:rsid="00a7ebf2"/>
    </style:style>
    <style:style style:name="T35" style:family="text">
      <style:text-properties officeooo:rsid="00a46be2"/>
    </style:style>
    <style:style style:name="T36" style:family="text">
      <style:text-properties officeooo:rsid="01785286"/>
    </style:style>
    <style:style style:name="T37" style:family="text">
      <style:text-properties officeooo:rsid="01766a39"/>
    </style:style>
    <style:style style:name="T38" style:family="text">
      <style:text-properties officeooo:rsid="00a80aa9"/>
    </style:style>
    <style:style style:name="T39" style:family="text">
      <style:text-properties officeooo:rsid="00a9b545"/>
    </style:style>
    <style:style style:name="T40" style:family="text">
      <style:text-properties officeooo:rsid="0179ff6c"/>
    </style:style>
    <style:style style:name="T41" style:family="text">
      <style:text-properties officeooo:rsid="00aba1b9"/>
    </style:style>
    <style:style style:name="T42" style:family="text">
      <style:text-properties officeooo:rsid="00b336fd"/>
    </style:style>
    <style:style style:name="T43" style:family="text">
      <style:text-properties officeooo:rsid="00a52873"/>
    </style:style>
    <style:style style:name="T44" style:family="text">
      <style:text-properties officeooo:rsid="00a612c5"/>
    </style:style>
    <style:style style:name="T45" style:family="text">
      <style:text-properties officeooo:rsid="00b2f236"/>
    </style:style>
    <style:style style:name="T46" style:family="text">
      <style:text-properties officeooo:rsid="017a4dcd"/>
    </style:style>
    <style:style style:name="T47" style:family="text">
      <style:text-properties fo:font-style="italic" officeooo:rsid="00a612c5" style:font-style-asian="italic" style:font-style-complex="italic"/>
    </style:style>
    <style:style style:name="T48" style:family="text">
      <style:text-properties officeooo:rsid="00c40af9"/>
    </style:style>
    <style:style style:name="T49" style:family="text">
      <style:text-properties officeooo:rsid="00be6fdf"/>
    </style:style>
    <style:style style:name="T50" style:family="text">
      <style:text-properties officeooo:rsid="017b2c71"/>
    </style:style>
    <style:style style:name="T51" style:family="text">
      <style:text-properties officeooo:rsid="00c2ae46"/>
    </style:style>
    <style:style style:name="T52" style:family="text">
      <style:text-properties officeooo:rsid="017ce4ae"/>
    </style:style>
    <style:style style:name="T53" style:family="text">
      <style:text-properties officeooo:rsid="00c7a2f2"/>
    </style:style>
    <style:style style:name="T54" style:family="text">
      <style:text-properties officeooo:rsid="00c98d08"/>
    </style:style>
    <style:style style:name="T55" style:family="text">
      <style:text-properties officeooo:rsid="00c574ac"/>
    </style:style>
    <style:style style:name="T56" style:family="text">
      <style:text-properties officeooo:rsid="017aeeca"/>
    </style:style>
    <style:style style:name="T57" style:family="text">
      <style:text-properties officeooo:rsid="017ed5ec"/>
    </style:style>
    <style:style style:name="T58" style:family="text">
      <style:text-properties officeooo:rsid="0180d545"/>
    </style:style>
    <style:style style:name="T59" style:family="text">
      <style:text-properties officeooo:rsid="0180db8e"/>
    </style:style>
    <style:style style:name="T60" style:family="text">
      <style:text-properties officeooo:rsid="00b3ebb8"/>
    </style:style>
    <style:style style:name="T61" style:family="text">
      <style:text-properties officeooo:rsid="00b4d911"/>
    </style:style>
    <style:style style:name="T62" style:family="text">
      <style:text-properties fo:font-style="italic" officeooo:rsid="00b4d911" style:font-style-asian="italic" style:font-style-complex="italic"/>
    </style:style>
    <style:style style:name="T63" style:family="text">
      <style:text-properties officeooo:rsid="00bd44a5"/>
    </style:style>
    <style:style style:name="T64" style:family="text">
      <style:text-properties officeooo:rsid="00b95297"/>
    </style:style>
    <style:style style:name="T65" style:family="text">
      <style:text-properties officeooo:rsid="00bb13a1"/>
    </style:style>
    <style:style style:name="T66" style:family="text">
      <style:text-properties officeooo:rsid="00bc2f75"/>
    </style:style>
    <style:style style:name="T67" style:family="text">
      <style:text-properties officeooo:rsid="00be7fd6"/>
    </style:style>
    <style:style style:name="T68" style:family="text">
      <style:text-properties officeooo:rsid="00c15a62"/>
    </style:style>
    <style:style style:name="T69" style:family="text">
      <style:text-properties officeooo:rsid="00c24a82"/>
    </style:style>
    <style:style style:name="T70" style:family="text">
      <style:text-properties officeooo:rsid="00c69cbc"/>
    </style:style>
    <style:style style:name="T71" style:family="text">
      <style:text-properties officeooo:rsid="00c625c5"/>
    </style:style>
    <style:style style:name="T72" style:family="text">
      <style:text-properties officeooo:rsid="00c635f6"/>
    </style:style>
    <style:style style:name="T73" style:family="text">
      <style:text-properties officeooo:rsid="00cb7648"/>
    </style:style>
    <style:style style:name="T74" style:family="text">
      <style:text-properties officeooo:rsid="00ccdf18"/>
    </style:style>
    <style:style style:name="T75" style:family="text">
      <style:text-properties officeooo:rsid="00d005b7"/>
    </style:style>
    <style:style style:name="T76" style:family="text">
      <style:text-properties officeooo:rsid="00d2ef98"/>
    </style:style>
    <style:style style:name="T77" style:family="text">
      <style:text-properties officeooo:rsid="00d4e02d"/>
    </style:style>
    <style:style style:name="T78" style:family="text">
      <style:text-properties officeooo:rsid="00d61d8f"/>
    </style:style>
    <style:style style:name="T79" style:family="text">
      <style:text-properties officeooo:rsid="00d7326c"/>
    </style:style>
    <style:style style:name="T80" style:family="text">
      <style:text-properties officeooo:rsid="00db1195"/>
    </style:style>
    <style:style style:name="T81" style:family="text">
      <style:text-properties officeooo:rsid="00d8d806"/>
    </style:style>
    <style:style style:name="T82" style:family="text">
      <style:text-properties officeooo:rsid="00da2a39"/>
    </style:style>
    <style:style style:name="T83" style:family="text">
      <style:text-properties officeooo:rsid="00db4b43"/>
    </style:style>
    <style:style style:name="T84" style:family="text">
      <style:text-properties officeooo:rsid="01839268"/>
    </style:style>
    <style:style style:name="T85" style:family="text">
      <style:text-properties officeooo:rsid="00dbce66"/>
    </style:style>
    <style:style style:name="T86" style:family="text">
      <style:text-properties officeooo:rsid="00dc5c27"/>
    </style:style>
    <style:style style:name="T87" style:family="text">
      <style:text-properties officeooo:rsid="00dd2731"/>
    </style:style>
    <style:style style:name="T88" style:family="text">
      <style:text-properties officeooo:rsid="0183ae7e"/>
    </style:style>
    <style:style style:name="T89" style:family="text">
      <style:text-properties fo:font-style="italic" officeooo:rsid="00dd2731" style:font-style-asian="italic" style:font-style-complex="italic"/>
    </style:style>
    <style:style style:name="T90" style:family="text">
      <style:text-properties officeooo:rsid="00decc8e"/>
    </style:style>
    <style:style style:name="T91" style:family="text">
      <style:text-properties officeooo:rsid="00e0bcae"/>
    </style:style>
    <style:style style:name="T92" style:family="text">
      <style:text-properties officeooo:rsid="00e27138"/>
    </style:style>
    <style:style style:name="T93" style:family="text">
      <style:text-properties officeooo:rsid="01865b95"/>
    </style:style>
    <style:style style:name="T94" style:family="text">
      <style:text-properties officeooo:rsid="0185a5bb"/>
    </style:style>
    <style:style style:name="T95" style:family="text">
      <style:text-properties officeooo:rsid="0188c9ca"/>
    </style:style>
    <style:style style:name="T96" style:family="text">
      <style:text-properties officeooo:rsid="018ab695"/>
    </style:style>
    <style:style style:name="T97" style:family="text">
      <style:text-properties officeooo:rsid="018c84f2"/>
    </style:style>
    <style:style style:name="T98" style:family="text">
      <style:text-properties officeooo:rsid="018dc41c"/>
    </style:style>
    <style:style style:name="T99" style:family="text">
      <style:text-properties officeooo:rsid="00e3f8eb"/>
    </style:style>
    <style:style style:name="T100" style:family="text">
      <style:text-properties officeooo:rsid="00e4eb78"/>
    </style:style>
    <style:style style:name="T101" style:family="text">
      <style:text-properties officeooo:rsid="018e0f9e"/>
    </style:style>
    <style:style style:name="T102" style:family="text">
      <style:text-properties officeooo:rsid="00e4ff5a"/>
    </style:style>
    <style:style style:name="T103" style:family="text">
      <style:text-properties officeooo:rsid="018eb880"/>
    </style:style>
    <style:style style:name="T104" style:family="text">
      <style:text-properties officeooo:rsid="00e6b0a7"/>
    </style:style>
    <style:style style:name="T105" style:family="text">
      <style:text-properties officeooo:rsid="0191d417"/>
    </style:style>
    <style:style style:name="T106" style:family="text">
      <style:text-properties officeooo:rsid="00e76234"/>
    </style:style>
    <style:style style:name="T107" style:family="text">
      <style:text-properties officeooo:rsid="00e8ef4e"/>
    </style:style>
    <style:style style:name="T108" style:family="text">
      <style:text-properties officeooo:rsid="00ebd31d"/>
    </style:style>
    <style:style style:name="T109" style:family="text">
      <style:text-properties officeooo:rsid="00f514ef"/>
    </style:style>
    <style:style style:name="T110" style:family="text">
      <style:text-properties officeooo:rsid="00ec2b4f"/>
    </style:style>
    <style:style style:name="T111" style:family="text">
      <style:text-properties officeooo:rsid="00ee150e"/>
    </style:style>
    <style:style style:name="T112" style:family="text">
      <style:text-properties officeooo:rsid="00f2a8b3"/>
    </style:style>
    <style:style style:name="T113" style:family="text">
      <style:text-properties officeooo:rsid="00ee786f"/>
    </style:style>
    <style:style style:name="T114" style:family="text">
      <style:text-properties officeooo:rsid="00f0a58d"/>
    </style:style>
    <style:style style:name="T115" style:family="text">
      <style:text-properties officeooo:rsid="00f01f88"/>
    </style:style>
    <style:style style:name="T116" style:family="text">
      <style:text-properties officeooo:rsid="00f1a36c"/>
    </style:style>
    <style:style style:name="T117" style:family="text">
      <style:text-properties officeooo:rsid="00f0e1de"/>
    </style:style>
    <style:style style:name="T118" style:family="text">
      <style:text-properties officeooo:rsid="00f37f7b"/>
    </style:style>
    <style:style style:name="T119" style:family="text">
      <style:text-properties officeooo:rsid="0193355d"/>
    </style:style>
    <style:style style:name="T120" style:family="text">
      <style:text-properties officeooo:rsid="00f48377"/>
    </style:style>
    <style:style style:name="T121" style:family="text">
      <style:text-properties officeooo:rsid="00f6b304"/>
    </style:style>
    <style:style style:name="T122" style:family="text">
      <style:text-properties officeooo:rsid="00f93a5c"/>
    </style:style>
    <style:style style:name="T123" style:family="text">
      <style:text-properties officeooo:rsid="00fa1c8a"/>
    </style:style>
    <style:style style:name="T124" style:family="text">
      <style:text-properties officeooo:rsid="00ffcbdb"/>
    </style:style>
    <style:style style:name="T125" style:family="text">
      <style:text-properties officeooo:rsid="01161a5a"/>
    </style:style>
    <style:style style:name="T126" style:family="text">
      <style:text-properties officeooo:rsid="010d87e5"/>
    </style:style>
    <style:style style:name="T127" style:family="text">
      <style:text-properties officeooo:rsid="01102075"/>
    </style:style>
    <style:style style:name="T128" style:family="text">
      <style:text-properties officeooo:rsid="0110dc9e"/>
    </style:style>
    <style:style style:name="T129" style:family="text">
      <style:text-properties officeooo:rsid="0112dbb2"/>
    </style:style>
    <style:style style:name="T130" style:family="text">
      <style:text-properties officeooo:rsid="00fa7081"/>
    </style:style>
    <style:style style:name="T131" style:family="text">
      <style:text-properties officeooo:rsid="0100fbce"/>
    </style:style>
    <style:style style:name="T132" style:family="text">
      <style:text-properties officeooo:rsid="00fc1a95"/>
    </style:style>
    <style:style style:name="T133" style:family="text">
      <style:text-properties officeooo:rsid="00fdcdd8"/>
    </style:style>
    <style:style style:name="T134" style:family="text">
      <style:text-properties officeooo:rsid="0102ac72"/>
    </style:style>
    <style:style style:name="T135" style:family="text">
      <style:text-properties officeooo:rsid="0105e741"/>
    </style:style>
    <style:style style:name="T136" style:family="text">
      <style:text-properties officeooo:rsid="0104923c"/>
    </style:style>
    <style:style style:name="T137" style:family="text">
      <style:text-properties officeooo:rsid="01064835"/>
    </style:style>
    <style:style style:name="T138" style:family="text">
      <style:text-properties officeooo:rsid="010a4c5d"/>
    </style:style>
    <style:style style:name="T139" style:family="text">
      <style:text-properties officeooo:rsid="01072d83"/>
    </style:style>
    <style:style style:name="T140" style:family="text">
      <style:text-properties officeooo:rsid="0107ab74"/>
    </style:style>
    <style:style style:name="T141" style:family="text">
      <style:text-properties officeooo:rsid="01089c8a"/>
    </style:style>
    <style:style style:name="T142" style:family="text">
      <style:text-properties officeooo:rsid="0108e664"/>
    </style:style>
    <style:style style:name="T143" style:family="text">
      <style:text-properties officeooo:rsid="011728de"/>
    </style:style>
    <style:style style:name="T144" style:family="text">
      <style:text-properties officeooo:rsid="01185e51"/>
    </style:style>
    <style:style style:name="T145" style:family="text">
      <style:text-properties officeooo:rsid="0118c9b9"/>
    </style:style>
    <style:style style:name="T146" style:family="text">
      <style:text-properties fo:font-style="italic" officeooo:rsid="0118c9b9" style:font-style-asian="italic" style:font-style-complex="italic"/>
    </style:style>
    <style:style style:name="T147" style:family="text">
      <style:text-properties officeooo:rsid="01942698"/>
    </style:style>
    <style:style style:name="T148" style:family="text">
      <style:text-properties officeooo:rsid="019562e6"/>
    </style:style>
    <style:style style:name="T149" style:family="text">
      <style:text-properties officeooo:rsid="011a6750"/>
    </style:style>
    <style:style style:name="T150" style:family="text">
      <style:text-properties officeooo:rsid="011b3fe0"/>
    </style:style>
    <style:style style:name="T151" style:family="text">
      <style:text-properties officeooo:rsid="011c3821"/>
    </style:style>
    <style:style style:name="T152" style:family="text">
      <style:text-properties officeooo:rsid="011d92ce"/>
    </style:style>
    <style:style style:name="T153" style:family="text">
      <style:text-properties officeooo:rsid="01278531"/>
    </style:style>
    <style:style style:name="T154" style:family="text">
      <style:text-properties officeooo:rsid="0195f6c8"/>
    </style:style>
    <style:style style:name="T155" style:family="text">
      <style:text-properties officeooo:rsid="01246ff1"/>
    </style:style>
    <style:style style:name="T156" style:family="text">
      <style:text-properties officeooo:rsid="0126273e"/>
    </style:style>
    <style:style style:name="T157" style:family="text">
      <style:text-properties officeooo:rsid="0121d04c"/>
    </style:style>
    <style:style style:name="T158" style:family="text">
      <style:text-properties officeooo:rsid="011e9a74"/>
    </style:style>
    <style:style style:name="T159" style:family="text">
      <style:text-properties officeooo:rsid="0123149b"/>
    </style:style>
    <style:style style:name="T160" style:family="text">
      <style:text-properties officeooo:rsid="0127e4b3"/>
    </style:style>
    <style:style style:name="T161" style:family="text">
      <style:text-properties officeooo:rsid="019651d9"/>
    </style:style>
    <style:style style:name="T162" style:family="text">
      <style:text-properties officeooo:rsid="012ca318"/>
    </style:style>
    <style:style style:name="T163" style:family="text">
      <style:text-properties officeooo:rsid="0128bed7"/>
    </style:style>
    <style:style style:name="T164" style:family="text">
      <style:text-properties officeooo:rsid="01294701"/>
    </style:style>
    <style:style style:name="T165" style:family="text">
      <style:text-properties officeooo:rsid="012c34f5"/>
    </style:style>
    <style:style style:name="T166" style:family="text">
      <style:text-properties officeooo:rsid="012a63be"/>
    </style:style>
    <style:style style:name="T167" style:family="text">
      <style:text-properties officeooo:rsid="012b02e7"/>
    </style:style>
    <style:style style:name="T168" style:family="text">
      <style:text-properties officeooo:rsid="012db2d9"/>
    </style:style>
    <style:style style:name="T169" style:family="text">
      <style:text-properties officeooo:rsid="0130adfe"/>
    </style:style>
    <style:style style:name="T170" style:family="text">
      <style:text-properties officeooo:rsid="01326d03"/>
    </style:style>
    <style:style style:name="T171" style:family="text">
      <style:text-properties officeooo:rsid="0133148a"/>
    </style:style>
    <style:style style:name="T172" style:family="text">
      <style:text-properties officeooo:rsid="01344423"/>
    </style:style>
    <style:style style:name="T173" style:family="text">
      <style:text-properties officeooo:rsid="01358b0a"/>
    </style:style>
    <style:style style:name="T174" style:family="text">
      <style:text-properties officeooo:rsid="0135d9e6"/>
    </style:style>
    <style:style style:name="T175" style:family="text">
      <style:text-properties officeooo:rsid="0135fece"/>
    </style:style>
    <style:style style:name="T176" style:family="text">
      <style:text-properties officeooo:rsid="0136a104"/>
    </style:style>
    <style:style style:name="T177" style:family="text">
      <style:text-properties officeooo:rsid="01374580"/>
    </style:style>
    <style:style style:name="T178" style:family="text">
      <style:text-properties officeooo:rsid="013af181"/>
    </style:style>
    <style:style style:name="T179" style:family="text">
      <style:text-properties officeooo:rsid="01435832"/>
    </style:style>
    <style:style style:name="T180" style:family="text">
      <style:text-properties officeooo:rsid="01439c99"/>
    </style:style>
    <style:style style:name="T181" style:family="text">
      <style:text-properties officeooo:rsid="0143d8ad"/>
    </style:style>
    <style:style style:name="T182" style:family="text">
      <style:text-properties officeooo:rsid="01452af7"/>
    </style:style>
    <style:style style:name="T183" style:family="text">
      <style:text-properties officeooo:rsid="01461a08"/>
    </style:style>
    <style:style style:name="T184" style:family="text">
      <style:text-properties officeooo:rsid="0146066a"/>
    </style:style>
    <style:style style:name="T185" style:family="text">
      <style:text-properties officeooo:rsid="01458a02"/>
    </style:style>
    <style:style style:name="T186" style:family="text">
      <style:text-properties officeooo:rsid="0197e2a3"/>
    </style:style>
    <style:style style:name="T187" style:family="text">
      <style:text-properties officeooo:rsid="01472cfb"/>
    </style:style>
    <style:style style:name="T188" style:family="text">
      <style:text-properties officeooo:rsid="013c5dd9"/>
    </style:style>
    <style:style style:name="T189" style:family="text">
      <style:text-properties officeooo:rsid="01476a95"/>
    </style:style>
    <style:style style:name="T190" style:family="text">
      <style:text-properties officeooo:rsid="01493ab8"/>
    </style:style>
    <style:style style:name="T191" style:family="text">
      <style:text-properties officeooo:rsid="013d9059"/>
    </style:style>
    <style:style style:name="T192" style:family="text">
      <style:text-properties officeooo:rsid="01981eec"/>
    </style:style>
    <style:style style:name="T193" style:family="text">
      <style:text-properties officeooo:rsid="013f01b7"/>
    </style:style>
    <style:style style:name="T194" style:family="text">
      <style:text-properties officeooo:rsid="0149a3ec"/>
    </style:style>
    <style:style style:name="T195" style:family="text">
      <style:text-properties officeooo:rsid="014b06b7"/>
    </style:style>
    <style:style style:name="T196" style:family="text">
      <style:text-properties officeooo:rsid="0141050d"/>
    </style:style>
    <style:style style:name="T197" style:family="text">
      <style:text-properties officeooo:rsid="01986e5e"/>
    </style:style>
    <style:style style:name="T198" style:family="text">
      <style:text-properties officeooo:rsid="014bc30e"/>
    </style:style>
    <style:style style:name="T199" style:family="text">
      <style:text-properties officeooo:rsid="014d889f"/>
    </style:style>
    <style:style style:name="T200" style:family="text">
      <style:text-properties fo:font-style="italic" officeooo:rsid="014d889f" style:font-style-asian="italic" style:font-style-complex="italic"/>
    </style:style>
    <style:style style:name="T201" style:family="text">
      <style:text-properties officeooo:rsid="014eea11"/>
    </style:style>
    <style:style style:name="T202" style:family="text">
      <style:text-properties officeooo:rsid="01500b47"/>
    </style:style>
    <style:style style:name="T203" style:family="text">
      <style:text-properties officeooo:rsid="01512211"/>
    </style:style>
    <style:style style:name="T204" style:family="text">
      <style:text-properties officeooo:rsid="01520b08"/>
    </style:style>
    <style:style style:name="T205" style:family="text">
      <style:text-properties officeooo:rsid="0153e848"/>
    </style:style>
    <style:style style:name="T206" style:family="text">
      <style:text-properties officeooo:rsid="019b6436"/>
    </style:style>
    <style:style style:name="T207" style:family="text">
      <style:text-properties fo:font-style="italic" officeooo:rsid="0153e848" style:font-style-asian="italic" style:font-style-complex="italic"/>
    </style:style>
    <style:style style:name="T208" style:family="text">
      <style:text-properties officeooo:rsid="0154408d"/>
    </style:style>
    <style:style style:name="T209" style:family="text">
      <style:text-properties officeooo:rsid="019dd92b"/>
    </style:style>
    <style:style style:name="T210" style:family="text">
      <style:text-properties officeooo:rsid="01546933"/>
    </style:style>
    <style:style style:name="T211" style:family="text">
      <style:text-properties officeooo:rsid="0156dc37"/>
    </style:style>
    <style:style style:name="T212" style:family="text">
      <style:text-properties officeooo:rsid="015875f5"/>
    </style:style>
    <style:style style:name="T213" style:family="text">
      <style:text-properties officeooo:rsid="0159b2a8"/>
    </style:style>
    <style:style style:name="T214" style:family="text">
      <style:text-properties officeooo:rsid="015a858a"/>
    </style:style>
    <style:style style:name="T215" style:family="text">
      <style:text-properties officeooo:rsid="019ed149"/>
    </style:style>
    <style:style style:name="T216" style:family="text">
      <style:text-properties officeooo:rsid="015bc1ea"/>
    </style:style>
    <style:style style:name="T217" style:family="text">
      <style:text-properties officeooo:rsid="015be452"/>
    </style:style>
    <style:style style:name="T218" style:family="text">
      <style:text-properties officeooo:rsid="01a03f62"/>
    </style:style>
    <style:style style:name="T219" style:family="text">
      <style:text-properties style:font-name="Garamond Premr Pro" fo:language="en" fo:country="US" officeooo:rsid="015d6555"/>
    </style:style>
    <style:style style:name="T220" style:family="text">
      <style:text-properties style:font-name="Garamond Premr Pro" fo:font-size="13pt" fo:language="en" fo:country="US" officeooo:rsid="015d6555"/>
    </style:style>
    <style:style style:name="T221" style:family="text">
      <style:text-properties officeooo:rsid="015eb46d"/>
    </style:style>
    <style:style style:name="T222" style:family="text">
      <style:text-properties officeooo:rsid="01a175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e with a <text:span text:style-name="T1">living</text:span> fossil</text:p>
      <text:p text:style-name="P2"/>
      <text:p text:style-name="P3">Human on dino action</text:p>
      <text:p text:style-name="P2"/>
      <text:p text:style-name="P4">“Kai, a young scholar in <text:span text:style-name="T2">the field of</text:span> dinosaur genetics, just completed a once impossible project with the help of Sullie, a young deinony<text:span text:style-name="T3">c</text:span>hus and his partner researcher, announcing a bright future for both of their careers. As he makes his way home from work, Sullie invites him to a congratulatory dinner – wit<text:span text:style-name="T4">h</text:span> perhaps some intentions beyond simply celebrating their breakthrough.”</text:p>
      <text:p text:style-name="P5"/>
      <text:p text:style-name="P6"><text:tab/><text:span text:style-name="T5">Eyes fixated on the green lights pulsating from his monitor, Kai only noticed he was holding his breath during the whole process, until his colleague researcher strolled behind him, her tail nervously swishing around as she took anxious steps around the experiment table. The scent of cherries hung in the air in her wake; did she wear that perfume the entire day?</text:span></text:p>
      <text:p text:style-name="P6"/>
      <text:p text:style-name="P6"><text:tab/><text:span text:style-name="T5">He quickly chased the intrusive thought </text:span><text:span text:style-name="T6">out</text:span><text:span text:style-name="T5"> as the constant beeping </text:span><text:span text:style-name="T7">of the computer</text:span><text:span text:style-name="T5"> </text:span><text:span text:style-name="T8">comes</text:span><text:span text:style-name="T5"> to a stop. On the table, the object of their experiment, a </text:span><text:span text:style-name="T9">brass</text:span><text:span text:style-name="T5">-coloured egg, was shaking left and right. Cracks start</text:span><text:span text:style-name="T10">s</text:span><text:span text:style-name="T5"> forming on its surface. On the other side of the table, Sullie, his colleague, couldn’t hide her excitement any longer, as her massive, multicolored feathery tail misse</text:span><text:span text:style-name="T11">s</text:span><text:span text:style-name="T5"> the head of an assistant by an inch.</text:span></text:p>
      <text:p text:style-name="P6"/>
      <text:p text:style-name="P6"><text:tab/>“<text:span text:style-name="T5">We did it…” she gasped for breath, visibly as shaken as Ka</text:span><text:span text:style-name="T12">i</text:span><text:span text:style-name="T5"> was. “I can’t- I can’t believe it.”</text:span></text:p>
      <text:p text:style-name="P6"/>
      <text:p text:style-name="P6"><text:tab/>“<text:span text:style-name="T5">I can,” he answered simply. “That’s what we’ve </text:span><text:span text:style-name="T13">been working</text:span><text:span text:style-name="T5"> on for so long. Don’t doubt yourself, Sullie.”</text:span></text:p>
      <text:p text:style-name="P6"/>
      <text:p text:style-name="P6"><text:tab/><text:span text:style-name="T9">A golden eye now fits in the space an eggshell fragment occupied a few seconds earlier. The cracks multiply on the surface of the egg, as the shaking doubles in intensity, until finally, the newborn breaks free of his prison of lime and albumen, letting out a shriek as he does so.</text:span></text:p>
      <text:p text:style-name="P6"/>
      <text:p text:style-name="P7"><text:tab/>“<text:span text:style-name="T9">Breathing stabilized,” Kai notes on his paperclip. “Reaction to lighting stimuli normal. Skin slightly thicker than normal specimens, confirming-- Sullie.”</text:span></text:p>
      <text:p text:style-name="P7"/>
      <text:p text:style-name="P7"><text:tab/>“<text:span text:style-name="T9">Ah, sorry!” the female deinonychus jerks up, her face inches from the newborn. “It’s just…”</text:span></text:p>
      <text:p text:style-name="P7"/>
      <text:p text:style-name="P7"><text:tab/>“<text:span text:style-name="T9">Don’t worry” Kai couldn’t help but smile. Her enthusiasm was contagious. “Why don’t you tell the professor about the good news? We’ll tuck the little guy in while you’re gone.</text:span></text:p>
      <text:p text:style-name="P7"/>
      <text:p text:style-name="P7"><text:tab/><text:span text:style-name="T9">She nods and turns tail, her claws clattering on the concrete floor as she takes off to report their success. Kai watches her go for a moment, the sight of her crimson feathers shining </text:span><text:soft-page-break/><text:span text:style-name="T9">under the bright spotlights of the experimentation room, before he catches himself and chases the intrusive vision again. </text:span></text:p>
      <text:p text:style-name="P8"/>
      <text:p text:style-name="P8"><text:tab/>Next to him, their assistants are already at work, wrapping the newborn hybrid in towels and taking him to the nursery. <text:span text:style-name="T14">His role done, Kai follows the trail of his dinosaur colleague, paperclip in hand, sighing at the prospect of soon having to deal with the paperwork relating to their adventure.</text:span></text:p>
      <text:p text:style-name="P8"/>
      <text:p text:style-name="P9">***</text:p>
      <text:p text:style-name="P8"/>
      <text:p text:style-name="P8"><text:tab/><text:span text:style-name="T14">Kai only saw Sullie again late that day, as he was about to check out of work, </text:span><text:span text:style-name="T15">alerted by her signature clattering of her claws; and of course, the protest of the personnel she was almost pushing out of her way.</text:span><text:span text:style-name="T14"> </text:span><text:span text:style-name="T15">The poor girl almost trip</text:span><text:span text:style-name="T16">s</text:span><text:span text:style-name="T15"> herself as she </text:span><text:span text:style-name="T17">sees</text:span><text:span text:style-name="T15"> him, and were her </text:span><text:span text:style-name="T18">vestigial </text:span><text:span text:style-name="T15">wings </text:span><text:span text:style-name="T19">bigger</text:span><text:span text:style-name="T15">, he could have sworn she would have taken off at the speed she was going.</text:span></text:p>
      <text:p text:style-name="P8"/>
      <text:p text:style-name="P8"><text:tab/>“<text:span text:style-name="T15">Hey Kai!” she salutes him, finally coming to a stop. “So, good news! Dad was really happy about our work. He’s been waiting for such a birth for so long. Even longer than us.”</text:span></text:p>
      <text:p text:style-name="P8"/>
      <text:p text:style-name="P10"><text:tab/><text:span text:style-name="T15">Finally, that adventure was over. The hybridization project, a </text:span><text:span text:style-name="T20">two years </text:span><text:span text:style-name="T15">long endeavor launched by </text:span><text:span text:style-name="T21">the old man</text:span><text:span text:style-name="T15">, had the goal of helping the less fertile dinosaur species of their society to curb back up their natality rate, by genetic splicing of their DNA with the one of other, normally incompatible species. The process, thought to be impossible, was nothing more than a miracle. <text:s/></text:span></text:p>
      <text:p text:style-name="P10"/>
      <text:p text:style-name="P10"><text:span text:style-name="T21"><text:tab/>T</text:span><text:span text:style-name="T15">he Institute of Genetics </text:span><text:span text:style-name="T21">had the two of them to thank for, of course, but none of that could have been done without the groundworks laid by Sullie’s </text:span><text:span text:style-name="T22">adoptive </text:span><text:span text:style-name="T21">father, the professor himself.</text:span></text:p>
      <text:p text:style-name="P11"/>
      <text:p text:style-name="P11"><text:tab/>“<text:span text:style-name="T15">Yeah. But that’s just the first step. I’m glad this one is over.”</text:span></text:p>
      <text:p text:style-name="P11"/>
      <text:p text:style-name="P11"><text:tab/>“<text:span text:style-name="T23">You say that as if this was a chore.”</text:span></text:p>
      <text:p text:style-name="P11"/>
      <text:p text:style-name="P11"><text:tab/>“<text:span text:style-name="T23">Just you wait until you grow digits, bird brain,” Kai teases her. “Then I’ll make you write all the reports and schedule the tests for the next project.”</text:span></text:p>
      <text:p text:style-name="P11"/>
      <text:p text:style-name="P11"><text:tab/>“<text:span text:style-name="T23">Nah, you seem to enjoy this too much, who am I to take that away from you,” she teases back, her bright eyes never taking off of him for a second.</text:span></text:p>
      <text:p text:style-name="P11"/>
      <text:p text:style-name="P12"><text:tab/>Reflexively, he extends his hand to caress her lightly behind the ears. She seems to tense up for a moment, but doesn’t object to the gesture. Kai never knew if she actually enjoyed it – she never liked when others treated her like a child, ever since she was born in the Institute.</text:p>
      <text:p text:style-name="P12"/>
      <text:p text:style-name="P12"><text:tab/>“<text:span text:style-name="T24">Well, I half expect him to throw us a party for all the work we’ve done,” Kai finally says, taking off his hand. “</text:span><text:span text:style-name="T25">Or maybe Bruno will, you know how he’s always up for ‘workplace cohesion’.”</text:span></text:p>
      <text:p text:style-name="P12"><text:soft-page-break/></text:p>
      <text:p text:style-name="P12"><text:tab/><text:span text:style-name="T25">As they arrive at the entrance hall, Sullie’s enthusiasm seems gone, replaced by an enigmatic expression. Kai couldn’t read her face as well as a human’s, but he knew her well enough that her fast-swinging tail, wings crossed and lowered eyes meant she has something on her mind. Not wanting to rush her, he slips his badge onto the entrance scanner to clock out, waving her briefly goodbye before turning his back to her. This seemed to suddenly stir her from her thoughts.</text:span></text:p>
      <text:p text:style-name="P12"/>
      <text:p text:style-name="P12"><text:tab/>“<text:span text:style-name="T25">You’re already leaving?” she asks.</text:span></text:p>
      <text:p text:style-name="P12"/>
      <text:p text:style-name="P12"><text:tab/>“<text:span text:style-name="T25">Well, yeah. I’ve already sent all the docs to Bruno, you won’t have to worry about it. I’ll pry the details of the reunion </text:span><text:span text:style-name="T26">from h</text:span><text:span text:style-name="T27">im </text:span><text:span text:style-name="T25">tomorrow.”</text:span></text:p>
      <text:p text:style-name="P12"/>
      <text:p text:style-name="P12"><text:tab/>“<text:span text:style-name="T25">Well, </text:span><text:span text:style-name="T28">a-</text:span><text:span text:style-name="T25">actually…”</text:span></text:p>
      <text:p text:style-name="P12"/>
      <text:p text:style-name="P12"><text:tab/><text:span text:style-name="T25">Sullie fidgets in place, struggling to maintain eye contact with him. Kai had never seen her so nervous before.</text:span></text:p>
      <text:p text:style-name="P12"/>
      <text:p text:style-name="P12"><text:tab/>“<text:span text:style-name="T25">Is something wrong?”</text:span></text:p>
      <text:p text:style-name="P12"/>
      <text:p text:style-name="P13"><text:tab/>“<text:span text:style-name="T25">Wel</text:span><text:span text:style-name="T29">l, u</text:span><text:span text:style-name="T25">h… </text:span><text:span text:style-name="T30">Speaking of party… We’ve been working on this thing for a while now, haven’t we? And, uhm, we haven’t got much time to, y’know, take our minds off of work the entire time, yeah?</text:span><text:span text:style-name="T25">”</text:span></text:p>
      <text:p text:style-name="P12"><text:tab/></text:p>
      <text:p text:style-name="P12"><text:tab/><text:span text:style-name="T25">She rubs the tip of her ‘fingers’ together, something she usually saves for when’s she about to admit to a prank she did to one of her caretakers. </text:span><text:span text:style-name="T30">She suddenly looks much younger than she is for a brief moment.</text:span></text:p>
      <text:p text:style-name="P12"/>
      <text:p text:style-name="P12"><text:tab/>“<text:span text:style-name="T30">So, uh, </text:span><text:span text:style-name="T31">it got me thinking</text:span><text:span text:style-name="T30">: Why not gather something to eat to celebrate our progress? I thought you might like the time off to relax and think about something else for a day.”</text:span></text:p>
      <text:p text:style-name="P12"/>
      <text:p text:style-name="P12"><text:tab/><text:span text:style-name="T30">The abrupt proposal throws him off for a few seconds, before he regains his composure. He only mentioned the party as a joke, but she seemed to have actually picked up on the stress taking a toll on his mood. In fact, this project was the hardest thing he’s ever worked on since joining the Institute. A little break from normalcy would do some good, even if it’s as simple as a dinner between colleagues.</text:span></text:p>
      <text:p text:style-name="P12"/>
      <text:p text:style-name="P12"><text:tab/>“<text:span text:style-name="T30">I’d love that,” Kai smiles. “At which hour do I pick you up?”</text:span></text:p>
      <text:p text:style-name="P12"/>
      <text:p text:style-name="P12"><text:tab/>“<text:span text:style-name="T30">Uhm, actually,” she fidgets even more, seemingly surprised to see he accepted, “I’ve ordered everything back at my place, we won’t have to endure the traffic. A-And I’ve prepared everything already, so we can go </text:span><text:span text:style-name="T32">home</text:span><text:span text:style-name="T30"> and </text:span><text:span text:style-name="T32">eat</text:span><text:span text:style-name="T30"> right now.”</text:span></text:p>
      <text:p text:style-name="P12"/>
      <text:p text:style-name="P12"><text:tab/>“<text:span text:style-name="T33">Sure! Lead the way.”</text:span></text:p>
      <text:p text:style-name="P12"/>
      <text:p text:style-name="P12"><text:soft-page-break/><text:tab/><text:span text:style-name="T33">She staggers for a brief moment, before turning tails and motioning him to follow her </text:span><text:span text:style-name="T34">back in the building</text:span><text:span text:style-name="T33">. As a pet project of the professor himself, she was granted the privilege to have her own apartment in the residential sector of the complex, right next to her father’s. Kai only went there once before; he helped her to get acquainted with the neighbourhood and move some of the furnitures the professor had ordered for her comfort, most notably her book collection, which she couldn’t live without.</text:span></text:p>
      <text:p text:style-name="P7"/>
      <text:p text:style-name="P7"><text:tab/><text:span text:style-name="T35">The walk only lasted for a couple minutes, with Sullie constantly peeking out behind her back to see if Kai was still following her, as if she still couldn’t believe he would accept her offer. The perfume of cherries filled the air behind her, carried by a slight breeze ruffling her feathers and pulling up her lab coat – which, really, fit</text:span><text:span text:style-name="T36">s</text:span><text:span text:style-name="T35"> her more like a cape than a coat, but gave her this mascot-like presence he </text:span><text:span text:style-name="T37">finds</text:span><text:span text:style-name="T35"> so endearing to her.</text:span></text:p>
      <text:p text:style-name="P7"/>
      <text:p text:style-name="P7"><text:tab/>“<text:span text:style-name="T34">Well, here we are,” </text:span><text:span text:style-name="T38">she declares, swiping her </text:span><text:span text:style-name="T39">black</text:span><text:span text:style-name="T38"> talons on the thick </text:span><text:span text:style-name="T40">doormat</text:span><text:span text:style-name="T38"> </text:span><text:span text:style-name="T41">on her doorstep</text:span><text:span text:style-name="T38"> before entering.</text:span></text:p>
      <text:p text:style-name="P7"/>
      <text:p text:style-name="P7"><text:tab/><text:span text:style-name="T35">Her actual place, funnily enough, felt smaller in his memories. But perhaps it was simply due to her rearranging the furnitures more optimally to make more room. The inside felt very </text:span><text:span text:style-name="T42">c</text:span><text:span text:style-name="T35">osy, bathed in warm lights </text:span><text:span text:style-name="T43">and littered with large cushions that acted as </text:span><text:span text:style-name="T44">couches and beds. Her book collection spanned entire shelves along the walls, ranging from biology studies to more casual topics like science-fiction series </text:span><text:span text:style-name="T45">or</text:span><text:span text:style-name="T44"> cooking manuals – D</text:span><text:span text:style-name="T46">oes</text:span><text:span text:style-name="T44"> she even cook? </text:span><text:span text:style-name="T47">Could</text:span><text:span text:style-name="T44"> she?</text:span></text:p>
      <text:p text:style-name="P7"/>
      <text:p text:style-name="P7"><text:tab/>“<text:span text:style-name="T48">Welcome back, Sullie,” a synthetic voice rang from across the room.</text:span></text:p>
      <text:p text:style-name="P14"/>
      <text:p text:style-name="P14"><text:tab/><text:span text:style-name="T49">Kai could hear some shuffling in the next room; probably the kitchen, as a little </text:span><text:span text:style-name="T50">robot</text:span><text:span text:style-name="T49"> butler makes his entrance, </text:span><text:span text:style-name="T51">no taller than his waist,</text:span><text:span text:style-name="T49"> in sleek black and white metal, the kind the young man occasionally </text:span><text:span text:style-name="T52">sees</text:span><text:span text:style-name="T49"> on commercials, marketed as assistants in day to day activities. </text:span><text:span text:style-name="T53">Now this explained </text:span><text:span text:style-name="T52">better</text:span><text:span text:style-name="T53"> how the place was </text:span><text:span text:style-name="T54">kept </text:span><text:span text:style-name="T53">tidied up, at least.</text:span></text:p>
      <text:p text:style-name="P14"/>
      <text:p text:style-name="P14"><text:tab/>“<text:span text:style-name="T55">Welcome, sir,” the </text:span><text:span text:style-name="T56">android</text:span><text:span text:style-name="T55"> greets Kai as he places his tray on a nearby low table, before helping his owner remove and han</text:span><text:span text:style-name="T57">g</text:span><text:span text:style-name="T55"> her coat.</text:span></text:p>
      <text:p text:style-name="P14"/>
      <text:p text:style-name="P14"><text:tab/>“<text:span text:style-name="T55">Astro, this is Kai,” Sullie says. “He’s the guest for the night I told you about. Is everything prepared?”</text:span></text:p>
      <text:p text:style-name="P14"/>
      <text:p text:style-name="P14"><text:tab/>“<text:span text:style-name="T55">Yes, Sullie” the synthetic voice answer</text:span><text:span text:style-name="T58">s</text:span><text:span text:style-name="T55"> – somewhat imitating a young boy. “You may sit by the table, I </text:span><text:span text:style-name="T59">will</text:span><text:span text:style-name="T55"> bring everything at your signal.”</text:span></text:p>
      <text:p text:style-name="P7"/>
      <text:p text:style-name="P15"><text:tab/>“<text:span text:style-name="T55">Great. </text:span><text:span text:style-name="T60">Suit yourself </text:span><text:span text:style-name="T55">Kai</text:span><text:span text:style-name="T60">, </text:span><text:span text:style-name="T55">he doesn’t bite</text:span><text:span text:style-name="T60">”, she nudges Kai closer to one of the giant bean bags around the dinner table at the center of the living room. </text:span></text:p>
      <text:p text:style-name="P15"/>
      <text:p text:style-name="P15"><text:span text:style-name="T61"><text:tab/>The young scientist falls on it with a </text:span><text:span text:style-name="T62">floof!</text:span><text:span text:style-name="T61">, </text:span><text:span text:style-name="T63">feeling</text:span><text:span text:style-name="T61"> the strain on his muscles slowly vanish from his legs </text:span><text:span text:style-name="T64">with</text:span><text:span text:style-name="T61"> a sigh of relief, </text:span><text:span text:style-name="T65">just </text:span><text:span text:style-name="T61">realizing how tired he was </text:span><text:span text:style-name="T65">from the </text:span><text:span text:style-name="T66">never-ending</text:span><text:span text:style-name="T65"> battery of tests he performed all day back at the lab. </text:span><text:span text:style-name="T49">His gaze lowers on the table, where a few </text:span><text:soft-page-break/><text:span text:style-name="T49">plates of drinks and appetizers were already present; and surprisingly, alco</text:span><text:span text:style-name="T67">h</text:span><text:span text:style-name="T49">ol.</text:span></text:p>
      <text:p text:style-name="P15"/>
      <text:p text:style-name="P15"><text:tab/>“<text:span text:style-name="T67">Didn’t know you had any appetite for alcohol,” he noted, eyeing a bottle of authentic Champagne – a probably very expensive one.</text:span></text:p>
      <text:p text:style-name="P15"/>
      <text:p text:style-name="P15"><text:tab/>“<text:span text:style-name="T67">Well, a girl’s gotta survive the day somehow,” she scoffed.</text:span></text:p>
      <text:p text:style-name="P15"/>
      <text:p text:style-name="P15"><text:tab/>“<text:span text:style-name="T67">Dunno, I always thought that was just a human thing.”</text:span></text:p>
      <text:p text:style-name="P15"/>
      <text:p text:style-name="P15"><text:tab/>“<text:span text:style-name="T67">Well, I don’t. Fancy a glass instead of psychoanalyzing my personal life?” </text:span><text:span text:style-name="T68">the red-feathered dinosaur</text:span><text:span text:style-name="T67"> retorts, not really serious.</text:span></text:p>
      <text:p text:style-name="P15"/>
      <text:p text:style-name="P15"><text:tab/><text:span text:style-name="T69">She pushes another bean bag closer to his before sitting down by his side – as well as dinosaurs could, anyway – as Kai extends a hand to reach the bottle of wine, pouring its content into a glass for both of them. He noticed her glass had a straw in it, to help her adapt to human-sized drinks. </text:span><text:span text:style-name="T70">Although the</text:span><text:span text:style-name="T71"> rest of the appetizers – mostly meat-</text:span><text:span text:style-name="T72">based sweeteners</text:span><text:span text:style-name="T71"> – </text:span><text:span text:style-name="T70">seemed</text:span><text:span text:style-name="T71"> more </text:span><text:span text:style-name="T70">interesting in the raptor’s eye</text:span><text:span text:style-name="T71">, especially the ones Astro just brought back from the kitchen on a tray.</text:span></text:p>
      <text:p text:style-name="P15"><text:tab/></text:p>
      <text:p text:style-name="P15"><text:tab/>“<text:span text:style-name="T48">And here I thought you were a great cook</text:span><text:span text:style-name="T49">”, </text:span><text:span text:style-name="T48">Kai teases her.</text:span></text:p>
      <text:p text:style-name="P16"/>
      <text:p text:style-name="P16"><text:tab/>“<text:span text:style-name="T53">Of course, me and my nimble fingers,” she replies back, nudging him with her muzzle. “</text:span><text:span text:style-name="T73">Jokes aside, I hope you’ll like it. I don’t know much about what humans eat, so hopefully I don’t poison you or something.”</text:span></text:p>
      <text:p text:style-name="P16"/>
      <text:p text:style-name="P16"><text:tab/>“<text:span text:style-name="T73">Don’t stress about it. I’m glad you took the time to do this for me. </text:span><text:span text:style-name="T74">Although, I didn’t expect this much for a simple dinner between colleagues.</text:span><text:span text:style-name="T73">”</text:span></text:p>
      <text:p text:style-name="P16"/>
      <text:p text:style-name="P16"><text:tab/>“<text:span text:style-name="T74">Oh, well…” Sullie mutters, fidgeting in her bean bag, looking at the table rather than him. “</text:span><text:span text:style-name="T75">It’s just… I saw how much effort you were putting at work, always helping others accomplishing their task first, so I thought, maybe I could just return the favor? </text:span><text:span text:style-name="T76">I mean, i</text:span><text:span text:style-name="T75">t’s not like I could have advanced much on the hybridization project without you…”</text:span></text:p>
      <text:p text:style-name="P16"/>
      <text:p text:style-name="P16"><text:tab/>“<text:span text:style-name="T76">Don’t sell yourself short, Sullie.” Kai briefly pats her behind the ‘ears’, before continuing, “You’re doing much more for the Institute that what you give yourself credit for. </text:span><text:span text:style-name="T77">And I’ve glad I have someone as bright as you to shoulder me on duty. I couldn’t have asked for a better partner.</text:span><text:span text:style-name="T76">”</text:span></text:p>
      <text:p text:style-name="P16"/>
      <text:p text:style-name="P16"><text:tab/><text:span text:style-name="T77">The raptor briefly hides her muzzle in her wings, clearly unused to receiving compliments. Her gaze seems to have softened a little bit at his sweet-talking.</text:span></text:p>
      <text:p text:style-name="P16"/>
      <text:p text:style-name="P16"><text:tab/>“<text:span text:style-name="T77">You’re kind,” she simply says after a pause. “Well… (Her head perks up, fixated on the table of goods in front of them.) Let’s not wait any further, or the food’s gonna get cold.”</text:span></text:p>
      <text:p text:style-name="P16"/>
      <text:p text:style-name="P16"><text:soft-page-break/><text:tab/>“<text:span text:style-name="T78">Right.”</text:span></text:p>
      <text:p text:style-name="P16"/>
      <text:p text:style-name="P16"><text:tab/><text:span text:style-name="T79">The two colleagues </text:span><text:span text:style-name="T80">keep</text:span><text:span text:style-name="T79"> exchanging pleasantries for a while, as the food quickly </text:span><text:span text:style-name="T80">leaves</text:span><text:span text:style-name="T79"> the plates and the wine slowly dwindle</text:span><text:span text:style-name="T80">s</text:span><text:span text:style-name="T79"> down – more on Sullie’s part than Kai’s. She, the young man was pleasantly surprised by, was actually a great conversationalist. Having so many books at her disposal left her a large </text:span><text:span text:style-name="T81">range</text:span><text:span text:style-name="T79"> of topics to discuss, it seems. </text:span><text:span text:style-name="T82">As the sun start</text:span><text:span text:style-name="T83">s</text:span><text:span text:style-name="T82"> to set, the young lady </text:span><text:span text:style-name="T83">doesn’t</text:span><text:span text:style-name="T82"> seem to run out of things to talk about. </text:span><text:span text:style-name="T83">The pair seem</text:span><text:span text:style-name="T84">s</text:span><text:span text:style-name="T83"> to get closer by the minute – not </text:span><text:span text:style-name="T85">just</text:span><text:span text:style-name="T83"> metaphorically, as Sulli</text:span><text:span text:style-name="T85">e</text:span><text:span text:style-name="T83"> was literal</text:span><text:span text:style-name="T85">l</text:span><text:span text:style-name="T83">y pressed against Kai by the time Astro came back to pick up the empty trays. </text:span><text:span text:style-name="T86">She now is laughing enthusiastically at his terrible jokes, although he has no doubt the wine played a large part in that.</text:span></text:p>
      <text:p text:style-name="P16"/>
      <text:p text:style-name="P16"><text:tab/><text:span text:style-name="T87">After an hour or so however, the effects of alcohol start to show their first signs, as Sullie’s head was lightly bobbing up and down. Kai </text:span><text:span text:style-name="T88">could hold</text:span><text:span text:style-name="T87"> his bottle better than his companion, but even he wouldn’t resist the fatigue for long.</text:span></text:p>
      <text:p text:style-name="P16"/>
      <text:p text:style-name="P16"><text:tab/>“<text:span text:style-name="T87">Thank you,” he eventually says after the conversation dried out. “For this night. You were right, I didn’t realize how much I needed that break. We should do those more often.”</text:span></text:p>
      <text:p text:style-name="P16"/>
      <text:p text:style-name="P16"><text:tab/>“<text:span text:style-name="T87">No, thank </text:span><text:span text:style-name="T89">you</text:span><text:span text:style-name="T87">, Kai. I’m glad you were there to share this </text:span><text:span text:style-name="T90">soiree </text:span><text:span text:style-name="T87">with me. </text:span><text:span text:style-name="T91">I don’t get many occasions to do this with people</text:span><text:span text:style-name="T87">. </text:span><text:span text:style-name="T91">It can get lonely up here at times. </text:span><text:span text:style-name="T87">I mean, I have Astro, but that doesn’t really count.”</text:span></text:p>
      <text:p text:style-name="P16"/>
      <text:p text:style-name="P16"><text:tab/>“<text:span text:style-name="T92">Alright, let’s get you to sleep before this night turns into a therapy session,” he jokingly says. “You’ll need some time to evacuate all that alcohol you chugged down.”</text:span></text:p>
      <text:p text:style-name="P16"/>
      <text:p text:style-name="P16"><text:tab/>“<text:span text:style-name="T87">A-And when I thought I bought this bottle for you,” Sullie sheepishly said between two hiccups. “I had to be the one finishing it.”</text:span></text:p>
      <text:p text:style-name="P16"/>
      <text:p text:style-name="P16"><text:tab/>“<text:span text:style-name="T87">Sullie, you’</text:span><text:span text:style-name="T92">re drunk. Come on, where’s your room?”</text:span></text:p>
      <text:p text:style-name="P16"/>
      <text:p text:style-name="P16"><text:tab/>“<text:span text:style-name="T92">Mmh, I’m not a child anymore,” she pouts, but doesn’t resist his hands pulling her out of the couch.</text:span></text:p>
      <text:p text:style-name="P16"/>
      <text:p text:style-name="P16"><text:tab/><text:span text:style-name="T92">Her bedroom herself was no different from the living room, aside from its size. A pale blue light reflect</text:span><text:span text:style-name="T93">s</text:span><text:span text:style-name="T92"> on the walls adorned with painting and photos, mostly of her</text:span><text:span text:style-name="T94">self</text:span><text:span text:style-name="T92"> and her adoptive father. A large mass of cushions </text:span><text:span text:style-name="T95">w</text:span><text:span text:style-name="T96">as</text:span><text:span text:style-name="T92"> piled up in the center of the room, likely what constitutes her ‘bed’ – ma</text:span><text:span text:style-name="T97">kes</text:span><text:span text:style-name="T92"> sense someone her stature would have a hard time getting comfortable in </text:span><text:span text:style-name="T98">a real</text:span><text:span text:style-name="T92"> one.</text:span></text:p>
      <text:p text:style-name="P16"/>
      <text:p text:style-name="P16"><text:tab/><text:span text:style-name="T99">It took all of her strength not to slump down on the pile of cushions, remembering last minute she had a guest in her house. </text:span><text:span text:style-name="T100">Kai, thankfully, doesn’t seem to mind, as he help</text:span><text:span text:style-name="T101">s</text:span><text:span text:style-name="T100"> her lay down on the ground while gently caressing the feathers on her back. </text:span></text:p>
      <text:p text:style-name="P16"/>
      <text:p text:style-name="P16"><text:tab/>“<text:span text:style-name="T102">Really, I mean it,” she finally says. “I’m glad you could make the time for me. I don’t </text:span><text:soft-page-break/><text:span text:style-name="T102">often receive visitors.”</text:span></text:p>
      <text:p text:style-name="P16"/>
      <text:p text:style-name="P16"><text:tab/>“<text:span text:style-name="T102">Hey, no problem. We’ve haven’t had an opportunity like that since you got that apartment. We should do that again sometime soon.”</text:span></text:p>
      <text:p text:style-name="P16"/>
      <text:p text:style-name="P16"><text:tab/><text:span text:style-name="T102">As he stands up to leave the room, Sullie raises her voice to stop him: “W-Wait!”</text:span></text:p>
      <text:p text:style-name="P16"/>
      <text:p text:style-name="P16"><text:tab/><text:span text:style-name="T102">Then sheepishly, </text:span><text:span text:style-name="T103">realizing </text:span><text:span text:style-name="T102">her voice </text:span><text:span text:style-name="T103">sounded</text:span><text:span text:style-name="T102"> louder than she desired. “Wait… Could you… Could you stay for a while?”</text:span></text:p>
      <text:p text:style-name="P17"/>
      <text:p text:style-name="P17"><text:tab/><text:span text:style-name="T104">Kai hesitates for a brief moment, but ultimately joins her on her ‘bed’, sitting between two cushions to help place her head on his lap. She is a bit surprised by the gentle gesture, but doesn’t refuse </text:span><text:span text:style-name="T105">it</text:span><text:span text:style-name="T104">.</text:span></text:p>
      <text:p text:style-name="P17"/>
      <text:p text:style-name="P17"><text:tab/>“<text:span text:style-name="T104">Alright, what’s wrong, big girl?” He simply asks.</text:span></text:p>
      <text:p text:style-name="P17"/>
      <text:p text:style-name="P17"><text:tab/>“<text:span text:style-name="T104">What?”</text:span></text:p>
      <text:p text:style-name="P17"/>
      <text:p text:style-name="P17"><text:tab/>“<text:span text:style-name="T104">You don’t usually call me like that unless it’s very important. And I don’t think it’s just about ‘returning the favor’ like that. What’s on your mind?”</text:span></text:p>
      <text:p text:style-name="P17"/>
      <text:p text:style-name="P17"><text:tab/><text:span text:style-name="T104">She looks away and briefly shivers, sending a ripple through her plumage. </text:span><text:span text:style-name="T106">She seems uncomfortable with the question, but her friend doesn’t press her.</text:span></text:p>
      <text:p text:style-name="P17"/>
      <text:p text:style-name="P17"><text:tab/>“<text:span text:style-name="T107">I… I’m leaving.” she whispers.</text:span></text:p>
      <text:p text:style-name="P17"/>
      <text:p text:style-name="P17"><text:tab/>“<text:span text:style-name="T107">What?”</text:span></text:p>
      <text:p text:style-name="P17"/>
      <text:p text:style-name="P17"><text:tab/>“<text:span text:style-name="T107">When I came to tell my dad the news this afternoon,” Sullie removes her head from his lap, now staring at the ground in front of her. “He announced me I’ll go with him </text:span><text:span text:style-name="T108">to</text:span><text:span text:style-name="T107"> Atlanta to meet with one of his associates there. Apparently he’s also interested in our research, and my dad wants my help to present our results. Also, probably to parade me around, like </text:span><text:span text:style-name="T108">one of his prized experiments</text:span><text:span text:style-name="T107">.”</text:span></text:p>
      <text:p text:style-name="P17"/>
      <text:p text:style-name="P17"><text:tab/>“<text:span text:style-name="T107">Wait, hold on,” Kai interrupts her. “Atlanta… Georgia? That’s literally at the other side of the country. </text:span><text:span text:style-name="T109">When?</text:span><text:span text:style-name="T107"> How long are you leaving?”</text:span></text:p>
      <text:p text:style-name="P17"/>
      <text:p text:style-name="P17"><text:tab/>“<text:span text:style-name="T109">Monday, next week. </text:span><text:span text:style-name="T107">I don’t know </text:span><text:span text:style-name="T109">how long</text:span><text:span text:style-name="T107">. At least a few months.”</text:span></text:p>
      <text:p text:style-name="P17"/>
      <text:p text:style-name="P17"><text:tab/>“<text:span text:style-name="T107">Oh. Phew,” he lets out, feeling the knot in his stomach recede. “Well, you’ll be away for a while, but you’ll be back eventually.”</text:span></text:p>
      <text:p text:style-name="P17"/>
      <text:p text:style-name="P17"><text:tab/>“<text:span text:style-name="T107">Yes, but… </text:span><text:span text:style-name="T110">I’ll be gone for so long. I have no family or friends in Atlanta. No one to count on if there’s a problem. And I don’t like how </text:span><text:span text:style-name="T111">regular</text:span><text:span text:style-name="T110"> people… Look at me.</text:span><text:span text:style-name="T107">”</text:span></text:p>
      <text:p text:style-name="P17"><text:soft-page-break/></text:p>
      <text:p text:style-name="P17"><text:tab/><text:span text:style-name="T91">He understood what she meant. Being a researcher wasn’t exactly an easy task. </text:span><text:span text:style-name="T92">People like Kai were often dispatched at other corners of the globe, studying new archaeological sites away from the people they knew. B</text:span><text:span text:style-name="T112">e</text:span><text:span text:style-name="T92">ing surrounded by new, unknown faces, but incapable of connecting with them, could make this job a very isolating </text:span><text:span text:style-name="T113">one</text:span><text:span text:style-name="T92">.</text:span><text:span text:style-name="T91"> Especially for someone like her. </text:span><text:span text:style-name="T113">Dinosaur</text:span><text:span text:style-name="T114">s</text:span><text:span text:style-name="T113"> weren’t exactly an uncommon sight,</text:span><text:span text:style-name="T91"> </text:span><text:span text:style-name="T113">but b</text:span><text:span text:style-name="T92">eing the only talking dinosaur </text:span><text:span text:style-name="T113">alive – yet –</text:span><text:span text:style-name="T92"> </text:span><text:span text:style-name="T113">Sulli</text:span><text:span text:style-name="T115">e</text:span><text:span text:style-name="T113"> inevitably </text:span><text:span text:style-name="T116">draws</text:span><text:span text:style-name="T113"> a lot of attention. </text:span><text:span text:style-name="T117">Plus, she never really left the Institute’s grounds, only occasionally visiting the rest of the city with her father during festivities.</text:span></text:p>
      <text:p text:style-name="P17"/>
      <text:p text:style-name="P17"><text:tab/>“<text:span text:style-name="T118">It might seem scary at first…” Kai tries to comfort her. “But your father must have a lot of confidence in you if he believes you’re up to the task. Think of it as an opportunity to become a true researcher.”</text:span></text:p>
      <text:p text:style-name="P17"/>
      <text:p text:style-name="P17"><text:tab/>“<text:span text:style-name="T118">But that’s… That’s not what I want. I’m already a researcher. I don’t need credit or fame.”</text:span></text:p>
      <text:p text:style-name="P17"/>
      <text:p text:style-name="P17"><text:tab/>“<text:span text:style-name="T118">Then what do you want, Sullie?”</text:span></text:p>
      <text:p text:style-name="P17"/>
      <text:p text:style-name="P17"><text:tab/><text:span text:style-name="T118">For a moment, she looks up at Kai, locking her gaze into his for the first time today.</text:span></text:p>
      <text:p text:style-name="P17"/>
      <text:p text:style-name="P17"><text:tab/>“<text:span text:style-name="T118">I just don’t want to be alone.”</text:span></text:p>
      <text:p text:style-name="P17"/>
      <text:p text:style-name="P17"><text:tab/>“<text:span text:style-name="T118">Sullie, you won’t be alone,” Kai slowly passes a hand through her feathers calm her down. “You</text:span><text:span text:style-name="T119">r father will be with you, and you</text:span><text:span text:style-name="T118"> </text:span><text:span text:style-name="T120">know</text:span><text:span text:style-name="T118">, if you really feel lonely, I’m just a phone call away. No big deal.”</text:span></text:p>
      <text:p text:style-name="P17"/>
      <text:p text:style-name="P17"><text:tab/>“<text:span text:style-name="T118">It’s not the same.”</text:span></text:p>
      <text:p text:style-name="P17"/>
      <text:p text:style-name="P17"><text:tab/>“<text:span text:style-name="T121">Would it be that bad to go without news of me for a while?”</text:span></text:p>
      <text:p text:style-name="P17"/>
      <text:p text:style-name="P17"><text:tab/><text:span text:style-name="T121">Sullie finally musters the strength to raise her head to Kai’s level. Her expression, as always, was undecipherable, but in her eyes gleamed a new spark under the pale blue light.</text:span></text:p>
      <text:p text:style-name="P17"/>
      <text:p text:style-name="P17"><text:tab/>“<text:span text:style-name="T122">Yes.” She simply says.</text:span></text:p>
      <text:p text:style-name="P17"/>
      <text:p text:style-name="P17"><text:tab/><text:span text:style-name="T122">She bumps her muzzle into Kai’s face. He </text:span><text:span text:style-name="T123">thi</text:span><text:span text:style-name="T124">n</text:span><text:span text:style-name="T123">ks</text:span><text:span text:style-name="T122"> at first of a simple cuddle of affection, but then the reality hit</text:span><text:span text:style-name="T123">s</text:span><text:span text:style-name="T122"> him: she </text:span><text:span text:style-name="T125">has </text:span><text:span text:style-name="T122">just kissed him. He could feel her half-open maw pressed against his lips, and her long tongue coiling around his in his mouth. The gesture was awkward, unnatural for a reptile her size. </text:span><text:span text:style-name="T126">All his senses were awakening, </text:span><text:span text:style-name="T127">his nos</text:span><text:span text:style-name="T128">e flooded by</text:span><text:span text:style-name="T126"> the scent of her perfume impregnating </text:span><text:span text:style-name="T128">her </text:span><text:span text:style-name="T129">f</text:span><text:span text:style-name="T128">eathers</text:span><text:span text:style-name="T126">.</text:span><text:span text:style-name="T122"> </text:span><text:span text:style-name="T130">Emotions of all kind</text:span><text:span text:style-name="T131">s</text:span><text:span text:style-name="T130"> swirl </text:span><text:span text:style-name="T132">in rapid succession</text:span><text:span text:style-name="T130"> in his head, </text:span><text:span text:style-name="T133">his brain</text:span><text:span text:style-name="T130"> barely processing what just happened, before it ends as abruptly as it started.</text:span></text:p>
      <text:p text:style-name="P17"/>
      <text:p text:style-name="P17"><text:tab/>“<text:span text:style-name="T134">Say something,” she urges him with a feverish voice.</text:span></text:p>
      <text:p text:style-name="P17"/>
      <text:p text:style-name="P17"><text:soft-page-break/><text:tab/><text:span text:style-name="T134">Realizing he was staring into space for a few seconds, he tries in vain to find a way to string a cohesive suite of words together.</text:span></text:p>
      <text:p text:style-name="P17"/>
      <text:p text:style-name="P17"><text:tab/>“<text:span text:style-name="T135">Wow.</text:span><text:span text:style-name="T134">” </text:span><text:span text:style-name="T135">Was all he could muster.</text:span></text:p>
      <text:p text:style-name="P17"/>
      <text:p text:style-name="P17"><text:tab/>“<text:span text:style-name="T136">You have such a way with words, Kai,” Sullie chuckles. “I’m charmed.”</text:span></text:p>
      <text:p text:style-name="P17"/>
      <text:p text:style-name="P17"><text:tab/>“<text:span text:style-name="T137">W-wait, Sullie, I… This is… Why?”</text:span></text:p>
      <text:p text:style-name="P17"/>
      <text:p text:style-name="P17"><text:tab/>“<text:span text:style-name="T137">D</text:span><text:span text:style-name="T138">o</text:span><text:span text:style-name="T137"> I need to drop more hints?” Sullie says, lowering her gaze in embarrassment. “I like you, silly.”</text:span></text:p>
      <text:p text:style-name="P17"/>
      <text:p text:style-name="P17"><text:tab/>“<text:span text:style-name="T139">But… Why me? I-I’m not special, I just some guy…”</text:span></text:p>
      <text:p text:style-name="P17"/>
      <text:p text:style-name="P17"><text:tab/>“<text:span text:style-name="T139">Do you really think I need someone ‘special’, Kai? I already got plenty of <text:s/>‘special’ as it is” the dinosaur girl grunts, gesturing at herself.</text:span></text:p>
      <text:p text:style-name="P17"/>
      <text:p text:style-name="P17"><text:tab/>“<text:span text:style-name="T140">Why me, then?”</text:span></text:p>
      <text:p text:style-name="P17"/>
      <text:p text:style-name="P17"><text:tab/><text:span text:style-name="T141">Sullie frowns, struggling to find the right words to express her feelings, still refusing to look at him. After what feels like an eternity, she finally speaks:</text:span></text:p>
      <text:p text:style-name="P17"/>
      <text:p text:style-name="P17"><text:tab/>“<text:span text:style-name="T141">You know how I always wanted to be a researcher? </text:span><text:span text:style-name="T142">It’s what everyone around me was doing, </text:span><text:span text:style-name="T143">ever</text:span><text:span text:style-name="T142"> since my egg hatched on that table. </text:span><text:span text:style-name="T144">You know that thing you do, when you’re a hatchling and you try to copy your elders in order to fit in? It’s a survival instinct, you all gather together to survive, you find your place among the group, you try to fit in.”</text:span></text:p>
      <text:p text:style-name="P17"/>
      <text:p text:style-name="P17"><text:tab/>“<text:span text:style-name="T144">Sullie, I…”</text:span></text:p>
      <text:p text:style-name="P17"/>
      <text:p text:style-name="P17"><text:tab/>“<text:span text:style-name="T144">Let me finish, please,” she stops him, getting her breath back, her thoughts clearly weighting down a lot on her. “So that’s what I tried. I tried to fit in. I learnt your language, I watched your TV shows and documentaries, I tried to understand you all better. A-And I think I didn’t do too bad, but… </text:span><text:span text:style-name="T145">My dad gave me the ability to talk, to understand, to walk among you all as if I was one of yours. But I never felt this </text:span><text:span text:style-name="T146">thing</text:span><text:span text:style-name="T145">, before. That connection with someone. I tried talking with everyone at the complex, trying to be serviceable and make friends; but I never felt anything… I don’t know, meaningful? Everyone’s nice with me, but it feels like I’m all alone with my thoughts at times. I guess that’s the curse of being a talking dinosaur in a world </text:span><text:span text:style-name="T147">that no longer bel</text:span><text:span text:style-name="T148">o</text:span><text:span text:style-name="T147">ngs to my kind</text:span><text:span text:style-name="T145">.</text:span><text:span text:style-name="T144">”</text:span></text:p>
      <text:p text:style-name="P17"/>
      <text:p text:style-name="P17"><text:tab/><text:span text:style-name="T145">Sullie raises her head slightly, but still struggles to make eye contact with Kai. For someone under the influence of the combo of alcohol plus stress, she sure feels chatty tonight.</text:span></text:p>
      <text:p text:style-name="P17"/>
      <text:p text:style-name="P17"><text:tab/>“<text:span text:style-name="T149">I don’t know exactly what you did, honestly. But I felt like when I wanted to say something, you listened. When I had a proposal for an experiment or an optimization of our tests, </text:span><text:soft-page-break/><text:span text:style-name="T149">you took them seriously in consideration. When I needed help with paperwork or to lift something, you always took the time to provide a solution or to solve it yourself. Each time our dad teams us up for a project, all I can think is: ‘I can trust this guy. Everything will be fine.’”</text:span></text:p>
      <text:p text:style-name="P17"/>
      <text:p text:style-name="P17"><text:tab/>“<text:span text:style-name="T149">Sullie, it’s very kind of you to say that, but that’s nothing special. I’m doing nothing but my duty as your partner.”</text:span></text:p>
      <text:p text:style-name="P17"/>
      <text:p text:style-name="P17"><text:tab/>“<text:span text:style-name="T149">Maybe, but it’s still true. It may not look special to you, but no one else went as far as you did to make me feel… Special? It’s weird to say this, but yeah, special. You never reminded me of the fact I’m just a big red lizard in a world of tiny people. You always treated me as an equal, not like a curiosity or a pet, like my dad sometimes does. For me, it’s pretty special in a good way, like I’m actually worthy of your attention beyond what I’m born as. </text:span><text:span text:style-name="T150">And…</text:span><text:span text:style-name="T149">”</text:span></text:p>
      <text:p text:style-name="P17"/>
      <text:p text:style-name="P17"><text:tab/><text:span text:style-name="T150">She finally musters the courage to look him right in the eyes, her big, golden irises glittering in the half-penumbra of the dark room.</text:span></text:p>
      <text:p text:style-name="P17"/>
      <text:p text:style-name="P17"><text:tab/>“<text:span text:style-name="T150">Even if you don’t think so, you’re still very special to me. You’re funny, you’re helpful, and you always comfort me when I doubt myself or inevitably fuck up something at work. I know it’s silly, but… I hoped you would feel the same way about me. Even though I’m far from the human standard of beauty.”</text:span></text:p>
      <text:p text:style-name="P17"/>
      <text:p text:style-name="P17"><text:tab/><text:span text:style-name="T151">She lowers her head again at her last declaration. </text:span><text:span text:style-name="T152">Kai </text:span><text:span text:style-name="T153">frown</text:span><text:span text:style-name="T154">s</text:span><text:span text:style-name="T153"> at</text:span><text:span text:style-name="T152"> her pessimism getting the best of her once again. </text:span><text:span text:style-name="T155">He places</text:span><text:span text:style-name="T152"> a hand under her maw, </text:span><text:span text:style-name="T156">and</text:span><text:span text:style-name="T152"> gently raises her head </text:span><text:span text:style-name="T157">to force</text:span><text:span text:style-name="T152"> eye contact again, hers filled with fatali</text:span><text:span text:style-name="T158">sm.</text:span></text:p>
      <text:p text:style-name="P17"/>
      <text:p text:style-name="P17"><text:tab/>“<text:span text:style-name="T159">Sullie… </text:span><text:span text:style-name="T160">I’ve already told you before… You still think of yourself as a pet project, not as someone talented who deserves her place here. You say people still see you as a curiosity, but everyone I worked with at the Institute loves having you around. It’s your energy and you</text:span><text:span text:style-name="T161">r</text:span><text:span text:style-name="T160"> enthusiasm that keeps us going every day. And as for me…”</text:span></text:p>
      <text:p text:style-name="P17"/>
      <text:p text:style-name="P17"><text:tab/><text:span text:style-name="T160">This time, it’s his turn to feel embarrassed, having to pour his heart out after hearing her do the same. Is this what she felt this entire time? No wonder she looked so stressed out.</text:span></text:p>
      <text:p text:style-name="P17"/>
      <text:p text:style-name="P17"><text:tab/>“… <text:span text:style-name="T160">Well, I don’t mind helping you, or going after you to fix your mistakes. You always make up for it afterwards. You’re smart, you make me laugh when my head’s in the gutter, and you’ve never stopped trying to be a better human than, what, most of us, honestly? If I only had to have one partner during my career, th</text:span><text:span text:style-name="T162">e</text:span><text:span text:style-name="T160">n at least, I’m glad it was you.”</text:span></text:p>
      <text:p text:style-name="P17"/>
      <text:p text:style-name="P17"><text:tab/><text:span text:style-name="T163">Her tail shifts uncontrollably, despite her owners best efforts to try – and fail – to keep her composure. </text:span><text:span text:style-name="T164">His hand rummages </text:span><text:span text:style-name="T165">through</text:span><text:span text:style-name="T164"> the crown of feathers on her head, trying his best to calm her down – and himself; petting her has such a relaxing effect.</text:span></text:p>
      <text:p text:style-name="P17"/>
      <text:p text:style-name="P18"><text:tab/>“<text:span text:style-name="T166">So, uh… If you’re looking for that someone to connect to… </text:span><text:span text:style-name="T167">I’d love to try </text:span><text:span text:style-name="T168">and</text:span> live up to th<text:span text:style-name="T167">at guy.”</text:span></text:p>
      <text:p text:style-name="P18"><text:soft-page-break/></text:p>
      <text:p text:style-name="P18"><text:tab/><text:span text:style-name="T169">This time, she stops pretending to have any control on her feelings left. </text:span><text:span text:style-name="T170">Th next thing Kai sees is a red blur before Sulli</text:span><text:span text:style-name="T171">e</text:span><text:span text:style-name="T170"> almost tackles him to the ground, rubbing her nuzzle into his neck and whispering quietly:</text:span></text:p>
      <text:p text:style-name="P18"/>
      <text:p text:style-name="P18"><text:tab/>“<text:span text:style-name="T170">Thank you. Thank you. Thank you…”</text:span></text:p>
      <text:p text:style-name="P18"/>
      <text:p text:style-name="P18"><text:tab/><text:span text:style-name="T172">Kai can’t help it but let escape a laugh, gently pushing her away to stop her feathers from tickling him. </text:span><text:span text:style-name="T173">He feels a gust of hot air coming out of her nostrils, and before he knew it, she was down on him, kissing him once again. This time, he puts in a bit more effort, letting their tongues intertwine while his hands wander on her body, feeling up her protruding pectorals first, before tying his hands at the back of her neck, pulling her closer to him.</text:span></text:p>
      <text:p text:style-name="P18"/>
      <text:p text:style-name="P18"><text:tab/><text:span text:style-name="T174">After what feels like an eternity, Sullie breaks free from the kiss, breathing heavily as if she ran a marathon. Seeing the worried look on Kai’s face, the red dinosaur reassures him:</text:span></text:p>
      <text:p text:style-name="P18"/>
      <text:p text:style-name="P18"><text:tab/>“<text:span text:style-name="T174">Sorry… I need to… Take a second… My heart is gonna explode if we continue.”</text:span></text:p>
      <text:p text:style-name="P18"/>
      <text:p text:style-name="P18"><text:tab/><text:span text:style-name="T175">They both take a second to gather their spirits, with Kai resting his hands on his newfound lover’s torso, feeling up her </text:span><text:span text:style-name="T176">strong </text:span><text:span text:style-name="T175">muscles pulsating under his palms.</text:span></text:p>
      <text:p text:style-name="P18"/>
      <text:p text:style-name="P18"><text:tab/>“<text:span text:style-name="T175">Your heart’s beating like crazy. Are you okay? You must have been really worked up over all of… this. Us, I mean.”</text:span></text:p>
      <text:p text:style-name="P18"/>
      <text:p text:style-name="P18"><text:tab/>“<text:span text:style-name="T175">I’m fine,” she answers softly. “I’m… I honestly don’t know what I would have done, if, you know, you would have refused. </text:span><text:span text:style-name="T177">I don’t know how I could look at you in the eyes after that, how everything would have changed between us after that revelation.</text:span><text:span text:style-name="T175">”</text:span></text:p>
      <text:p text:style-name="P18"/>
      <text:p text:style-name="P19"><text:tab/>“<text:span text:style-name="T178">We’d still be friends working together like nothing happened,</text:span><text:span text:style-name="T177">” he says, petting her once more to calm her down. “Don’t stress out about ‘what ifs’. Nothing would have changed.”</text:span></text:p>
      <text:p text:style-name="P19"/>
      <text:p text:style-name="P19"><text:tab/><text:span text:style-name="T178">For a brief moment, Sullie seems like she wanted to object, but decided to trust him on the matter; not that it mattered anymore. But now that she has collected her thoughts however, she looks once again as shy as she was prior to their dinner.</text:span></text:p>
      <text:p text:style-name="P19"/>
      <text:p text:style-name="P19"><text:tab/>“<text:span text:style-name="T178">So… Now what?” she asks. “I-I haven’t planned that far, I just expected you to refuse and go home, but…”</text:span></text:p>
      <text:p text:style-name="P19"/>
      <text:p text:style-name="P19"><text:tab/><text:span text:style-name="T179">Kai cannot help himself but laugh. Despite all of this, she is still acting like a </text:span><text:span text:style-name="T180">nervous</text:span><text:span text:style-name="T179"> little girl reading her first romance story.</text:span></text:p>
      <text:p text:style-name="P19"/>
      <text:p text:style-name="P19"><text:tab/>“<text:span text:style-name="T178">I do have an idea in mind,” </text:span><text:span text:style-name="T181">he says.</text:span></text:p>
      <text:p text:style-name="P19"/>
      <text:p text:style-name="P19"><text:tab/>“<text:span text:style-name="T178">What </text:span><text:span text:style-name="T182">is it</text:span><text:span text:style-name="T178">?”</text:span></text:p>
      <text:p text:style-name="P19"><text:soft-page-break/></text:p>
      <text:p text:style-name="P19"><text:tab/>“<text:span text:style-name="T178">There’s not much to do left past that point. What do you think couples do after the first step to seal their pact?”</text:span></text:p>
      <text:p text:style-name="P19"/>
      <text:p text:style-name="P19"><text:tab/><text:span text:style-name="T178">Sullie’s eyes open as wide as possible, as her tail swishes left and right again on its own violition, betraying the </text:span><text:span text:style-name="T183">sudden</text:span><text:span text:style-name="T178"> perverted </text:span><text:span text:style-name="T183">thoughts</text:span><text:span text:style-name="T184"> </text:span><text:span text:style-name="T178">her mind </text:span><text:span text:style-name="T185">was </text:span><text:span text:style-name="T183">racing</text:span><text:span text:style-name="T185"> to</text:span><text:span text:style-name="T178">.</text:span></text:p>
      <text:p text:style-name="P19"/>
      <text:p text:style-name="P19"><text:tab/>“<text:span text:style-name="T178">Kai! How </text:span><text:span text:style-name="T186">could y</text:span><text:span text:style-name="T178">- Ho</text:span><text:span text:style-name="T186">w</text:span><text:span text:style-name="T178"> would that even work?”</text:span></text:p>
      <text:p text:style-name="P19"/>
      <text:p text:style-name="P19"><text:tab/>“<text:span text:style-name="T178">Come on bird brain, you’ve been </text:span><text:span text:style-name="T187">studying</text:span><text:span text:style-name="T178"> dinosaur reproduction for a few years by now. I think you know well how that works.”</text:span></text:p>
      <text:p text:style-name="P19"/>
      <text:p text:style-name="P19"><text:tab/><text:span text:style-name="T178">If Sullie couldn’t blush, her tail definitely showed her embarrassment, </text:span><text:span text:style-name="T188">swinging so fast it almost threatened to throw her off of him at that speed. But making her </text:span><text:span text:style-name="T189">flushed and bothered</text:span><text:span text:style-name="T188"> was one of Kai’s guilty pleasures in life, and he </text:span><text:span text:style-name="T190">wasn’t willing to give that up</text:span><text:span text:style-name="T188"> now.</text:span></text:p>
      <text:p text:style-name="P19"/>
      <text:p text:style-name="P20"><text:tab/>“<text:span text:style-name="T178">Would… Would that be… Suitable?” </text:span><text:span text:style-name="T188">she asks, lowering her gaze. “Are you okay with… Being with me… In that way?”</text:span></text:p>
      <text:p text:style-name="P20"/>
      <text:p text:style-name="P21"><text:tab/>Kai doesn’t answer anything. Instead, he lets his hand<text:span text:style-name="T191">s</text:span> do the talking for him.</text:p>
      <text:p text:style-name="P21"/>
      <text:p text:style-name="P21"><text:tab/><text:span text:style-name="T191">Gently getting her off of him, he moves past her long, serpentine neck to caress the thick plumage on her back, emanating the sweet scent of cherry </text:span><text:span text:style-name="T192">between</text:span><text:span text:style-name="T191"> each stroke. </text:span><text:span text:style-name="T193">Sullie, too out of her depth to say anything, just freezes up at his contact.</text:span></text:p>
      <text:p text:style-name="P21"/>
      <text:p text:style-name="P21"><text:tab/>“<text:span text:style-name="T194">Calm down</text:span><text:span text:style-name="T193">,” he finally says after his hands reach her rear legs. “This is supposed to be enjoyable for you, Sullie.”</text:span></text:p>
      <text:p text:style-name="P21"/>
      <text:p text:style-name="P21"><text:tab/>“<text:span text:style-name="T193">I’m sorry.”</text:span></text:p>
      <text:p text:style-name="P21"/>
      <text:p text:style-name="P21"><text:tab/>“<text:span text:style-name="T193">Shh. </text:span><text:span text:style-name="T195">R</text:span><text:span text:style-name="T194">elax</text:span><text:span text:style-name="T193"> your muscles and enjoy the moment.”</text:span></text:p>
      <text:p text:style-name="P21"/>
      <text:p text:style-name="P21"><text:tab/><text:span text:style-name="T196">Thankfully, Sullie obeys, taking all of her willpower to calm herself down and release the tension all around her body. </text:span><text:span text:style-name="T195">Kai resumes his exploration of her body, feeling the hidden strength of h</text:span><text:span text:style-name="T197">e</text:span><text:span text:style-name="T195">r thighs under his fingers. His hand then reach up to her back, then slide at the base of her tail. He then starts rubbing the erogenous zone, just as he would do with an overgrown house cat.</text:span></text:p>
      <text:p text:style-name="P21"/>
      <text:p text:style-name="P21"><text:tab/>“<text:span text:style-name="T195">S-Stop teasing me, and just do it,” Sullie whispers, clearly enjoying this more than she would admit.</text:span></text:p>
      <text:p text:style-name="P21"/>
      <text:p text:style-name="P21"><text:tab/><text:span text:style-name="T195">Kai then slides his hand along the length of her tail, having to hold it in place to avoid being smacked in the face by it. </text:span><text:span text:style-name="T198">He, too, starts trembling nervously, anticipating what comes next. Finding the courage to look at what is happening in her back, Sullie takes a deep breath, and raises </text:span><text:soft-page-break/><text:span text:style-name="T198">her hips.</text:span></text:p>
      <text:p text:style-name="P21"/>
      <text:p text:style-name="P21"><text:tab/><text:span text:style-name="T199">The young man was not unfamiliar with the private parts of dinosaurs; after all, his job involved </text:span><text:span text:style-name="T200">looking</text:span><text:span text:style-name="T199"> at them, most of the time. But this time, it felt different. Not having any checklist to fulfill, and doing this with a female raptor he felt closer to than anyone else, he felt like invading her personal life. And yet, he couldn’t stop looking </text:span><text:span text:style-name="T201">at the fine horizontal slit between her legs, barely hiding a pink flesh slowly pulsating at the rhythm of its owner’s heart</text:span><text:span text:style-name="T202">beats.</text:span></text:p>
      <text:p text:style-name="P21"/>
      <text:p text:style-name="P21"><text:tab/><text:span text:style-name="T203">Kai tentatively extends his hand, until his fingers brush the surface of her vagina. Sullie slightly bucks up and sighs, but otherwise doesn’t say anything. Taking this as a sign of encouragement, Kai extends a finger inside her needy pussy, then two, then </text:span><text:span text:style-name="T204">finds</text:span><text:span text:style-name="T203"> enough room for a third. </text:span><text:span text:style-name="T204">He rocks his hand back and forth, slowly, </text:span><text:span text:style-name="T205">listening to</text:span><text:span text:style-name="T204"> his partner’s </text:span><text:span text:style-name="T205">breathing to make sure she wouldn’t cu</text:span><text:span text:style-name="T206">m</text:span><text:span text:style-name="T205"> too soon.</text:span></text:p>
      <text:p text:style-name="P21"/>
      <text:p text:style-name="P21"><text:tab/>“<text:span text:style-name="T205">Undress,” she commands him. “I shouldn’t be the only one naked.”</text:span></text:p>
      <text:p text:style-name="P21"/>
      <text:p text:style-name="P21"><text:tab/><text:span text:style-name="T205">He obeys, and removes his fingers before doing the same with his clothes as fast as possible, not wanting to wait any further. He wonders if he would be big enough to satisfy her, as he knows some species of dinosaurs were much, much larger in that department than a regular human. Then again, Sullie </text:span><text:span text:style-name="T207">was</text:span><text:span text:style-name="T205"> relatively small.</text:span></text:p>
      <text:p text:style-name="P21"/>
      <text:p text:style-name="P21"><text:tab/><text:span text:style-name="T205">He expected Sullie to bashfully look away, too </text:span><text:span text:style-name="T208">s</text:span><text:span text:style-name="T209">h</text:span><text:span text:style-name="T208">y</text:span><text:span text:style-name="T205"> to do anything but letting him take charge for the whole session. What he didn’t expect, however, was his red-feathered partner lunging at his cock as soon as it appeared, making hi</text:span><text:span text:style-name="T208">m</text:span><text:span text:style-name="T205"> stumble back on the pile of cushions under his feet.</text:span></text:p>
      <text:p text:style-name="P21"/>
      <text:p text:style-name="P21"><text:tab/>“<text:span text:style-name="T210">Sullie, I...”</text:span></text:p>
      <text:p text:style-name="P21"/>
      <text:p text:style-name="P21"><text:tab/>“<text:span text:style-name="T210">Shut up,” she whispers. “I need this.”</text:span></text:p>
      <text:p text:style-name="P21"/>
      <text:p text:style-name="P21"><text:tab/><text:span text:style-name="T210">She then opens her maw, fully engulfing his cock in her mouth. The sudden stimulation makes Kai gasp in pleasure, holding her face with both hands to avoid stumbling further. He could feel her tongue coiling around him, pumping him as fast as she possibly could. </text:span><text:span text:style-name="T211">Lust rises inside of him, the depravity of this unnatural relationship enough to entice him to slowly rock his hips in return, showing his penis further down her throat.</text:span></text:p>
      <text:p text:style-name="P21"/>
      <text:p text:style-name="P21"><text:tab/><text:span text:style-name="T211">But as the lust builds up to an orgasm, Kai pants, frenetically trying to remove himself from his mouth. He has to put in a little bit of strength, as his partner was less than happy to let him go so soon.</text:span></text:p>
      <text:p text:style-name="P21"/>
      <text:p text:style-name="P21"><text:tab/>“<text:span text:style-name="T212">Sullie, I-I’m almost there,” he pants, grasping for air. “I’m gonna cum soon if you don’t release me.”</text:span></text:p>
      <text:p text:style-name="P21"/>
      <text:p text:style-name="P21"><text:tab/><text:span text:style-name="T212">She begrudgingly lets him go, leaving his cock covered in saliva hang in the air. She </text:span><text:soft-page-break/><text:span text:style-name="T212">takes back her old position, lifting her ass up in the air for her partner to indulge in the sight of her now dripping pussy.</text:span></text:p>
      <text:p text:style-name="P21"/>
      <text:p text:style-name="P21"><text:tab/>“<text:span text:style-name="T212">Hurry up,” she commands again. “I’ve waited too long for this.”</text:span></text:p>
      <text:p text:style-name="P21"/>
      <text:p text:style-name="P21"><text:tab/><text:span text:style-name="T213">She almost crashes her hips back towards his as he holds her by her thighs, aligning his cock to her entrance. </text:span><text:span text:style-name="T214">He slides in without difficulty, the stimulation sending a bolt of pleasure rippling through his spine. In front of him, Sullie suddenly gasps and shudders, closing her eyes to help parsing the foreign sensation.</text:span></text:p>
      <text:p text:style-name="P21"/>
      <text:p text:style-name="P21"><text:tab/>“<text:span text:style-name="T214">Sorry!” Kai blurts out. “Are you okay?”</text:span></text:p>
      <text:p text:style-name="P21"/>
      <text:p text:style-name="P21"><text:tab/>“<text:span text:style-name="T214">I’m fine!” she almost screams, panting for breath. “Go on, push deeper, give it to me.”</text:span></text:p>
      <text:p text:style-name="P21"/>
      <text:p text:style-name="P21"><text:tab/><text:span text:style-name="T214">Kai grabs her tail with one hand and raises it to give himself more room to push. Without further ado, the pair begins their push and pull, the room soon filled with the sound of their hips smacking against each other, </text:span><text:span text:style-name="T215">only </text:span><text:span text:style-name="T214">drowned </text:span><text:span text:style-name="T216">out</text:span><text:span text:style-name="T214"> by moans and dirty talk.</text:span></text:p>
      <text:p text:style-name="P21"/>
      <text:p text:style-name="P21"><text:tab/><text:span text:style-name="T216">After a few minutes, Kai picks up the pace. His partner could feel his fervor coming to a close: He was about to cum. And so was she.</text:span></text:p>
      <text:p text:style-name="P21"/>
      <text:p text:style-name="P21"><text:tab/>“<text:span text:style-name="T216">Do it inside,” she pleads, almost knocked out by the pleasure. “Give it to me, cum inside me, do it do it do it…”</text:span></text:p>
      <text:p text:style-name="P21"/>
      <text:p text:style-name="P21"><text:tab/><text:span text:style-name="T216">Eventually, Kai cannot hold it any longer. He grabs her hips with both hands, digging his nails deep in her plumage and his cock even deeper in her stomach. Finally a while flash blinds him as his shaft pulsates, sending thick ropes of cum inside the dinosaur’s vagina. Sullie bucks up, growling under the feeling of her cunt filled with the semen of a human – her human. </text:span><text:span text:style-name="T217">Both let out cries of pleasure as they orgasm at the same time, leaving a sticky white mess of semen mixed up with her girl juices.</text:span></text:p>
      <text:p text:style-name="P21"/>
      <text:p text:style-name="P21"><text:tab/>“<text:span text:style-name="T218">Oh yes, oh yes, I…” Sullie starts, before her mind goes blank as well.</text:span></text:p>
      <text:p text:style-name="P21"/>
      <text:p text:style-name="P21"><text:tab/><text:span text:style-name="T217">Finally, after what feels like an eternity, Kai disentangles himself from her, and allows himself to bask in the afterglow of sex, taking a look as the result of his hard work: Her pussy, traversed by spasms, leaking the mix of their love all over her legs.</text:span></text:p>
      <text:p text:style-name="P21"/>
      <text:p text:style-name="P22"><text:tab/>He then stumbles back, laying down on Sullie’s bed to catch his breath. Slowly, his partner joins him, uncertain on her trembling legs. She then assumes a half-sitting, half-laid down position, pushing herself on top of Kai to cover him with her feathers. She snuggles against his torso, her muzzle sending hot bursts of air onto his neck.</text:p>
      <text:p text:style-name="P22"/>
      <text:p text:style-name="P22"><text:tab/>“That was..” Kai starts.</text:p>
      <text:p text:style-name="P22"/>
      <text:p text:style-name="P23"><text:soft-page-break/><text:span text:style-name="T219"><text:tab/>“Incredible”, Sullie finishes, lickin</text:span><text:span text:style-name="T220">g him affectionately on the cheek. “I didn’t expect this to be so sportive, though.”</text:span></text:p>
      <text:p text:style-name="P24"/>
      <text:p text:style-name="P24"><text:tab/>Indeed, Kai felt surprisingly tired. Perhaps all the wine they drank finally took its toll on them. </text:p>
      <text:p text:style-name="P24"/>
      <text:p text:style-name="P24"><text:tab/>Kai wraps his arms around his lover, as she attempts to cover him as best as possible to keep him warm for the night – one that took and unexpected, but much welcomed turn.</text:p>
      <text:p text:style-name="P24"/>
      <text:p text:style-name="P24"><text:tab/>“<text:span text:style-name="T221">I love you too, Sullie,” Kai finally says, landing a kiss on her nose. “I know the future is going to look scary for you, but I’ll always be there for you if you need me.”</text:span></text:p>
      <text:p text:style-name="P24"/>
      <text:p text:style-name="P24"><text:tab/>“… <text:span text:style-name="T221">Thank you Kai,” Sullie replies, before licking hi</text:span><text:span text:style-name="T222">m</text:span><text:span text:style-name="T221"> again. “This night gave me all I could ever ask f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0H59M39S</meta:editing-duration>
    <meta:editing-cycles>264</meta:editing-cycles>
    <meta:generator>LibreOffice/25.2.4.3$Windows_X86_64 LibreOffice_project/33e196637044ead23f5c3226cde09b47731f7e27</meta:generator>
    <meta:creation-date>2025-11-01T12:32:01.561505000</meta:creation-date>
    <dc:title>Format prompt histoire</dc:title>
    <dc:date>2026-01-26T14:31:57.320650800</dc:date>
    <meta:document-statistic meta:table-count="0" meta:image-count="0" meta:object-count="0" meta:page-count="15" meta:paragraph-count="182" meta:word-count="6019" meta:character-count="33500" meta:non-whitespace-character-count="27456"/>
    <meta:template xlink:type="simple" xlink:actuate="onRequest" xlink:title="Format prompt histoire" xlink:href="file:///C:/Users/Clément/AppData/Roaming/LibreOffice/4/user/template/Format%20prompt%20histoire.ott" meta:date="2025-11-01T12:32:01.410705300"/>
  </office:meta>
</office:document-meta>
</file>