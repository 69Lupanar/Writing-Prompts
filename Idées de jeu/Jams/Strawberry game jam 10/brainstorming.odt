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d15d5" officeooo:paragraph-rsid="001d15d5"/>
    </style:style>
    <style:style style:name="P2" style:family="paragraph" style:parent-style-name="Standard" style:list-style-name="L1">
      <style:paragraph-properties fo:line-height="115%"/>
      <style:text-properties officeooo:rsid="001d15d5" officeooo:paragraph-rsid="001d15d5"/>
    </style:style>
    <style:style style:name="P3" style:family="paragraph" style:parent-style-name="Standard" style:list-style-name="L1">
      <style:paragraph-properties fo:line-height="115%"/>
      <style:text-properties officeooo:rsid="001d7876" officeooo:paragraph-rsid="001d7876"/>
    </style:style>
    <style:style style:name="P4" style:family="paragraph" style:parent-style-name="Standard">
      <style:paragraph-properties fo:line-height="115%"/>
      <style:text-properties officeooo:rsid="001d7876" officeooo:paragraph-rsid="001d7876"/>
    </style:style>
    <style:style style:name="P5" style:family="paragraph" style:parent-style-name="Standard">
      <style:paragraph-properties fo:line-height="115%"/>
      <style:text-properties officeooo:rsid="001eb813" officeooo:paragraph-rsid="001eb813"/>
    </style:style>
    <style:style style:name="P6" style:family="paragraph" style:parent-style-name="Standard" style:list-style-name="L2">
      <style:paragraph-properties fo:line-height="115%"/>
      <style:text-properties officeooo:rsid="001eb813" officeooo:paragraph-rsid="001eb813"/>
    </style:style>
    <style:style style:name="P7" style:family="paragraph" style:parent-style-name="Standard" style:list-style-name="L2">
      <style:paragraph-properties fo:line-height="115%"/>
      <style:text-properties officeooo:rsid="002105b1" officeooo:paragraph-rsid="002105b1"/>
    </style:style>
    <style:style style:name="T1" style:family="text">
      <style:text-properties officeooo:rsid="001faf26"/>
    </style:style>
    <style:style style:name="T2" style:family="text">
      <style:text-properties officeooo:rsid="002105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ème : fusion</text:p>
      <text:p text:style-name="P1"/>
      <text:p text:style-name="P1">Idées  de jeu :</text:p>
      <text:p text:style-name="P1"/>
      <text:list text:style-name="L1">
        <text:list-item>
          <text:p text:style-name="P2">Un jeu inspiré de Fossil Fighters &amp; Pkmn H version</text:p>
        </text:list-item>
        <text:list-item>
          <text:p text:style-name="P2">Un jeu où l’on crée des chimères à baiser à partir de différentes parties d’animaux</text:p>
        </text:list-item>
        <text:list-item>
          <text:p text:style-name="P3">Un jeu sur la grossesse où obtenir du sperme de différentes espèces crée des enfants hybrides</text:p>
        </text:list-item>
      </text:list>
      <text:p text:style-name="P4"/>
      <text:p text:style-name="P5">Idée retenue :</text:p>
      <text:p text:style-name="P5"/>
      <text:list text:style-name="L2">
        <text:list-item>
          <text:p text:style-name="P6">Un jeu inspiré de Fossil Fighters, où on collecte des dinos pour les faire se battre en 3v3.</text:p>
        </text:list-item>
        <text:list-item>
          <text:p text:style-name="P6">Après une victoire/Défaite, on peut choisir un dino pour baiser le joueur/l’ennemi. Son sperme/<text:span text:style-name="T1">ovule</text:span> est ensuite collecté <text:span text:style-name="T1">avec une machine </text:span><text:span text:style-name="T2">(max. 3 différents)</text:span></text:p>
        </text:list-item>
        <text:list-item>
          <text:p text:style-name="P7">On peut ensuite déposer ce sperme dans une machine pour cloner le dinosaure. La puissance et la rareté du dinosaure dépend du sperme collecté.</text:p>
        </text:list-item>
        <text:list-item>
          <text:p text:style-name="P7">Alternativement, on peut collecter des fossiles de pénis/vagin de dinosaure pour substituer le sperme d’une espèce spécifiqu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40M20S</meta:editing-duration>
    <meta:editing-cycles>6</meta:editing-cycles>
    <meta:generator>LibreOffice/25.2.4.3$Windows_X86_64 LibreOffice_project/33e196637044ead23f5c3226cde09b47731f7e27</meta:generator>
    <meta:creation-date>2026-01-23T14:59:04.050999200</meta:creation-date>
    <dc:title>Format de texte</dc:title>
    <dc:date>2026-01-23T17:23:31.279132100</dc:date>
    <meta:document-statistic meta:table-count="0" meta:image-count="0" meta:object-count="0" meta:page-count="1" meta:paragraph-count="10" meta:word-count="140" meta:character-count="794" meta:non-whitespace-character-count="670"/>
    <meta:template xlink:type="simple" xlink:actuate="onRequest" xlink:title="Format de texte" xlink:href="file:///C:/Users/Clément/AppData/Roaming/LibreOffice/4/user/template/Format%20de%20texte.ott" meta:date="2026-01-23T14:59:03.656576100"/>
  </office:meta>
</office:document-meta>
</file>