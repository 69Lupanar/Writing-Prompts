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d15d5" officeooo:paragraph-rsid="001d15d5"/>
    </style:style>
    <style:style style:name="P2" style:family="paragraph" style:parent-style-name="Standard">
      <style:paragraph-properties fo:line-height="115%"/>
      <style:text-properties officeooo:rsid="003c4164" officeooo:paragraph-rsid="003c4164"/>
    </style:style>
    <style:style style:name="P3" style:family="paragraph" style:parent-style-name="Standard">
      <style:paragraph-properties fo:line-height="115%"/>
      <style:text-properties officeooo:rsid="0022c198" officeooo:paragraph-rsid="003c4164"/>
    </style:style>
    <style:style style:name="P4" style:family="paragraph" style:parent-style-name="Standard">
      <style:paragraph-properties fo:line-height="115%"/>
      <style:text-properties officeooo:rsid="0022c198" officeooo:paragraph-rsid="0022c198"/>
    </style:style>
    <style:style style:name="P5" style:family="paragraph" style:parent-style-name="Standard">
      <style:paragraph-properties fo:line-height="115%"/>
      <style:text-properties officeooo:rsid="003c4164" officeooo:paragraph-rsid="003d6f64"/>
    </style:style>
    <style:style style:name="P6" style:family="paragraph" style:parent-style-name="Standard">
      <style:paragraph-properties fo:line-height="115%"/>
      <style:text-properties officeooo:rsid="0023c326" officeooo:paragraph-rsid="0023c326"/>
    </style:style>
    <style:style style:name="P7" style:family="paragraph" style:parent-style-name="Standard" style:list-style-name="L1">
      <style:paragraph-properties fo:line-height="115%"/>
      <style:text-properties officeooo:rsid="0023c326" officeooo:paragraph-rsid="0023c326"/>
    </style:style>
    <style:style style:name="P8" style:family="paragraph" style:parent-style-name="Standard" style:list-style-name="L1">
      <style:paragraph-properties fo:line-height="115%"/>
      <style:text-properties officeooo:rsid="00240403" officeooo:paragraph-rsid="00240403"/>
    </style:style>
    <style:style style:name="P9" style:family="paragraph" style:parent-style-name="Standard" style:list-style-name="L1">
      <style:paragraph-properties fo:line-height="115%"/>
      <style:text-properties officeooo:rsid="0023c326" officeooo:paragraph-rsid="0044dec6"/>
    </style:style>
    <style:style style:name="P10" style:family="paragraph" style:parent-style-name="Standard" style:list-style-name="L1">
      <style:paragraph-properties fo:line-height="115%"/>
      <style:text-properties officeooo:rsid="0028325b" officeooo:paragraph-rsid="0028325b"/>
    </style:style>
    <style:style style:name="P11" style:family="paragraph" style:parent-style-name="Standard" style:list-style-name="L1">
      <style:paragraph-properties fo:line-height="115%"/>
      <style:text-properties officeooo:rsid="002a043e" officeooo:paragraph-rsid="002a043e"/>
    </style:style>
    <style:style style:name="P12" style:family="paragraph" style:parent-style-name="Standard" style:list-style-name="L1">
      <style:paragraph-properties fo:line-height="115%"/>
      <style:text-properties officeooo:rsid="002b5acd" officeooo:paragraph-rsid="002b5acd"/>
    </style:style>
    <style:style style:name="P13" style:family="paragraph" style:parent-style-name="Standard" style:list-style-name="L1">
      <style:paragraph-properties fo:line-height="115%"/>
      <style:text-properties officeooo:rsid="003ff3f0" officeooo:paragraph-rsid="003ff3f0"/>
    </style:style>
    <style:style style:name="P14" style:family="paragraph" style:parent-style-name="Standard" style:list-style-name="L1">
      <style:paragraph-properties fo:line-height="115%"/>
      <style:text-properties officeooo:rsid="0041abc9" officeooo:paragraph-rsid="0041abc9"/>
    </style:style>
    <style:style style:name="P15" style:family="paragraph" style:parent-style-name="Standard" style:list-style-name="L1">
      <style:paragraph-properties fo:line-height="115%"/>
      <style:text-properties officeooo:rsid="0041b95b" officeooo:paragraph-rsid="0041b95b"/>
    </style:style>
    <style:style style:name="P16" style:family="paragraph" style:parent-style-name="Standard">
      <style:paragraph-properties fo:line-height="115%"/>
      <style:text-properties officeooo:rsid="002b5acd" officeooo:paragraph-rsid="002b5acd"/>
    </style:style>
    <style:style style:name="P17" style:family="paragraph" style:parent-style-name="Standard" style:list-style-name="L1">
      <style:paragraph-properties fo:line-height="115%"/>
      <style:text-properties officeooo:rsid="002d93ef" officeooo:paragraph-rsid="002d93ef"/>
    </style:style>
    <style:style style:name="P18" style:family="paragraph" style:parent-style-name="Standard" style:list-style-name="L1">
      <style:paragraph-properties fo:line-height="115%"/>
      <style:text-properties officeooo:rsid="00305697" officeooo:paragraph-rsid="00305697"/>
    </style:style>
    <style:style style:name="P19" style:family="paragraph" style:parent-style-name="Standard">
      <style:paragraph-properties fo:line-height="115%"/>
      <style:text-properties officeooo:rsid="00305697" officeooo:paragraph-rsid="00305697"/>
    </style:style>
    <style:style style:name="P20" style:family="paragraph" style:parent-style-name="Standard" style:list-style-name="L2">
      <style:paragraph-properties fo:line-height="115%"/>
      <style:text-properties officeooo:rsid="00320dd7" officeooo:paragraph-rsid="00320dd7"/>
    </style:style>
    <style:style style:name="P21" style:family="paragraph" style:parent-style-name="Standard" style:list-style-name="L2">
      <style:paragraph-properties fo:line-height="115%"/>
      <style:text-properties officeooo:rsid="0036696f" officeooo:paragraph-rsid="003bc5c2"/>
    </style:style>
    <style:style style:name="P22" style:family="paragraph" style:parent-style-name="Standard" style:list-style-name="L2">
      <style:paragraph-properties fo:line-height="115%"/>
      <style:text-properties officeooo:rsid="003bf34f" officeooo:paragraph-rsid="003bf34f"/>
    </style:style>
    <style:style style:name="T1" style:family="text">
      <style:text-properties officeooo:rsid="003d6f64"/>
    </style:style>
    <style:style style:name="T2" style:family="text">
      <style:text-properties officeooo:rsid="002674b7"/>
    </style:style>
    <style:style style:name="T3" style:family="text">
      <style:text-properties officeooo:rsid="00240403"/>
    </style:style>
    <style:style style:name="T4" style:family="text">
      <style:text-properties officeooo:rsid="0036696f"/>
    </style:style>
    <style:style style:name="T5" style:family="text">
      <style:text-properties officeooo:rsid="0041646d"/>
    </style:style>
    <style:style style:name="T6" style:family="text">
      <style:text-properties officeooo:rsid="0043586d"/>
    </style:style>
    <style:style style:name="T7" style:family="text">
      <style:text-properties officeooo:rsid="002f574c"/>
    </style:style>
    <style:style style:name="T8" style:family="text">
      <style:text-properties officeooo:rsid="002f65e2"/>
    </style:style>
    <style:style style:name="T9" style:family="text">
      <style:text-properties officeooo:rsid="00305697"/>
    </style:style>
    <style:style style:name="T10" style:family="text">
      <style:text-properties officeooo:rsid="0034cfd2"/>
    </style:style>
    <style:style style:name="T11" style:family="text">
      <style:text-properties officeooo:rsid="0035a373"/>
    </style:style>
    <style:style style:name="T12" style:family="text">
      <style:text-properties officeooo:rsid="0031a3e0"/>
    </style:style>
    <style:style style:name="T13" style:family="text">
      <style:text-properties officeooo:rsid="00367829"/>
    </style:style>
    <style:style style:name="T14" style:family="text">
      <style:text-properties officeooo:rsid="00387265"/>
    </style:style>
    <style:style style:name="T15" style:family="text">
      <style:text-properties officeooo:rsid="00397f9e"/>
    </style:style>
    <style:style style:name="T16" style:family="text">
      <style:text-properties officeooo:rsid="00320dd7"/>
    </style:style>
    <style:style style:name="T17" style:family="text">
      <style:text-properties officeooo:rsid="0032ea20"/>
    </style:style>
    <style:style style:name="T18" style:family="text">
      <style:text-properties officeooo:rsid="00330840"/>
    </style:style>
    <style:style style:name="T19" style:family="text">
      <style:text-properties officeooo:rsid="0033cd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ème : fusion</text:p>
      <text:p text:style-name="P1"/>
      <text:p text:style-name="P2">Concept : </text:p>
      <text:p text:style-name="P3"/>
      <text:p text:style-name="P3">Le joueur incarne un nouveau Fossil Fighter, un dresseur de dinosaures de combat. Sa mission est de recenser le plus de fossiles que possible en minant dans une des nombreuses mines disséminées à travers le monde.</text:p>
      <text:p text:style-name="P3">En chemin, il sera confronté aux dangers souterrains, comme des poches de gaz enflammé, de la lave, mais aussi d’autres combattants qui le défieront en duel de dinosaures, le perdant devant satisfaire l’un des dinosaures du vainqueur.</text:p>
      <text:p text:style-name="P1"/>
      <text:p text:style-name="P4">Idées de scénario :</text:p>
      <text:p text:style-name="P4"/>
      <text:p text:style-name="P5">Le joueur travaille pour le professeur Génome, un scientifique étudiant les luxurosaures <text:span text:style-name="T1">(</text:span>lustosaurs<text:span text:style-name="T1">) et leur origine. Pour ce faire, il engage de jeunes Dinomineurs comme le joueur pour extraire leurs fossiles de la terre et étudier leur propriétés en les clonant et utilisant les luxurosaures en combat.</text:span></text:p>
      <text:p text:style-name="P5"/>
      <text:p text:style-name="P6">Idées de gameplay :</text:p>
      <text:p text:style-name="P6"/>
      <text:list text:style-name="L1">
        <text:list-item>
          <text:p text:style-name="P7">Croisement entre Glean et Fossil Fighters, avec une partie exploration et minage, et une partie combat.</text:p>
          <text:p text:style-name="P7"/>
        </text:list-item>
        <text:list-item>
          <text:p text:style-name="P8">La boucle de gameplay : Le jeu génère une nouvelle mine &gt; le joueur creuse pour déterrer des fossiles et autres objets &gt; il combat les IAs sur son chemin pour gagner en EXP et débloquer de nouvelles zones &gt; il retourne à sa base une fois ses dinos épuisés, son inventaire <text:span text:style-name="T2">plein</text:span> ou quand ses jauges ne lui permettent plus de continuer &gt; Il utilise sa base pour cloner de nouveaux dinos et améliorer son perso, sa base et ses dinos &gt; Le perso dort et recommence tout le lendemain, où une nouvelle carte est générée.</text:p>
          <text:p text:style-name="P9"/>
        </text:list-item>
        <text:list-item>
          <text:p text:style-name="P9">Dans la partie exploration, le joueur contrôle le mineur devant creuser sous terre à la recherche de fossiles. Ces fossiles sont ensuite ramenés à sa base pour en extraire leur ADN, dont la qualité dépend de l’état du fossile. Après 3 échantillons d’ADN récupérés, le joueur peut cloner le dinosaure associé, <text:span text:style-name="T3">dont l’espèce est déterminée par leurs fossiles d’origine. Ces dinosaures peuvent ensuite être utilisés en combat où pour passer certains obstacles du terrain (dino volant pour planer sur de longues distances, dino musclé pour détruire des objets indestructibles, dino marin pour nager sans se noyer, </text:span><text:span text:style-name="T4">dino ingnifuge pour traverser la lave</text:span><text:span text:style-name="T3">).</text:span></text:p>
          <text:p text:style-name="P9"/>
        </text:list-item>
        <text:list-item>
          <text:p text:style-name="P10"><text:soft-page-break/>Pendant son exploration, le joueur dispose de 3 jauges : Santé, fatigue et chaleur. </text:p>
          <text:list>
            <text:list-item>
              <text:p text:style-name="P10">La santé détermine les dégâts subis par l’environnement : Effondrement de cave, brûlure, gaz nocif, etc.</text:p>
            </text:list-item>
            <text:list-item>
              <text:p text:style-name="P10">La fatigue détermine le nb total d’actions qu’il peut réaliser par jour. Se déplacer et miner réduisent peu à peu la fatigue.</text:p>
            </text:list-item>
            <text:list-item>
              <text:p text:style-name="P11">La chaleur augmente au fur et à mesure que le joueur descend dans les profondeurs. Si la chaleur augmente de trop, le personnage du joueur retire une couche de vêtements. Moins le joueur porte de vêtements, plus ses dinosaures seront excités en combat, augmentant leur attaque mais diminuant leur concentration, diminuant leurs chances d’éviter les coups.</text:p>
            </text:list-item>
            <text:list-item>
              <text:p text:style-name="P12">Le joueur peut restaurer sa santé et sa fatigue en dormant à sa base, où en consommant des objets qu’il trouve en minant. Il peut également soigner ses dinos par le même procédé.</text:p>
            </text:list-item>
            <text:list-item>
              <text:p text:style-name="P12">Le joueur ne peut pas remettre ses vêtements, sauf en retournant dormir à sa base. Il peut cependant réduire sa chaleur en restant dans les strates les plus hautes du niveau.</text:p>
            </text:list-item>
            <text:list-item>
              <text:p text:style-name="P12">Si sa santé ou fatigue tombent à 0, le joueur est renvoyé de force à sa base, générant un nouveau niveau.</text:p>
            </text:list-item>
            <text:list-item>
              <text:p text:style-name="P13">Les objets que le joueur peut récupérer en minant sont :</text:p>
              <text:list>
                <text:list-item>
                  <text:p text:style-name="P13">Les fossiles, utilisés lors du clonage de luxurosaures ;</text:p>
                </text:list-item>
                <text:list-item>
                  <text:p text:style-name="P13">Les matières premières (pierre précieuses, métaux, gaz), utilisées pour la construction d’améliorations pour le personnage ;</text:p>
                </text:list-item>
                <text:list-item>
                  <text:p text:style-name="P13">Les gemmes, offrant un gain gratuit d’EXP en fonction de sa rareté <text:span text:style-name="T5">et qualité ;</text:span></text:p>
                </text:list-item>
                <text:list-item>
                  <text:p text:style-name="P14">Les piles de gravats, contenant des objets abandonnés par d’autres PNJs (vêtements, nourriture) ;</text:p>
                </text:list-item>
              </text:list>
            </text:list-item>
            <text:list-item>
              <text:p text:style-name="P15">Pendant l’exploration, il peut également y avoir des événements apparaissant de temps à autre, pouvant apporter des effets continus comme ponctuels, positifs comme négatifs (réduction de la fatigue pendant X minutes <text:span text:style-name="T6">durant minage</text:span>, augmentation des stats des dinos en combat, etc...)</text:p>
            </text:list-item>
          </text:list>
        </text:list-item>
      </text:list>
      <text:p text:style-name="P16"/>
      <text:list text:continue-numbering="true" text:style-name="L1">
        <text:list-item>
          <text:p text:style-name="P17">A sa base, le joueur peut réaliser plusieurs actions :</text:p>
          <text:list>
            <text:list-item>
              <text:p text:style-name="P17">Construire des améliorations pour son perso et sa base, utilisant les matériaux trouvés lors de son exploration. Ces améliorations consistent en des bonus passifs à ses jauges de stats, sa vitesse ou qualité de minage, etc.</text:p>
            </text:list-item>
            <text:list-item>
              <text:p text:style-name="P17">Changer la composition de son équipe, en choisissant quels dinos emmener avec lui (max. 3)</text:p>
            </text:list-item>
            <text:list-item>
              <text:p text:style-name="P17">Cloner des dinos en utilisant les fossiles trouvés lors de son exploration. Chaque fossile possède une qualit<text:span text:style-name="T7">é déterminée lors du minage de l’objet, pouvant être augmentée avec des améliorations. Une fois l’ADN extrait du fossile, le joueur peut cloner un dinosaure à partir de ses échantillons récoltés (il ne peut en avoir </text:span><text:soft-page-break/><text:span text:style-name="T7">que 3 à la fois.) Le dinosaure qu’il obtiendra dépendra de l’origine de ses échantillons (Par exemple, 2 ADNs de raptor et 1 ADN de ptéro auront de bonnes chances de donner un raptor, de faibles chances de don</text:span><text:span text:style-name="T8">n</text:span><text:span text:style-name="T7">er un ptéro, ou une chance modérée de créer un hybride). </text:span><text:span text:style-name="T9">Si le joueur obtient un ADN </text:span><text:span text:style-name="T10">déjà extrait</text:span><text:span text:style-name="T9">, </text:span><text:span text:style-name="T11">il peut l’intégrer</text:span><text:span text:style-name="T9"> à son dino déjà créé </text:span><text:span text:style-name="T10">en tant qu’EXP, dont le montant dépend de la qualité de l’ADN.</text:span></text:p>
            </text:list-item>
            <text:list-item>
              <text:p text:style-name="P18">Dormir, ce qui amène le joueur au jour suivant et régénère <text:span text:style-name="T12">le niveau. Cela permet de repartir sur une base saine si le joueur perd ou est bloqué dans le cas où la génération crée des niveaux insolubles.</text:span></text:p>
            </text:list-item>
          </text:list>
        </text:list-item>
      </text:list>
      <text:p text:style-name="P19"><text:s/></text:p>
      <text:list text:style-name="L2">
        <text:list-item>
          <text:p text:style-name="P20">Pendant la phase de combat, les dinos du joueur affrontent ceux adverses dans un match en 3v3.</text:p>
          <text:list>
            <text:list-item>
              <text:p text:style-name="P21">Le gameplay de cette section est similaire à ce<text:span text:style-name="T13">lui de Fossil Fighters, avec le</text:span><text:span text:style-name="T14">s</text:span><text:span text:style-name="T13"> même</text:span><text:span text:style-name="T14">s</text:span><text:span text:style-name="T13"> </text:span><text:span text:style-name="T14">mécaniques</text:span><text:span text:style-name="T13"> de zone, bonus passif de stats, et points de pouvoir partagés entre tous les dinos. </text:span><text:span text:style-name="T15">Le joueur avec le moins de dinos ou le moins de PV attaque en 1er.</text:span></text:p>
            </text:list-item>
            <text:list-item>
              <text:p text:style-name="P21"><text:span text:style-name="T16">Le gagnant </text:span><text:span text:style-name="T17">gagne de l’EXP pour ses dinos, et</text:span><text:span text:style-name="T16"> peut envoyer l’un de ses dinosaures violer le joueur adverse, ou bien le vainqueur peut lui-même profiter d’un des dinos du perdant ; </text:span><text:span text:style-name="T18">dans les deux cas, il peut gagner l’ADN du dino en question, </text:span><text:span text:style-name="T19">mais sa qualité ne peut pas dépasser celle déjà établie du dino.</text:span></text:p>
            </text:list-item>
            <text:list-item>
              <text:p text:style-name="P22">Lorsqu’ils gagnent assez d’exp, ils gagnent un niveau (max 100) et peuvent apprendre de nouvelles capacité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DT24M38S</meta:editing-duration>
    <meta:editing-cycles>43</meta:editing-cycles>
    <meta:generator>LibreOffice/25.2.4.3$Windows_X86_64 LibreOffice_project/33e196637044ead23f5c3226cde09b47731f7e27</meta:generator>
    <meta:creation-date>2026-01-23T14:59:04.050999200</meta:creation-date>
    <dc:title>Format de texte</dc:title>
    <dc:date>2026-01-31T11:57:51.141746200</dc:date>
    <meta:document-statistic meta:table-count="0" meta:image-count="0" meta:object-count="0" meta:page-count="3" meta:paragraph-count="36" meta:word-count="1038" meta:character-count="5985" meta:non-whitespace-character-count="5004"/>
    <meta:template xlink:type="simple" xlink:actuate="onRequest" xlink:title="Format de texte" xlink:href="file:///C:/Users/Clément/AppData/Roaming/LibreOffice/4/user/template/Format%20de%20texte.ott" meta:date="2026-01-23T14:59:03.656576100"/>
  </office:meta>
</office:document-meta>
</file>