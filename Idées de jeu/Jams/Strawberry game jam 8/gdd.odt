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953f6" officeooo:paragraph-rsid="000953f6"/>
    </style:style>
    <style:style style:name="P2" style:family="paragraph" style:parent-style-name="Standard">
      <style:text-properties officeooo:rsid="000e987f" officeooo:paragraph-rsid="000e987f"/>
    </style:style>
    <style:style style:name="P3" style:family="paragraph" style:parent-style-name="Standard">
      <style:text-properties officeooo:rsid="000fe49a" officeooo:paragraph-rsid="000fe49a"/>
    </style:style>
    <style:style style:name="P4" style:family="paragraph" style:parent-style-name="Standard" style:list-style-name="L1">
      <style:text-properties officeooo:rsid="000953f6" officeooo:paragraph-rsid="000b30d1"/>
    </style:style>
    <style:style style:name="P5" style:family="paragraph" style:parent-style-name="Standard" style:list-style-name="L1">
      <style:text-properties officeooo:rsid="000e987f" officeooo:paragraph-rsid="000e987f"/>
    </style:style>
    <style:style style:name="P6" style:family="paragraph" style:parent-style-name="Standard" style:list-style-name="L2">
      <style:text-properties officeooo:rsid="000fe49a" officeooo:paragraph-rsid="000fe49a"/>
    </style:style>
    <style:style style:name="P7" style:family="paragraph" style:parent-style-name="Standard" style:list-style-name="L2">
      <style:text-properties officeooo:rsid="00132878" officeooo:paragraph-rsid="00132878"/>
    </style:style>
    <style:style style:name="P8" style:family="paragraph" style:parent-style-name="Standard" style:list-style-name="L2">
      <style:text-properties officeooo:rsid="00158819" officeooo:paragraph-rsid="00158819"/>
    </style:style>
    <style:style style:name="T1" style:family="text">
      <style:text-properties officeooo:rsid="000b30d1"/>
    </style:style>
    <style:style style:name="T2" style:family="text">
      <style:text-properties officeooo:rsid="000cb599"/>
    </style:style>
    <style:style style:name="T3" style:family="text">
      <style:text-properties officeooo:rsid="000f4bf5"/>
    </style:style>
    <style:style style:name="T4" style:family="text">
      <style:text-properties officeooo:rsid="0011da60"/>
    </style:style>
    <style:style style:name="T5" style:family="text">
      <style:text-properties officeooo:rsid="0012e30e"/>
    </style:style>
    <style:style style:name="T6" style:family="text">
      <style:text-properties officeooo:rsid="00162d42"/>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m : Coomshot</text:p>
      <text:p text:style-name="P1"/>
      <text:p text:style-name="P1">Thème : La fécondation de l’ovule. </text:p>
      <text:p text:style-name="P1"/>
      <text:p text:style-name="P1">Prémices : Le joueur incarne un spermatozoïde qui doit remonter le vagin et l’utérus d’une femme pour féconder son ovule. Il doit détruire les défenses immunitaires de la région ainsi que la compétition se mettant sur son chemin.</text:p>
      <text:p text:style-name="P1"/>
      <text:p text:style-name="P1">Contrôles : Le perso suit le curseur de la souris <text:span text:style-name="T2">quand le</text:span> <text:span text:style-name="T2">c</text:span>lic gauche <text:span text:style-name="T2">est</text:span> enfoncé. <text:span text:style-name="T2">Clic droit</text:span> pour tirer, clic <text:span text:style-name="T2">milieu</text:span> pressé pour utiliser une bombe.</text:p>
      <text:p text:style-name="P1"/>
      <text:p text:style-name="P1">Mécaniques : </text:p>
      <text:p text:style-name="P1"/>
      <text:list xml:id="list3922682000" text:style-name="L1">
        <text:list-item>
          <text:p text:style-name="P4">Le jeu se compose de plusieurs niveaux : L’entrée du vagin (qui sert de niveau facile pour apprendre les mécaniques au joueur, avec un hymen bien défendu à la fin que le joueur doit détruire), le vagin en lui-même (avec un boss consistant en d’autres spermas qui tentent de tuer le joueur), le col de l’utérus (<text:span text:style-name="T1">avec les défenses immunitaires tentant de détruire les spermas, </text:span><text:span text:style-name="T6">avec un anticorps à la fin</text:span>), <text:span text:style-name="T1">et l’utérus (où se trouve le boss final, l’ovule, dont le joueur doit détruire les défenses pour s’introduire à l’intérieur).</text:span></text:p>
        </text:list-item>
        <text:list-item>
          <text:p text:style-name="P5">Le joueur a 3 vies, et perd le niveau s’il n’en a plus. Il peut perdre une vie en touchant les parois du niveau, les projectiles ennemis, ou les ennemies eux-mêmes.</text:p>
        </text:list-item>
        <text:list-item>
          <text:p text:style-name="P5">Optionnel : </text:p>
          <text:list>
            <text:list-item>
              <text:p text:style-name="P5">Le joueur peut ramasser des bonus obtenus en tuant des ennemis : Vies ou bombes supplémentaires, <text:span text:style-name="T3">boucliers</text:span>, tirs plus puissants/rapides ou plusieurs tirs à la fois. <text:span text:style-name="T3">Ces bonus peuvent être temporaires ou permanents, certains se perdant quand une vie est perdue.</text:span></text:p>
            </text:list-item>
          </text:list>
        </text:list-item>
      </text:list>
      <text:p text:style-name="P2"/>
      <text:p text:style-name="P3">Présentation : </text:p>
      <text:p text:style-name="P3"/>
      <text:list xml:id="list3199486627" text:style-name="L2">
        <text:list-item>
          <text:p text:style-name="P6">Interface générale rappelant les vieux jeux flash : Colorée, ronde.</text:p>
        </text:list-item>
        <text:list-item>
          <text:p text:style-name="P6">Sprites en 2D pour l’environnement, les personnages et les props (projectiles et autres).</text:p>
        </text:list-item>
        <text:list-item>
          <text:p text:style-name="P6">Animations d’explosions pour les <text:span text:style-name="T4">entités </text:span>détruit<text:span text:style-name="T4">e</text:span>s. L’idée est d’exagérer la destruction des ennemis et l’environnement pour donner l’impression d’une zone de guerre, plutôt que d’une simple fécondation.</text:p>
        </text:list-item>
        <text:list-item>
          <text:p text:style-name="P6">Optionnel :</text:p>
          <text:list>
            <text:list-item>
              <text:p text:style-name="P7">Parallax sur l’environnement pour donner une impression de profondeur au vagin</text:p>
            </text:list-item>
            <text:list-item>
              <text:p text:style-name="P6">Animation d’intro pour le premier niveau, ou l’on voit une bite éjaculer et libérer tous les spermas dans le vagin.</text:p>
            </text:list-item>
            <text:list-item>
              <text:p text:style-name="P6">Présence d’autres spermas dans les niveaux, dont le nombre réduit au fil de la progression. Ces spermas sont purement cosmétiques et n’ont aucune interaction avec le gameplay.</text:p>
            </text:list-item>
            <text:list-item>
              <text:p text:style-name="P8">Présence de défenses dans le parallax en plus des spermas, qui donnerait l’impression que les spermas tentent eux aussi de se battre contre les défenses.</text:p>
            </text:list-item>
            <text:list-item>
              <text:p text:style-name="P6"><text:s/><text:span text:style-name="T5">Système de dialogue pour faire parler les spermas, dans l’idée de leur donner une attitude de soldats, pour renforcer cette idée de zone de guerre.</text:span></text:p>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2-01T13:29:26.568000000</dc:date>
    <meta:editing-duration>PT18M</meta:editing-duration>
    <meta:editing-cycles>11</meta:editing-cycles>
    <meta:generator>LibreOffice/7.3.3.2$Windows_X86_64 LibreOffice_project/d1d0ea68f081ee2800a922cac8f79445e4603348</meta:generator>
    <meta:document-statistic meta:table-count="0" meta:image-count="0" meta:object-count="0" meta:page-count="1" meta:paragraph-count="19" meta:word-count="416" meta:character-count="2473" meta:non-whitespace-character-count="2084"/>
  </office:meta>
</office:document-meta>
</file>