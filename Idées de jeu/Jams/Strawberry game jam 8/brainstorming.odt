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text-properties officeooo:rsid="000f956a" officeooo:paragraph-rsid="000f956a"/>
    </style:style>
    <style:style style:name="P2" style:family="paragraph" style:parent-style-name="Standard" style:list-style-name="L1">
      <style:text-properties fo:color="#127622" loext:opacity="100%" officeooo:rsid="00074779" officeooo:paragraph-rsid="00074779"/>
    </style:style>
    <style:style style:name="P3" style:family="paragraph" style:parent-style-name="Standard" style:list-style-name="L1">
      <style:text-properties fo:color="#127622" loext:opacity="100%" officeooo:rsid="00074779" officeooo:paragraph-rsid="0008b038"/>
    </style:style>
    <style:style style:name="P4" style:family="paragraph" style:parent-style-name="Standard" style:list-style-name="L1">
      <style:text-properties fo:color="#127622" loext:opacity="100%" officeooo:rsid="0008b038" officeooo:paragraph-rsid="0008b038"/>
    </style:style>
    <style:style style:name="P5" style:family="paragraph" style:parent-style-name="Standard" style:list-style-name="L1">
      <style:text-properties fo:color="#127622" loext:opacity="100%" officeooo:rsid="0008be6c" officeooo:paragraph-rsid="0008be6c"/>
    </style:style>
    <style:style style:name="P6" style:family="paragraph" style:parent-style-name="Standard" style:list-style-name="L1">
      <style:text-properties fo:color="#127622" loext:opacity="100%" officeooo:rsid="000bac04" officeooo:paragraph-rsid="000bac04"/>
    </style:style>
    <style:style style:name="P7" style:family="paragraph" style:parent-style-name="Standard">
      <style:text-properties fo:color="#127622" loext:opacity="100%" officeooo:rsid="000bac04" officeooo:paragraph-rsid="000bac04"/>
    </style:style>
    <style:style style:name="T1" style:family="text">
      <style:text-properties officeooo:rsid="00074779"/>
    </style:style>
    <style:style style:name="T2" style:family="text">
      <style:text-properties officeooo:rsid="0008b038"/>
    </style:style>
    <style:style style:name="T3" style:family="text">
      <style:text-properties officeooo:rsid="0009b391"/>
    </style:style>
    <style:style style:name="T4" style:family="text">
      <style:text-properties officeooo:rsid="00119b2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899974365" text:style-name="L1">
        <text:list-item>
          <text:p text:style-name="P2">Un bullet hell en 2D sur le thème de l’ovulation : On joue un spermatozoïde qui cherche à féconder un ovule, et doit détruire les protections qui le mènent à l’ovule, mais aussi la compétition qui cherche à l’arrêter.</text:p>
          <text:list>
            <text:list-item>
              <text:p text:style-name="P2">Avantages:</text:p>
              <text:list>
                <text:list-item>
                  <text:p text:style-name="P2">Facile à coder, on peut utiliser DOTS pour les performances</text:p>
                </text:list-item>
                <text:list-item>
                  <text:p text:style-name="P2">Gameplay simple à implémenter <text:span text:style-name="T4">et</text:span> prendre en main</text:p>
                </text:list-item>
              </text:list>
            </text:list-item>
            <text:list-item>
              <text:p text:style-name="P2">Inconvénients:</text:p>
              <text:list>
                <text:list-item>
                  <text:p text:style-name="P2">Demande pas mal de sprites en 2D (gérable).</text:p>
                </text:list-item>
                <text:list-item>
                  <text:p text:style-name="P3">Demande pas mal d’animations pour faire une présentation engageante (pour l’arrivée des boss par exemple) <text:span text:style-name="T2">(</text:span>uniquement si on a le temps<text:span text:style-name="T2">)</text:span></text:p>
                </text:list-item>
                <text:list-item>
                  <text:p text:style-name="P4">Demande un système de dialogue pour faire parler les spermatozoïdes<text:span text:style-name="T1"> </text:span>(<text:span text:style-name="T1">uniquement si on a le temps</text:span>)</text:p>
                </text:list-item>
              </text:list>
            </text:list-item>
            <text:list-item>
              <text:p text:style-name="P2">Mécaniques : </text:p>
              <text:list>
                <text:list-item>
                  <text:p text:style-name="P2">Mouvement précis avec l<text:span text:style-name="T3">e curseur de l</text:span>a souris</text:p>
                </text:list-item>
                <text:list-item>
                  <text:p text:style-name="P2">Tir avec le clic gauche enfoncé</text:p>
                </text:list-item>
                <text:list-item>
                  <text:p text:style-name="P5">Bombe avec un clic droit pour détruire tous les ennemis et projectiles à l’écran (nombre limité de bombes)</text:p>
                </text:list-item>
                <text:list-item>
                  <text:p text:style-name="P2">Tir simple, power-ups uniquement si on a le temps</text:p>
                </text:list-item>
                <text:list-item>
                  <text:p text:style-name="P2">Plusieurs niveaux à traverser, chacun représentant une section du vagin et de l’utérus</text:p>
                </text:list-item>
                <text:list-item>
                  <text:p text:style-name="P6">Chaque niveau finit par un boss</text:p>
                </text:list-item>
              </text:list>
            </text:list-item>
          </text:list>
        </text:list-item>
      </text:list>
      <text:p text:style-name="P7"/>
      <text:list xml:id="list130010210427987" text:continue-numbering="true" text:style-name="L1">
        <text:list-item>
          <text:p text:style-name="P1">Un jeu de casse-brique sur le même thème que le précédent. </text:p>
          <text:list>
            <text:list-item>
              <text:p text:style-name="P1">Avantages:</text:p>
              <text:list>
                <text:list-item>
                  <text:p text:style-name="P1">Facile à coder</text:p>
                </text:list-item>
              </text:list>
            </text:list-item>
            <text:list-item>
              <text:p text:style-name="P1">Inconvénients : </text:p>
              <text:list>
                <text:list-item>
                  <text:p text:style-name="P1">Un peu chiant à jouer</text:p>
                </text:list-item>
              </text:list>
            </text:list-item>
            <text:list-item>
              <text:p text:style-name="P1">Mécaniques : </text:p>
              <text:list>
                <text:list-item>
                  <text:p text:style-name="P1">Chaque niveau se situe au dessus du précédent ; pour progresser, le joueur doit envoyer la balle en haut de l’écran. Si elle retombe, elle passe au niveau inférieur. Le haut de l’écran est bloqué par un portail que le joueur doit détruire. Mais il doit aussi laisser assez de briques pour pouvoir rebondir dessus et retourner au niveau supérieur plus rapidement;</text:p>
                </text:list-item>
              </text:list>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2-01T13:00:08.613000000</dc:date>
    <meta:editing-duration>PT21M8S</meta:editing-duration>
    <meta:editing-cycles>9</meta:editing-cycles>
    <meta:generator>LibreOffice/7.3.3.2$Windows_X86_64 LibreOffice_project/d1d0ea68f081ee2800a922cac8f79445e4603348</meta:generator>
    <meta:document-statistic meta:table-count="0" meta:image-count="0" meta:object-count="0" meta:page-count="1" meta:paragraph-count="22" meta:word-count="274" meta:character-count="1501" meta:non-whitespace-character-count="1267"/>
  </office:meta>
</office:document-meta>
</file>