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15%"/>
      <style:text-properties officeooo:rsid="001bb7a0" officeooo:paragraph-rsid="001bb7a0"/>
    </style:style>
    <style:style style:name="P2" style:family="paragraph" style:parent-style-name="Text_20_body">
      <style:paragraph-properties fo:line-height="115%"/>
      <style:text-properties officeooo:rsid="001be0da" officeooo:paragraph-rsid="001be0da"/>
    </style:style>
    <style:style style:name="P3" style:family="paragraph" style:parent-style-name="Text_20_body">
      <style:paragraph-properties fo:line-height="115%"/>
      <style:text-properties officeooo:rsid="001c04ca" officeooo:paragraph-rsid="001c04ca"/>
    </style:style>
    <style:style style:name="P4" style:family="paragraph" style:parent-style-name="Text_20_body">
      <style:paragraph-properties fo:line-height="115%"/>
      <style:text-properties officeooo:rsid="001dfeeb" officeooo:paragraph-rsid="0020c040"/>
    </style:style>
    <style:style style:name="P5" style:family="paragraph" style:parent-style-name="Text_20_body">
      <style:paragraph-properties fo:line-height="115%"/>
      <style:text-properties officeooo:rsid="001edcbd" officeooo:paragraph-rsid="0020c040"/>
    </style:style>
    <style:style style:name="P6" style:family="paragraph" style:parent-style-name="Text_20_body">
      <style:paragraph-properties fo:line-height="115%"/>
      <style:text-properties officeooo:rsid="0021894c" officeooo:paragraph-rsid="0021894c"/>
    </style:style>
    <style:style style:name="T1" style:family="text">
      <style:text-properties officeooo:rsid="001c04ca"/>
    </style:style>
    <style:style style:name="T2" style:family="text">
      <style:text-properties officeooo:rsid="001d93d3"/>
    </style:style>
    <style:style style:name="T3" style:family="text">
      <style:text-properties officeooo:rsid="001ddecb"/>
    </style:style>
    <style:style style:name="T4" style:family="text">
      <style:text-properties officeooo:rsid="001eaf8c"/>
    </style:style>
    <style:style style:name="T5" style:family="text">
      <style:text-properties officeooo:rsid="0021583d"/>
    </style:style>
    <style:style style:name="T6" style:family="text">
      <style:text-properties officeooo:rsid="00209a9f"/>
    </style:style>
    <style:style style:name="T7" style:family="text">
      <style:text-properties officeooo:rsid="0020c04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ées de scénario : </text:p>
      <text:p text:style-name="P2"/>
      <text:p text:style-name="P2">Inspiré de <text:a xlink:type="simple" xlink:href="https://fr.wikipedia.org/wiki/La_Plage" text:style-name="Internet_20_link" text:visited-style-name="Visited_20_Internet_20_Link">la Plage</text:a>.</text:p>
      <text:p text:style-name="P2"/>
      <text:p text:style-name="P1">Le protagoniste <text:span text:style-name="T1">se réveille sur une plage d’une île</text:span> inconnu<text:span text:style-name="T1">e</text:span>, <text:span text:style-name="T1">entouré de restes de ce qui semble être un petit bateau s’étant naufragé. N’ayant aucun souvenir de ce qui lui est arrivé, il part explorer l’île à la recherche d’aide et de réponses.</text:span></text:p>
      <text:p text:style-name="P3">L’île est un sanctuaire recueillant une biodiversité riche en faune et en flore. Cependant, le PP réalise après quelques jours de séjour que l’écosystème local ne comprend pas seulement des animaux et plantes normales, mais aussi des variantes <text:span text:style-name="T2">ayant subi d’horribles mutations au point de radicalement changer leur apparence et leur comportement, devenant plus forts, violents, intelligents et libidineux, </text:span><text:span text:style-name="T3">tuant ou s’accouplant avec tout animal qu’ils croisent.</text:span></text:p>
      <text:p text:style-name="P4">Après avoir retrouvé des traces d’activité humaine, le PP découvre qu’il se trouve sur une île abandonnée en Polynésie française, ayant été sujette à des essais nucléaires, expliquant le développement anormal de l’écosystème local. <text:span text:style-name="T4">Au début utilisé comme site de test pour étudier les effets des radiations sur la faune locale, </text:span><text:span text:style-name="T5">certains animaux étant été introduits pour étudier leur comportement</text:span><text:span text:style-name="T4">, l’endroit à été abandonné faute de résultats exploitables, </text:span><text:span text:style-name="T6">mais le PP pourra se servir de leurs recherches pour mieux comprendre le comportement de ces créatures (notamment, où et quand les trouver, et comment les amadouer)</text:span><text:span text:style-name="T4">. </text:span></text:p>
      <text:p text:style-name="P5">L’île a aussi été explorée par d’autres personnes auparavant, et le PP trouvera de nombreuses traces de leur passage, notamment des vestiges de leur communauté (villages, corps, etc). <text:span text:style-name="T7">Il trouvera aussi cependant des phénomènes inexplicables ajoutées dans le jeu pour renforcer l’aspect mystique et mystérieux de l’oeuvre.</text:span></text:p>
      <text:p text:style-name="P6">Le PP se souviendra peu à peu de son passé : Il était un ornithologue chargé d’étudier les oiseaux rares de la région, lorsque son bateau a été pris dans une tempête, tuant les guides qui l’accompagnaient et le laissant naufragé sur l’île au début du je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22M1S</meta:editing-duration>
    <meta:editing-cycles>13</meta:editing-cycles>
    <meta:generator>LibreOffice/25.2.4.3$Windows_X86_64 LibreOffice_project/33e196637044ead23f5c3226cde09b47731f7e27</meta:generator>
    <meta:creation-date>2025-04-25T11:36:48.615000000</meta:creation-date>
    <dc:date>2025-06-22T17:42:51.346636700</dc:date>
    <meta:document-statistic meta:table-count="0" meta:image-count="0" meta:object-count="0" meta:page-count="1" meta:paragraph-count="7" meta:word-count="307" meta:character-count="1945" meta:non-whitespace-character-count="1643"/>
  </office:meta>
</office:document-meta>
</file>