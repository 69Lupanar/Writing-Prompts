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officeooo:rsid="001ba903" officeooo:paragraph-rsid="001ba903"/>
    </style:style>
    <style:style style:name="P2" style:family="paragraph" style:parent-style-name="Text_20_body" style:list-style-name="L1">
      <style:paragraph-properties fo:line-height="115%"/>
      <style:text-properties officeooo:rsid="001ba903" officeooo:paragraph-rsid="001ba903"/>
    </style:style>
    <style:style style:name="P3" style:family="paragraph" style:parent-style-name="Text_20_body" style:list-style-name="L1">
      <style:paragraph-properties fo:line-height="115%"/>
      <style:text-properties officeooo:rsid="001cada4" officeooo:paragraph-rsid="001cada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jeu : </text:p>
      <text:list xml:id="list771502744" text:style-name="L1">
        <text:list-item>
          <text:p text:style-name="P2">Le protagoniste est un puritain atterrissant dans un monde où le sexe est non seulement vu comme quelque chose de positif, mais aussi encouragé entre les gens de tous âges et tous horizons. Le décalage de ses mœurs avec celles de son nouveau monde cause un conflit moral chez lui. En parallèle, un culte aux mauvaises intentions tente de bannir le sexe en dehors de la reproduction, que le protagoniste devra combattre pour rétablir la paix.</text:p>
        </text:list-item>
        <text:list-item>
          <text:p text:style-name="P3">Le protagoniste arrive dans une ville mal famée où il loge chez le mac d’une maison close, dont le désir est de changer les mentalités des gens autour du sexe après que sa mère, une femme au cœur pur, ait été forcée de se prostituer pour subvenir à leurs besoins. Le joueur doit alors l’aider à sauver sa maison close et grandir sa réputatio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M16S</meta:editing-duration>
    <meta:editing-cycles>3</meta:editing-cycles>
    <meta:generator>LibreOffice/7.3.3.2$Windows_X86_64 LibreOffice_project/d1d0ea68f081ee2800a922cac8f79445e4603348</meta:generator>
    <meta:creation-date>2023-07-25T00:27:10.510000000</meta:creation-date>
    <dc:date>2024-01-14T21:38:40.795000000</dc:date>
    <meta:document-statistic meta:table-count="0" meta:image-count="0" meta:object-count="0" meta:page-count="1" meta:paragraph-count="3" meta:word-count="146" meta:character-count="801" meta:non-whitespace-character-count="659"/>
  </office:meta>
</office:document-meta>
</file>