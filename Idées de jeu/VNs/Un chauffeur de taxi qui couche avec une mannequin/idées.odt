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1bcc" officeooo:paragraph-rsid="00191bcc"/>
    </style:style>
    <style:style style:name="P2" style:family="paragraph" style:parent-style-name="Standard" style:list-style-name="L1">
      <style:text-properties officeooo:rsid="00191bcc" officeooo:paragraph-rsid="00191bcc"/>
    </style:style>
    <style:style style:name="P3" style:family="paragraph" style:parent-style-name="Standard">
      <style:text-properties officeooo:paragraph-rsid="00106f6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1"/>
      <text:list text:style-name="L1">
        <text:list-item>
          <text:p text:style-name="P2">Le joueur incarne un chauffeur de limousine travaillant pour une agence servant de nombreuses célébrités. Il rencontre un jour une mannequin avec qui il entame une relation malgré leurs emplois les empêchant de sortir avec qui que ce soit, encore moins de milieux différents. L’histoire parlera de braver les interdits, de classicisme et de disparité entre riches et pauvres.</text:p>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M15S</meta:editing-duration>
    <meta:editing-cycles>2</meta:editing-cycles>
    <meta:generator>LibreOffice/25.2.4.3$Windows_X86_64 LibreOffice_project/33e196637044ead23f5c3226cde09b47731f7e27</meta:generator>
    <meta:creation-date>2025-08-18T09:25:15.521267900</meta:creation-date>
    <dc:title>Format de texte</dc:title>
    <dc:date>2025-08-18T09:27:29.423649800</dc:date>
    <meta:document-statistic meta:table-count="0" meta:image-count="0" meta:object-count="0" meta:page-count="1" meta:paragraph-count="2" meta:word-count="64" meta:character-count="396" meta:non-whitespace-character-count="334"/>
    <meta:template xlink:type="simple" xlink:actuate="onRequest" xlink:title="Format de texte" xlink:href="file:///C:/Users/Clément/AppData/Roaming/LibreOffice/4/user/template/Format%20de%20texte1.ott" meta:date="2025-08-18T09:25:14.649599000"/>
  </office:meta>
</office:document-meta>
</file>