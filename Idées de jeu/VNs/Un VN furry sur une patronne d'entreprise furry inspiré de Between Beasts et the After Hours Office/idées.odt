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cb86c" officeooo:paragraph-rsid="001cb8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Le PP est un employé lambda dans une corpo, vivant une vie de sous-traitant sans saveur, se levant et se couchant à point d’heure, ce genre de truc. Sa patronne et la plupart de ses collègues sont des férrures. Le PP devra se rapprocher de sa patronne, avec qui il échangera des bouts de son passé et apprendra à la connaître peu à pe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M27S</meta:editing-duration>
    <meta:editing-cycles>2</meta:editing-cycles>
    <meta:generator>LibreOffice/7.3.3.2$Windows_X86_64 LibreOffice_project/d1d0ea68f081ee2800a922cac8f79445e4603348</meta:generator>
    <meta:creation-date>2025-03-30T01:34:40.050000000</meta:creation-date>
    <dc:date>2025-03-30T01:37:04.442000000</dc:date>
    <meta:document-statistic meta:table-count="0" meta:image-count="0" meta:object-count="0" meta:page-count="1" meta:paragraph-count="2" meta:word-count="68" meta:character-count="356" meta:non-whitespace-character-count="289"/>
  </office:meta>
</office:document-meta>
</file>