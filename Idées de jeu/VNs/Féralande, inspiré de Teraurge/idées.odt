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officeooo:rsid="000ec709" officeooo:paragraph-rsid="000ec709"/>
    </style:style>
    <style:style style:name="P2" style:family="paragraph" style:parent-style-name="Standard">
      <style:paragraph-properties fo:text-align="justify" style:justify-single-word="false"/>
      <style:text-properties style:font-name="Calibri" officeooo:rsid="000ec709" officeooo:paragraph-rsid="00322c2b"/>
    </style:style>
    <style:style style:name="P3" style:family="paragraph" style:parent-style-name="Standard">
      <style:paragraph-properties fo:text-align="justify" style:justify-single-word="false"/>
      <style:text-properties style:font-name="Calibri" officeooo:rsid="000ec709" officeooo:paragraph-rsid="0033929f"/>
    </style:style>
    <style:style style:name="P4" style:family="paragraph" style:parent-style-name="Standard">
      <style:paragraph-properties fo:text-align="justify" style:justify-single-word="false"/>
      <style:text-properties style:font-name="Calibri" officeooo:rsid="0011786f" officeooo:paragraph-rsid="0011786f"/>
    </style:style>
    <style:style style:name="P5" style:family="paragraph" style:parent-style-name="Standard">
      <style:paragraph-properties fo:text-align="justify" style:justify-single-word="false"/>
      <style:text-properties style:font-name="Calibri" officeooo:rsid="0011786f" officeooo:paragraph-rsid="00173cac"/>
    </style:style>
    <style:style style:name="P6" style:family="paragraph" style:parent-style-name="Standard">
      <style:paragraph-properties fo:text-align="justify" style:justify-single-word="false"/>
      <style:text-properties style:font-name="Calibri" officeooo:rsid="001e38b0" officeooo:paragraph-rsid="001e38b0"/>
    </style:style>
    <style:style style:name="P7" style:family="paragraph" style:parent-style-name="Standard">
      <style:paragraph-properties fo:text-align="justify" style:justify-single-word="false"/>
      <style:text-properties style:font-name="Calibri" officeooo:rsid="00225905" officeooo:paragraph-rsid="000ec709"/>
    </style:style>
    <style:style style:name="P8" style:family="paragraph" style:parent-style-name="Standard">
      <style:paragraph-properties fo:text-align="justify" style:justify-single-word="false"/>
      <style:text-properties style:font-name="Calibri" officeooo:rsid="00225905" officeooo:paragraph-rsid="00225905"/>
    </style:style>
    <style:style style:name="P9" style:family="paragraph" style:parent-style-name="Standard">
      <style:paragraph-properties fo:text-align="justify" style:justify-single-word="false"/>
      <style:text-properties style:font-name="Calibri" officeooo:rsid="001eb2d0" officeooo:paragraph-rsid="0031d436"/>
    </style:style>
    <style:style style:name="P10" style:family="paragraph" style:parent-style-name="Standard" style:list-style-name="L1">
      <style:paragraph-properties fo:text-align="justify" style:justify-single-word="false"/>
      <style:text-properties style:font-name="Calibri" officeooo:rsid="002889fb" officeooo:paragraph-rsid="002889fb"/>
    </style:style>
    <style:style style:name="P11" style:family="paragraph" style:parent-style-name="Standard" style:list-style-name="L3">
      <style:paragraph-properties fo:text-align="justify" style:justify-single-word="false"/>
      <style:text-properties style:font-name="Calibri" officeooo:rsid="001e38b0" officeooo:paragraph-rsid="001e38b0"/>
    </style:style>
    <style:style style:name="P12" style:family="paragraph" style:parent-style-name="Standard" style:list-style-name="L3">
      <style:paragraph-properties fo:text-align="justify" style:justify-single-word="false"/>
      <style:text-properties style:font-name="Calibri" officeooo:rsid="001e38b0" officeooo:paragraph-rsid="0031d436"/>
    </style:style>
    <style:style style:name="P13" style:family="paragraph" style:parent-style-name="Standard" style:list-style-name="L3">
      <style:paragraph-properties fo:text-align="justify" style:justify-single-word="false"/>
      <style:text-properties style:font-name="Calibri" officeooo:rsid="001eb2d0" officeooo:paragraph-rsid="0031d436"/>
    </style:style>
    <style:style style:name="P14" style:family="paragraph" style:parent-style-name="Standard" style:list-style-name="L4">
      <style:paragraph-properties fo:text-align="justify" style:justify-single-word="false"/>
      <style:text-properties style:font-name="Calibri" officeooo:rsid="00322c2b" officeooo:paragraph-rsid="0033929f"/>
    </style:style>
    <style:style style:name="P15" style:family="paragraph" style:parent-style-name="Standard" style:list-style-name="L4">
      <style:paragraph-properties fo:text-align="justify" style:justify-single-word="false"/>
      <style:text-properties style:font-name="Calibri" officeooo:rsid="0033929f" officeooo:paragraph-rsid="0033929f"/>
    </style:style>
    <style:style style:name="P16" style:family="paragraph" style:parent-style-name="Standard" style:list-style-name="L2">
      <style:paragraph-properties fo:text-align="justify" style:justify-single-word="false"/>
      <style:text-properties officeooo:paragraph-rsid="00322c2b"/>
    </style:style>
    <style:style style:name="P17" style:family="paragraph" style:parent-style-name="Standard" style:list-style-name="L2">
      <style:paragraph-properties fo:text-align="justify" style:justify-single-word="false"/>
      <style:text-properties officeooo:rsid="0035b986" officeooo:paragraph-rsid="0035b986"/>
    </style:style>
    <style:style style:name="T1" style:family="text">
      <style:text-properties officeooo:rsid="001e84cd"/>
    </style:style>
    <style:style style:name="T2" style:family="text">
      <style:text-properties officeooo:rsid="00241570"/>
    </style:style>
    <style:style style:name="T3" style:family="text">
      <style:text-properties officeooo:rsid="002889fb"/>
    </style:style>
    <style:style style:name="T4" style:family="text">
      <style:text-properties officeooo:rsid="0029edf7"/>
    </style:style>
    <style:style style:name="T5" style:family="text">
      <style:text-properties officeooo:rsid="002a6eb2"/>
    </style:style>
    <style:style style:name="T6" style:family="text">
      <style:text-properties officeooo:rsid="002b214e"/>
    </style:style>
    <style:style style:name="T7" style:family="text">
      <style:text-properties officeooo:rsid="002d170a"/>
    </style:style>
    <style:style style:name="T8" style:family="text">
      <style:text-properties officeooo:rsid="002f5963"/>
    </style:style>
    <style:style style:name="T9" style:family="text">
      <style:text-properties officeooo:rsid="00222e41"/>
    </style:style>
    <style:style style:name="T10" style:family="text">
      <style:text-properties officeooo:rsid="00322c2b"/>
    </style:style>
    <style:style style:name="T11" style:family="text">
      <style:text-properties style:font-name="Calibri"/>
    </style:style>
    <style:style style:name="T12" style:family="text">
      <style:text-properties style:font-name="Calibri" officeooo:rsid="002d170a"/>
    </style:style>
    <style:style style:name="T13" style:family="text">
      <style:text-properties style:font-name="Calibri" officeooo:rsid="002dc35b"/>
    </style:style>
    <style:style style:name="T14" style:family="text">
      <style:text-properties officeooo:rsid="0037b45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73cm" fo:text-indent="-0.635cm" fo:margin-left="0.7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dées de gameplay : </text:p>
      <text:p text:style-name="P7"/>
      <text:p text:style-name="P8"><text:tab/><text:span text:style-name="T3">Un roman visuel avec des éléments de RPG : </text:span></text:p>
      <text:p text:style-name="P8"/>
      <text:list xml:id="list823673991" text:style-name="L1">
        <text:list-item>
          <text:p text:style-name="P10">Inventaire et items,</text:p>
        </text:list-item>
        <text:list-item>
          <text:p text:style-name="P10">Système de sorts et capacités personnalisables à la Ryzom,</text:p>
        </text:list-item>
        <text:list-item>
          <text:p text:style-name="P10">Personnages recrutables et gestion d’équipe,</text:p>
        </text:list-item>
        <text:list-item>
          <text:p text:style-name="P10">Combat en tour par tour <text:span text:style-name="T4">avec des éléments variables en fonction du terrain ou de l’ennemi <text:s/>(un peu comme dans Monster Girl Quest où </text:span><text:span text:style-name="T5">chaque ennemi a sa propre IA, </text:span><text:span text:style-name="T6">et comme dans pokémon reborn où le terrain influence grandement et est grandement influencé par les capacités.</text:span><text:span text:style-name="T4">)</text:span></text:p>
        </text:list-item>
      </text:list>
      <text:p text:style-name="P1"/>
      <text:p text:style-name="P2"/>
      <text:p text:style-name="P2">Idées de scénario : </text:p>
      <text:p text:style-name="P2"/>
      <text:list xml:id="list1121660999" text:style-name="L2">
        <text:list-item>
          <text:p text:style-name="P16"><text:span text:style-name="T12">Le protagoniste est un humain lambda vivant dans notre monde, jusqu’au jour où il se retrouve téléporté à Féralande, </text:span><text:span text:style-name="T13">une terre mystérieuse et féérique peuplée de créatures bestiales, bipèdes ou non, douées de conscience et de parole. Ce monde étant en proie à un grave danger, le protagoniste se retrouve mêlé malgré lui aux conspirations de ce monde tout en cherchant continuellement un moyen de rentrer chez lui.</text:span></text:p>
          <text:p text:style-name="P16"><text:span text:style-name="T13"/></text:p>
        </text:list-item>
        <text:list-item>
          <text:p text:style-name="P17"><text:span text:style-name="T13">L</text:span><text:span text:style-name="T11">e protagoniste est un déserteur de l’armée d’un empire humain, un empire expansionniste et belliqueux, l’équivalent de l’empire romain. A l’origine conscrit de force, il profite du chaos d’une bataille perdue d’avance pour s’enfuir dans les terres ennemies, peuplées de créatures férales. Le message de l’histoire serait à propos de coexistence entre humains et féraux, et d’apprendre à dépasser ses peurs et d’affronter le danger pour protéger ceux qu’il aime. </text:span></text:p>
        </text:list-item>
      </text:list>
      <text:p text:style-name="P2"/>
      <text:p text:style-name="P1"/>
      <text:p text:style-name="P4">Idées d’expérience à faire vivre au joueur : </text:p>
      <text:p text:style-name="P4"/>
      <text:p text:style-name="P5"><text:tab/><text:span text:style-name="T2">Similaire à Caverne, </text:span><text:span text:style-name="T7">mais sa</text:span><text:span text:style-name="T14">n</text:span><text:span text:style-name="T7">s le côté horreur ; il s’agit ici plus d’une aventure héroïque et d’exploration d’un monde mystérieux et magique que d’une histoire de survie comme dans Caverne. </text:span><text:span text:style-name="T8">Le ton est plus léger et l’univers est moins oppressant, le but du joueur ici est plus de découvrir les merveilles et la beauté naturelle de ce nouveau monde que de chercher à les fuir comme dans Caverne.</text:span></text:p>
      <text:p text:style-name="P5"/>
      <text:p text:style-name="P6">Fétiches : </text:p>
      <text:p text:style-name="P6"/>
      <text:list xml:id="list3868094916" text:style-name="L3">
        <text:list-item>
          <text:p text:style-name="P11">Teratophilie,</text:p>
        </text:list-item>
        <text:list-item>
          <text:p text:style-name="P11">Zoophilie,</text:p>
        </text:list-item>
        <text:list-item>
          <text:p text:style-name="P12">Filles-monstres <text:span text:style-name="T1">et férrures,</text:span></text:p>
        </text:list-item>
        <text:list-item>
          <text:p text:style-name="P13">Grossesse et naissance <text:span text:style-name="T9">(incluant ponte)</text:span>,</text:p>
        </text:list-item>
      </text:list>
      <text:p text:style-name="P9"/>
      <text:p text:style-name="P3"/>
      <text:p text:style-name="P3">Idées de <text:span text:style-name="T10">points d’intrigue</text:span> : </text:p>
      <text:p text:style-name="P3"/>
      <text:list xml:id="list2353311319" text:style-name="L4">
        <text:list-item>
          <text:p text:style-name="P14">Le PP rencontre une diplomate d’une race alien, elle cherche la cohabitation avec les humains malgré les réticences des deux races. Les deux tomberont amoureux et tenteront de réaliser <text:soft-page-break/>son rêve de coexistence malgré les nombreux obstacles sur leur route. Leur relation inter-espèces sera mal vue par certaines personnes, étant l’un des rares cas dans l’histoire.</text:p>
        </text:list-item>
        <text:list-item>
          <text:p text:style-name="P15">Le PP est enlevé pour un rituel sacrificiel démoniaque, mais parvient à s’enfuir en volant les armes d’une générale ennemie, une ocelot-morphe. Celle-ci le pourchasse à travers une jungle et, malgré les tentatives débrouilardes du PP, parvient à le capturer et le violer, avant de le ramener au temple. Plutôt que de le tuer, elle le garde en tant que jouet sexue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5-01T21:23:10.324000000</dc:date>
    <meta:editing-duration>PT1H18M34S</meta:editing-duration>
    <meta:editing-cycles>47</meta:editing-cycles>
    <meta:generator>LibreOffice/7.3.3.2$Windows_X86_64 LibreOffice_project/d1d0ea68f081ee2800a922cac8f79445e4603348</meta:generator>
    <meta:document-statistic meta:table-count="0" meta:image-count="0" meta:object-count="0" meta:page-count="2" meta:paragraph-count="20" meta:word-count="444" meta:character-count="2668" meta:non-whitespace-character-count="2246"/>
  </office:meta>
</office:document-meta>
</file>