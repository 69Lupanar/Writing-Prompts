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officeooo:rsid="000ec709" officeooo:paragraph-rsid="00322c2b"/>
    </style:style>
    <style:style style:name="P2" style:family="paragraph" style:parent-style-name="Standard">
      <style:paragraph-properties fo:text-align="justify" style:justify-single-word="false"/>
      <style:text-properties style:font-name="Calibri" officeooo:rsid="002dc35b" officeooo:paragraph-rsid="00322c2b"/>
    </style:style>
    <style:style style:name="P3" style:family="paragraph" style:parent-style-name="Standard" style:list-style-name="L1">
      <style:paragraph-properties fo:text-align="justify" style:justify-single-word="false"/>
      <style:text-properties officeooo:rsid="0035b986" officeooo:paragraph-rsid="003c9dea"/>
    </style:style>
    <style:style style:name="P4" style:family="paragraph" style:parent-style-name="Standard" style:list-style-name="L1">
      <style:paragraph-properties fo:text-align="justify" style:justify-single-word="false"/>
      <style:text-properties style:font-name="Calibri" officeooo:rsid="0039a752" officeooo:paragraph-rsid="003c9dea"/>
    </style:style>
    <style:style style:name="P5" style:family="paragraph" style:parent-style-name="Standard" style:list-style-name="L1">
      <style:paragraph-properties fo:text-align="justify" style:justify-single-word="false"/>
      <style:text-properties style:font-name="Calibri" officeooo:rsid="003c9dea" officeooo:paragraph-rsid="003c9dea"/>
    </style:style>
    <style:style style:name="P6" style:family="paragraph" style:parent-style-name="Standard" style:list-style-name="L1">
      <style:paragraph-properties fo:text-align="justify" style:justify-single-word="false"/>
      <style:text-properties officeooo:rsid="003dc22c" officeooo:paragraph-rsid="003dc22c"/>
    </style:style>
    <style:style style:name="P7" style:family="paragraph" style:parent-style-name="Standard" style:list-style-name="L1">
      <style:paragraph-properties fo:text-align="justify" style:justify-single-word="false"/>
      <style:text-properties style:font-name="Calibri" officeooo:rsid="00416a66" officeooo:paragraph-rsid="003dc22c"/>
    </style:style>
    <style:style style:name="P8" style:family="paragraph" style:parent-style-name="Standard" style:list-style-name="L1">
      <style:paragraph-properties fo:text-align="justify" style:justify-single-word="false"/>
      <style:text-properties officeooo:rsid="0041d10c" officeooo:paragraph-rsid="0041d10c"/>
    </style:style>
    <style:style style:name="P9" style:family="paragraph" style:parent-style-name="Standard">
      <style:paragraph-properties fo:text-align="justify" style:justify-single-word="false"/>
      <style:text-properties style:font-name="Calibri" officeooo:rsid="0011786f" officeooo:paragraph-rsid="00322c2b"/>
    </style:style>
    <style:style style:name="P10" style:family="paragraph" style:parent-style-name="Standard">
      <style:paragraph-properties fo:text-align="justify" style:justify-single-word="false"/>
      <style:text-properties style:font-name="Calibri" officeooo:rsid="001eb2d0" officeooo:paragraph-rsid="00173cac"/>
    </style:style>
    <style:style style:name="P11" style:family="paragraph" style:parent-style-name="Standard">
      <style:paragraph-properties fo:text-align="justify" style:justify-single-word="false"/>
      <style:text-properties style:font-name="Calibri" officeooo:rsid="000ec709" officeooo:paragraph-rsid="0033929f"/>
    </style:style>
    <style:style style:name="T1" style:family="text">
      <style:text-properties style:font-name="Calibri" officeooo:rsid="002dc35b"/>
    </style:style>
    <style:style style:name="T2" style:family="text">
      <style:text-properties style:font-name="Calibri"/>
    </style:style>
    <style:style style:name="T3" style:family="text">
      <style:text-properties style:font-name="Calibri" officeooo:rsid="0038880c"/>
    </style:style>
    <style:style style:name="T4" style:family="text">
      <style:text-properties style:font-name="Calibri" officeooo:rsid="0042b0ec"/>
    </style:style>
    <style:style style:name="T5" style:family="text">
      <style:text-properties style:font-name="Calibri" officeooo:rsid="0038dac8"/>
    </style:style>
    <style:style style:name="T6" style:family="text">
      <style:text-properties style:font-name="Calibri" officeooo:rsid="00395b87"/>
    </style:style>
    <style:style style:name="T7" style:family="text">
      <style:text-properties style:font-name="Calibri" officeooo:rsid="0039a752"/>
    </style:style>
    <style:style style:name="T8" style:family="text">
      <style:text-properties style:font-name="Calibri" officeooo:rsid="003aece0"/>
    </style:style>
    <style:style style:name="T9" style:family="text">
      <style:text-properties style:font-name="Calibri" officeooo:rsid="003c9dea"/>
    </style:style>
    <style:style style:name="T10" style:family="text">
      <style:text-properties style:font-name="Calibri" officeooo:rsid="003f712c"/>
    </style:style>
    <style:style style:name="T11" style:family="text">
      <style:text-properties style:font-name="Calibri" officeooo:rsid="00416a66"/>
    </style:style>
    <style:style style:name="T12" style:family="text">
      <style:text-properties style:font-name="Calibri" officeooo:rsid="004302cc"/>
    </style:style>
    <style:style style:name="T13" style:family="text">
      <style:text-properties officeooo:rsid="00322c2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de scénario : </text:p>
      <text:p text:style-name="P2"/>
      <text:list text:style-name="L1">
        <text:list-item>
          <text:p text:style-name="P3"><text:span text:style-name="T1">L</text:span><text:span text:style-name="T2">e protagoniste est un déserteur de l’armée </text:span><text:span text:style-name="T3">de l’empire </text:span><text:span text:style-name="T4">E</text:span><text:span text:style-name="T3">, un empire venant des steppes du Nord et analogue de l’empire Romain, </text:span><text:span text:style-name="T5">belliqueux et </text:span><text:span text:style-name="T6">expansionniste</text:span><text:span text:style-name="T5">, cherchant à étendre son influence sur le reste du continent, </text:span><text:span text:style-name="T7">notamment les états voisins A, B et C. A est un état-marchand neutre dirigé par une union entre humains et une race C, B est une coalition de tribus d’hommes-bêtes guerriers, et C est un état bourgeonnant de la race C sorti d’une guerre civile ayant fragilisé leur pouvoir, cherchant à établir la paix et la coexistence avec la nation A. </text:span></text:p>
          <text:p text:style-name="P4"/>
        </text:list-item>
        <text:list-item>
          <text:p text:style-name="P3"><text:span text:style-name="T8">Si la nation A, par des alliances stratégiques et une armée efficace, a pu repousser les assauts de l’empire, la coalition B perd de plus en plus de terrain et menace de se désagréger dû aux assauts de l’empire et aux dissensions internes. </text:span><text:span text:style-name="T9">La nation C sort d’une guerre civile opposant les traditionalistes, opposant toute influence humaine sur leur peuple, et le pouvoir gouvernant, cherchant la coexistence avec les humains, voire à éviter la guerre avec tous les peuples du continent si possible.</text:span></text:p>
          <text:p text:style-name="P5"><text:s/></text:p>
        </text:list-item>
        <text:list-item>
          <text:p text:style-name="P6"><text:span text:style-name="T9">L</text:span><text:span text:style-name="T2">e protagoniste, cherchant avant tout à se faire oublier de peur de rencontrer des humains le reconnaissant comme un déserteur, est par un jeu de circonstances employé chez la nation A, d’abord comme simple caravanier chargé du bon transport de biens et de gens, puis comme </text:span><text:span text:style-name="T10">garde du corps pour des personnalités importantes, notamment d’autres espèces. Si le PP rechigne à faire ce genre de travail, lui qui a tout fait pour éviter le conflit, il mène cependant excellemment son travail, et son zèle attire l’attention de son maître, qui l’assigne comme diplomate pour aider l’établissement de liens avec la nation C. </text:span><text:span text:style-name="T11">Le PP, sceptique des idéaux de son supérieur, accepte malgré tout son rôle, et attire l’oeil de C’, une des matriarches de la nation férale, </text:span><text:span text:style-name="T12">et une idéaliste suivant les pas de ses parents vers la coexistence inter-espèces</text:span><text:span text:style-name="T11">. Les deux développeront des sentiments, qui seront mis comme leur projet de coexistence à l’épreuve de la guerre, de la politique et des préjugés de la population.</text:span></text:p>
          <text:p text:style-name="P7"><text:s/></text:p>
        </text:list-item>
        <text:list-item>
          <text:p text:style-name="P8"><text:span text:style-name="T11">P</text:span><text:span text:style-name="T2">our arriver à son but, le PP devra travailler avec des membres de différentes races, chacun avec leurs propres passé et motivations, et leur propre vision de la coexistence inter-espèces.</text:span></text:p>
        </text:list-item>
      </text:list>
      <text:p text:style-name="P9"/>
      <text:p text:style-name="P10"/>
      <text:p text:style-name="P11"/>
      <text:p text:style-name="P11">Idées de <text:span text:style-name="T13">points d’intrigue</text:span> :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1-12T14:37:26.400060900</dc:date>
    <meta:editing-duration>PT5H56M34S</meta:editing-duration>
    <meta:editing-cycles>62</meta:editing-cycles>
    <meta:generator>LibreOffice/25.2.4.3$Windows_X86_64 LibreOffice_project/33e196637044ead23f5c3226cde09b47731f7e27</meta:generator>
    <meta:document-statistic meta:table-count="0" meta:image-count="0" meta:object-count="0" meta:page-count="1" meta:paragraph-count="9" meta:word-count="392" meta:character-count="2306" meta:non-whitespace-character-count="1922"/>
  </office:meta>
</office:document-meta>
</file>