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language="en" fo:country="US" officeooo:rsid="000ec709" officeooo:paragraph-rsid="000ec709"/>
    </style:style>
    <style:style style:name="P2" style:family="paragraph" style:parent-style-name="Standard">
      <style:paragraph-properties fo:text-align="justify" style:justify-single-word="false"/>
      <style:text-properties style:font-name="Calibri" fo:language="en" fo:country="US" officeooo:rsid="000ec709" officeooo:paragraph-rsid="0036ed36"/>
    </style:style>
    <style:style style:name="P3" style:family="paragraph" style:parent-style-name="Standard">
      <style:paragraph-properties fo:text-align="justify" style:justify-single-word="false"/>
      <style:text-properties style:font-name="Calibri" fo:language="en" fo:country="US" officeooo:rsid="002708bf" officeooo:paragraph-rsid="002708bf"/>
    </style:style>
    <style:style style:name="P4" style:family="paragraph" style:parent-style-name="Standard">
      <style:paragraph-properties fo:text-align="justify" style:justify-single-word="false"/>
      <style:text-properties style:font-name="Calibri" fo:language="en" fo:country="US" officeooo:rsid="0039d302" officeooo:paragraph-rsid="0039d302"/>
    </style:style>
    <style:style style:name="P5" style:family="paragraph" style:parent-style-name="Standard">
      <style:paragraph-properties fo:text-align="justify" style:justify-single-word="false"/>
      <style:text-properties style:font-name="Calibri" fo:language="en" fo:country="US" officeooo:rsid="002708bf" officeooo:paragraph-rsid="0039d302"/>
    </style:style>
    <style:style style:name="P6" style:family="paragraph" style:parent-style-name="Standard">
      <style:paragraph-properties fo:text-align="justify" style:justify-single-word="false"/>
      <style:text-properties style:font-name="Calibri" fo:language="en" fo:country="US" officeooo:rsid="002708bf" officeooo:paragraph-rsid="00303019"/>
    </style:style>
    <style:style style:name="P7" style:family="paragraph" style:parent-style-name="Standard">
      <style:paragraph-properties fo:text-align="justify" style:justify-single-word="false"/>
      <style:text-properties style:font-name="Calibri" fo:language="en" fo:country="US" officeooo:rsid="0039d302" officeooo:paragraph-rsid="0011786f"/>
    </style:style>
    <style:style style:name="P8" style:family="paragraph" style:parent-style-name="Standard">
      <style:paragraph-properties fo:text-align="justify" style:justify-single-word="false"/>
      <style:text-properties style:font-name="Calibri" fo:language="en" fo:country="US" officeooo:rsid="0011786f" officeooo:paragraph-rsid="0011786f"/>
    </style:style>
    <style:style style:name="P9" style:family="paragraph" style:parent-style-name="Text_20_body">
      <style:paragraph-properties fo:text-align="justify" style:justify-single-word="false"/>
      <style:text-properties style:font-name="Calibri" fo:language="en" fo:country="US" officeooo:rsid="001a3e44" officeooo:paragraph-rsid="00173cac"/>
    </style:style>
    <style:style style:name="P10" style:family="paragraph" style:parent-style-name="Text_20_body">
      <style:paragraph-properties fo:text-align="justify" style:justify-single-word="false"/>
      <style:text-properties style:font-name="Calibri" fo:language="en" fo:country="US" officeooo:rsid="001a3e44"/>
    </style:style>
    <style:style style:name="T1" style:family="text">
      <style:text-properties officeooo:rsid="0036ed36"/>
    </style:style>
    <style:style style:name="T2" style:family="text">
      <style:text-properties officeooo:rsid="000f0202"/>
    </style:style>
    <style:style style:name="T3" style:family="text">
      <style:text-properties style:text-underline-style="none" officeooo:rsid="0036ed36"/>
    </style:style>
    <style:style style:name="T4" style:family="text">
      <style:text-properties officeooo:rsid="0039d302"/>
    </style:style>
    <style:style style:name="T5" style:family="text">
      <style:text-properties officeooo:rsid="003b33f5"/>
    </style:style>
    <style:style style:name="T6" style:family="text">
      <style:text-properties officeooo:rsid="002dcf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pan text:style-name="T1">Scenario ideas</text:span> : </text:p>
      <text:p text:style-name="P1"/>
      <text:p text:style-name="P1"><text:tab/><text:span text:style-name="T1">The protagonist is a geologist</text:span> <text:span text:style-name="T1">traveling to an isolate region of the world to study a strange cavern formation,</text:span> <text:span text:style-name="T1">appearing shortly after</text:span> <text:span text:style-name="T1">the reording of a recent earthquake</text:span>. <text:span text:style-name="T1">Of</text:span> magnitude 7.8, <text:span text:style-name="T1">unusual in this region of the globe</text:span>, <text:span text:style-name="T1">the researcher was worried</text:span> <text:span text:style-name="T1">of the possible emergence</text:span> <text:span text:style-name="T1">of a volcanic activity</text:span> <text:span text:style-name="T1">that could put the local population in danger</text:span>.</text:p>
      <text:p text:style-name="P1"/>
      <text:p text:style-name="P2"><text:tab/><text:span text:style-name="T1">During his descent of the cavern</text:span><text:span text:style-name="T2">, </text:span><text:span text:style-name="T1">the wall onto which latched his harness collapses</text:span><text:span text:style-name="T2">, </text:span><text:span text:style-name="T3">the security ropes supposed to hold him break</text:span><text:span text:style-name="T2">, </text:span><text:span text:style-name="T1">making him freefall at the bottom of a ravine</text:span><text:span text:style-name="T2">. </text:span><text:span text:style-name="T1">He only owes his survival to a</text:span><text:span text:style-name="T2"> torrent </text:span><text:span text:style-name="T1">at the bottom of the cavern</text:span><text:span text:style-name="T2"> </text:span><text:span text:style-name="T1">cushioning his fall</text:span><text:span text:style-name="T2">, </text:span><text:span text:style-name="T1">but making him dive deeper in the underground tunnels</text:span><text:span text:style-name="T2">. Nearly drowning, he loses consciousness.</text:span></text:p>
      <text:p text:style-name="P1"/>
      <text:p text:style-name="P2"><text:tab/>He wakes up a few hours later at the edge of <text:span text:style-name="T1">a</text:span> river, <text:span text:style-name="T1">right next to a strange village populated by ‘hermatropes’, a strange subterranean species descending from ancient dinosaurs; he then quickly realises he just discovered a complete ecosystem living right under the earth crust.</text:span></text:p>
      <text:p text:style-name="P2"/>
      <text:p text:style-name="P2"><text:span text:style-name="T1"><text:tab/>H</text:span>is bag of supplies <text:span text:style-name="T1">is</text:span> the only thing he has left from the accident. Without his climbing gear, it's impossible to get back to where he came from, and his phone and walkie-talkie aren't picking up any signals from his colleagues. He'll have to go deeper into this network of caves in the hope of finding a way back to the surface. But as he ventures into the bowels of the Earth and discovers its secrets, it turns out that he is not the only wandering soul, and that what he thought were animals turn out to be much more dangerous... and lustful.</text:p>
      <text:p text:style-name="P1"/>
      <text:p text:style-name="P3"><text:tab/>During his journey, he will meet C<text:span text:style-name="T1">e</text:span>liope, a female hermatrope living in <text:span text:style-name="T1">that same</text:span> underground village that has existed since immemorial <text:span text:style-name="T1">times</text:span>. Tired of life in her village, she wants to spread her wings and discover what the rest of the Cavern has to offer, and dreams of one day seeing the starry sky above the surface that she has heard so much about. Seeing in the protagonist an opportunity to see the world, she agrees to help him return to the surface and accompanies him on his adventures.</text:p>
      <text:p text:style-name="P3"/>
      <text:p text:style-name="P3"><text:tab/>The protagonist will also discover that he is not the only human to have discovered this underground world, finding traces of various explorers separated by decades or even centuries who recounted their discoveries about the Cavern and its origins. He will learn that the strange phenomena of the Cavern originate from an energy source buried even deeper within the Earth, but that all attempts by these explorers to reach it, or to return to the surface, have ended in failure, most of them apparently stopped by someone determined to prevent them from recounting their adventures on the surface. The few survivors were probably killed by predators or a cave-in, and the lucky few who made it back to the surface were probably taken for madmen and locked up or executed for heresy, depending on the century.</text:p>
      <text:p text:style-name="P3"/>
      <text:p text:style-name="P4">The reason for all the weird events going on:</text:p>
      <text:p text:style-name="P3"/>
      <text:p text:style-name="P5"><text:tab/>The protagonist will have multiple encounters with members of an occult cult called the Guardians of Sibylline, creatures seeking to block his path to the surface and the depths of the cave. They are responsible for the deaths of the most recent explorers, whose notes the protagonist will have found, for reasons that are still unknown.</text:p>
      <text:p text:style-name="P3"/>
      <text:p text:style-name="P6"><text:tab/>He eventually meets their leader, Çira, an elderly exiled <text:span text:style-name="T4">h</text:span>ermatrop<text:span text:style-name="T4">e</text:span> who, thirsty for <text:soft-page-break/>power, had once attempted to rally all the <text:span text:style-name="T4">h</text:span>ermatrop<text:span text:style-name="T4">e</text:span> villages under her banner, using their fear of the surface to manipulate them. Although this fear is still ingrained in the inhabitants, they drove her out of their villages, leading her to seek refuge deeper and deeper into the Cavern, until one day she found the source of the cavern's mystical power: The Sibylline (<text:span text:style-name="T5">from the latin ‘sybillinus’, </text:span>meaning ‘<text:span text:style-name="T4">unexplainable’</text:span>). </text:p>
      <text:p text:style-name="P6"/>
      <text:p text:style-name="P6"><text:span text:style-name="T6"><text:tab/></text:span>The latter is a huge alien organism that crashed into Earth 65 million years ago, causing the extinction of the dinosaurs. Although it recovered from the cataclysm, it remains weakened and can no longer leave Earth. Over millions of years, its essence has distilled in the depths of the Cavern, giving it and its inhabitants strange and unexplained properties, such as the protagonist's strange dreams in which a creature seems to speak to him through his thoughts; the strange shapes of certain creatures; and the presence of a sunless sky above the <text:span text:style-name="T4">h</text:span>ermatropian villages.</text:p>
      <text:p text:style-name="P6"/>
      <text:p text:style-name="P6"><text:tab/> Çira has since become the guardian of the Sibylline, with her minions watching over him and ensuring that no one else appropriates his power. Even though her thirst for conquest has subsided, Çira remains suspicious of the protagonist and the surface, fearing that humans will arrive en masse and seek to capture or kill the Sibylline, as well as the hermatropes and other inhabitants of the Cave. That is why she seeks to kill him and feed him to the Sibylline.</text:p>
      <text:p text:style-name="P6"/>
      <text:p text:style-name="P4">The ending:</text:p>
      <text:p text:style-name="P6"/>
      <text:p text:style-name="P6"><text:tab/>The protagonist and C<text:span text:style-name="T4">e</text:span>liope manage to leave the Cave after killing Çira, and the protagonist, wanting to keep this magical place a secret, decides to live with C<text:span text:style-name="T4">e</text:span>liope in her village in the Cave; but not before showing her the starry sky she had dreamed of so much.</text:p>
      <text:p text:style-name="P6"/>
      <text:p text:style-name="P1"/>
      <text:p text:style-name="P7">The desired experience:</text:p>
      <text:p text:style-name="P8"/>
      <text:p text:style-name="P9"><text:tab/>The game aims to be a mix between Teraurge and a horror game: The experience is intended to be more contemplative, an adventure where the player explores and discovers a mystical world that is completely foreign to what they have known, without neglecting the feeling of constant danger, reminding them that every decision is a risk and that death can await them around every corner. </text:p>
      <text:p text:style-name="P10"><text:tab/>The protagonist discovers new plants, animals, and geological formations that challenge their scientific knowledge of nature and the formation of their world. As they interact with the inhabitants of the depths, they discover new cultures and different ways of thinking and seeing the world, particularly these civilizations' relationship with the surface. some of whom have never seen or heard of the sky, while others seek to avoid contact with the surface at all costs.</text:p>
      <text:p text:style-name="P10"><text:tab/>The game also constantly reminds the player that even in safe places, they are not immune to accidents or ambushes, seeking to arouse primal fears that echo our defensive reactions inherited from our ancestors since the dawn of time: fear of the dark, the unknown, claustrophobia, megalophobia, paranoia, fear of drowning, et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08T10:27:28.650247900</dc:date>
    <meta:editing-duration>PT2H25M48S</meta:editing-duration>
    <meta:editing-cycles>46</meta:editing-cycles>
    <meta:generator>LibreOffice/25.2.4.3$Windows_X86_64 LibreOffice_project/33e196637044ead23f5c3226cde09b47731f7e27</meta:generator>
    <meta:document-statistic meta:table-count="0" meta:image-count="0" meta:object-count="0" meta:page-count="2" meta:paragraph-count="18" meta:word-count="1063" meta:character-count="6288" meta:non-whitespace-character-count="5225"/>
  </office:meta>
</office:document-meta>
</file>