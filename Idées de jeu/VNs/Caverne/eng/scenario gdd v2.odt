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Gras" style:font-family-generic="swiss" style:font-pitch="variable"/>
    <style:font-face style:name="Calibri2" svg:font-family="Calibri" style:font-adornments="Italique" style:font-family-generic="swiss" style:font-pitch="variable"/>
    <style:font-face style:name="Calibri3" svg:font-family="Calibri" style:font-adornments="Italique 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18e1f1" officeooo:paragraph-rsid="0018e1f1"/>
    </style:style>
    <style:style style:name="P2" style:family="paragraph" style:parent-style-name="Standard">
      <style:text-properties officeooo:rsid="00106f63" officeooo:paragraph-rsid="00106f63"/>
    </style:style>
    <style:style style:name="P3" style:family="paragraph" style:parent-style-name="Subtitle">
      <style:text-properties officeooo:rsid="0018e1f1" officeooo:paragraph-rsid="0018e1f1"/>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Contents_20_4">
      <style:paragraph-properties>
        <style:tab-stops>
          <style:tab-stop style:position="15.499cm" style:type="right" style:leader-style="dotted" style:leader-text="."/>
        </style:tab-stops>
      </style:paragraph-properties>
    </style:style>
    <style:style style:name="P8" style:family="paragraph" style:parent-style-name="Heading_20_1">
      <style:text-properties officeooo:rsid="0018e1f1" officeooo:paragraph-rsid="0018e1f1"/>
    </style:style>
    <style:style style:name="P9" style:family="paragraph" style:parent-style-name="Standard">
      <style:text-properties officeooo:rsid="00106f63" officeooo:paragraph-rsid="0018e1f1"/>
    </style:style>
    <style:style style:name="P10" style:family="paragraph" style:parent-style-name="Text_20_body">
      <style:paragraph-properties fo:text-align="justify" style:justify-single-word="false"/>
      <style:text-properties style:font-name="Calibri4" fo:language="en" fo:country="US" officeooo:rsid="005fb3af" officeooo:paragraph-rsid="00641a5f"/>
    </style:style>
    <style:style style:name="P11" style:family="paragraph" style:parent-style-name="Text_20_body">
      <style:paragraph-properties fo:line-height="100%"/>
      <style:text-properties officeooo:rsid="00106f63"/>
    </style:style>
    <style:style style:name="P12" style:family="paragraph" style:parent-style-name="Text_20_body">
      <style:text-properties officeooo:rsid="007de864" officeooo:paragraph-rsid="007de864"/>
    </style:style>
    <style:style style:name="P13" style:family="paragraph" style:parent-style-name="Text_20_body">
      <style:text-properties officeooo:rsid="0024ed52" officeooo:paragraph-rsid="0024ed52"/>
    </style:style>
    <style:style style:name="P14" style:family="paragraph" style:parent-style-name="Heading_20_2">
      <style:text-properties officeooo:rsid="0018e1f1" officeooo:paragraph-rsid="0018e1f1"/>
    </style:style>
    <style:style style:name="P15" style:family="paragraph" style:parent-style-name="Text_20_body">
      <style:paragraph-properties fo:text-align="justify" style:justify-single-word="false"/>
      <style:text-properties style:font-name="Calibri4" fo:language="en" fo:country="US" officeooo:rsid="005fb3af" officeooo:paragraph-rsid="0081b3c3"/>
    </style:style>
    <style:style style:name="P16" style:family="paragraph" style:parent-style-name="Text_20_body">
      <style:paragraph-properties fo:text-align="justify" style:justify-single-word="false"/>
      <style:text-properties style:font-name="Calibri4" fo:font-size="13pt" officeooo:rsid="002762e1" officeooo:paragraph-rsid="00214c40"/>
    </style:style>
    <style:style style:name="P17" style:family="paragraph" style:parent-style-name="Standard">
      <style:paragraph-properties fo:text-align="justify" style:justify-single-word="false"/>
      <style:text-properties style:font-name="Calibri" fo:language="en" fo:country="US" officeooo:rsid="002708bf" officeooo:paragraph-rsid="0028f01b"/>
    </style:style>
    <style:style style:name="P18" style:family="paragraph" style:parent-style-name="Standard">
      <style:text-properties officeooo:paragraph-rsid="0018e1f1"/>
    </style:style>
    <style:style style:name="P19" style:family="paragraph" style:parent-style-name="Text_20_body">
      <style:text-properties style:font-name="Calibri4" fo:language="en" fo:country="US" officeooo:rsid="007b7582" officeooo:paragraph-rsid="00414715"/>
    </style:style>
    <style:style style:name="T1" style:family="text">
      <style:text-properties fo:language="en" fo:country="US"/>
    </style:style>
    <style:style style:name="T2" style:family="text">
      <style:text-properties fo:language="en" fo:country="US" officeooo:rsid="007de864"/>
    </style:style>
    <style:style style:name="T3" style:family="text">
      <style:text-properties officeooo:rsid="008111cb"/>
    </style:style>
    <style:style style:name="T4" style:family="text">
      <style:text-properties officeooo:rsid="008394e4"/>
    </style:style>
    <style:style style:name="T5"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verns</text:p>
      <text:p text:style-name="P2"/>
      <text:p text:style-name="P3">Scenario &amp; story structur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The hook<text:tab/>2</text:a></text:p>
          <text:p text:style-name="P4"><text:a xlink:type="simple" xlink:href="#__RefHeading___Toc715_353095010%20Copie%201" text:style-name="Index_20_Link" text:visited-style-name="Index_20_Link">The intended experience<text:tab/>2</text:a></text:p>
          <text:p text:style-name="P4"><text:a xlink:type="simple" xlink:href="#__RefHeading___Toc715_353095010%20Copie%201%20Copie%201" text:style-name="Index_20_Link" text:visited-style-name="Index_20_Link">The structure of the story<text:tab/>3</text:a></text:p>
          <text:p text:style-name="P5"><text:a xlink:type="simple" xlink:href="#__RefHeading___Toc717_353095010" text:style-name="Index_20_Link" text:visited-style-name="Index_20_Link">Summary of the story<text:tab/>4</text:a></text:p>
          <text:p text:style-name="P5"><text:a xlink:type="simple" xlink:href="#__RefHeading___Toc717_353095010%20Copie%201" text:style-name="Index_20_Link" text:visited-style-name="Index_20_Link">The source of all inexplicable events<text:tab/>5</text:a></text:p>
          <text:p text:style-name="P5"><text:a xlink:type="simple" xlink:href="#__RefHeading___Toc717_353095010%20Copie%202" text:style-name="Index_20_Link" text:visited-style-name="Index_20_Link">The ending<text:tab/>5</text:a></text:p>
          <text:p text:style-name="P4"><text:a xlink:type="simple" xlink:href="#__RefHeading___Toc715_353095010%20Copie%201%20Copie%201%20Copie%201" text:style-name="Index_20_Link" text:visited-style-name="Index_20_Link">The story (full details)<text:tab/>6</text:a></text:p>
          <text:p text:style-name="P5"><text:a xlink:type="simple" xlink:href="#__RefHeading___Toc717_353095010%20Copie%201%20Copie%201" text:style-name="Index_20_Link" text:visited-style-name="Index_20_Link">Intro<text:tab/>7</text:a></text:p>
          <text:p text:style-name="P5"><text:a xlink:type="simple" xlink:href="#__RefHeading___Toc717_353095010%20Copie%201%20Copie%201%20Copie%201" text:style-name="Index_20_Link" text:visited-style-name="Index_20_Link">Chapter 1<text:tab/>7</text:a></text:p>
          <text:p text:style-name="P6"><text:a xlink:type="simple" xlink:href="#__RefHeading___Toc719_353095010" text:style-name="Index_20_Link" text:visited-style-name="Index_20_Link">The area<text:tab/>7</text:a></text:p>
          <text:p text:style-name="P7"><text:a xlink:type="simple" xlink:href="#__RefHeading___Toc721_353095010%20Copie%201%20Copie%201" text:style-name="Index_20_Link" text:visited-style-name="Index_20_Link">The Village<text:tab/>8</text:a></text:p>
          <text:p text:style-name="P6"><text:a xlink:type="simple" xlink:href="#__RefHeading___Toc719_353095010%20Copie%201" text:style-name="Index_20_Link" text:visited-style-name="Index_20_Link">Quests &amp; objectives<text:tab/>8</text:a></text:p>
          <text:p text:style-name="P7"><text:a xlink:type="simple" xlink:href="#__RefHeading___Toc721_353095010%20Copie%201" text:style-name="Index_20_Link" text:visited-style-name="Index_20_Link">The main quest<text:tab/>9</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8" text:outline-level="1"><text:bookmark-start text:name="__RefHeading___Toc715_353095010"/><text:soft-page-break/>The hook<text:bookmark-end text:name="__RefHeading___Toc715_353095010"/></text:h>
      <text:p text:style-name="P9"/>
      <text:p text:style-name="P10"><text:tab/>The protagonist is a speleologist who has come to study a strange cave formation. During his descent, he falls to the bottom of a ravine, only owing his survival to a torrent that cushioned his fall.</text:p>
      <text:p text:style-name="P10"/>
      <text:p text:style-name="P10"><text:tab/>He wakes up a few hours later at the edge of a riverbed, his bag of supplies being the only possession that had survived the accident. He must then venture deeper into this network of caves in the hope of finding a way back to the surface. But as he explores the bowels of the Earth and discovers its secrets, it turns out that he is not the only wandering soul, and that what he thought were animals turn out to be much more dangerous... and lustful.</text:p>
      <text:p text:style-name="P11"/>
      <text:p text:style-name="P11"/>
      <text:h text:style-name="P8" text:outline-level="1"><text:bookmark-start text:name="__RefHeading___Toc715_353095010 Copie 1"/>The <text:span text:style-name="T1">intended</text:span> experience<text:bookmark-end text:name="__RefHeading___Toc715_353095010 Copie 1"/></text:h>
      <text:p text:style-name="P9"/>
      <text:p text:style-name="P10"><text:tab/>The experience is intended to be more contemplative than active, with a focus on story more than gameplay so as not to have the player’s progression blocked by a difficulty curve. This also allows for an adventure where the player explores and discovers a mystical, alien world that is completely foreign to what they have known, without neglecting the feeling of constant danger, reminding them that every decision is a risk and that death can await them around every corner. </text:p>
      <text:p text:style-name="P10"/>
      <text:p text:style-name="P10"><text:tab/>Atmosphere-wise, the game takes inspiration from Teraurge and Corruption of Champions: The protagonist discovers new plants, animals, and geological formations that challenge their scientific knowledge of nature and the formation of their world. As they interact with the inhabitants of the depths, they discover new cultures and different ways of thinking and seeing the world, particularly these civilizations' relationship with the surface. some of whom have never seen or heard of the sky, while others seek to avoid contact with the surface at all costs.</text:p>
      <text:p text:style-name="P10"/>
      <text:p text:style-name="P10"><text:tab/>The game also takes some design elements from the horror genre, constantly reminding the player that even in safe places, they are not immune to accidents or ambushes, seeking to arouse primal fears that echo our defensive reactions inherited from our ancestors since the dawn of time: fear of the dark, the unknown, claustrophobia, megalophobia, paranoia, fear of drowning, etc.</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 text:outline-level="1"><text:bookmark-start text:name="__RefHeading___Toc715_353095010 Copie 1 Copie 1"/><text:soft-page-break/>The <text:span text:style-name="T2">main gameplay loop</text:span><text:bookmark-end text:name="__RefHeading___Toc715_353095010 Copie 1 Copie 1"/></text:h>
      <text:p text:style-name="P12"/>
      <text:p text:style-name="P12">[TODO<text:span text:style-name="T3">]</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4" text:outline-level="2"><text:bookmark-start text:name="__RefHeading___Toc717_353095010"/><text:soft-page-break/>Summary of the story<text:bookmark-end text:name="__RefHeading___Toc717_353095010"/></text:h>
      <text:p text:style-name="P9"/>
      <text:p text:style-name="P10"><text:tab/>The protagonist is a geologist traveling to an isolate region of the world to study a strange cavern formation, appearing shortly after the recording of a recent earthquake. Of magnitude 7.8, unusual in this region of the globe, the researcher was worried of the possible emergence of a volcanic activity that could put the local population in danger.</text:p>
      <text:p text:style-name="P10"/>
      <text:p text:style-name="P10"><text:tab/>During his descent of the cavern, the wall onto which latched his harness collapses, the security ropes supposed to hold him break, making him freefall at the bottom of a ravine. He only owes his survival to a torrent at the bottom of the cavern cushioning his fall, but making him dive deeper in the underground tunnels. Nearly drowning, he loses consciousness.</text:p>
      <text:p text:style-name="P10"/>
      <text:p text:style-name="P10"><text:tab/>He wakes up a few hours later at the edge of a river, <text:span text:style-name="T3">h</text:span>is bag of supplies <text:span text:style-name="T3">being</text:span> the only thing he has left from the accident. Without his climbing gear, it's impossible to get back to where he came from, and his phone and walkie-talkie aren't picking up any signals from his colleagues. He'll have to go deeper into this network of caves in the hope of finding a way back to the surface. But as he ventures into the bowels of the Earth and discovers its secrets, it turns out that he is not the only wandering soul, and that what he thought were animals turn out to be much more dangerous... and lustful.</text:p>
      <text:p text:style-name="P10"/>
      <text:p text:style-name="P15"><text:tab/>During his journey, he then quickly realises he just discovered a complete ecosystem living right underneath the earth crust that has existed since immemorial times, filled with strange plants and creatures. <text:span text:style-name="T3">He</text:span> will also discover that he is not the only human to have discovered this underground world, finding traces of various explorers separated by decades or even centuries who recounted their discoveries about the Cavern and its origins, <text:span text:style-name="T3">as well as many inhabitants who can somewhat speak his language, having learned from previous adventurers like him</text:span>.</text:p>
      <text:p text:style-name="P15"/>
      <text:p text:style-name="P15"><text:tab/>He will learn that the strange phenomena of the Cavern originate from an energy source buried even deeper within the Earth, but that all attempts by these explorers to reach it, or to return to the surface, have ended in failure, most of them apparently stopped by someone determined to prevent them from recounting their adventures on the surface. The few survivors were probably killed by predators or a cave-in, and the lucky few who made it back to the surface were probably taken for madmen and locked up or executed for heresy, depending on the century.</text:p>
      <text:p text:style-name="P16"/>
      <text:p text:style-name="P16"/>
      <text:p text:style-name="P16"/>
      <text:p text:style-name="P16"/>
      <text:p text:style-name="P16"/>
      <text:p text:style-name="P16"/>
      <text:p text:style-name="P16"/>
      <text:p text:style-name="P16"/>
      <text:h text:style-name="P14" text:outline-level="2"><text:bookmark-start text:name="__RefHeading___Toc717_353095010 Copie 1"/><text:soft-page-break/>The source of all inexplicable events<text:bookmark-end text:name="__RefHeading___Toc717_353095010 Copie 1"/></text:h>
      <text:p text:style-name="P9"/>
      <text:p text:style-name="P10"><text:tab/>The protagonist will have multiple encounters with members of an occult group called the Guardians of the Sibylline, creatures seeking to block his path to the surface and the depths of the cave. They are responsible for the deaths of the most recent explorers, whose notes the protagonist will have found, for reasons that are still unknown.</text:p>
      <text:p text:style-name="P10"/>
      <text:p text:style-name="P10"><text:tab/>He eventually meets their leader, Çira, an elderly exiled hermatrope who, thirsty for power, had once attempted to rally all the hermatrope villages under her banner, using their fear of the surface to manipulate them. Although this fear is still ingrained in the inhabitants, they drove her out of their villages, leading her to seek refuge deeper and deeper into the Cavern, until one day she found the source of the cavern's mystical power: The Sibylline (from the latin ‘sybillinus’, meaning ‘unexplainable’). </text:p>
      <text:p text:style-name="P10"/>
      <text:p text:style-name="P10"><text:tab/>The latter is a huge alien organism that crashed into Earth 65 million years ago, causing the extinction of the dinosaurs. Although it survived the cataclysm, it remains weakened and can no longer leave Earth. Over millions of years, as sediments and layers of rock and magma have buried its body, its essence has distilled in the depths of the Cavern, giving it and its inhabitants strange and unexplained properties, such as the protagonist's ability to talk with the hermatropes despite the difference of language; the strange shapes of certain creatures; and the presence of a sunless sky above the hermatropian villages.</text:p>
      <text:p text:style-name="P10"/>
      <text:p text:style-name="P10"><text:tab/> Çira has since become the guardian of the Sibylline, with her minions watching over him and ensuring that no one else appropriates his power. Even though her thirst for conquest has subsided, Çira remains suspicious of the protagonist and the surface, fearing that humans will arrive en masse and seek to capture or kill the Sibylline, as well as the hermatropes and other inhabitants of the Cave. That is why she seeks to kill him and feed him to the Sibylline.</text:p>
      <text:p text:style-name="P17"/>
      <text:p text:style-name="P17"/>
      <text:h text:style-name="P14" text:outline-level="2"><text:bookmark-start text:name="__RefHeading___Toc717_353095010 Copie 2"/>The ending<text:bookmark-end text:name="__RefHeading___Toc717_353095010 Copie 2"/></text:h>
      <text:p text:style-name="P9"/>
      <text:p text:style-name="P10"><text:tab/>The ending of the final chapter has slight differences depending on the girl the player character is the closest to, but the events leading to it are the same for all endings: The protagonist sends the girls back to their respective villages to ask for help, while <text:span text:style-name="T4">he</text:span> scouts ahead and tries to negotiate with Çira. As he fails, and her henchmen are closing on him, reinforcements come in the form of the soldiers of every village the player has visited, accompanied by the girls he recruited, who quickly rejoin his party for the final confrontation, during which Çira is killed and peace is restored to the Caverns.</text:p>
      <text:p text:style-name="P16"/>
      <text:p text:style-name="P16"/>
      <text:p text:style-name="P16"/>
      <text:p text:style-name="P16"/>
      <text:h text:style-name="P8" text:outline-level="1"><text:bookmark-start text:name="__RefHeading___Toc715_353095010 Copie 1 Copie 1 Copie 1"/><text:soft-page-break/>The <text:span text:style-name="T1">story (full details)</text:span><text:bookmark-end text:name="__RefHeading___Toc715_353095010 Copie 1 Copie 1 Copie 1"/></text:h>
      <text:p text:style-name="P18"/>
      <text:p text:style-name="P19"><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Gras" style:font-family-generic="swiss" style:font-pitch="variable"/>
    <style:font-face style:name="Calibri2" svg:font-family="Calibri" style:font-adornments="Italique" style:font-family-generic="swiss" style:font-pitch="variable"/>
    <style:font-face style:name="Calibri3" svg:font-family="Calibri" style:font-adornments="Italique 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4"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0pt"/>
    </style:style>
    <style:style style:name="Title" style:family="paragraph" style:parent-style-name="Heading" style:next-style-name="Text_20_body" style:class="chapter">
      <style:paragraph-properties fo:text-align="center" style:justify-single-word="false"/>
      <style:text-properties fo:color="#00588c" loext:opacity="100%" style:font-name="Calibri4"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4"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4"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3"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1"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2"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DT15H18M29S</meta:editing-duration>
    <meta:editing-cycles>95</meta:editing-cycles>
    <meta:generator>LibreOffice/25.2.4.3$Windows_X86_64 LibreOffice_project/33e196637044ead23f5c3226cde09b47731f7e27</meta:generator>
    <meta:creation-date>2025-11-08T09:34:55.116800300</meta:creation-date>
    <dc:title>Format de texte</dc:title>
    <dc:date>2025-11-12T17:38:27.942439600</dc:date>
    <meta:document-statistic meta:table-count="0" meta:image-count="0" meta:object-count="0" meta:page-count="6" meta:paragraph-count="39" meta:word-count="1282" meta:character-count="7506" meta:non-whitespace-character-count="6245"/>
    <meta:template xlink:type="simple" xlink:actuate="onRequest" xlink:title="Format de texte" xlink:href="file:///C:/Users/Clément/AppData/Roaming/LibreOffice/4/user/template/Format%20de%20texte1.ott" meta:date="2025-11-08T09:34:54.727004400"/>
  </office:meta>
</office:document-meta>
</file>