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8e1f1" officeooo:paragraph-rsid="0018e1f1"/>
    </style:style>
    <style:style style:name="P2" style:family="paragraph" style:parent-style-name="Standard">
      <style:text-properties officeooo:rsid="00106f63" officeooo:paragraph-rsid="00106f63"/>
    </style:style>
    <style:style style:name="P3" style:family="paragraph" style:parent-style-name="Subtitle">
      <style:text-properties officeooo:rsid="0018e1f1" officeooo:paragraph-rsid="0018e1f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1">
      <style:text-properties officeooo:rsid="0018e1f1" officeooo:paragraph-rsid="0018e1f1"/>
    </style:style>
    <style:style style:name="P9" style:family="paragraph" style:parent-style-name="Standard">
      <style:text-properties officeooo:rsid="00106f63" officeooo:paragraph-rsid="0018e1f1"/>
    </style:style>
    <style:style style:name="P10" style:family="paragraph" style:parent-style-name="Text_20_body">
      <style:paragraph-properties fo:text-align="justify" style:justify-single-word="false"/>
      <style:text-properties style:font-name="Calibri4" fo:language="en" fo:country="US" officeooo:rsid="005fb3af" officeooo:paragraph-rsid="00641a5f"/>
    </style:style>
    <style:style style:name="P11" style:family="paragraph" style:parent-style-name="Text_20_body">
      <style:paragraph-properties fo:line-height="100%"/>
      <style:text-properties officeooo:rsid="00106f63"/>
    </style:style>
    <style:style style:name="P12" style:family="paragraph" style:parent-style-name="Text_20_body">
      <style:text-properties officeooo:rsid="001f9462" officeooo:paragraph-rsid="001f9462"/>
    </style:style>
    <style:style style:name="P13" style:family="paragraph" style:parent-style-name="Text_20_body" style:list-style-name="L1">
      <style:text-properties officeooo:rsid="001f9462" officeooo:paragraph-rsid="001f9462"/>
    </style:style>
    <style:style style:name="P14" style:family="paragraph" style:parent-style-name="Text_20_body">
      <style:text-properties officeooo:rsid="002083b4" officeooo:paragraph-rsid="002083b4"/>
    </style:style>
    <style:style style:name="P15" style:family="paragraph" style:parent-style-name="Text_20_body">
      <style:text-properties officeooo:rsid="002083b4" officeooo:paragraph-rsid="005a4a03"/>
    </style:style>
    <style:style style:name="P16" style:family="paragraph" style:parent-style-name="Text_20_body">
      <style:text-properties fo:language="en" fo:country="US" officeooo:rsid="0074888c" officeooo:paragraph-rsid="005a4a03"/>
    </style:style>
    <style:style style:name="P17" style:family="paragraph" style:parent-style-name="Text_20_body">
      <style:text-properties officeooo:rsid="00214c40" officeooo:paragraph-rsid="00214c40"/>
    </style:style>
    <style:style style:name="P18" style:family="paragraph" style:parent-style-name="Text_20_body">
      <style:text-properties officeooo:rsid="0024ed52" officeooo:paragraph-rsid="0024ed52"/>
    </style:style>
    <style:style style:name="P19" style:family="paragraph" style:parent-style-name="Heading_20_2">
      <style:text-properties officeooo:rsid="0018e1f1" officeooo:paragraph-rsid="0018e1f1"/>
    </style:style>
    <style:style style:name="P20" style:family="paragraph" style:parent-style-name="Text_20_body">
      <style:paragraph-properties fo:text-align="justify" style:justify-single-word="false"/>
      <style:text-properties style:font-name="Calibri4" fo:font-size="13pt" officeooo:rsid="002762e1" officeooo:paragraph-rsid="00214c40"/>
    </style:style>
    <style:style style:name="P21" style:family="paragraph" style:parent-style-name="Standard">
      <style:paragraph-properties fo:text-align="justify" style:justify-single-word="false"/>
      <style:text-properties style:font-name="Calibri" fo:language="en" fo:country="US" officeooo:rsid="002708bf" officeooo:paragraph-rsid="0028f01b"/>
    </style:style>
    <style:style style:name="P22" style:family="paragraph" style:parent-style-name="Standard">
      <style:text-properties officeooo:paragraph-rsid="0018e1f1"/>
    </style:style>
    <style:style style:name="P23" style:family="paragraph" style:parent-style-name="Text_20_body">
      <style:text-properties officeooo:rsid="00414715" officeooo:paragraph-rsid="00414715"/>
    </style:style>
    <style:style style:name="P24" style:family="paragraph" style:parent-style-name="Text_20_body">
      <style:text-properties officeooo:rsid="002083b4" officeooo:paragraph-rsid="0076dfed"/>
    </style:style>
    <style:style style:name="P25" style:family="paragraph" style:parent-style-name="Text_20_body" style:list-style-name="L2">
      <style:paragraph-properties fo:text-align="justify" style:justify-single-word="false"/>
      <style:text-properties officeooo:paragraph-rsid="0076dfed"/>
    </style:style>
    <style:style style:name="P26" style:family="paragraph" style:parent-style-name="Text_20_body" style:list-style-name="L2">
      <style:paragraph-properties fo:text-align="justify" style:justify-single-word="false"/>
      <style:text-properties fo:language="en" fo:country="US" officeooo:rsid="0073799a" officeooo:paragraph-rsid="0076dfed"/>
    </style:style>
    <style:style style:name="P27" style:family="paragraph" style:parent-style-name="Text_20_body" style:list-style-name="L2">
      <style:paragraph-properties fo:text-align="justify" style:justify-single-word="false"/>
      <style:text-properties fo:language="en" fo:country="US" officeooo:rsid="0074888c" officeooo:paragraph-rsid="0076dfed"/>
    </style:style>
    <style:style style:name="P28" style:family="paragraph" style:parent-style-name="Text_20_body">
      <style:paragraph-properties fo:text-align="justify" style:justify-single-word="false"/>
      <style:text-properties fo:language="en" fo:country="US" officeooo:rsid="0074888c" officeooo:paragraph-rsid="0076dfed"/>
    </style:style>
    <style:style style:name="P29" style:family="paragraph" style:parent-style-name="Heading_20_3">
      <style:text-properties officeooo:rsid="0061fb6b" officeooo:paragraph-rsid="0061fb6b"/>
    </style:style>
    <style:style style:name="P30" style:family="paragraph" style:parent-style-name="Text_20_body">
      <style:paragraph-properties fo:text-align="justify" style:justify-single-word="false"/>
      <style:text-properties style:font-name="Calibri4" fo:font-size="13pt" fo:language="en" fo:country="US" officeooo:rsid="005ce70e" officeooo:paragraph-rsid="00641a5f"/>
    </style:style>
    <style:style style:name="P31" style:family="paragraph" style:parent-style-name="Text_20_body" style:list-style-name="L3">
      <style:paragraph-properties fo:text-align="justify" style:justify-single-word="false"/>
      <style:text-properties style:font-name="Calibri4" fo:language="en" fo:country="US" officeooo:rsid="005fb3af" officeooo:paragraph-rsid="00641a5f"/>
    </style:style>
    <style:style style:name="P32" style:family="paragraph" style:parent-style-name="Standard">
      <style:text-properties officeooo:rsid="00106f63" officeooo:paragraph-rsid="0065bef8"/>
    </style:style>
    <style:style style:name="P33" style:family="paragraph" style:parent-style-name="Heading_20_4">
      <style:text-properties officeooo:rsid="0065bef8" officeooo:paragraph-rsid="0065bef8"/>
    </style:style>
    <style:style style:name="P34" style:family="paragraph" style:parent-style-name="Text_20_body">
      <style:text-properties officeooo:paragraph-rsid="0065bef8"/>
    </style:style>
    <style:style style:name="P35" style:family="paragraph" style:parent-style-name="Text_20_body">
      <style:paragraph-properties fo:text-align="justify" style:justify-single-word="false"/>
      <style:text-properties officeooo:paragraph-rsid="00641a5f"/>
    </style:style>
    <style:style style:name="P36" style:family="paragraph" style:parent-style-name="Text_20_body">
      <style:text-properties fo:language="en" fo:country="US" officeooo:rsid="00599e46" officeooo:paragraph-rsid="00641a5f"/>
    </style:style>
    <style:style style:name="P37" style:family="paragraph" style:parent-style-name="Text_20_body">
      <style:text-properties fo:language="en" fo:country="US" officeooo:rsid="00641a5f" officeooo:paragraph-rsid="00641a5f"/>
    </style:style>
    <style:style style:name="P38" style:family="paragraph" style:parent-style-name="Text_20_body" style:list-style-name="L4">
      <style:text-properties fo:language="en" fo:country="US" officeooo:rsid="00641a5f" officeooo:paragraph-rsid="00641a5f"/>
    </style:style>
    <style:style style:name="P39" style:family="paragraph" style:parent-style-name="Text_20_body" style:list-style-name="L4">
      <style:text-properties fo:language="en" fo:country="US" officeooo:rsid="00646f73" officeooo:paragraph-rsid="00646f73"/>
    </style:style>
    <style:style style:name="P40" style:family="paragraph" style:parent-style-name="Standard">
      <style:text-properties officeooo:rsid="00106f63" officeooo:paragraph-rsid="0061fb6b"/>
    </style:style>
    <style:style style:name="P41" style:family="paragraph" style:parent-style-name="Heading_20_4">
      <style:text-properties officeooo:rsid="006666f7" officeooo:paragraph-rsid="006666f7"/>
    </style:style>
    <style:style style:name="P42" style:family="paragraph" style:parent-style-name="Text_20_body">
      <style:paragraph-properties fo:text-align="justify" style:justify-single-word="false"/>
      <style:text-properties style:font-name="Calibri4" fo:font-size="13pt" fo:language="en" fo:country="US" officeooo:rsid="005fb3af" officeooo:paragraph-rsid="00641a5f"/>
    </style:style>
    <style:style style:name="P43" style:family="paragraph" style:parent-style-name="Text_20_body">
      <style:paragraph-properties fo:text-align="justify" style:justify-single-word="false"/>
      <style:text-properties style:font-name="Calibri4" fo:language="en" fo:country="US" officeooo:rsid="007b7582" officeooo:paragraph-rsid="007b7582"/>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officeooo:rsid="00214c40"/>
    </style:style>
    <style:style style:name="T4" style:family="text">
      <style:text-properties officeooo:rsid="002274c2"/>
    </style:style>
    <style:style style:name="T5" style:family="text">
      <style:text-properties officeooo:rsid="002762e1"/>
    </style:style>
    <style:style style:name="T6" style:family="text">
      <style:text-properties fo:font-weight="bold" officeooo:rsid="004a9cb8" style:font-weight-asian="bold" style:font-weight-complex="bold"/>
    </style:style>
    <style:style style:name="T7" style:family="text">
      <style:text-properties fo:font-weight="bold" officeooo:rsid="0042ea76" style:font-weight-asian="bold" style:font-weight-complex="bold"/>
    </style:style>
    <style:style style:name="T8" style:family="text">
      <style:text-properties fo:font-weight="bold" officeooo:rsid="0048c583" style:font-weight-asian="bold" style:font-weight-complex="bold"/>
    </style:style>
    <style:style style:name="T9" style:family="text">
      <style:text-properties fo:font-weight="bold" officeooo:rsid="0044c306" style:font-weight-asian="bold" style:font-weight-complex="bold"/>
    </style:style>
    <style:style style:name="T10" style:family="text">
      <style:text-properties fo:font-weight="bold" officeooo:rsid="0046b963" style:font-weight-asian="bold" style:font-weight-complex="bold"/>
    </style:style>
    <style:style style:name="T11" style:family="text">
      <style:text-properties fo:font-weight="bold" officeooo:rsid="00487667" style:font-weight-asian="bold" style:font-weight-complex="bold"/>
    </style:style>
    <style:style style:name="T12" style:family="text">
      <style:text-properties style:font-name="Calibri4" fo:font-size="10pt" fo:language="en" fo:country="US" officeooo:rsid="005fb3af"/>
    </style:style>
    <style:style style:name="T13" style:family="text">
      <style:text-properties style:font-name="Calibri4" fo:font-size="10pt" fo:language="en" fo:country="US" fo:font-weight="bold" officeooo:rsid="005fb3af" style:font-weight-asian="bold" style:font-weight-complex="bold"/>
    </style:style>
    <style:style style:name="T14" style:family="text">
      <style:text-properties fo:language="en" fo:country="US" officeooo:rsid="006048b7"/>
    </style:style>
    <style:style style:name="T15" style:family="text">
      <style:text-properties fo:language="en" fo:country="US" officeooo:rsid="005b0cf4"/>
    </style:style>
    <style:style style:name="T16" style:family="text">
      <style:text-properties fo:language="en" fo:country="US" officeooo:rsid="005ce70e"/>
    </style:style>
    <style:style style:name="T17" style:family="text">
      <style:text-properties fo:language="en" fo:country="US" officeooo:rsid="005dcdca"/>
    </style:style>
    <style:style style:name="T18" style:family="text">
      <style:text-properties officeooo:rsid="0074888c"/>
    </style:style>
    <style:style style:name="T19" style:family="text">
      <style:text-properties officeooo:rsid="0074d56e"/>
    </style:style>
    <style:style style:name="T20" style:family="text">
      <style:text-properties officeooo:rsid="00754b89"/>
    </style:style>
    <style:style style:name="T21" style:family="text">
      <style:text-properties officeooo:rsid="007183ac"/>
    </style:style>
    <style:style style:name="T22" style:family="text">
      <style:text-properties officeooo:rsid="007a81d7"/>
    </style:style>
    <style:style style:name="T23" style:family="text">
      <style:text-properties officeooo:rsid="0062a95b"/>
    </style:style>
    <style:style style:name="T24" style:family="text">
      <style:text-properties style:font-name="Calibri4" fo:font-size="13pt" fo:language="en" fo:country="US" officeooo:rsid="005fb3af"/>
    </style:style>
    <style:style style:name="T25" style:family="text">
      <style:text-properties style:font-name="Calibri4" fo:language="en" fo:country="US" officeooo:rsid="005fb3a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verns</text:p>
      <text:p text:style-name="P2"/>
      <text:p text:style-name="P3">Scenario &amp; story structur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The hook<text:tab/>2</text:a></text:p>
          <text:p text:style-name="P4"><text:a xlink:type="simple" xlink:href="#__RefHeading___Toc715_353095010%20Copie%201" text:style-name="Index_20_Link" text:visited-style-name="Index_20_Link">The intended experience<text:tab/>2</text:a></text:p>
          <text:p text:style-name="P4"><text:a xlink:type="simple" xlink:href="#__RefHeading___Toc715_353095010%20Copie%201%20Copie%201" text:style-name="Index_20_Link" text:visited-style-name="Index_20_Link">The structure of the story<text:tab/>3</text:a></text:p>
          <text:p text:style-name="P5"><text:a xlink:type="simple" xlink:href="#__RefHeading___Toc717_353095010" text:style-name="Index_20_Link" text:visited-style-name="Index_20_Link">Summary of the story<text:tab/>4</text:a></text:p>
          <text:p text:style-name="P5"><text:a xlink:type="simple" xlink:href="#__RefHeading___Toc717_353095010%20Copie%201" text:style-name="Index_20_Link" text:visited-style-name="Index_20_Link">The source of all inexplicable events<text:tab/>5</text:a></text:p>
          <text:p text:style-name="P5"><text:a xlink:type="simple" xlink:href="#__RefHeading___Toc717_353095010%20Copie%202" text:style-name="Index_20_Link" text:visited-style-name="Index_20_Link">The ending<text:tab/>5</text:a></text:p>
          <text:p text:style-name="P4"><text:a xlink:type="simple" xlink:href="#__RefHeading___Toc715_353095010%20Copie%201%20Copie%201%20Copie%201" text:style-name="Index_20_Link" text:visited-style-name="Index_20_Link">The story (full details)<text:tab/>6</text:a></text:p>
          <text:p text:style-name="P5"><text:a xlink:type="simple" xlink:href="#__RefHeading___Toc717_353095010%20Copie%201%20Copie%201" text:style-name="Index_20_Link" text:visited-style-name="Index_20_Link">Intro<text:tab/>7</text:a></text:p>
          <text:p text:style-name="P5"><text:a xlink:type="simple" xlink:href="#__RefHeading___Toc717_353095010%20Copie%201%20Copie%201%20Copie%201" text:style-name="Index_20_Link" text:visited-style-name="Index_20_Link">Chapter 1<text:tab/>7</text:a></text:p>
          <text:p text:style-name="P6"><text:a xlink:type="simple" xlink:href="#__RefHeading___Toc719_353095010" text:style-name="Index_20_Link" text:visited-style-name="Index_20_Link">The area<text:tab/>7</text:a></text:p>
          <text:p text:style-name="P7"><text:a xlink:type="simple" xlink:href="#__RefHeading___Toc721_353095010%20Copie%201%20Copie%201" text:style-name="Index_20_Link" text:visited-style-name="Index_20_Link">The Village<text:tab/>8</text:a></text:p>
          <text:p text:style-name="P6"><text:a xlink:type="simple" xlink:href="#__RefHeading___Toc719_353095010%20Copie%201" text:style-name="Index_20_Link" text:visited-style-name="Index_20_Link">Quests &amp; objectives<text:tab/>8</text:a></text:p>
          <text:p text:style-name="P7"><text:a xlink:type="simple" xlink:href="#__RefHeading___Toc721_353095010%20Copie%201" text:style-name="Index_20_Link" text:visited-style-name="Index_20_Link">The main quest<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1"><text:bookmark-start text:name="__RefHeading___Toc715_353095010"/><text:soft-page-break/>The hook<text:bookmark-end text:name="__RefHeading___Toc715_353095010"/></text:h>
      <text:p text:style-name="P9"/>
      <text:p text:style-name="P10"><text:tab/>The protagonist is a speleologist who has come to study a strange cave formation. During his descent, he falls to the bottom of a ravine, only owing his survival to a torrent that cushioned his fall.</text:p>
      <text:p text:style-name="P10"/>
      <text:p text:style-name="P10"><text:tab/>He wakes up a few hours later at the edge of a riverbed, his bag of supplies being the only possession that had survived the accident. He must then venture deeper into this network of caves in the hope of finding a way back to the surface. But as he explores the bowels of the Earth and discovers its secrets, it turns out that he is not the only wandering soul, and that what he thought were animals turn out to be much more dangerous... and lustful.</text:p>
      <text:p text:style-name="P11"/>
      <text:p text:style-name="P11"/>
      <text:h text:style-name="P8" text:outline-level="1"><text:bookmark-start text:name="__RefHeading___Toc715_353095010 Copie 1"/>The <text:span text:style-name="T1">intended</text:span> experience<text:bookmark-end text:name="__RefHeading___Toc715_353095010 Copie 1"/></text:h>
      <text:p text:style-name="P9"/>
      <text:p text:style-name="P10"><text:tab/>The experience is intended to be more contemplative than active, with a focus on story more than gameplay so as not to have the player’s progression blocked by a difficulty curve. This also allows for an adventure where the player explores and discovers a mystical, alien world that is completely foreign to what they have known, without neglecting the feeling of constant danger, reminding them that every decision is a risk and that death can await them around every corner. </text:p>
      <text:p text:style-name="P10"/>
      <text:p text:style-name="P10"><text:tab/>Atmosphere-wise, the game takes inspiration from Teraurge and Corruption of Champions: The protagonist discovers new plants, animals, and geological formations that challenge their scientific knowledge of nature and the formation of their world. As they interact with the inhabitants of the depths, they discover new cultures and different ways of thinking and seeing the world, particularly these civilizations' relationship with the surface. some of whom have never seen or heard of the sky, while others seek to avoid contact with the surface at all costs.</text:p>
      <text:p text:style-name="P10"/>
      <text:p text:style-name="P10"><text:tab/>The game also takes some design elements from the horror genre, constantly reminding the player that even in safe places, they are not immune to accidents or ambushes, seeking to arouse primal fears that echo our defensive reactions inherited from our ancestors since the dawn of time: fear of the dark, the unknown, claustrophobia, megalophobia, paranoia, fear of drowning, etc.</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 text:outline-level="1"><text:bookmark-start text:name="__RefHeading___Toc715_353095010 Copie 1 Copie 1"/><text:soft-page-break/>The <text:span text:style-name="T1">structure of the story</text:span><text:bookmark-end text:name="__RefHeading___Toc715_353095010 Copie 1 Copie 1"/></text:h>
      <text:p text:style-name="P9"/>
      <text:p text:style-name="P12">The story is segmented in 6 parts:</text:p>
      <text:list text:style-name="L1">
        <text:list-item>
          <text:p text:style-name="P13">A short introduction, which contains no gameplay and is here to set the tone and the hook of the story;</text:p>
        </text:list-item>
        <text:list-item>
          <text:p text:style-name="P13">The 4 main chapters, each taking place in a different area of the caverns. Each one of these areas is represented by a village (the main hub of that chapter) and its surrounding gallery of caverns and ravines, acting as the explorable area.</text:p>
        </text:list-item>
        <text:list-item>
          <text:p text:style-name="P13">An ending chapter, where the final boss is confronted and defeated, the main plot reaches its conclusion and all character storylines resolve.</text:p>
        </text:list-item>
      </text:list>
      <text:p text:style-name="P12"/>
      <text:p text:style-name="P14">Each of the 4 main chapters is themed around an element (water, earth, wind, fire). <text:span text:style-name="T2">[NOTE: There is no story reason for that, but it would allows us to create different biomes for different species of monsters, as well as creating more distinct regions]</text:span>. The humanoid dinosaurs inhabiting <text:span text:style-name="T3">an</text:span> area are called ‘hermatropes’ as a global term to encompass all the sub-species comprising that group.</text:p>
      <text:p text:style-name="P14"/>
      <text:p text:style-name="P15">Each of <text:span text:style-name="T3">these</text:span> areas contain<text:span text:style-name="T3">s</text:span> a village inhabited by a different (or multiple different) species of hermatropes, with a culture and building architecture matching that element (for instance, the village themed after water could be a fishing village with floating houses.)</text:p>
      <text:p text:style-name="P16"/>
      <text:p text:style-name="P17">At the start of the game, the player arrives in the first village by default, and must complete the main quest of that village to unlock the next chapter <text:span text:style-name="T2">[NOTE: Maybe we could make them all unlocked by default, and the player could freely move between them? The final chapter would only be unlocked once all 4 chapter are completed?]</text:span>. <text:span text:style-name="T4">Each village has a main romantic interest (tied in some way to the main quest of that village) and multiple other romancable optional characters. Only the main RI can be recruited as a party member, </text:span><text:span text:style-name="T5">except in some side quests, where temporary party members could join us for the duration of that ques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 text:outline-level="2"><text:bookmark-start text:name="__RefHeading___Toc717_353095010"/><text:soft-page-break/>Summary of the story<text:bookmark-end text:name="__RefHeading___Toc717_353095010"/></text:h>
      <text:p text:style-name="P9"/>
      <text:p text:style-name="P10"><text:tab/>The protagonist is a geologist traveling to an isolate region of the world to study a strange cavern formation, appearing shortly after the recording of a recent earthquake. Of magnitude 7.8, unusual in this region of the globe, the researcher was worried of the possible emergence of a volcanic activity that could put the local population in danger.</text:p>
      <text:p text:style-name="P10"/>
      <text:p text:style-name="P10"><text:tab/>During his descent of the cavern, the wall onto which latched his harness collapses, the security ropes supposed to hold him break, making him freefall at the bottom of a ravine. He only owes his survival to a torrent at the bottom of the cavern cushioning his fall, but making him dive deeper in the underground tunnels. Nearly drowning, he loses consciousness.</text:p>
      <text:p text:style-name="P10"/>
      <text:p text:style-name="P10"><text:tab/>He wakes up a few hours later at the edge of a river, right next to a strange village populated by ‘hermatropes’, a strange subterranean species descending from ancient dinosaurs; he then quickly realises he just discovered a complete ecosystem living right underneath the earth crust that has existed since immemorial times, filled with strange plants and creatures that can somehow speak and understand his language.</text:p>
      <text:p text:style-name="P10"/>
      <text:p text:style-name="P10"><text:tab/>His bag of supplies is the only thing he has left from the accident. Without his climbing gear, it's impossible to get back to where he came from, and his phone and walkie-talkie aren't picking up any signals from his colleagues. He'll have to go deeper into this network of caves in the hope of finding a way back to the surface. But as he ventures into the bowels of the Earth and discovers its secrets, it turns out that he is not the only wandering soul, and that what he thought were animals turn out to be much more dangerous... and lustful.</text:p>
      <text:p text:style-name="P10"/>
      <text:p text:style-name="P10"><text:tab/>During his journey, he will meet multiple characters, including Celiope, a female hermatrope living in that same underground village he first landed in. Tired of life in her village, she wants to spread her wings and discover what the rest of the Cavern has to offer, and dreams of one day seeing the starry sky above the surface that she has heard so much about. Seeing in the protagonist an opportunity to see the world, she agrees to help him return to the surface and accompanies him on his adventures.</text:p>
      <text:p text:style-name="P10"/>
      <text:p text:style-name="P10"><text:tab/>The protagonist will also discover that he is not the only human to have discovered this underground world, finding traces of various explorers separated by decades or even centuries who recounted their discoveries about the Cavern and its origins. He will learn that the strange phenomena of the Cavern originate from an energy source buried even deeper within the Earth, but that all attempts by these explorers to reach it, or to return to the surface, have ended in failure, most of them apparently stopped by someone determined to prevent them from recounting their adventures on the surface. The few survivors were probably killed by predators or a cave-in, and the lucky few who made it back to the surface were probably taken for madmen and locked up or executed for heresy, depending on the century.</text:p>
      <text:p text:style-name="P20"/>
      <text:p text:style-name="P20"/>
      <text:p text:style-name="P20"/>
      <text:p text:style-name="P20"/>
      <text:p text:style-name="P20"/>
      <text:h text:style-name="P19" text:outline-level="2"><text:bookmark-start text:name="__RefHeading___Toc717_353095010 Copie 1"/><text:soft-page-break/>The source of all inexplicable events<text:bookmark-end text:name="__RefHeading___Toc717_353095010 Copie 1"/></text:h>
      <text:p text:style-name="P9"/>
      <text:p text:style-name="P10"><text:tab/>The protagonist will have multiple encounters with members of an occult group called the Guardians of the Sibylline, creatures seeking to block his path to the surface and the depths of the cave. They are responsible for the deaths of the most recent explorers, whose notes the protagonist will have found, for reasons that are still unknown.</text:p>
      <text:p text:style-name="P10"/>
      <text:p text:style-name="P10"><text:tab/>He eventually meets their leader, Çira, an elderly exiled hermatrope who, thirsty for power, had once attempted to rally all the hermatrope villages under her banner, using their fear of the surface to manipulate them. Although this fear is still ingrained in the inhabitants, they drove her out of their villages, leading her to seek refuge deeper and deeper into the Cavern, until one day she found the source of the cavern's mystical power: The Sibylline (from the latin ‘sybillinus’, meaning ‘unexplainable’). </text:p>
      <text:p text:style-name="P10"/>
      <text:p text:style-name="P10"><text:tab/>The latter is a huge alien organism that crashed into Earth 65 million years ago, causing the extinction of the dinosaurs. Although it survived the cataclysm, it remains weakened and can no longer leave Earth. Over millions of years, as sediments and layers of rock and magma have buried its body, its essence has distilled in the depths of the Cavern, giving it and its inhabitants strange and unexplained properties, such as the protagonist's ability to talk with the hermatropes despite the difference of language; the strange shapes of certain creatures; and the presence of a sunless sky above the hermatropian villages.</text:p>
      <text:p text:style-name="P10"/>
      <text:p text:style-name="P10"><text:tab/> Çira has since become the guardian of the Sibylline, with her minions watching over him and ensuring that no one else appropriates his power. Even though her thirst for conquest has subsided, Çira remains suspicious of the protagonist and the surface, fearing that humans will arrive en masse and seek to capture or kill the Sibylline, as well as the hermatropes and other inhabitants of the Cave. That is why she seeks to kill him and feed him to the Sibylline.</text:p>
      <text:p text:style-name="P21"/>
      <text:p text:style-name="P21"/>
      <text:h text:style-name="P19" text:outline-level="2"><text:bookmark-start text:name="__RefHeading___Toc717_353095010 Copie 2"/>The ending<text:bookmark-end text:name="__RefHeading___Toc717_353095010 Copie 2"/></text:h>
      <text:p text:style-name="P9"/>
      <text:p text:style-name="P10"><text:tab/>The ending of the final chapter has slight differences depending on the girl the player character is the closest to, but the events leading to it are the same for all endings: The protagonist sends the girls back to their respective villages to ask for help, while scouts ahead and tries to negotiate with Çira. As he fails, and her henchmen are closing on him, reinforcements come in the form of the soldiers of every village the player has visited, accompanied by the girls he recruited, who quickly rejoin his party for the final confrontation, during which Çira is killed and peace is restored to the Caverns.</text:p>
      <text:p text:style-name="P10"/>
      <text:p text:style-name="P10"><text:tab/>The ending will then change depending on the player’s preferred girl: For instance, with Celiope, the protagonist and her manage to leave the Cave after killing Çira, and the protagonist, wanting to keep this magical place a secret, decides to live with Celiope in her village in the Caverns; but not before showing her the starry sky she had dreamed of so much.</text:p>
      <text:p text:style-name="P20"/>
      <text:p text:style-name="P20"/>
      <text:h text:style-name="P8" text:outline-level="1"><text:bookmark-start text:name="__RefHeading___Toc715_353095010 Copie 1 Copie 1 Copie 1"/><text:soft-page-break/>The <text:span text:style-name="T1">story (full details)</text:span><text:bookmark-end text:name="__RefHeading___Toc715_353095010 Copie 1 Copie 1 Copie 1"/></text:h>
      <text:p text:style-name="P22"/>
      <text:p text:style-name="P23"><text:span text:style-name="T2">[NOTE : This section will probably change a lot depending on the evolution of our vision of what the story is supposed to </text:span><text:span text:style-name="T6">c</text:span><text:span text:style-name="T2">onvey, or how the gameplay will influence certain branches. </text:span><text:span text:style-name="T7">Each </text:span><text:span text:style-name="T8">important</text:span><text:span text:style-name="T7"> character </text:span><text:span text:style-name="T8">mentioned here </text:span><text:span text:style-name="T7">has a </text:span><text:span text:style-name="T9">separate</text:span><text:span text:style-name="T7"> file describing their development </text:span><text:span text:style-name="T9">in detail; here, we will just include the parts that are </text:span><text:span text:style-name="T10">d</text:span><text:span text:style-name="T11">irectly </text:span><text:span text:style-name="T9">relevant to the story</text:span><text:span text:style-name="T7">.</text:span><text:span text:style-name="T2">]</text:span></text:p>
      <text:p text:style-name="P24"/>
      <text:list text:style-name="L2">
        <text:list-item>
          <text:p text:style-name="P25"><text:span text:style-name="T12">The first village is themed around </text:span><text:span text:style-name="T13">water</text:span><text:span text:style-name="T12">, and is a fishing and farming village formed around a giant lake and countless waterfalls and rivers sprouting from the nearby ravines and the ceiling – invisible, replaced by a blue, sunless sky. Most of its inhabitants are herbivores and/or amphibious, and spend most of their days tending to their river crops, fishing, or partaking in collective activities such as deep diving and pottery (thanks to the clay-rich </text:span><text:span text:style-name="T14">soil of the area)</text:span><text:span text:style-name="T15">. </text:span><text:span text:style-name="T16">They are pacifists, although some of their members still carry spears and shields and act as a</text:span><text:span text:style-name="T17">n</text:span><text:span text:style-name="T16"> internal peacekeeping force.</text:span></text:p>
        </text:list-item>
        <text:list-item>
          <text:p text:style-name="P26">The second village is themed around <text:span text:style-name="T2">earth</text:span>, and is mainly a mining/agrarian village, with houses sculpted into the stone of the caverns, and sprawling galleries connecting all sections of the village together deep underground. The ‘surface’ of the village is used for crops and to host cultural festivals. Most of its inhabitants are big, towering mountains of muscle, their physiology perfect for mining and combat, which comes in handy for gemcutting, but also fending off the assault of the last two villages, more belligerent than the fishing village. These hermatropes spend most of their days working in the mines, trading goods with the other villages, training at martial arts as soldiers or as entertainment; and enjoy jewelry and extravagant clothing. <text:span text:style-name="T18">The are on good terms with the water village, but less so with the wind and fire ones, having to fend off their assaults frequently, either due to provocations, ambushes, or misunderstandings.</text:span></text:p>
        </text:list-item>
        <text:list-item>
          <text:p text:style-name="P27">The third village is themed around <text:span text:style-name="T2">wind</text:span>, and is less of a village, and more of a collection of nests scattered on steep ravines and large mesas, with every few of them living on the ground, where a huge, lush forest covers the entirety of the area. Its inhabitants are mainly flying hermatropes, extremely territorial and hating intruders coming too close to their nests. As few of them have prehensile digits, most of them don’t use tools or wear clothes, and prefer to live a more simple life as hunter-gatherers. Most of them aren’t smart, and quick to start a fight on even the slightest of misunderstandings; they are at odds with the earth and fire villages for this reason, as the wind village blame them for the dissapearance of many of their eggs <text:span text:style-name="T2">[detailed in the story]</text:span>.</text:p>
        </text:list-item>
        <text:list-item>
          <text:p text:style-name="P27">The last village is themed around <text:span text:style-name="T2">fire</text:span>, and is a collection of warring tribes gathered at the base of an active volcano, led by a single hermatrope who is allowed to be challenged once a year in hand to hand combat for the status of chieftain. This village has a militaristic doctrine, being much more organized and tailored made for combat than the other villages. Its inhabitants embrace the idea of ‘might makes right’, being comprised mostly of carnivorous species. <text:span text:style-name="T19">They are very superstitious – even more so than the other villages – and often partake in ritualistic offerings at the summit of the volcano, be it food or live sacrifices. They often clash with the wind and earth villages for territory, although they share some sort of respect with the latter, the earth village also being a militaristic force on its own, but defensive rather than offensive. </text:span><text:span text:style-name="T20">As entertainment, they often toy with captured animals and hermatropes they find on new territory, and like the earth tribe, they enjoy partaking in martial arts competitions.</text:span></text:p>
        </text:list-item>
      </text:list>
      <text:p text:style-name="P28"/>
      <text:p text:style-name="P28"/>
      <text:p text:style-name="P28"/>
      <text:h text:style-name="P19" text:outline-level="2"><text:bookmark-start text:name="__RefHeading___Toc717_353095010 Copie 1 Copie 1"/><text:soft-page-break/>Intro<text:bookmark-end text:name="__RefHeading___Toc717_353095010 Copie 1 Copie 1"/></text:h>
      <text:p text:style-name="P9"/>
      <text:p text:style-name="P10"><text:tab/>A helicopter carrying a team of speleologists, including the main character, lands near a research station in the French Alps, after an exchange of calls relaying a worrying situation: A series of earthquakes of high magnitude, unusual in this region of the globe, that could put the survival of nearby villages at risk.</text:p>
      <text:p text:style-name="P10"/>
      <text:p text:style-name="P10"><text:tab/>The MC and his colleagues undertake the climbing of a nearby ravine, formed during the incident. During his descent of the cavern, the wall onto which latched his harness collapses, the security ropes supposed to hold him break, making him freefall at the bottom of a ravine. He only owes his survival to a torrent at the bottom of the cavern cushioning his fall, but the rapids take him deeper in the underground tunnels. Nearly drowning, he loses consciousness.</text:p>
      <text:p text:style-name="P10"/>
      <text:p text:style-name="P10"><text:tab/>He wakes up a few hours later at the edge of a river, right next to a strange fishing village. Thinking the current somehow led him outside the caves, he notices the strange architecture or nearby houses, as well as the lack of clouds – and Sun – in the sky.</text:p>
      <text:p text:style-name="P10"/>
      <text:p text:style-name="P10"><text:tab/>He is then greeted by the local inhabitants, a strange group of different humanoid dinosaur species known as ‘hermatropes’. Surprised to be able to understand them, he learns he is still deep in the caves and landed in the main lake of the village after falling from a waterfall in the sky; and was until now housed at a nearby inn until he recovered.</text:p>
      <text:p text:style-name="P10"/>
      <text:p text:style-name="P10"><text:tab/>After meeting with the innkeeper, he is then greeted by her daughter, Celiope, the first main romancable character, who is taked to lead him to the chieftain of the village in order to discover his intentions and determine his fate.</text:p>
      <text:p text:style-name="P10"/>
      <text:p text:style-name="P10"><text:tab/>The chieftain, an elder female hermatrope, accepts to let him stay at the inn until he is ready to take on his journey to the surface. The MC learns from her he is not the first human to land here, and that many of them have attempted to reach the surface; since she hasn’t heard of them since, she assumes they succeeded, but the MC is suspicious; if humans have discovered this place before, why hasn’t the rest of humanity learned about it?</text:p>
      <text:p text:style-name="P10"/>
      <text:p text:style-name="P10"><text:tab/>However, she cannot let him stay at the inn free of charge; starting the next day, he will have to provide service to the innkeeper, as well as some villagers in need of extra hands. He accepts her offer, and is then free to visit the village for the first day, guided by Celiope who keeps an eye on him. The intro ends after the first night, where he sees outside a starless and moonless sky, and reminisces about his day, still incredulous to have met such an alien species.</text:p>
      <text:h text:style-name="P19" text:outline-level="2"><text:bookmark-start text:name="__RefHeading___Toc717_353095010 Copie 1 Copie 1 Copie 1"/>Chapter 1<text:bookmark-end text:name="__RefHeading___Toc717_353095010 Copie 1 Copie 1 Copie 1"/></text:h>
      <text:p text:style-name="P15"/>
      <text:h text:style-name="P29" text:outline-level="3"><text:bookmark-start text:name="__RefHeading___Toc719_353095010"/>The area<text:bookmark-end text:name="__RefHeading___Toc719_353095010"/></text:h>
      <text:p text:style-name="P30"/>
      <text:p text:style-name="P10">The area is divided in <text:span text:style-name="T21">five</text:span> parts:</text:p>
      <text:list text:style-name="L3">
        <text:list-item>
          <text:p text:style-name="P31"><text:soft-page-break/>The Village, which acts as a main hub, where the player can interact with NPCs, buy/sell items and accept quests;</text:p>
        </text:list-item>
        <text:list-item>
          <text:p text:style-name="P31">The Swamp, the Waterfalls, the Creek <text:span text:style-name="T21">and the Lone Island (accessible from the Creek)</text:span>, which are all <text:span text:style-name="T22">four</text:span> explorable areas where the player can encounter enemies, collect items, interact with the environment, and complete quests.</text:p>
        </text:list-item>
      </text:list>
      <text:p text:style-name="P32"/>
      <text:h text:style-name="P33" text:outline-level="4"><text:bookmark-start text:name="__RefHeading___Toc721_353095010 Copie 1 Copie 1"/>The Village<text:bookmark-end text:name="__RefHeading___Toc721_353095010 Copie 1 Copie 1"/></text:h>
      <text:p text:style-name="P34"/>
      <text:p text:style-name="P35"><text:span text:style-name="T12">The first village is themed around water, and is a fishing and farming village formed around a giant lake and countless waterfalls and rivers sprouting from the nearby ravines and the ceiling – invisible, replaced by a blue, sunless sky. Most of its inhabitants are herbivores and/or amphibious, and spend most of their days tending to their river crops, fishing, or partaking in collective activities such as deep diving and pottery (thanks to the clay-rich </text:span><text:span text:style-name="T14">soil of the area)</text:span><text:span text:style-name="T15">. </text:span><text:span text:style-name="T16">They are pacifists, although some of their members still carry spears and shields and act as a</text:span><text:span text:style-name="T17">n</text:span><text:span text:style-name="T16"> internal peacekeeping force.</text:span></text:p>
      <text:p text:style-name="P36"/>
      <text:p text:style-name="P37">The village contains:</text:p>
      <text:list text:style-name="L4">
        <text:list-item>
          <text:p text:style-name="P38">The inn, where the player can sleep until a certain hour or the next morning;</text:p>
        </text:list-item>
        <text:list-item>
          <text:p text:style-name="P38">The chieftain’s hut, where the player can follow the main quest;</text:p>
        </text:list-item>
        <text:list-item>
          <text:p text:style-name="P38">The marketplace, where the player can buy/sell items;</text:p>
        </text:list-item>
        <text:list-item>
          <text:p text:style-name="P39">The piers, where the fishermen work and where the player can access the lake;</text:p>
        </text:list-item>
        <text:list-item>
          <text:p text:style-name="P39">The lake, home to a few NPCs and side-quests;</text:p>
        </text:list-item>
      </text:list>
      <text:p text:style-name="P37"/>
      <text:p text:style-name="P37"/>
      <text:p text:style-name="P37"/>
      <text:p text:style-name="P37"/>
      <text:p text:style-name="P37"/>
      <text:p text:style-name="P37"/>
      <text:p text:style-name="P37"/>
      <text:p text:style-name="P37"/>
      <text:p text:style-name="P37"/>
      <text:h text:style-name="P29" text:outline-level="3"><text:bookmark-start text:name="__RefHeading___Toc719_353095010 Copie 1"/><text:span text:style-name="T23">Quests </text:span>&amp; objectives<text:bookmark-end text:name="__RefHeading___Toc719_353095010 Copie 1"/></text:h>
      <text:p text:style-name="P40"/>
      <text:p text:style-name="P40"/>
      <text:p text:style-name="P10">[To complete with future revisions]</text:p>
      <text:p text:style-name="P10"/>
      <text:p text:style-name="P40"/>
      <text:h text:style-name="P41" text:outline-level="4"><text:bookmark-start text:name="__RefHeading___Toc721_353095010 Copie 1"/><text:soft-page-break/>The main quest<text:bookmark-end text:name="__RefHeading___Toc721_353095010 Copie 1"/></text:h>
      <text:p text:style-name="P42"/>
      <text:p text:style-name="P35"><text:span text:style-name="T24"><text:tab/></text:span><text:span text:style-name="T25">The next day after his arrival at the village, the MC is requested by the innkeeper to help her replendish her stock of food by accompanying Celiope at the Piers, then the Waterfalls, a relatively safe area. The MC uses this opportunity to ask more about this world to Celiope, and learns about the other villages in the rest of the Caverns, but that tensions are rising between the Pterodactyls and the Rexes about the dissapearance of several children. She doesn’t know much about this, but she mentions that their neighbours, the tribe of the Triceratops, acts as a buffer that prevents the conflict from spilling over to their fishing village, which is why the chieftain insists in keeping good relations with them.</text:span></text:p>
      <text:p text:style-name="P10"/>
      <text:p text:style-name="P10"><text:tab/>Celiope, who turns out to be a very curious woman, asks in turn many questions about the surface. She is dissapointed to learn no hermatropes live at the surface, but is thrilled to learn about the animals and plants, as well as the starry sky at night, which she has never seen – the underground sky is devoid of any star.</text:p>
      <text:p text:style-name="P10"/>
      <text:p text:style-name="P10"><text:tab/>At their return to the inn, her mother – the innkeeper – informs the MC the chieftain is waiting for him at her hut. Once arrived at his destination, the elderly hermatrope appears mostly curious at what his arrival means for the village at large, and how much has the world changed since the last human to come here, roughly a century ago. </text:p>
      <text:p text:style-name="P10"/>
      <text:p text:style-name="P10"><text:tab/>Surprised by this revelation, he nonetheless satisfies her curiosity. He is then instructed to help some of her acquaintances as repayment for staying at the inn. In exchange, he will have the opportunity to prepare for the trip to the next village, inhabited by a friendly tribe of Triceratops, who ordered a delivery of goods for one of their upcoming festivals.</text:p>
      <text:p text:style-name="P10"/>
      <text:p text:style-name="P43">[TO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4"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0pt"/>
    </style:style>
    <style:style style:name="Title" style:family="paragraph" style:parent-style-name="Heading" style:next-style-name="Text_20_body" style:class="chapter">
      <style:paragraph-properties fo:text-align="center" style:justify-single-word="false"/>
      <style:text-properties fo:color="#00588c" loext:opacity="100%" style:font-name="Calibri4"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4"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4"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3"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2"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DT12H59M28S</meta:editing-duration>
    <meta:editing-cycles>88</meta:editing-cycles>
    <meta:generator>LibreOffice/25.2.4.3$Windows_X86_64 LibreOffice_project/33e196637044ead23f5c3226cde09b47731f7e27</meta:generator>
    <meta:creation-date>2025-11-08T09:34:55.116800300</meta:creation-date>
    <dc:title>Format de texte</dc:title>
    <dc:date>2025-11-11T17:14:34.355500400</dc:date>
    <meta:document-statistic meta:table-count="0" meta:image-count="0" meta:object-count="0" meta:page-count="9" meta:paragraph-count="81" meta:word-count="3387" meta:character-count="19714" meta:non-whitespace-character-count="16381"/>
    <meta:template xlink:type="simple" xlink:actuate="onRequest" xlink:title="Format de texte" xlink:href="file:///C:/Users/Clément/AppData/Roaming/LibreOffice/4/user/template/Format%20de%20texte1.ott" meta:date="2025-11-08T09:34:54.727004400"/>
  </office:meta>
</office:document-meta>
</file>