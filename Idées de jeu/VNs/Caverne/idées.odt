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officeooo:rsid="000ec709" officeooo:paragraph-rsid="000ec709"/>
    </style:style>
    <style:style style:name="P2" style:family="paragraph" style:parent-style-name="Standard">
      <style:paragraph-properties fo:text-align="justify" style:justify-single-word="false"/>
      <style:text-properties style:font-name="Calibri" officeooo:rsid="0011786f" officeooo:paragraph-rsid="0011786f"/>
    </style:style>
    <style:style style:name="P3" style:family="paragraph" style:parent-style-name="Standard">
      <style:paragraph-properties fo:text-align="justify" style:justify-single-word="false"/>
      <style:text-properties style:font-name="Calibri" officeooo:rsid="0011786f" officeooo:paragraph-rsid="00173cac"/>
    </style:style>
    <style:style style:name="P4" style:family="paragraph" style:parent-style-name="Standard">
      <style:paragraph-properties fo:text-align="justify" style:justify-single-word="false"/>
      <style:text-properties style:font-name="Calibri" officeooo:rsid="0011786f" officeooo:paragraph-rsid="001c5b7a"/>
    </style:style>
    <style:style style:name="P5" style:family="paragraph" style:parent-style-name="Standard">
      <style:paragraph-properties fo:text-align="justify" style:justify-single-word="false"/>
      <style:text-properties style:font-name="Calibri" officeooo:rsid="001e38b0" officeooo:paragraph-rsid="001e38b0"/>
    </style:style>
    <style:style style:name="P6" style:family="paragraph" style:parent-style-name="Standard">
      <style:paragraph-properties fo:text-align="justify" style:justify-single-word="false"/>
      <style:text-properties style:font-name="Calibri" officeooo:rsid="00225905" officeooo:paragraph-rsid="000ec709"/>
    </style:style>
    <style:style style:name="P7" style:family="paragraph" style:parent-style-name="Standard">
      <style:paragraph-properties fo:text-align="justify" style:justify-single-word="false"/>
      <style:text-properties style:font-name="Calibri" officeooo:rsid="00225905" officeooo:paragraph-rsid="00225905"/>
    </style:style>
    <style:style style:name="P8" style:family="paragraph" style:parent-style-name="Standard" style:list-style-name="L1">
      <style:paragraph-properties fo:text-align="justify" style:justify-single-word="false"/>
      <style:text-properties style:font-name="Calibri" officeooo:rsid="001e38b0" officeooo:paragraph-rsid="001e38b0"/>
    </style:style>
    <style:style style:name="P9" style:family="paragraph" style:parent-style-name="Standard" style:list-style-name="L1">
      <style:paragraph-properties fo:text-align="justify" style:justify-single-word="false"/>
      <style:text-properties style:font-name="Calibri" officeooo:rsid="001eb2d0" officeooo:paragraph-rsid="001eb2d0"/>
    </style:style>
    <style:style style:name="P10" style:family="paragraph" style:parent-style-name="Standard">
      <style:paragraph-properties fo:text-align="justify" style:justify-single-word="false"/>
      <style:text-properties style:font-name="Calibri" officeooo:rsid="000ec709" officeooo:paragraph-rsid="000ec709"/>
    </style:style>
    <style:style style:name="P11" style:family="paragraph" style:parent-style-name="Standard">
      <style:paragraph-properties fo:text-align="justify" style:justify-single-word="false"/>
      <style:text-properties style:font-name="Calibri" officeooo:rsid="002708bf" officeooo:paragraph-rsid="002708bf"/>
    </style:style>
    <style:style style:name="P12" style:family="paragraph" style:parent-style-name="Standard">
      <style:paragraph-properties fo:text-align="justify" style:justify-single-word="false"/>
      <style:text-properties style:font-name="Calibri" officeooo:rsid="002708bf" officeooo:paragraph-rsid="00303019"/>
    </style:style>
    <style:style style:name="T1" style:family="text">
      <style:text-properties officeooo:rsid="000f0202"/>
    </style:style>
    <style:style style:name="T2" style:family="text">
      <style:text-properties officeooo:rsid="00102836"/>
    </style:style>
    <style:style style:name="T3" style:family="text">
      <style:text-properties officeooo:rsid="00117229"/>
    </style:style>
    <style:style style:name="T4" style:family="text">
      <style:text-properties officeooo:rsid="0011c9cb"/>
    </style:style>
    <style:style style:name="T5" style:family="text">
      <style:text-properties officeooo:rsid="0012e28f"/>
    </style:style>
    <style:style style:name="T6" style:family="text">
      <style:text-properties officeooo:rsid="0015992b"/>
    </style:style>
    <style:style style:name="T7" style:family="text">
      <style:text-properties officeooo:rsid="00173cac"/>
    </style:style>
    <style:style style:name="T8" style:family="text">
      <style:text-properties officeooo:rsid="00187c99"/>
    </style:style>
    <style:style style:name="T9" style:family="text">
      <style:text-properties officeooo:rsid="0018a1cf"/>
    </style:style>
    <style:style style:name="T10" style:family="text">
      <style:text-properties officeooo:rsid="0019797a"/>
    </style:style>
    <style:style style:name="T11" style:family="text">
      <style:text-properties officeooo:rsid="0019ac1b"/>
    </style:style>
    <style:style style:name="T12" style:family="text">
      <style:text-properties officeooo:rsid="001a3e44"/>
    </style:style>
    <style:style style:name="T13" style:family="text">
      <style:text-properties officeooo:rsid="001b5538"/>
    </style:style>
    <style:style style:name="T14" style:family="text">
      <style:text-properties officeooo:rsid="001c5b7a"/>
    </style:style>
    <style:style style:name="T15" style:family="text">
      <style:text-properties officeooo:rsid="001dc255"/>
    </style:style>
    <style:style style:name="T16" style:family="text">
      <style:text-properties officeooo:rsid="001e84cd"/>
    </style:style>
    <style:style style:name="T17" style:family="text">
      <style:text-properties officeooo:rsid="00222e41"/>
    </style:style>
    <style:style style:name="T18" style:family="text">
      <style:text-properties officeooo:rsid="0023cc6a"/>
    </style:style>
    <style:style style:name="T19" style:family="text">
      <style:text-properties style:text-underline-style="none" officeooo:rsid="0023cc6a"/>
    </style:style>
    <style:style style:name="T20" style:family="text">
      <style:text-properties officeooo:rsid="0028c243"/>
    </style:style>
    <style:style style:name="T21" style:family="text">
      <style:text-properties officeooo:rsid="002ab01e"/>
    </style:style>
    <style:style style:name="T22" style:family="text">
      <style:text-properties officeooo:rsid="002b3fce"/>
    </style:style>
    <style:style style:name="T23" style:family="text">
      <style:text-properties officeooo:rsid="002c5098"/>
    </style:style>
    <style:style style:name="T24" style:family="text">
      <style:text-properties officeooo:rsid="002dcf64"/>
    </style:style>
    <style:style style:name="T25" style:family="text">
      <style:text-properties officeooo:rsid="00303019"/>
    </style:style>
    <style:style style:name="T26" style:family="text">
      <style:text-properties officeooo:rsid="0030ce34"/>
    </style:style>
    <style:style style:name="T27" style:family="text">
      <style:text-properties officeooo:rsid="0031aae8"/>
    </style:style>
    <style:style style:name="T28" style:family="text">
      <style:text-properties officeooo:rsid="00329b45"/>
    </style:style>
    <style:style style:name="T29" style:family="text">
      <style:text-properties officeooo:rsid="0033f0b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dées de gameplay : </text:p>
      <text:p text:style-name="P6"/>
      <text:p text:style-name="P7"><text:tab/>Pas de gameplay pour l’instant, ce sera juste un roman visuel.</text:p>
      <text:p text:style-name="P1"/>
      <text:p text:style-name="P1">Idées de scénario : </text:p>
      <text:p text:style-name="P1"/>
      <text:p text:style-name="P1"><text:tab/>Le protagoniste est un spéléologue venu étudier une étrange formation de cavernes apparue peu après l’enregistrement récent d’un tremblement de terre. De magnitude 7.8, inhabituel dans cette région du globe, le chercheur s’inquiétait de la possible émergence d’une activité volcanique pouvant mettre la population locale en danger.</text:p>
      <text:p text:style-name="P1"/>
      <text:p text:style-name="P1"><text:tab/><text:span text:style-name="T1">Durant sa descente dans la grotte, la paroi sur laquelle ses harnais prenaient appui s’effondrent, </text:span><text:span text:style-name="T18">et les cordes de sécurité supposées le retenir se </text:span><text:span text:style-name="T19">rompent</text:span><text:span text:style-name="T1">, le faisant chuter au fin fond d’un ravin. Il ne doit sa survie qu’à un torrent au fond de la caverne amortissant sa chute, mais le faisant plonger plus profondément encore dans les galeries souterraines. Manquant de se noyer, il perd connaissance.</text:span></text:p>
      <text:p text:style-name="P1"/>
      <text:p text:style-name="P1"><text:tab/><text:span text:style-name="T1">Il se réveille quelques heures plus tard au bord du lit du fleuve, son sac de provisions étant sa seule propriété rescapée de l’accident. Sans son équipement d’escalade, impossible de retourner de là d’où il vient, et son téléphone et talkie-walkie ne captent aucun signal de ses collègues. Il devra alors s’enfoncer plus profondément dans ce réseau de cavernes dans l’espoir de trouver une issue vers la surface. </text:span><text:span text:style-name="T2">Mais alors qu’il s’aventure dans les entrailles de la Terre et en découvre ses secrets, il s’avère qu’il n’est pas </text:span><text:span text:style-name="T3">la </text:span><text:span text:style-name="T2">seul</text:span><text:span text:style-name="T3">e âme errante</text:span><text:span text:style-name="T2">, et que ce qu’il croyait être des animaux se révèlent être bien plus dangereux… Et libidineux.</text:span></text:p>
      <text:p text:style-name="P1"/>
      <text:p text:style-name="P11"><text:tab/>Au cours de son périple, il fera la rencontre de Céliope, une femelle hermatrope vivant dans un village souterrain existant depuis des temps immémoriaux. Lassée de la vie dans son village, elle souhaite prendre son envol et découvrir ce que le reste de la Caverne a à lui offrir, et rêve de voir un jour le ciel étoilé de la surface dont elle a tant entendu parler. <text:span text:style-name="T20">Voyant chez le protagoniste une opportunité de voir le monde, elle accepte de l’aider à retourner à la surface et l’accompagne dans ses aventures.</text:span></text:p>
      <text:p text:style-name="P11"/>
      <text:p text:style-name="P11"><text:tab/><text:span text:style-name="T20">Le protagoniste découvrira également qu’il n’est pas le seul humain à avoir découvert ce monde souterrain, découvrant au cours de son voyage des traces de divers explorateurs séparés par des décennies, voire des siècles, relatant leurs découvertes </text:span><text:span text:style-name="T21">sur</text:span><text:span text:style-name="T20"> la Caverne </text:span><text:span text:style-name="T21">et son origine</text:span><text:span text:style-name="T20">. </text:span><text:span text:style-name="T22">Il apprendra que les phénomènes étranges de la Caverne proviennent d’une source d’énergie enfouie encore plus profondément dans la Terre, mais que</text:span><text:span text:style-name="T28"> </text:span><text:span text:style-name="T22">toute tentative de ces explorateurs de l’atteindre, ou de remonter à la surface, se sont soldées par un échec, </text:span><text:span text:style-name="T28">la plupart</text:span><text:span text:style-name="T22"> ayant visiblement été arrêtés par quelqu’un déterminé à les empêcher de relater leurs aventures à la surface. </text:span><text:span text:style-name="T28">Les rares rescapés ont probablement été tués par des prédateurs ou un éboulement, et les rares chanceux ayant pu rejoindre la surface ont probablement été pris pour des fous, et enfermés ou exécutés pour hérésie en fonction du siècle.</text:span></text:p>
      <text:p text:style-name="P11"/>
      <text:p text:style-name="P11"><text:tab/><text:span text:style-name="T22">Le protagoniste aura de multiples rencontres avec des membres d’un culte occulte appelé les Gardiens du Sibyllin, </text:span><text:span text:style-name="T23">des créatures cherchant à lui barrer la route vers la surface et les profondeurs de la caverne. Ces derniers sont les responsables des morts </text:span><text:span text:style-name="T26">de</text:span><text:span text:style-name="T27">s plus récents</text:span><text:span text:style-name="T23"> explorateurs dont le protagoniste aura rencontré les notes, pour des raisons encore inconnues.</text:span></text:p>
      <text:p text:style-name="P11"/>
      <text:p text:style-name="P12"><text:tab/><text:span text:style-name="T24">Il finira par rencontrer leur cheffe, Çira, une vieille hermatrope exilée qui, assoiffée de </text:span><text:soft-page-break/><text:span text:style-name="T24">pouvoir, avait jadis tenté de rallier tous les villages hermatropes sous sa bannière, usant de leur peur de la surface pour les manipuler. Même si cette peur est toujours ancrée chez les habitants, ces derniers l’ont chassé de leurs villages, ce qui l’a conduit à trouver refuge toujours plus profond dans la Caverne, jusqu’à un jour trouver la source du pouvoir mystique de la caverne: Le Sibyllin (ce qui veut dire « inexplicable »). </text:span></text:p>
      <text:p text:style-name="P12"/>
      <text:p text:style-name="P12"><text:span text:style-name="T24"><text:tab/>Ce dernier est un immense organisme alien s’étant écrasé sur la Terre il y a 65 millions d’années, causant l’extinction des dinosaures. Même s’il s’est remis du cataclysme, il reste affaibli et ne peut plus quitter la Terre. Au fil des millions d’années, son essence s’est distillée dans les profondeurs de la Caverne, lui donnant ainsi qu’à ses habitants leurs propriétés étranges et inexpliquées, comme </text:span><text:span text:style-name="T29">les étranges rêves du protagoniste où une créature semble lui parler par la pensée ;</text:span><text:span text:style-name="T24"> les formes étranges de certaines créatures, ou la présence d’un ciel sans soleil au-dessus des villages hermatropes.</text:span></text:p>
      <text:p text:style-name="P12"/>
      <text:p text:style-name="P12"><text:tab/> <text:span text:style-name="T24">Çira </text:span><text:span text:style-name="T25">est donc devenue depuis la gardienne du Sibyllin, ses sbires et elle veillant sur lui et s’assurant que nul autre ne s’approprie son pouvoir. Même si sa soif de conquête s’est apaisée, <text:s/></text:span><text:span text:style-name="T24">Çira </text:span><text:span text:style-name="T25">reste méfiante du protagoniste et de la surface, craignant que les humains n’arrivent en masse et ne cherchent à capturer ou tuer le Sibyllin, ainsi que les hermatropes et autres habitants de la Caverne. C’est pourquoi elle cherche à le tuer pour le donner en pâture au Sibyllin.</text:span></text:p>
      <text:p text:style-name="P12"/>
      <text:p text:style-name="P12"><text:tab/><text:span text:style-name="T25">Le protagoniste et Céliope parviennent à quitter la Caverne après avoir tué </text:span><text:span text:style-name="T24">Çira, </text:span><text:span text:style-name="T25">et le protagoniste, désireux de garder cet endroit magique secret, décide de vivre avec Céliope à son village dans la Caverne; mais pas avant de lui montrer le ciel étoilé dont elle rêvait tant.</text:span></text:p>
      <text:p text:style-name="P1"/>
      <text:p text:style-name="P2">Idées d’expérience à faire vivre au joueur : </text:p>
      <text:p text:style-name="P2"/>
      <text:p text:style-name="P3"><text:tab/>Le jeu se veut être un mélange entre Teraurge et un jeu d’horreur : <text:span text:style-name="T4">L’expérience se veut être plus contemplative, une aventure où le joueur explore et découvre un monde mystique et totalement étranger à ce qu’il a connu, </text:span><text:span text:style-name="T5">sans négliger la sensation de danger permanent, rappelant que chaque décision est un risque et que la mort peut l’attendre au moindre recoin. </text:span></text:p>
      <text:p text:style-name="P3"/>
      <text:p text:style-name="P3"><text:span text:style-name="T6"><text:tab/>Le protagoniste découvre de nouvelles plantes, animaux, et formations géologiques qui remettent en question ses acquis scientifiques sur ce qu’il connaissait sur la nature et la formation de son monde, </text:span><text:span text:style-name="T7">et tandis qu’il interagit avec les habitants des profondeurs, il découvre de nouvelles cultures et différentes façons de penser et voir le monde, </text:span><text:span text:style-name="T8">notamment le rapport de ces civilisations avec la surface, </text:span><text:span text:style-name="T9">certains n’ayant jamais vu le ciel ni en ont entendu parler, tandis que d’autres cherchent à éviter tout contact avec la surface à tout prix.</text:span></text:p>
      <text:p text:style-name="P3"/>
      <text:p text:style-name="P4"><text:tab/><text:span text:style-name="T12"> </text:span><text:span text:style-name="T13">Le jeu rappelle </text:span><text:span text:style-name="T14">aussi</text:span><text:span text:style-name="T13"> constamment au joueur que même dans les endroits sûrs, il n’est pas à l’abri d’un accident ou d’une embuscade, </text:span><text:span text:style-name="T10">cherch</text:span><text:span text:style-name="T14">ant</text:span><text:span text:style-name="T10"> à susciter </text:span><text:span text:style-name="T15">chez lui</text:span><text:span text:style-name="T10"> les peurs primale</text:span><text:span text:style-name="T15">s</text:span><text:span text:style-name="T10"> faisant écho à nos réactions défensives héritées de nos ancêtres depuis la nuit des temps : La peur du noir, de l’inconnu, la claustrophobie, la mégalophobie, </text:span><text:span text:style-name="T11">la paranoïa, </text:span><text:span text:style-name="T12">la peur de la noyade, etc.</text:span></text:p>
      <text:p text:style-name="P4"/>
      <text:p text:style-name="P5">Fétiches : </text:p>
      <text:p text:style-name="P5"/>
      <text:list xml:id="list504434356" text:style-name="L1">
        <text:list-item>
          <text:p text:style-name="P8">Teratophilie,</text:p>
        </text:list-item>
        <text:list-item>
          <text:p text:style-name="P8">Zoophilie,</text:p>
        </text:list-item>
        <text:list-item>
          <text:p text:style-name="P8">Filles-monstres <text:span text:style-name="T16">et férrures,</text:span></text:p>
        </text:list-item>
        <text:list-item>
          <text:p text:style-name="P9">Grossesse et naissance <text:span text:style-name="T17">(incluant pont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4-24T00:41:33.886000000</dc:date>
    <meta:editing-duration>PT1H29M32S</meta:editing-duration>
    <meta:editing-cycles>42</meta:editing-cycles>
    <meta:generator>LibreOffice/7.3.3.2$Windows_X86_64 LibreOffice_project/d1d0ea68f081ee2800a922cac8f79445e4603348</meta:generator>
    <meta:document-statistic meta:table-count="0" meta:image-count="0" meta:object-count="0" meta:page-count="2" meta:paragraph-count="22" meta:word-count="1083" meta:character-count="6595" meta:non-whitespace-character-count="5515"/>
  </office:meta>
</office:document-meta>
</file>