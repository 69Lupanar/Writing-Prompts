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alibri" officeooo:rsid="000ec709" officeooo:paragraph-rsid="000ec709"/>
    </style:style>
    <style:style style:name="P2" style:family="paragraph" style:parent-style-name="Standard">
      <style:paragraph-properties fo:text-align="justify" style:justify-single-word="false"/>
      <style:text-properties style:font-name="Calibri" officeooo:rsid="0011786f" officeooo:paragraph-rsid="0011786f"/>
    </style:style>
    <style:style style:name="P3" style:family="paragraph" style:parent-style-name="Standard">
      <style:paragraph-properties fo:text-align="justify" style:justify-single-word="false"/>
      <style:text-properties style:font-name="Calibri" officeooo:rsid="0011786f" officeooo:paragraph-rsid="00173cac"/>
    </style:style>
    <style:style style:name="P4" style:family="paragraph" style:parent-style-name="Standard">
      <style:paragraph-properties fo:text-align="justify" style:justify-single-word="false"/>
      <style:text-properties style:font-name="Calibri" officeooo:rsid="001e38b0" officeooo:paragraph-rsid="001e38b0"/>
    </style:style>
    <style:style style:name="P5" style:family="paragraph" style:parent-style-name="Standard">
      <style:paragraph-properties fo:text-align="justify" style:justify-single-word="false"/>
      <style:text-properties style:font-name="Calibri" officeooo:rsid="00225905" officeooo:paragraph-rsid="000ec709"/>
    </style:style>
    <style:style style:name="P6" style:family="paragraph" style:parent-style-name="Standard">
      <style:paragraph-properties fo:text-align="justify" style:justify-single-word="false"/>
      <style:text-properties style:font-name="Calibri" officeooo:rsid="00225905" officeooo:paragraph-rsid="00225905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Calibri" officeooo:rsid="001e38b0" officeooo:paragraph-rsid="001e38b0"/>
    </style:style>
    <style:style style:name="P8" style:family="paragraph" style:parent-style-name="Standard">
      <style:paragraph-properties fo:text-align="justify" style:justify-single-word="false"/>
      <style:text-properties style:font-name="Calibri" officeooo:rsid="0011786f" officeooo:paragraph-rsid="00173cac"/>
    </style:style>
    <style:style style:name="P9" style:family="paragraph" style:parent-style-name="Standard">
      <style:paragraph-properties fo:text-align="justify" style:justify-single-word="false"/>
      <style:text-properties style:font-name="Calibri" officeooo:rsid="000ec709" officeooo:paragraph-rsid="000ec709"/>
    </style:style>
    <style:style style:name="T1" style:family="text">
      <style:text-properties officeooo:rsid="001e84cd"/>
    </style:style>
    <style:style style:name="T2" style:family="text">
      <style:text-properties officeooo:rsid="00241570"/>
    </style:style>
    <style:style style:name="T3" style:family="text">
      <style:text-properties officeooo:rsid="0025a37c"/>
    </style:style>
    <style:style style:name="T4" style:family="text">
      <style:text-properties officeooo:rsid="00263713"/>
    </style:style>
    <style:style style:name="T5" style:family="text">
      <style:text-properties officeooo:rsid="00277545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Idées de gameplay : </text:p>
      <text:p text:style-name="P5"/>
      <text:p text:style-name="P6"><text:tab/>Pas de gameplay pour l’instant, ce sera juste un roman visuel.</text:p>
      <text:p text:style-name="P1"/>
      <text:p text:style-name="P1"/>
      <text:p text:style-name="P1">Idées de scénario : </text:p>
      <text:p text:style-name="P1"/>
      <text:p text:style-name="P1"><text:tab/><text:span text:style-name="T2">Le protagoniste est un </text:span><text:span text:style-name="T3">cryptozoologue </text:span><text:span text:style-name="T4">et cryptobotanique</text:span><text:span text:style-name="T3">,</text:span><text:span text:style-name="T2"> passionné de mythes et légendes urbaines, et pourchasse activement des monstres et phénomènes paranormaux dans le but de les étudier, espérant un jour obtenir la célébrité. </text:span><text:span text:style-name="T3">Le jeu serait découpé en plusieurs épisodes, chacun mettant en scène le même personnage traversant le monde à la recherche de cryptides, des </text:span><text:span text:style-name="T5">créatures dont l’existence n’est que soupçonnée et relayée de bouche à oreille par des racontars. Le protagoniste cherche à dévoiler la vérité sur ces mystères, et découvrira que ces monstres sont bien plus libidineux que leurs apparences ne le portent à croire.</text:span></text:p>
      <text:p text:style-name="P1"/>
      <text:p text:style-name="P1"/>
      <text:p text:style-name="P2">Idées d’expérience à faire vivre au joueur : </text:p>
      <text:p text:style-name="P2"/>
      <text:p text:style-name="P3"><text:tab/><text:span text:style-name="T2">Similaire à Caverne.</text:span></text:p>
      <text:p text:style-name="P3"/>
      <text:p text:style-name="P4">Fétiches : </text:p>
      <text:p text:style-name="P4"/>
      <text:list xml:id="list596140902" text:style-name="L1">
        <text:list-item>
          <text:p text:style-name="P7">Teratophilie,</text:p>
        </text:list-item>
        <text:list-item>
          <text:p text:style-name="P7">Zoophilie,</text:p>
        </text:list-item>
        <text:list-item>
          <text:p text:style-name="P7">Filles-monstres <text:span text:style-name="T1">et férrures,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19T14:15:21.960000000</dc:date>
    <meta:editing-duration>PT50M36S</meta:editing-duration>
    <meta:editing-cycles>32</meta:editing-cycles>
    <meta:generator>LibreOffice/7.3.3.2$Windows_X86_64 LibreOffice_project/d1d0ea68f081ee2800a922cac8f79445e4603348</meta:generator>
    <meta:document-statistic meta:table-count="0" meta:image-count="0" meta:object-count="0" meta:page-count="1" meta:paragraph-count="10" meta:word-count="138" meta:character-count="869" meta:non-whitespace-character-count="737"/>
  </office:meta>
</office:document-meta>
</file>