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officeooo:rsid="000ec709" officeooo:paragraph-rsid="000ec709"/>
    </style:style>
    <style:style style:name="P2" style:family="paragraph" style:parent-style-name="Standard">
      <style:paragraph-properties fo:text-align="justify" style:justify-single-word="false"/>
      <style:text-properties style:font-name="Calibri" officeooo:rsid="000ec709" officeooo:paragraph-rsid="0029e945"/>
    </style:style>
    <style:style style:name="P3" style:family="paragraph" style:parent-style-name="Standard">
      <style:paragraph-properties fo:text-align="justify" style:justify-single-word="false"/>
      <style:text-properties style:font-name="Calibri" officeooo:rsid="000ec709" officeooo:paragraph-rsid="002db035"/>
    </style:style>
    <style:style style:name="P4" style:family="paragraph" style:parent-style-name="Standard">
      <style:paragraph-properties fo:text-align="justify" style:justify-single-word="false"/>
      <style:text-properties style:font-name="Calibri" officeooo:rsid="001e38b0" officeooo:paragraph-rsid="000ec709"/>
    </style:style>
    <style:style style:name="P5" style:family="paragraph" style:parent-style-name="Standard">
      <style:paragraph-properties fo:text-align="justify" style:justify-single-word="false"/>
      <style:text-properties style:font-name="Calibri" officeooo:rsid="002c2b4f" officeooo:paragraph-rsid="002db035"/>
    </style:style>
    <style:style style:name="P6" style:family="paragraph" style:parent-style-name="Standard">
      <style:paragraph-properties fo:text-align="justify" style:justify-single-word="false"/>
      <style:text-properties style:font-name="Calibri" officeooo:rsid="002db035" officeooo:paragraph-rsid="002db035"/>
    </style:style>
    <style:style style:name="P7" style:family="paragraph" style:parent-style-name="Standard">
      <style:paragraph-properties fo:text-align="justify" style:justify-single-word="false"/>
      <style:text-properties officeooo:paragraph-rsid="002db035"/>
    </style:style>
    <style:style style:name="P8" style:family="paragraph" style:parent-style-name="Standard">
      <style:paragraph-properties fo:text-align="justify" style:justify-single-word="false"/>
      <style:text-properties officeooo:paragraph-rsid="002db035"/>
    </style:style>
    <style:style style:name="P9" style:family="paragraph" style:parent-style-name="Standard">
      <style:paragraph-properties fo:text-align="justify" style:justify-single-word="false"/>
      <style:text-properties style:font-name="Calibri" officeooo:rsid="000ec709" officeooo:paragraph-rsid="0029e945"/>
    </style:style>
    <style:style style:name="P10" style:family="paragraph" style:parent-style-name="Standard" style:list-style-name="L1">
      <style:paragraph-properties fo:text-align="justify" style:justify-single-word="false"/>
      <style:text-properties style:font-name="Calibri" officeooo:rsid="00362038" officeooo:paragraph-rsid="00362038"/>
    </style:style>
    <style:style style:name="P11" style:family="paragraph" style:parent-style-name="Standard" style:list-style-name="L1">
      <style:paragraph-properties fo:text-align="justify" style:justify-single-word="false"/>
      <style:text-properties style:font-name="Calibri" officeooo:rsid="003762f2" officeooo:paragraph-rsid="003762f2"/>
    </style:style>
    <style:style style:name="P12" style:family="paragraph" style:parent-style-name="Standard" style:list-style-name="L1">
      <style:paragraph-properties fo:text-align="justify" style:justify-single-word="false"/>
      <style:text-properties style:font-name="Calibri" officeooo:rsid="003788cd" officeooo:paragraph-rsid="0038a2b7"/>
    </style:style>
    <style:style style:name="P13" style:family="paragraph" style:parent-style-name="Standard" style:list-style-name="L1">
      <style:paragraph-properties fo:text-align="justify" style:justify-single-word="false"/>
      <style:text-properties style:font-name="Calibri" officeooo:rsid="0039e1b3" officeooo:paragraph-rsid="0039e1b3"/>
    </style:style>
    <style:style style:name="P14" style:family="paragraph" style:parent-style-name="Standard" style:list-style-name="L1">
      <style:paragraph-properties fo:text-align="justify" style:justify-single-word="false"/>
      <style:text-properties style:font-name="Calibri" officeooo:rsid="003aee62" officeooo:paragraph-rsid="003aee62"/>
    </style:style>
    <style:style style:name="T1" style:family="text">
      <style:text-properties style:font-name="Calibri" officeooo:rsid="000ec709"/>
    </style:style>
    <style:style style:name="T2" style:family="text">
      <style:text-properties style:font-name="Calibri" officeooo:rsid="00241570"/>
    </style:style>
    <style:style style:name="T3" style:family="text">
      <style:text-properties style:font-name="Calibri" officeooo:rsid="002abb55"/>
    </style:style>
    <style:style style:name="T4" style:family="text">
      <style:text-properties style:font-name="Calibri" officeooo:rsid="002b8ea6"/>
    </style:style>
    <style:style style:name="T5" style:family="text">
      <style:text-properties style:font-name="Calibri" officeooo:rsid="002c2b4f"/>
    </style:style>
    <style:style style:name="T6" style:family="text">
      <style:text-properties style:font-name="Calibri" officeooo:rsid="002c70dc"/>
    </style:style>
    <style:style style:name="T7" style:family="text">
      <style:text-properties style:font-name="Calibri" officeooo:rsid="002db035"/>
    </style:style>
    <style:style style:name="T8" style:family="text">
      <style:text-properties style:font-name="Calibri" officeooo:rsid="002e6a6d"/>
    </style:style>
    <style:style style:name="T9" style:family="text">
      <style:text-properties style:font-name="Calibri" officeooo:rsid="002fbc93"/>
    </style:style>
    <style:style style:name="T10" style:family="text">
      <style:text-properties style:font-name="Calibri" officeooo:rsid="003207eb"/>
    </style:style>
    <style:style style:name="T11" style:family="text">
      <style:text-properties style:font-name="Calibri" officeooo:rsid="00327f25"/>
    </style:style>
    <style:style style:name="T12" style:family="text">
      <style:text-properties style:font-name="Calibri" officeooo:rsid="0034375b"/>
    </style:style>
    <style:style style:name="T13" style:family="text">
      <style:text-properties style:font-name="Calibri" officeooo:rsid="0035aaf0"/>
    </style:style>
    <style:style style:name="T14" style:family="text">
      <style:text-properties style:font-name="Calibri" officeooo:rsid="00361259"/>
    </style:style>
    <style:style style:name="T15" style:family="text">
      <style:text-properties officeooo:rsid="0029e945"/>
    </style:style>
    <style:style style:name="T16" style:family="text">
      <style:text-properties fo:font-style="italic"/>
    </style:style>
    <style:style style:name="T17" style:family="text">
      <style:text-properties officeooo:rsid="002db035"/>
    </style:style>
    <style:style style:name="T18" style:family="text">
      <style:text-properties officeooo:rsid="003762f2"/>
    </style:style>
    <style:style style:name="T19" style:family="text">
      <style:text-properties officeooo:rsid="003788cd"/>
    </style:style>
    <style:style style:name="T20" style:family="text">
      <style:text-properties officeooo:rsid="0038a2b7"/>
    </style:style>
    <style:style style:name="T21" style:family="text">
      <style:text-properties officeooo:rsid="003aee62"/>
    </style:style>
    <style:style style:name="T22" style:family="text">
      <style:text-properties officeooo:rsid="003b6780"/>
    </style:style>
    <style:style style:name="T23" style:family="text">
      <style:text-properties officeooo:rsid="003b6ad7"/>
    </style:style>
    <style:style style:name="T24" style:family="text">
      <style:text-properties officeooo:rsid="003c089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5">Description d</text:span><text:span text:style-name="T17">u</text:span><text:span text:style-name="T15"> cryptide (dans la réalité)</text:span> : </text:p>
      <text:p text:style-name="P3"/>
      <text:p text:style-name="P7"><text:span text:style-name="T1"><text:tab/></text:span><text:span text:style-name="T2">Le </text:span><text:span text:style-name="T11">Yéti</text:span><text:span text:style-name="T3"> est un primate géant détecté au </text:span><text:span text:style-name="T11">cœur des Himalayas, à plusieurs endroits au nord de l’Inde, au Népal et au Sud de la Chine</text:span><text:span text:style-name="T3">. Vivant d</text:span><text:span text:style-name="T11">ans les cavernes des plus hautes montagnes</text:span><text:span text:style-name="T3">, </text:span><text:span text:style-name="T4">il laisse de grandes empreintes de pieds de primate dans l</text:span><text:span text:style-name="T11">a neige</text:span><text:span text:style-name="T4">, </text:span><text:span text:style-name="T6">et fuit le contact </text:span><text:span text:style-name="T12">des humains</text:span><text:span text:style-name="T6">, par hostilité ou par peur, </text:span><text:span text:style-name="T12">ces derniers référant ce cryptide à un démon des neiges</text:span><text:span text:style-name="T4">. </text:span><text:span text:style-name="T5">Une hypothèse propose qu’il soit un descendant du </text:span><text:a xlink:type="simple" xlink:href="https://fr.wikipedia.org/wiki/Gigantopithecus_blacki" text:style-name="Internet_20_link" text:visited-style-name="Visited_20_Internet_20_Link"><text:span text:style-name="T16">Gigantopithecus blacki</text:span></text:a><text:span text:style-name="T3">, un espèce éteinte </text:span><text:span text:style-name="T5">de primates géants originaire d’Asie du Sud-Est, et serait donc un cousin du </text:span><text:span text:style-name="T10">Bigfoot</text:span><text:span text:style-name="T5">.</text:span></text:p>
      <text:p text:style-name="P5"/>
      <text:p text:style-name="P3"><text:span text:style-name="T15">Description d</text:span><text:span text:style-name="T17">u</text:span><text:span text:style-name="T15"> cryptide (</text:span><text:span text:style-name="T17">en jeu</text:span><text:span text:style-name="T15">)</text:span> : </text:p>
      <text:p text:style-name="P3"/>
      <text:p text:style-name="P7"><text:span text:style-name="T1"><text:tab/></text:span><text:span text:style-name="T2">Le </text:span><text:span text:style-name="T13">Yéti</text:span><text:span text:style-name="T3"> </text:span><text:span text:style-name="T7">est un spécimen féminin de primate géant anthropomorphe d’une espèce inconnu. Recouverte d’une fourrure </text:span><text:span text:style-name="T13">blanche</text:span><text:span text:style-name="T7"> épaisse qui masque partiellement son visage, son torse et son abdomen sont cependant recouverts d’un duvet de poils plus fin, laissant apparaître sa silhouette féminine et ses attributs féminins, à savoir ses seins et son vagin. Ses grands pieds, qu’elle peut contrôler aussi bien que ses mains, lui permettent d’attraper des objets ou des hommes qu’elle chasse de temps à autre dans sa forêt.</text:span></text:p>
      <text:p text:style-name="P6"/>
      <text:p text:style-name="P7"><text:span text:style-name="T7"><text:tab/>Vivant en autarcie à l’écart des hommes, Bigfoot n’a jamais eu de contact avec d’autres membres de son espèce et retient ainsi une forte frustration sexuelle qu’elle n’a jamais pu libérer autrement que par masturbation. </text:span><text:span text:style-name="T8">Ainsi, elle chasse régulièrement les humains curieux qui s’aventurent dans l</text:span><text:span text:style-name="T13">es montagnes</text:span><text:span text:style-name="T8"> à sa recherche, et les dévore s’il s’agit de femmes, ou les viole s’il s’agit d’hommes. Parfois, elle s’entiche d’un humain et choisit de le garder ou le laisser partir, mais cela reste un cas rare. </text:span><text:span text:style-name="T9">Pendant ses rapports sexuels, Bigfoot se montre très proactive et dominante, aimant utiliser ses pieds pour bloquer et masturber ses partenaires.</text:span></text:p>
      <text:p text:style-name="P7"><text:span text:style-name="T9"/></text:p>
      <text:p text:style-name="P7"><text:span text:style-name="T9"><text:tab/></text:span><text:span text:style-name="T13">Une particularité du Yéti est qu’elle adore dessiner, celle-ci utilisant de la nourriture et de l’huile pour peindre des fresques murales dans sa caverne, relatant les rencontres qu’elle a eu à l’extérieur, ou encore la séparation de son espèce avec celle de Bigfoot et la diminution de son nombre de congénères dû à la chasse humaine jusqu’à ce qu’elle reste la dernière de son espèce. </text:span><text:span text:style-name="T14">Son goût pour le dessin est un trait que Konar partage avec elle, ce qui les rapprochera.</text:span></text:p>
      <text:p text:style-name="P3"/>
      <text:p text:style-name="P2">Idées de scénario : </text:p>
      <text:p text:style-name="P2"/>
      <text:p text:style-name="P2"/>
      <text:list xml:id="list1590206162" text:style-name="L1">
        <text:list-item>
          <text:p text:style-name="P10">Konar est envoyé en mission au Népal pour rencontrer le Yéti. Son client a engagé un office de tourisme privé pour ne pas le déranger et lui offrir une couverture de touriste souhaitant atteindre le sommet de l’Himalaya.</text:p>
        </text:list-item>
        <text:list-item>
          <text:p text:style-name="P10">Avec ses sherp<text:span text:style-name="T18">as, il entame l’ascension de la montagne, l’épreuve se montrant hardue. Pendant l’ascension, des loups attaquent le petit groupe, mais les sherpas parviennent à les repousser avec des armes et des produits répulsifs.</text:span></text:p>
        </text:list-item>
        <text:list-item>
          <text:p text:style-name="P11">Pendant l’ascension, un blizzard violent se lève, détruisant leurs cordes et leurs échelles et forçant Konar à se séparer de ses sherpas. Pendant qu’il tente de remonter les rejoindre, des léopards des neiges l’attaquent. Il ne doit sa survie qu’à une ombre gigantesque ayant tué le prédateur par la seule force de ses mains. La vision fait fuir les sherpas, croyant avoir affaire à un démon.</text:p>
        </text:list-item>
        <text:list-item>
          <text:p text:style-name="P11">Le démon se révèle être le Yéti, qui se contente de ramasser ses proies sans accorder le moindre regard à Konar. Ayant perdu de vue les sherpas, il n’a d’autre choix que de suivre le Yéti s’il ne veut pas mourir de froid.</text:p>
        </text:list-item>
        <text:list-item>
          <text:p text:style-name="P11"><text:soft-page-break/>Malgré ses réticences, la cryptide tolère sa présence dans sa grotte, se contentant de dévorer la chair crue sans même faire un feu pour la cuire. Konar, lui, commence à être transi de froid, mais le Yéti ne l’aide en rien à allumer un feu, voyant ses tentatives ratées d’utiliser son briquet.</text:p>
        </text:list-item>
        <text:list-item>
          <text:p text:style-name="P11">Konar, voyant l’occasion d’étudier le cryptide de plus près, décide de la dessiner, craignant que le flash de son appareil ne la provoque et ne l’incite à l’éjecter de la grotte. Le voyant dessiner, le Yéti semble se détendre légèrement, puis après que Konar lui ait montré son portrait, décide de lui allumer un feu pour le réchauffer.</text:p>
        </text:list-item>
        <text:list-item>
          <text:p text:style-name="P11">Une fois le repas fini, le Yéti s’endort sans se soucier de Konar, celui-ci, désireux d’aller pisser, prend un bout de bois et parvient à l’allumer en enroulant du papier sec autour de son bout. Cherchant un coin de la grotte approprié, il tombe sur une salle parsemée de peintures murales dépictant le Yéti dans ses diverses aventures au cours de sa vie, <text:span text:style-name="T19">incluant à sa grande surprise une famille entière de Yétis.</text:span></text:p>
        </text:list-item>
        <text:list-item>
          <text:p text:style-name="P12">C’est alors que le Yéto apparaît dans son dos, mais au lieu de le chasser, elle fixe la fresque murale avec tristesse. Suivant son regard, il suit de la main le flux des événements représentés par la peinture, de la séparation de son espèce avec Bigfoot, à la vie des siens dans les montagnes, puis à l’arrivée des hommes qui les ont chassés au fil des âges avec des lances, puis des fusils. Konar comprend que plusieurs générations de Yétis ont vécu ici au vu de la taille imposante de la caverne, puis remarque que le nombre de yétis diminue au fil des illustrations, pour au final ne laisser que le Yéti à ses côtés. </text:p>
        </text:list-item>
        <text:list-item>
          <text:p text:style-name="P12"><text:span text:style-name="T20">Souhaitant lui remonter le moral, il dessine à son tour sur la paroi au feutre noir, d’abord lui et le Yéti à ses côtés, puis les environs. D’abord peu impressionnée, son attitude change quand Konar se met à dessiner le Pacifique et l’Amérique du Nord, lui indiquant d’une croix l’endroit où Bigfoot est supposée exister. Elle se met alors à dessiner à son tour, dépictant ses techniques de chasse tandis que Konar s’évertue à lui faire comprendre la taille du monde et l’existence de la mer.</text:span></text:p>
        </text:list-item>
        <text:list-item>
          <text:p text:style-name="P13">Plus à l’aise en la compagnie de Konar, le Yéti lui fait découvrir le reste des cavernes, jusqu’à une source d’eau chaude thermale. <text:span text:style-name="T21">Hésitant, il finit par se mettre nu et la rejoint, où elle se met à lui faire sa toilette qui finit en double-masturbation, puis en copulation où il manque de se noyer. Puis ils retournent se coucher.</text:span></text:p>
        </text:list-item>
        <text:list-item>
          <text:p text:style-name="P14">Le lendemain, Konar est réveillé par une fellation du Yéti, qui le soulève ensuite du sol pour copuler avec lui. Le Yéti, attristée de voir que Konar doit partir, <text:span text:style-name="T24">semble </text:span><text:span text:style-name="T23">hésiter alors qu’il voit un dessin de randonneurs piégés dans la glace, morts de froid à cause du blizzard ; les nombreux randonneurs que le Yéti n’a pas pu sauver. Celle-ci</text:span> décide <text:span text:style-name="T23">alors</text:span> de l’accompagner vers le sommet, pensant qu’il s’agissait de sa destination, bien que Konar désirait redescendre mais ne pouvait pas lui dire non.</text:p>
        </text:list-item>
        <text:list-item>
          <text:p text:style-name="P14">La montée est laborieuse alors qu’un nouveau blizzard se lève, mais le Yéti le sauve en lui tenant la main jusqu’à leur arrivée au dessus des nuages, où un ciel bleu et un paysage montagneux à couper le souffle les attend.</text:p>
        </text:list-item>
        <text:list-item>
          <text:p text:style-name="P14">Alors que Konar se surprend à admirer les lieux et que le Yéti étend les bras pour profiter de l’instant présent, celle-ci découvre son membre pour l’inciter à copuler à l’air libre. Malgré le froid et sa peur d’être découvert par d’autres randonneurs, Konar accepte.</text:p>
        </text:list-item>
        <text:list-item>
          <text:p text:style-name="P14">Alors qu’il s’apprête à redescendre, le Yéti le serre dans ses bras et repart pour sa caverne. La descente est étrangement tranquille, jusqu’à ce qu’il découvre une troupe de randonneurs se dirigeant vers lui : C’était une équipe de secours venu chercher les traces de son corps, surpris de le savoir en vie et au sommet quand bon nombre de randonneurs ont perdu la vie dans ces montagnes.</text:p>
        </text:list-item>
        <text:list-item>
          <text:p text:style-name="P14">Rentrant à son hôtel, Konar transmet son rapport à son client, mais malgré n’avoir que ses dessins pour prouver sa rencontre avec le Yéti, celui-ci semble croire à son aventure. <text:span text:style-name="T22">Il part </text:span><text:soft-page-break/><text:span text:style-name="T22">peu après pour une nouvelle aventure, alors que le jeu montre le Yéti, assise seule sur le flanc d’une montagne, profitant de l’air frais passant sur sa fourrure.</text:span></text:p>
        </text:list-item>
      </text:list>
      <text:p text:style-name="P1"/>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7-21T16:39:23.660000000</dc:date>
    <meta:editing-duration>PT3H21M</meta:editing-duration>
    <meta:editing-cycles>54</meta:editing-cycles>
    <meta:generator>LibreOffice/7.3.3.2$Windows_X86_64 LibreOffice_project/d1d0ea68f081ee2800a922cac8f79445e4603348</meta:generator>
    <meta:document-statistic meta:table-count="0" meta:image-count="0" meta:object-count="0" meta:page-count="3" meta:paragraph-count="22" meta:word-count="1319" meta:character-count="7584" meta:non-whitespace-character-count="6294"/>
  </office:meta>
</office:document-meta>
</file>