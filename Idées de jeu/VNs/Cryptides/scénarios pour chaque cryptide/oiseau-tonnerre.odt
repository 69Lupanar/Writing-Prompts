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29e945"/>
    </style:style>
    <style:style style:name="P2" style:family="paragraph" style:parent-style-name="Standard">
      <style:paragraph-properties fo:text-align="justify" style:justify-single-word="false"/>
      <style:text-properties style:font-name="Calibri" officeooo:rsid="000ec709" officeooo:paragraph-rsid="002db035"/>
    </style:style>
    <style:style style:name="P3" style:family="paragraph" style:parent-style-name="Standard">
      <style:paragraph-properties fo:text-align="justify" style:justify-single-word="false"/>
      <style:text-properties style:font-name="Calibri" officeooo:rsid="002c2b4f" officeooo:paragraph-rsid="002db035"/>
    </style:style>
    <style:style style:name="P4" style:family="paragraph" style:parent-style-name="Standard">
      <style:paragraph-properties fo:text-align="justify" style:justify-single-word="false"/>
      <style:text-properties style:font-name="Calibri" officeooo:rsid="00616bba" officeooo:paragraph-rsid="00616bba"/>
    </style:style>
    <style:style style:name="P5" style:family="paragraph" style:parent-style-name="Standard">
      <style:paragraph-properties fo:text-align="justify" style:justify-single-word="false"/>
      <style:text-properties style:font-name="Calibri" officeooo:rsid="006ce540" officeooo:paragraph-rsid="005163e6"/>
    </style:style>
    <style:style style:name="P6" style:family="paragraph" style:parent-style-name="Standard">
      <style:paragraph-properties fo:text-align="justify" style:justify-single-word="false"/>
      <style:text-properties officeooo:paragraph-rsid="005163e6"/>
    </style:style>
    <style:style style:name="P7" style:family="paragraph" style:parent-style-name="Standard">
      <style:paragraph-properties fo:text-align="justify" style:justify-single-word="false"/>
      <style:text-properties officeooo:paragraph-rsid="006d0b83"/>
    </style:style>
    <style:style style:name="P8" style:family="paragraph" style:parent-style-name="Standard">
      <style:paragraph-properties fo:text-align="justify" style:justify-single-word="false"/>
      <style:text-properties style:font-name="Calibri" officeooo:rsid="000ec709" officeooo:paragraph-rsid="00825c63"/>
    </style:style>
    <style:style style:name="P9" style:family="paragraph" style:parent-style-name="Standard">
      <style:paragraph-properties fo:text-align="justify" style:justify-single-word="false"/>
      <style:text-properties style:font-name="Calibri" officeooo:rsid="000ec709" officeooo:paragraph-rsid="008bbdcf"/>
    </style:style>
    <style:style style:name="P10" style:family="paragraph" style:parent-style-name="Standard">
      <style:paragraph-properties fo:text-align="justify" style:justify-single-word="false"/>
      <style:text-properties style:font-name="Calibri" officeooo:rsid="000ec709" officeooo:paragraph-rsid="0093566f"/>
    </style:style>
    <style:style style:name="P11" style:family="paragraph" style:parent-style-name="Standard">
      <style:paragraph-properties fo:text-align="justify" style:justify-single-word="false"/>
      <style:text-properties style:font-name="Calibri" officeooo:rsid="000ec709" officeooo:paragraph-rsid="009631cc"/>
    </style:style>
    <style:style style:name="P12" style:family="paragraph" style:parent-style-name="Standard">
      <style:paragraph-properties fo:text-align="justify" style:justify-single-word="false"/>
      <style:text-properties style:font-name="Calibri" officeooo:rsid="000ec709" officeooo:paragraph-rsid="00978332"/>
    </style:style>
    <style:style style:name="T1" style:family="text">
      <style:text-properties officeooo:rsid="00241570"/>
    </style:style>
    <style:style style:name="T2" style:family="text">
      <style:text-properties style:font-name="Calibri" officeooo:rsid="000ec709"/>
    </style:style>
    <style:style style:name="T3" style:family="text">
      <style:text-properties style:font-name="Calibri" officeooo:rsid="00241570"/>
    </style:style>
    <style:style style:name="T4" style:family="text">
      <style:text-properties style:font-name="Calibri" officeooo:rsid="002abb55"/>
    </style:style>
    <style:style style:name="T5" style:family="text">
      <style:text-properties style:font-name="Calibri" officeooo:rsid="002c2b4f"/>
    </style:style>
    <style:style style:name="T6" style:family="text">
      <style:text-properties style:font-name="Calibri" officeooo:rsid="002db035"/>
    </style:style>
    <style:style style:name="T7" style:family="text">
      <style:text-properties style:font-name="Calibri" officeooo:rsid="00653901"/>
    </style:style>
    <style:style style:name="T8" style:family="text">
      <style:text-properties style:font-name="Calibri" officeooo:rsid="00682b42"/>
    </style:style>
    <style:style style:name="T9" style:family="text">
      <style:text-properties style:font-name="Calibri" officeooo:rsid="0068ad78"/>
    </style:style>
    <style:style style:name="T10" style:family="text">
      <style:text-properties style:font-name="Calibri" officeooo:rsid="0068f487"/>
    </style:style>
    <style:style style:name="T11" style:family="text">
      <style:text-properties style:font-name="Calibri" officeooo:rsid="006a3edb"/>
    </style:style>
    <style:style style:name="T12" style:family="text">
      <style:text-properties style:font-name="Calibri" officeooo:rsid="006ab6de"/>
    </style:style>
    <style:style style:name="T13" style:family="text">
      <style:text-properties style:font-name="Calibri" officeooo:rsid="006c8ffe"/>
    </style:style>
    <style:style style:name="T14" style:family="text">
      <style:text-properties style:font-name="Calibri" officeooo:rsid="006ce540"/>
    </style:style>
    <style:style style:name="T15" style:family="text">
      <style:text-properties style:font-name="Calibri" officeooo:rsid="006d0b83"/>
    </style:style>
    <style:style style:name="T16" style:family="text">
      <style:text-properties style:font-name="Calibri" officeooo:rsid="006ee2ad"/>
    </style:style>
    <style:style style:name="T17" style:family="text">
      <style:text-properties style:font-name="Calibri" officeooo:rsid="0070c90f"/>
    </style:style>
    <style:style style:name="T18" style:family="text">
      <style:text-properties style:font-name="Calibri" officeooo:rsid="0075f548"/>
    </style:style>
    <style:style style:name="T19" style:family="text">
      <style:text-properties officeooo:rsid="0029e945"/>
    </style:style>
    <style:style style:name="T20" style:family="text">
      <style:text-properties officeooo:rsid="002db035"/>
    </style:style>
    <style:style style:name="T21" style:family="text">
      <style:text-properties officeooo:rsid="00302982"/>
    </style:style>
    <style:style style:name="T22" style:family="text">
      <style:text-properties officeooo:rsid="0066c191"/>
    </style:style>
    <style:style style:name="T23" style:family="text">
      <style:text-properties officeooo:rsid="0071b76b"/>
    </style:style>
    <style:style style:name="T24" style:family="text">
      <style:text-properties officeooo:rsid="00727d1a"/>
    </style:style>
    <style:style style:name="T25" style:family="text">
      <style:text-properties officeooo:rsid="0077c475"/>
    </style:style>
    <style:style style:name="T26" style:family="text">
      <style:text-properties officeooo:rsid="00782296"/>
    </style:style>
    <style:style style:name="T27" style:family="text">
      <style:text-properties officeooo:rsid="0079514c"/>
    </style:style>
    <style:style style:name="T28" style:family="text">
      <style:text-properties officeooo:rsid="007b81c0"/>
    </style:style>
    <style:style style:name="T29" style:family="text">
      <style:text-properties officeooo:rsid="007ca3b0"/>
    </style:style>
    <style:style style:name="T30" style:family="text">
      <style:text-properties officeooo:rsid="007dcfd3"/>
    </style:style>
    <style:style style:name="T31" style:family="text">
      <style:text-properties officeooo:rsid="007f3063"/>
    </style:style>
    <style:style style:name="T32" style:family="text">
      <style:text-properties officeooo:rsid="007f5fe3"/>
    </style:style>
    <style:style style:name="T33" style:family="text">
      <style:text-properties officeooo:rsid="008094a2"/>
    </style:style>
    <style:style style:name="T34" style:family="text">
      <style:text-properties officeooo:rsid="00825c63"/>
    </style:style>
    <style:style style:name="T35" style:family="text">
      <style:text-properties officeooo:rsid="00748e7c"/>
    </style:style>
    <style:style style:name="T36" style:family="text">
      <style:text-properties officeooo:rsid="00837520"/>
    </style:style>
    <style:style style:name="T37" style:family="text">
      <style:text-properties officeooo:rsid="0084b334"/>
    </style:style>
    <style:style style:name="T38" style:family="text">
      <style:text-properties officeooo:rsid="0084d244"/>
    </style:style>
    <style:style style:name="T39" style:family="text">
      <style:text-properties officeooo:rsid="0088212e"/>
    </style:style>
    <style:style style:name="T40" style:family="text">
      <style:text-properties officeooo:rsid="0089e051"/>
    </style:style>
    <style:style style:name="T41" style:family="text">
      <style:text-properties officeooo:rsid="008b5e39"/>
    </style:style>
    <style:style style:name="T42" style:family="text">
      <style:text-properties officeooo:rsid="008bbdcf"/>
    </style:style>
    <style:style style:name="T43" style:family="text">
      <style:text-properties officeooo:rsid="008d75b3"/>
    </style:style>
    <style:style style:name="T44" style:family="text">
      <style:text-properties officeooo:rsid="008e3e04"/>
    </style:style>
    <style:style style:name="T45" style:family="text">
      <style:text-properties officeooo:rsid="009001e6"/>
    </style:style>
    <style:style style:name="T46" style:family="text">
      <style:text-properties officeooo:rsid="0091f174"/>
    </style:style>
    <style:style style:name="T47" style:family="text">
      <style:text-properties officeooo:rsid="0092c6ee"/>
    </style:style>
    <style:style style:name="T48" style:family="text">
      <style:text-properties officeooo:rsid="00930122"/>
    </style:style>
    <style:style style:name="T49" style:family="text">
      <style:text-properties officeooo:rsid="0093566f"/>
    </style:style>
    <style:style style:name="T50" style:family="text">
      <style:text-properties officeooo:rsid="00937ea2"/>
    </style:style>
    <style:style style:name="T51" style:family="text">
      <style:text-properties officeooo:rsid="009568d2"/>
    </style:style>
    <style:style style:name="T52" style:family="text">
      <style:text-properties officeooo:rsid="00978332"/>
    </style:style>
    <style:style style:name="T53" style:family="text">
      <style:text-properties officeooo:rsid="0097ee5e"/>
    </style:style>
    <style:style style:name="T54" style:family="text">
      <style:text-properties officeooo:rsid="0098d15d"/>
    </style:style>
    <style:style style:name="T55" style:family="text">
      <style:text-properties officeooo:rsid="0098dee6"/>
    </style:style>
    <style:style style:name="T56" style:family="text">
      <style:text-properties officeooo:rsid="0098e83d"/>
    </style:style>
    <style:style style:name="T57" style:family="text">
      <style:text-properties officeooo:rsid="009a112a"/>
    </style:style>
    <style:style style:name="T58" style:family="text">
      <style:text-properties officeooo:rsid="009bbea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Description d</text:span><text:span text:style-name="T20">u</text:span><text:span text:style-name="T19"> cryptide (dans la réalité)</text:span> : </text:p>
      <text:p text:style-name="P2"/>
      <text:p text:style-name="P7"><text:span text:style-name="T2"><text:tab/></text:span><text:span text:style-name="T3">L’</text:span><text:span text:style-name="T7">oiseau-tonnerre</text:span><text:span text:style-name="T4"> </text:span><text:span text:style-name="T5">est </text:span><text:span text:style-name="T8">un volatile dont l’envergure peut aller de 2 à 21 mètres, ressemblant à un condor de Californie ou de Ca</text:span><text:span text:style-name="T10">l</text:span><text:span text:style-name="T8">ifornie. </text:span><text:span text:style-name="T9">Son plumage est noir et parsemée de plumes blanches rangées en rayures, sa tête est chauve est surmontée d’une collerette blanche, et ses pattes sont courtes et puissantes. Populaire dans le folklore de nombreuses tribus amérindiennes, l’oiseau-tonnerre est </text:span><text:span text:style-name="T14">représenté par de nombreux totems amérindiens </text:span><text:span text:style-name="T15">et réputé</text:span><text:span text:style-name="T9"> pour être intelligent, solitaire et doté d’une grande force, capable de soulever des baleines dont il se nourrit. Son corps </text:span><text:span text:style-name="T11">absorbe et</text:span><text:span text:style-name="T9"> émet naturellement de l’électricité dont il décharge sur ses proies en de violent éclairs, ses ailes suffisamment fortes pour causer des bourrasques et produire un bruit de tonnerre assourdissant.</text:span></text:p>
      <text:p text:style-name="P3"/>
      <text:p text:style-name="P2"><text:span text:style-name="T19">Description d</text:span><text:span text:style-name="T20">u</text:span><text:span text:style-name="T19"> cryptide (</text:span><text:span text:style-name="T20">en jeu</text:span><text:span text:style-name="T19">)</text:span> : </text:p>
      <text:p text:style-name="P2"/>
      <text:p text:style-name="P6"><text:span text:style-name="T2"><text:tab/></text:span><text:span text:style-name="T3">L</text:span><text:span text:style-name="T12">’oiseau-tonnerre est un jeune spécimen féminin de 5 mètres d’envergure, semblable physiquement à un</text:span><text:span text:style-name="T6"> </text:span><text:span text:style-name="T12">Condor de Californie géant. Son visage, plus anthropomorphe que les condors normaux, est couronnée d’une crinière blonde-grise qui s’étend jusque sur ses épaules. Son plumage noirdencre est parsemé de plumes blanches en motif de rayures, qui s’illuminent d’une bleu cyan lorsqu’elle contracte ses muscles pour générer de l’électricité à la manière des anguilles électriques. </text:span><text:span text:style-name="T13">Contrairement à la plupart des autres espèces d’oiseaux, </text:span><text:span text:style-name="T14">ce cryptide ne possède pas un cloaque, mais un vagin.</text:span></text:p>
      <text:p text:style-name="P5"/>
      <text:p text:style-name="P6"><text:span text:style-name="T14"><text:tab/></text:span><text:span text:style-name="T16">Solitaire </text:span><text:span text:style-name="T18">et fier</text:span><text:span text:style-name="T16">, c’est un chasseur intelligent qui parcourt les vastes espaces de l’Utah et d’Arizona à la recherche de proies et partenaires sexuels, et se repose le soir dans son repaire, tapi dans les hauteurs du Grand Canyon d’Arizona. </text:span><text:span text:style-name="T17">La réserve amérindienne de Kaibab, peuplée par la tribu de Kaibab Paiutes, conte de nombreuses histoires détaillant l’implication de l’oiseau-tonnerre dans de nombreux événements à travers leur histoire, notamment les prétendus pouvoirs mythiques du volatile et ses combats contre d’autres créatures mythiques.</text:span></text:p>
      <text:p text:style-name="P2"/>
      <text:p text:style-name="P1">Idées de scénario : </text:p>
      <text:p text:style-name="P1"/>
      <text:p text:style-name="P8"><text:tab/><text:span text:style-name="T1">Le protagoniste, </text:span><text:span text:style-name="T21">Konar Lebarbant, </text:span><text:span text:style-name="T22">parcourt les états de l’Utah et de l’Arizona aux États-Unis </text:span><text:span text:style-name="T23">à destination de Fredonia, un petit village bordant une réserve amérindienne et le parc national du Grand Canyon </text:span><text:span text:style-name="T24">d’Arizona. Son client lui demande cette fois d’enquêter sur les causes d’une activité météorologique inhabituelle dans la région, la région étant depuis quelques semaines sous l’emprise d’un étrange orage qui alterne entre violentes bourrasques et tempêtes d’éclairs ; cet orage a cause le crash d’un avion privé à quelques kilomètres du parc, ainsi que de nombreuses coupures de courant inexpliquées, que son client a supposé être l’œuvre d’un oiseau-tonnerre ayant élu domicile dans le canyon.</text:span></text:p>
      <text:p text:style-name="P8"/>
      <text:p text:style-name="P8"><text:span text:style-name="T35"><text:tab/>Konar visite la réserve amérindienne pour en savoir plus sur l’oiseau-tonnerre.</text:span></text:p>
      <text:p text:style-name="P8"/>
      <text:p text:style-name="P8"><text:span text:style-name="T28"><text:tab/>Première visite du parc, Konar ne remarque rien d’anormal. A son retour à l’hôtel le soir, le</text:span><text:span text:style-name="T30">s lignes téléphoniques sont coupées </text:span><text:span text:style-name="T28">dans toute la petite ville, </text:span><text:span text:style-name="T30">l’empêchant d’appeler son client </text:span><text:span text:style-name="T31">pour lui confirmer son arrivée</text:span><text:span text:style-name="T28">. Il décide d’aller se coucher.</text:span></text:p>
      <text:p text:style-name="P8"/>
      <text:p text:style-name="P8"><text:span text:style-name="T28"><text:tab/>Le lendemain, le courant n’est toujours pas revenu. </text:span><text:span text:style-name="T29">Au restaurant de l’hôtel, Konar surprend un des ouvriers travaillant sur les lignes électriques raconter que le problème vient des lignes traversant le parc national. Konar y voit une opportunité d’enquêter.</text:span></text:p>
      <text:p text:style-name="P8"><text:soft-page-break/></text:p>
      <text:p text:style-name="P8"><text:span text:style-name="T29"><text:tab/>S’écartant du chemin guidé, Konar suit les lignes électriques traversant le parc. </text:span><text:span text:style-name="T30">Au fur et à mesure de son avancée, les nuages se font de plus en plus lourds.</text:span><text:span text:style-name="T29"> Les lignes gagnent en hauteur, et semblent se lier à un bâtiment en haut d’une falaise. </text:span></text:p>
      <text:p text:style-name="P8"/>
      <text:p text:style-name="P8"><text:span text:style-name="T30"><text:tab/>Faute de trouver un chemin plus rapide, </text:span><text:span text:style-name="T35">Konar escalade </text:span><text:span text:style-name="T30">la</text:span><text:span text:style-name="T35"> falaise pour </text:span><text:span text:style-name="T30">découvrir un transformateur électrique, apparemment déserté. De grands éclairs lumineux jaillissent de son épicentre. Se rapprochant de la source, il y découvre l’oiseau-tonnerre, qui</text:span><text:span text:style-name="T35"> a attaqué </text:span><text:span text:style-name="T30">le</text:span><text:span text:style-name="T35"> transformateur pour se recharge</text:span><text:span text:style-name="T30">r, exp</text:span><text:span text:style-name="T32">l</text:span><text:span text:style-name="T30">iquant pourquoi l</text:span><text:span text:style-name="T35">es télécommunications sont endommagées. </text:span><text:span text:style-name="T27">Il attaque Konar, </text:span><text:span text:style-name="T33">mais ses éclairs conduisent toute l’électricité jusqu’à lui et le surchargent, le forçant à s’enfuir</text:span><text:span text:style-name="T27">.</text:span></text:p>
      <text:p text:style-name="P8"/>
      <text:p text:style-name="P8"><text:span text:style-name="T34"><text:tab/>Le jour suivant, le courant est peu à peu revenu à Fredonia, cependant un énorme orage est sur le point de s’abattre sur le parc, en direction de la ville. Konar y voit une opportunité pour retrouver le cryptide et s’achète des protections en caoutchouc contre la pluie et l’électricité.</text:span></text:p>
      <text:p text:style-name="P8"/>
      <text:p text:style-name="P8"><text:span text:style-name="T34"><text:tab/>Le parc étant fermé pour la durée de l’orage, Konar prend la route vers l’épicentre de l’orage, traversant le paysage coloré et rocailleux de la région. Arrivé à destination, il comprend qu’il devra escalader plusieurs falaises, et se félicit</text:span><text:span text:style-name="T37">e</text:span><text:span text:style-name="T34"> d’avoir apporté son vieux matériel d’escalade, bien qu’il n’ait jamais été bon à ça.</text:span></text:p>
      <text:p text:style-name="P8"/>
      <text:p text:style-name="P9"><text:tab/><text:span text:style-name="T36">A son arrivée, il trouve le Cryptide visiblement blessé</text:span><text:span text:style-name="T39">, son visage humanoïde distordu de douleur</text:span><text:span text:style-name="T36">. </text:span><text:span text:style-name="T38">Prenant ses précautions pour éviter de l’effrayer, il réalise </text:span><text:span text:style-name="T39">que le volatile frotte ses parties intimes contre une pierre, des arcs électriques quittant son corps à chaque spasme et orgasme. Konar comprend que sa surcharge en électricité excite sexuellement l’oiseau-tonnerre, et tente de s’approcher pour la calmer. </text:span></text:p>
      <text:p text:style-name="P9"/>
      <text:p text:style-name="P9"><text:span text:style-name="T39"><text:tab/>En le voyant, </text:span><text:span text:style-name="T40">le cryptide lui lance un faible éclair pour le repousser, mais protégé par sa combinaison, Konar peut s’approcher sans problème, et attrape l’oiseau-tonnerre alors qu’il sautillait pour s’enfuir. Konar lui bloque les ailes pour l’empêcher de s’envoler, et profite de cette occasion pour observer l’animal de plus près, notamment son vagin qui sécrète des fluides à une quantité remarquable. Sachant que l’oiseau ne peut pas le blesser, il décide de le </text:span><text:span text:style-name="T35">doigter pour se calmer. </text:span><text:span text:style-name="T40">Un fois fini, Konar relâche l’animal, qui s’éloigne de quelques pas avec un regard confus, </text:span><text:span text:style-name="T41">l’orage se calmant au-dessus de leurs têtes</text:span><text:span text:style-name="T40">. </text:span><text:span text:style-name="T41">Konar tente d’immortaliser ce moment érotique avec une photo, mais le cryptide s’envole avec un dernier éclair qui grille son appareil.</text:span></text:p>
      <text:p text:style-name="P9"/>
      <text:p text:style-name="P10"><text:tab/><text:span text:style-name="T42">Le lendemain, Konar repart en exploration à sa recherche. Cependant, aucun orage ne se profile à l’horizon, et le cryptide n’est pas aux deux derniers emplacements. Konar l’aperçoit par hasard au sommet d’un mesa, et décide de l’escalader pour le rejoindre. L’oiseau-tonnerre fixe pensivement une nuée de condors tournoyer dans le ciel, l’air attristée par cette vue. </text:span><text:span text:style-name="T43">Elle finit cependant par remarquer Konar et tente de l’intimider pour le faire partir de son territoire. Konar lui offre de la viande en offrande, ce qui semble la calmer malgré son refus. Cependant, elle refuse sa nourriture et prend son envol, au grand dam de Konar, avant qu’elle ne revienne </text:span><text:span text:style-name="T44">avec un poisson fraîchement pêché dans la rivière en contrebas, qu’elle mange devant Konar en signe de défi. Puis elle s’envole une fois fini, laissant Konar se demander si son agressivité n’était pas dû </text:span><text:span text:style-name="T45">a</text:span><text:span text:style-name="T44">u fait que son nid ne devait pas être loin.</text:span></text:p>
      <text:p text:style-name="P10"/>
      <text:p text:style-name="P11"><text:span text:style-name="T26"><text:tab/></text:span><text:span text:style-name="T49">Le lendemain pendant son exploration, Konar remarque un agglomérat important de condors : C’est la saison des amours. Il est surpris par l’arrivée de l’oiseau-tonnerre, qui n’arrive </text:span><text:soft-page-break/><text:span text:style-name="T49">cependant pas à trouver de partenaire, tous étant effrayés par sa taille et ses éclairs. Leurs refus semble frustrer l’oiseau-tonnerre, et l’orage menace d’éclater. Konar décide de s’interposer avant qu’elle ne décide de tous les frire, et tente de la calmer, </text:span><text:span text:style-name="T52">comprenant que sa frustration sexuelle lui cause de perdre le contrôle de son électricité</text:span><text:span text:style-name="T49">. </text:span><text:span text:style-name="T50">Le crypti</text:span><text:span text:style-name="T53">d</text:span><text:span text:style-name="T50">e semble le reconnaître un temps, puis sa colère reprend, causant un arc électrique qui fait fuir les autres condors. Konar réussit une seconde à la caresse</text:span><text:span text:style-name="T52">r </text:span><text:span text:style-name="T54">et tente de se mettre derrière elle pour la doigter à nouveau</text:span><text:span text:style-name="T50"> avant que, confuse, la volatile prenne son envol, </text:span><text:span text:style-name="T56">sans qu’il puisse prendre une photo </text:span><text:span text:style-name="T57">d’elle</text:span><text:span text:style-name="T50">.</text:span></text:p>
      <text:p text:style-name="P11"/>
      <text:p text:style-name="P12"><text:span text:style-name="T46"><text:tab/>Le lendemain, Konar essaie de retrouver l’oiseau-tonnerre </text:span><text:span text:style-name="T48">aux mêmes endroits que la dernière fois</text:span><text:span text:style-name="T46">, </text:span><text:span text:style-name="T47">mais ne la trouve pas</text:span><text:span text:style-name="T46">. Il la retrouve </text:span><text:span text:style-name="T48">lors d’une pluie battante, </text:span><text:span text:style-name="T46">abritée dans une grotte en attendant que la pluie passe ; </text:span><text:span text:style-name="T55">d’abord méfiante, </text:span><text:span text:style-name="T46">elle accepte de se blottir contre elle et le laisse la caresser.</text:span><text:span text:style-name="T50"> Konar comprend alors qu’elle doit </text:span><text:span text:style-name="T51">être ravagée par la solitude</text:span><text:span text:style-name="T50">, ses dons électriques faisant fuir ses congénères.</text:span><text:span text:style-name="T46"> Une fois l’orage passé, </text:span><text:span text:style-name="T35">Cryptide transporte Konar sur son dos pour lui faire visiter le Grand Canyon en remerciement de l’avoir aidé, puis l’emmène à son nid pour copuler, </text:span><text:span text:style-name="T58">l’oiseau-tonnerre montrant un grand plaisir à dominer et à électrocuter son partenaire</text:span><text:span text:style-name="T35">. </text:span><text:span text:style-name="T25">La fin de l’épisode montre l’oiseau-tonnerre du haut du canyon observer la caravane de Konar partir pour sa prochaine mission.</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18T20:08:18.229000000</dc:date>
    <meta:editing-duration>PT10H52M17S</meta:editing-duration>
    <meta:editing-cycles>141</meta:editing-cycles>
    <meta:generator>LibreOffice/7.3.3.2$Windows_X86_64 LibreOffice_project/d1d0ea68f081ee2800a922cac8f79445e4603348</meta:generator>
    <meta:document-statistic meta:table-count="0" meta:image-count="0" meta:object-count="0" meta:page-count="3" meta:paragraph-count="19" meta:word-count="1317" meta:character-count="8420" meta:non-whitespace-character-count="7101"/>
  </office:meta>
</office:document-meta>
</file>