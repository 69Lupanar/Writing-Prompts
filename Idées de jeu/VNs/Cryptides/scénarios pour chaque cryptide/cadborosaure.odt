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323b19"/>
    </style:style>
    <style:style style:name="P3" style:family="paragraph" style:parent-style-name="Standard">
      <style:paragraph-properties fo:text-align="justify" style:justify-single-word="false"/>
      <style:text-properties officeooo:paragraph-rsid="0038c875"/>
    </style:style>
    <style:style style:name="P4" style:family="paragraph" style:parent-style-name="Standard">
      <style:paragraph-properties fo:text-align="justify" style:justify-single-word="false"/>
      <style:text-properties officeooo:paragraph-rsid="003f5ce9"/>
    </style:style>
    <style:style style:name="P5" style:family="paragraph" style:parent-style-name="Standard">
      <style:paragraph-properties fo:text-align="justify" style:justify-single-word="false"/>
      <style:text-properties officeooo:paragraph-rsid="004eb7a3"/>
    </style:style>
    <style:style style:name="P6" style:family="paragraph" style:parent-style-name="Standard">
      <style:paragraph-properties fo:text-align="justify" style:justify-single-word="false"/>
      <style:text-properties style:font-name="Calibri"/>
    </style:style>
    <style:style style:name="P7" style:family="paragraph" style:parent-style-name="Standard">
      <style:paragraph-properties fo:text-align="justify" style:justify-single-word="false"/>
      <style:text-properties style:font-name="Calibri" officeooo:rsid="001e38b0" officeooo:paragraph-rsid="000ec709"/>
    </style:style>
    <style:style style:name="P8" style:family="paragraph" style:parent-style-name="Standard">
      <style:paragraph-properties fo:text-align="justify" style:justify-single-word="false"/>
      <style:text-properties style:font-name="Calibri"/>
    </style:style>
    <style:style style:name="P9" style:family="paragraph" style:parent-style-name="Standard">
      <style:paragraph-properties fo:text-align="justify" style:justify-single-word="false"/>
      <style:text-properties style:font-name="Calibri" officeooo:rsid="0033cdd9" officeooo:paragraph-rsid="00323b19"/>
    </style:style>
    <style:style style:name="P10" style:family="paragraph" style:parent-style-name="Standard">
      <style:paragraph-properties fo:text-align="justify" style:justify-single-word="false"/>
      <style:text-properties style:font-name="Calibri" officeooo:rsid="003c26ed" officeooo:paragraph-rsid="003f5ce9"/>
    </style:style>
    <style:style style:name="P11" style:family="paragraph" style:parent-style-name="Standard">
      <style:paragraph-properties fo:text-align="justify" style:justify-single-word="false"/>
      <style:text-properties style:font-name="Calibri" officeooo:rsid="003f5ce9" officeooo:paragraph-rsid="003f5ce9"/>
    </style:style>
    <style:style style:name="P12" style:family="paragraph" style:parent-style-name="Standard">
      <style:paragraph-properties fo:text-align="justify" style:justify-single-word="false"/>
      <style:text-properties style:font-name="Calibri" officeooo:rsid="0047d188" officeooo:paragraph-rsid="003f5ce9"/>
    </style:style>
    <style:style style:name="P13" style:family="paragraph" style:parent-style-name="Standard">
      <style:paragraph-properties fo:text-align="justify" style:justify-single-word="false"/>
      <style:text-properties style:font-name="Calibri" officeooo:rsid="004bb1b8" officeooo:paragraph-rsid="004eb7a3"/>
    </style:style>
    <style:style style:name="P14" style:family="paragraph" style:parent-style-name="Standard">
      <style:paragraph-properties fo:text-align="justify" style:justify-single-word="false"/>
      <style:text-properties officeooo:paragraph-rsid="004eb7a3"/>
    </style:style>
    <style:style style:name="P15" style:family="paragraph" style:parent-style-name="Standard">
      <style:paragraph-properties fo:text-align="justify" style:justify-single-word="false"/>
      <style:text-properties officeooo:rsid="0052d8cd" officeooo:paragraph-rsid="0052d8cd"/>
    </style:style>
    <style:style style:name="P16" style:family="paragraph" style:parent-style-name="Standard">
      <style:paragraph-properties fo:text-align="justify" style:justify-single-word="false"/>
      <style:text-properties officeooo:rsid="0052d8cd" officeooo:paragraph-rsid="00649f98"/>
    </style:style>
    <style:style style:name="P17" style:family="paragraph" style:parent-style-name="Standard">
      <style:paragraph-properties fo:text-align="justify" style:justify-single-word="false"/>
      <style:text-properties officeooo:rsid="0052d8cd" officeooo:paragraph-rsid="006883aa"/>
    </style:style>
    <style:style style:name="P18" style:family="paragraph" style:parent-style-name="Standard">
      <style:paragraph-properties fo:text-align="justify" style:justify-single-word="false"/>
      <style:text-properties officeooo:rsid="006108b4" officeooo:paragraph-rsid="005c3647"/>
    </style:style>
    <style:style style:name="P19" style:family="paragraph" style:parent-style-name="Standard">
      <style:paragraph-properties fo:text-align="justify" style:justify-single-word="false"/>
      <style:text-properties officeooo:rsid="006108b4" officeooo:paragraph-rsid="006924d2"/>
    </style:style>
    <style:style style:name="P20" style:family="paragraph" style:parent-style-name="Standard">
      <style:paragraph-properties fo:text-align="justify" style:justify-single-word="false"/>
      <style:text-properties officeooo:rsid="006c0139" officeooo:paragraph-rsid="006c0139"/>
    </style:style>
    <style:style style:name="P21" style:family="paragraph" style:parent-style-name="Standard" style:list-style-name="L1">
      <style:paragraph-properties fo:text-align="justify" style:justify-single-word="false"/>
      <style:text-properties officeooo:rsid="006c0139" officeooo:paragraph-rsid="006c0139"/>
    </style:style>
    <style:style style:name="P22" style:family="paragraph" style:parent-style-name="Standard" style:list-style-name="L2">
      <style:paragraph-properties fo:text-align="justify" style:justify-single-word="false"/>
      <style:text-properties officeooo:rsid="006c0139" officeooo:paragraph-rsid="006f6cec"/>
    </style:style>
    <style:style style:name="P23" style:family="paragraph" style:parent-style-name="Standard">
      <style:paragraph-properties fo:text-align="justify" style:justify-single-word="false"/>
      <style:text-properties officeooo:rsid="006c0139" officeooo:paragraph-rsid="006f6cec"/>
    </style:style>
    <style:style style:name="P24" style:family="paragraph" style:parent-style-name="Standard">
      <style:paragraph-properties fo:text-align="justify" style:justify-single-word="false"/>
      <style:text-properties officeooo:rsid="006e66e4" officeooo:paragraph-rsid="006e66e4"/>
    </style:style>
    <style:style style:name="P25" style:family="paragraph" style:parent-style-name="Standard" style:list-style-name="L2">
      <style:paragraph-properties fo:text-align="justify" style:justify-single-word="false"/>
      <style:text-properties officeooo:rsid="006f6cec" officeooo:paragraph-rsid="006f6cec"/>
    </style:style>
    <style:style style:name="P26" style:family="paragraph" style:parent-style-name="Standard" style:list-style-name="L2">
      <style:paragraph-properties fo:text-align="justify" style:justify-single-word="false"/>
      <style:text-properties officeooo:rsid="006f9058" officeooo:paragraph-rsid="006f9058"/>
    </style:style>
    <style:style style:name="T1" style:family="text">
      <style:text-properties style:font-name="Calibri"/>
    </style:style>
    <style:style style:name="T2" style:family="text">
      <style:text-properties style:font-name="Calibri" officeooo:rsid="002b2e44"/>
    </style:style>
    <style:style style:name="T3" style:family="text">
      <style:text-properties style:font-name="Calibri" fo:language="fr" fo:country="FR" officeooo:rsid="002b4ca0"/>
    </style:style>
    <style:style style:name="T4" style:family="text">
      <style:text-properties style:font-name="Calibri" fo:language="fr" fo:country="FR" officeooo:rsid="002eadb0"/>
    </style:style>
    <style:style style:name="T5" style:family="text">
      <style:text-properties style:font-name="Calibri" officeooo:rsid="002db5df"/>
    </style:style>
    <style:style style:name="T6" style:family="text">
      <style:text-properties style:font-name="Calibri" officeooo:rsid="002df164"/>
    </style:style>
    <style:style style:name="T7" style:family="text">
      <style:text-properties style:font-name="Calibri" officeooo:rsid="002e367c"/>
    </style:style>
    <style:style style:name="T8" style:family="text">
      <style:text-properties style:font-name="Calibri" officeooo:rsid="00323b19"/>
    </style:style>
    <style:style style:name="T9" style:family="text">
      <style:text-properties style:font-name="Calibri" officeooo:rsid="0033cdd9"/>
    </style:style>
    <style:style style:name="T10" style:family="text">
      <style:text-properties style:font-name="Calibri" officeooo:rsid="00344ac2"/>
    </style:style>
    <style:style style:name="T11" style:family="text">
      <style:text-properties style:font-name="Calibri" officeooo:rsid="00361e73"/>
    </style:style>
    <style:style style:name="T12" style:family="text">
      <style:text-properties style:font-name="Calibri" officeooo:rsid="00378696"/>
    </style:style>
    <style:style style:name="T13" style:family="text">
      <style:text-properties style:font-name="Calibri" officeooo:rsid="0037a993"/>
    </style:style>
    <style:style style:name="T14" style:family="text">
      <style:text-properties style:font-name="Calibri" officeooo:rsid="0038c875"/>
    </style:style>
    <style:style style:name="T15" style:family="text">
      <style:text-properties style:font-name="Calibri" officeooo:rsid="0039ee03"/>
    </style:style>
    <style:style style:name="T16" style:family="text">
      <style:text-properties style:font-name="Calibri" officeooo:rsid="003bce86"/>
    </style:style>
    <style:style style:name="T17" style:family="text">
      <style:text-properties style:font-name="Calibri" officeooo:rsid="003c26ed"/>
    </style:style>
    <style:style style:name="T18" style:family="text">
      <style:text-properties style:font-name="Calibri" officeooo:rsid="003ccf23"/>
    </style:style>
    <style:style style:name="T19" style:family="text">
      <style:text-properties style:font-name="Calibri" officeooo:rsid="003e2900"/>
    </style:style>
    <style:style style:name="T20" style:family="text">
      <style:text-properties style:font-name="Calibri" officeooo:rsid="003f5ce9"/>
    </style:style>
    <style:style style:name="T21" style:family="text">
      <style:text-properties style:font-name="Calibri" officeooo:rsid="00413f8f"/>
    </style:style>
    <style:style style:name="T22" style:family="text">
      <style:text-properties style:font-name="Calibri" officeooo:rsid="00433763"/>
    </style:style>
    <style:style style:name="T23" style:family="text">
      <style:text-properties style:font-name="Calibri" officeooo:rsid="00450d77"/>
    </style:style>
    <style:style style:name="T24" style:family="text">
      <style:text-properties style:font-name="Calibri" officeooo:rsid="0045a23c"/>
    </style:style>
    <style:style style:name="T25" style:family="text">
      <style:text-properties style:font-name="Calibri" officeooo:rsid="0045ef6b"/>
    </style:style>
    <style:style style:name="T26" style:family="text">
      <style:text-properties style:font-name="Calibri" officeooo:rsid="0047d188"/>
    </style:style>
    <style:style style:name="T27" style:family="text">
      <style:text-properties style:font-name="Calibri" officeooo:rsid="004830c9"/>
    </style:style>
    <style:style style:name="T28" style:family="text">
      <style:text-properties style:font-name="Calibri" officeooo:rsid="00484556"/>
    </style:style>
    <style:style style:name="T29" style:family="text">
      <style:text-properties style:font-name="Calibri" officeooo:rsid="004a0f6b"/>
    </style:style>
    <style:style style:name="T30" style:family="text">
      <style:text-properties style:font-name="Calibri" officeooo:rsid="004bb1b8"/>
    </style:style>
    <style:style style:name="T31" style:family="text">
      <style:text-properties style:font-name="Calibri" officeooo:rsid="004cb00e"/>
    </style:style>
    <style:style style:name="T32" style:family="text">
      <style:text-properties style:font-name="Calibri" officeooo:rsid="004d7896"/>
    </style:style>
    <style:style style:name="T33" style:family="text">
      <style:text-properties style:font-name="Calibri" officeooo:rsid="004eb7a3"/>
    </style:style>
    <style:style style:name="T34" style:family="text">
      <style:text-properties style:font-name="Calibri" officeooo:rsid="00502ff0"/>
    </style:style>
    <style:style style:name="T35" style:family="text">
      <style:text-properties style:font-name="Calibri" officeooo:rsid="0050cf7e"/>
    </style:style>
    <style:style style:name="T36" style:family="text">
      <style:text-properties style:font-name="Calibri" officeooo:rsid="0054b93e"/>
    </style:style>
    <style:style style:name="T37" style:family="text">
      <style:text-properties style:font-name="Calibri" officeooo:rsid="00566d48"/>
    </style:style>
    <style:style style:name="T38" style:family="text">
      <style:text-properties style:font-name="Calibri" officeooo:rsid="00573fbd"/>
    </style:style>
    <style:style style:name="T39" style:family="text">
      <style:text-properties style:font-name="Calibri" officeooo:rsid="00590831"/>
    </style:style>
    <style:style style:name="T40" style:family="text">
      <style:text-properties style:font-name="Calibri" officeooo:rsid="005a4f09"/>
    </style:style>
    <style:style style:name="T41" style:family="text">
      <style:text-properties style:font-name="Calibri" officeooo:rsid="005b880b"/>
    </style:style>
    <style:style style:name="T42" style:family="text">
      <style:text-properties style:font-name="Calibri" officeooo:rsid="005c231c"/>
    </style:style>
    <style:style style:name="T43" style:family="text">
      <style:text-properties style:font-name="Calibri" officeooo:rsid="005c3647"/>
    </style:style>
    <style:style style:name="T44" style:family="text">
      <style:text-properties style:font-name="Calibri" officeooo:rsid="005dca22"/>
    </style:style>
    <style:style style:name="T45" style:family="text">
      <style:text-properties style:font-name="Calibri" officeooo:rsid="005fbd02"/>
    </style:style>
    <style:style style:name="T46" style:family="text">
      <style:text-properties style:font-name="Calibri" officeooo:rsid="0062cd95"/>
    </style:style>
    <style:style style:name="T47" style:family="text">
      <style:text-properties style:font-name="Calibri" officeooo:rsid="00649f98"/>
    </style:style>
    <style:style style:name="T48" style:family="text">
      <style:text-properties style:font-name="Calibri" officeooo:rsid="00653ecf"/>
    </style:style>
    <style:style style:name="T49" style:family="text">
      <style:text-properties style:font-name="Calibri" officeooo:rsid="0065ce2c"/>
    </style:style>
    <style:style style:name="T50" style:family="text">
      <style:text-properties style:font-name="Calibri" officeooo:rsid="006776c9"/>
    </style:style>
    <style:style style:name="T51" style:family="text">
      <style:text-properties style:font-name="Calibri" officeooo:rsid="006883aa"/>
    </style:style>
    <style:style style:name="T52" style:family="text">
      <style:text-properties style:font-name="Calibri" officeooo:rsid="006ac498"/>
    </style:style>
    <style:style style:name="T53" style:family="text">
      <style:text-properties style:font-name="Calibri" officeooo:rsid="006c0139"/>
    </style:style>
    <style:style style:name="T54" style:family="text">
      <style:text-properties style:font-name="Calibri" officeooo:rsid="006c0752"/>
    </style:style>
    <style:style style:name="T55" style:family="text">
      <style:text-properties style:font-name="Calibri" officeooo:rsid="006e66e4"/>
    </style:style>
    <style:style style:name="T56" style:family="text">
      <style:text-properties style:font-name="Calibri" officeooo:rsid="0071cb14"/>
    </style:style>
    <style:style style:name="T57" style:family="text">
      <style:text-properties style:font-name="Calibri" officeooo:rsid="007354bd"/>
    </style:style>
    <style:style style:name="T58" style:family="text">
      <style:text-properties style:font-name="Calibri" officeooo:rsid="0075fab1"/>
    </style:style>
    <style:style style:name="T59" style:family="text">
      <style:text-properties style:font-name="Calibri" officeooo:rsid="0076603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escription du cryptide (dans la réalité) : </text:p>
      <text:p text:style-name="P6"/>
      <text:p text:style-name="P1"><text:span text:style-name="T1"><text:tab/>Le </text:span><text:span text:style-name="T2">Cadborosaure </text:span><text:span text:style-name="T6">(nommé Caddy par les chercheurs)</text:span><text:span text:style-name="T1"> est un </text:span><text:span text:style-name="T3">serpent de mer réputé pour vivre le long des côtes canadiennes de la Colombie-Brittanique, </text:span><text:span text:style-name="T4">découvert dans la Baie de Cadboro à Grand Victoria</text:span><text:span text:style-name="T1">. </text:span><text:span text:style-name="T5">Bien que seul un cadavre douteux ayant été retrouvé, il est réputé pour être un long serpent à rayures verticales et à tête de cheval, possédant un long cou et de petites nageoires à l’avant du corps. Il possède aussi un autre paire de nageoires postérieures, et une paire de grandes nageoires palmées à l’extrémité de sa queue lui fournissant une puissante propulsion. </text:span><text:span text:style-name="T7">Il est apparenté à de nombreuses espèces marines, possédant de nombreux traits partagés avec ces espèces, empêchant les chercheurs de lui établir une origine précise.</text:span></text:p>
      <text:p text:style-name="P6"/>
      <text:p text:style-name="P6">Description du cryptide (en jeu) : </text:p>
      <text:p text:style-name="P6"/>
      <text:p text:style-name="P2"><text:span text:style-name="T1"><text:tab/>Le </text:span><text:span text:style-name="T2">Cadborosaure</text:span><text:span text:style-name="T1"> </text:span><text:span text:style-name="T8">est un spécimen féminin d’une espèce aquatique d’origine inconnue, mélangeant des traits de nombreuses espèces marines : La tête équine d’un hippocampe, le long corps sinueux d’une anguille, la taille d’un anaconda géant, une crête colorée similaire à celle d’un poisson ruban, </text:span><text:span text:style-name="T10">des écailles et une allure royale similaire à un régalec</text:span><text:span text:style-name="T8">, de longues nageoires puissantes et palmées similaires à celles d’un lion de mer, et une bouche déployable comme celle d’un requin lutin. </text:span><text:span text:style-name="T9">Caddy est également capable de générer de la bioluminescence via les rayures sur son corps afin d’intimider les prédateurs et attirer les proies.</text:span></text:p>
      <text:p text:style-name="P9"/>
      <text:p text:style-name="P3"><text:span text:style-name="T9"><text:tab/></text:span><text:span text:style-name="T11">Caddy est un prédateur qui s’en prend à toutes sortes de poissons et mammifères marins, tels que les requins, lions de mer et baleines, y compris les plus imposants. </text:span><text:span text:style-name="T12">Des témoignages récents ont rapporté l’apparition de nombreuses carcasses échouées sur les rivages de la Baie de Cadboro, ainsi que de mystérieuses lumières sous-marines à la nuit tombée. </text:span><text:span text:style-name="T13">Très secret, les membres de cette espèce rare ne se montrent jamais aux humains, </text:span><text:span text:style-name="T14">et vivent en autarcie dans les profondeurs de la baie, dans des cavernes souterraines, </text:span><text:span text:style-name="T15">où ils forment de petites communautés très hiérarchisées où le plus grand spécimen agit en « reine » de la colonie</text:span><text:span text:style-name="T14">.</text:span></text:p>
      <text:p text:style-name="P6"/>
      <text:p text:style-name="P6">Idées de scénario : </text:p>
      <text:p text:style-name="P6"/>
      <text:p text:style-name="P4"><text:span text:style-name="T1"><text:tab/></text:span><text:span text:style-name="T16">Le protagoniste traverse la frontière entre les États-Unis et le Canada pour se retrouver en Colombie-Brittanique. Son mystérieux client lui a fourni les coordonnées de sa prochaine cible : Le Cadborosaure, un cryptide caché dans les profondeurs de la Baie de Cadboro à Grand Victoria. </text:span><text:span text:style-name="T17">D’après son donateur, des rumeurs circuleraient qu’un groupe de pêcheurs aient disparu en pleine mer sans laisser de trace, leur bateau dérivant intact jusqu’à la rive du port. Leur disparition coïnciderait avec l’augmentation subite du nombre de carcasses </text:span><text:span text:style-name="T11">de poissons et mammifères marins </text:span><text:span text:style-name="T17">échouées sur la rive depuis plusieurs jours. </text:span></text:p>
      <text:p text:style-name="P10"/>
      <text:p text:style-name="P4"><text:span text:style-name="T17"><text:tab/></text:span><text:span text:style-name="T18">Konar, peu désireux de se mêler à une enquête de disparition de personnes qui ne le regardait pas, change rapidement de ton à la vue de la récompense impressionnante promise par son client, en plus de l’avantage de s’être vu offert un b</text:span><text:span text:style-name="T19">at</text:span><text:span text:style-name="T18">eau à moteur et un kit de pêche et de plongée. </text:span><text:span text:style-name="T20">Son </text:span><text:span text:style-name="T21">plan</text:span><text:span text:style-name="T20"> : Servir d’appât en attendant une réaction du cryptide, puis plonger et observer son comportement – de préférence après qu’il soit repu.</text:span></text:p>
      <text:p text:style-name="P11"/>
      <text:p text:style-name="P4"><text:span text:style-name="T20"><text:tab/></text:span><text:span text:style-name="T22">Ne voyant pas d’autre solution, Konar attend la nuit tombée pour installer sa caravane sur la rive, dans un des coins de pêche réservés au public, loin de l’activité du port de la ville. </text:span><text:span text:style-name="T23">Il restera quatre heures à attendre une réaction, mais ne réussira qu’à attirer des mouettes jalousant les quelques maigres poissons qu’il est parvenu à pêcher. </text:span><text:span text:style-name="T24">Les résultats se faisant </text:span><text:soft-page-break/><text:span text:style-name="T24">attendre, Konar se décide à rentrer bredouille, arguant avec lui-même que son client ne s’attendrait sûrement pas à des résultats dès le premier jour.</text:span><text:span text:style-name="T25"> Cependant, il commence à constater que l’activité sonore autour de lui a rapidement décliné après quelques temps ; il était trop tard pour voir d’autres pêcheurs, mais la faune de la baie était étrangement silencieuse, là où le vacarme des mouettes l’assourdissait plus qu’autre chose. </text:span><text:span text:style-name="T26">Mais surtout, une brume épaisse s’était installée autour de la bicoque, rendant difficile de discerner la rive depuis sa position.</text:span></text:p>
      <text:p text:style-name="P12"/>
      <text:p text:style-name="P5"><text:span text:style-name="T26"><text:tab/>Inquiet, Konar décide de rester une demi-heure de plus avant de plier bagage. </text:span><text:span text:style-name="T28">Prenant soin d’enfiler sa tenue de plongée en cas de besoin, s</text:span><text:span text:style-name="T26">on </text:span><text:span text:style-name="T28">prochain</text:span><text:span text:style-name="T26"> lancer d’hameçon suivant attirera une ombre s’approchant de la barque qui ne lui laissera que la tête de ce qui aurait été une belle prise autrement. </text:span><text:span text:style-name="T27">Konar jure dans sa barbe, mais retente une nouvelle fois. </text:span><text:span text:style-name="T28">Une masse étrange flotte à la surface de l’eau, portée par le courant, qui s’avère être une mouette observant ses résultats. Konar tourne la tête juste à temps pour entendre le volatile crier avant d’être aspiré vers les profondeurs. Quelques remous plus tard, seule la moitié de son corps remonte à la surface dans une eau </text:span><text:span text:style-name="T29">teintée</text:span><text:span text:style-name="T28"> de rouge. </text:span><text:span text:style-name="T30">Konar moque son manque de vigilance face aux requins sous la surface, quand de nombreux remous apparaissent soudainement tout autour de lui, avant de voir de nombreux petits poissons franchir la surface </text:span><text:span text:style-name="T31">de l’eau</text:span><text:span text:style-name="T30">. </text:span></text:p>
      <text:p text:style-name="P13"/>
      <text:p text:style-name="P5"><text:span text:style-name="T30"><text:tab/></text:span><text:span text:style-name="T32">D’abord curieux et amusé de voir un banc de poissons d’aussi près, il réalise avec horreur que leur frénésie est dû aux nombreux prédateurs sur le point de les attaquer, comme le suggèrent les nombreux ailerons perçant à leur tour la surface de l’eau. </text:span><text:span text:style-name="T33">Les remous se transforment en torrents d’eau frappant tour à tour la coque du bateau, faisant perdre l’équilibre à Konar, qui peine à rester assis alors de plus en plus de requins, dans la confusion, frappent à leur tour la coque et contribuent davantage au chaos. </text:span><text:span text:style-name="T34">Puis, une baleine </text:span><text:span text:style-name="T35">surgit</text:span><text:span text:style-name="T34"> à la surface </text:span><text:span text:style-name="T35">d’un coup de queue,</text:span><text:span text:style-name="T34"> </text:span><text:span text:style-name="T35">avant de retomber </text:span><text:span text:style-name="T34">et de heurter la barque suffisamment fort pour que Konar en tombe à l’eau, au cœur du banc de prédateurs.</text:span></text:p>
      <text:p text:style-name="P5"><text:span text:style-name="T34"/></text:p>
      <text:p text:style-name="P15"><text:span text:style-name="T34"><text:tab/></text:span><text:span text:style-name="T1">Konar tente de remonter à la surface, mais face à l’assaut de dents et de coups de queue, ne parvient qu’à s’enfoncer plus loin encore dans les profondeurs. Heureusement, sa bouteille d’oxygène parvient à tenir le coup, et sa lampe torche lui permet de voir le carnage qui fait rage autour de lui. Après plusieurs tentatives ratées, Konar cède à la panique et cesse de lutter, fermant les yeux en attendant que les prédateurs partent, espérant qu’un humain comme lui n’était pas prévu dans leur repas.</text:span></text:p>
      <text:p text:style-name="P15"><text:span text:style-name="T1"/></text:p>
      <text:p text:style-name="P15"><text:span text:style-name="T1"><text:tab/></text:span><text:span text:style-name="T36">Puis, peu à peu, les remous autour de lui se calment. Konar risque un œil autour de lui, mais le carnage n’est pas celui qu’il espérait : Au lieu de voir une pluie de poissons flotter autour de lui et les requins partis, il découvre avec horreur que la plupart des carcasses autour de lui sont celles </text:span><text:span text:style-name="T37">des prédateurs ayant attaqué le banc ; des requins et dauphins pour la plupart. Sous ses pieds, un hululement de douleur assourdissant se fait entendre, qui ne peut appartenir qu’à la baleine qui l’a renversé plus tôt. Cédant à la peur, Konar remonte au plus vite sur son bateau et regagne le rivage, décidé à abandonner la mission.</text:span></text:p>
      <text:p text:style-name="P15"><text:span text:style-name="T37"/></text:p>
      <text:p text:style-name="P15"><text:span text:style-name="T37"><text:tab/>Faisant son rapport à son client, celui-ci semble au contraire bien plus intéressé par la tournure qu’ont pris les événements, et parvient à convaincre Konar d’y retourner le jour en doublant sa paye et en lui fournissant un pistolet à harpon pour se défendre d’éventuels requins. </text:span><text:span text:style-name="T38">Cette fois, Konar laisse de côté la pêche pour consacrer sa journée à la plongée, cherchant à prendre des photos des carcasses des prédateurs tués la nuit dernière, espérant que les coupables soient déjà partis. Cependant, il découvre avec surprise que quasiment aucune des carcasses ne gît encore sur les fonds marins, y compris les ossements, </text:span><text:span text:style-name="T39">ce qui laisse supposer que les coupables </text:span><text:soft-page-break/><text:span text:style-name="T39">étaient en nombre et les ont dévoré immédiatement après l’attaque. </text:span><text:span text:style-name="T40">Forcé par son contrat de continuer les recherches, il découvre une immense faille dans le récif et s’y engouffre. Alors que la lumière se dilue dans l’eau froide de la baie, il y découvre la carcasse de la baleine de la nuit dernière, recouvertes de nombreuses morsures et manquant de nombreux morceaux de chair malgré sa taille. Konar prend une photo et rentre, décidant de revenir la nuit tombée afin de voir si des prédateurs seraient attirés par la carcasse, espérant que l’événement d’hier soir n’était que des requins se tournant les uns contre les autres pour se disputer le banc de poisson.</text:span></text:p>
      <text:p text:style-name="P15"><text:span text:style-name="T40"/></text:p>
      <text:p text:style-name="P15"><text:span text:style-name="T40"><text:tab/></text:span><text:span text:style-name="T41">Le soir même, Konar décide de pêcher une petite heure afin de tester les eaux, mais ne parvient qu’à attirer l’éventuelle mouette curieuse pendant un long moment, jusqu’à apercevoir au loin une faible lumière rosâtre, correspondant à la description de Caddy que son client lui a fourni. Il décide de lancer un appât dans sa direction pour l’attirer, mais la lumière disparaît aussi vite qu’elle est apparue. Konar enfile alors sa combinaison de plongée et se jette à l’eau, suivant la direction du cryptide. Il découvre que sa destination est la faille où il avait découvert la carcasse de baleine, qui est cette fois, à sa grande horreur, assaillie de toutes parts par de nombreux requins venus se nourrir.</text:span></text:p>
      <text:p text:style-name="P15"><text:span text:style-name="T41"/></text:p>
      <text:p text:style-name="P15"><text:span text:style-name="T41"><text:tab/></text:span><text:span text:style-name="T42">Cherchant à s’enfuir avant de se faire repérer, il est attaqué par deux requins qui le prennent par surprise en lui rentrant dedans par l’arrière. Konar agrippe son harpon et tire sur l’un des requins qui s’enfuit en teintant l’eau de rouge dans son sillage. Loin de décourager son camarade, l’odeur du sang semble d’exciter davantage, au point d’attaquer directement Konar en mordant dans son bras, lui arrachant un cri de douleur. Il parvient à se débarrasser de lui, mais d’autres requins n’ayant pas eu leur tour sur la baleine, attirés par l’odeur du sang et le tapage, décident d’encercler Konar pour le dévorer à la place. Voyant son heure venir, Konar ferme les yeux, juste au moment pour entendre les remous autour de lui s’intensifier ; pourtant, aucun mal ne lui est fait. Il rassemble son courage pour ouvrir ses yeux, et la faible lumière de sa lampe torche lui fait découvrir des corps sinueux </text:span><text:span text:style-name="T43">attaquer les requins dans un bain de sang qui lui bloque rapidement la vue. Il décide de fermer à nouveau les yeux et de ne les rouvrir qu’une fois les tourbillons autour de lui calmés.</text:span></text:p>
      <text:p text:style-name="P15"><text:span text:style-name="T43"/></text:p>
      <text:p text:style-name="P17"><text:span text:style-name="T43"><text:tab/>A son retour, il constate le même carnage que la nuit précédente : De nombreuses carcasses de requins coulent tout autour de lui pour rejoindre la baleine tapie au fond de la mer, masquée par le bain de sang qui teinte sa vision de rouge. Au moment où il aperçoit du mouvement à sa droite, sa lampe torche s’éteint, le plongeant intégralement dans le noir en compagnie de créatures inconnues. Konar se dépêche de prendre une autre lampe de sa poche et manque de s’aveugler dans sa panique, révélant à l’écran la tête d’une étrange créature </text:span><text:span text:style-name="T52">juste dev</text:span><text:span text:style-name="T53">a</text:span><text:span text:style-name="T52">nt</text:span><text:span text:style-name="T43"> lui.</text:span></text:p>
      <text:p text:style-name="P17"><text:span text:style-name="T45"/></text:p>
      <text:p text:style-name="P19"><text:span text:style-name="T45"><text:tab/></text:span><text:span text:style-name="T46">Le souffle coupé face à cette apparition légendaire, l’incrédulité fait rapidement place à la peur quand il réalise que cette créature immense est très certainement plus rapide que lui et capable de le tuer en un éclair. Pourtant, quand elle arrive à sa hauteur, elle semble plus curieuse que désireuse d’un repas, </text:span><text:span text:style-name="T53">et enroule son long corps autour de lui pour l’empêcher de s’enfuir. Alors que sa respiration devient plus laborieuse, il réalise que le cryptide cherche à ouvrir le bas de sa combinaison pour accéder à son membre. S’il avait une main libre, il aurait pu la repousser, craignant de voir son membre arraché au vu de ce que cette créature a fait aux requins ; mais elle s’en occupe elle-même en déchirant sa combinaison, libérant son membre à l’air libre.</text:span></text:p>
      <text:p text:style-name="P19"><text:span text:style-name="T53"/></text:p>
      <text:p text:style-name="P20"><text:span text:style-name="T1">Scène X : </text:span></text:p>
      <text:list xml:id="list3416929872" text:style-name="L1">
        <text:list-item>
          <text:p text:style-name="P21"><text:span text:style-name="T1">Le Caddy lèche le membre de Konar pour forcer une érection, lui délivrant des frissons de </text:span><text:soft-page-break/><text:span text:style-name="T1">plaisir involontaires.</text:span></text:p>
        </text:list-item>
        <text:list-item>
          <text:p text:style-name="P21"><text:span text:style-name="T1">Caddy desserre légèrement son emprise sur Konar pour repositionner son vagin au-dessus de son membre, au grand dam de Konar qui espérait une occasion de s’échapper.</text:span></text:p>
        </text:list-item>
        <text:list-item>
          <text:p text:style-name="P21"><text:span text:style-name="T1">Caddy s’abat violemment sur son membre et frotte son corps répétitivement contre celui de Konar. Ses rayures s’illuminent au rythme de ses va et viens.</text:span></text:p>
        </text:list-item>
        <text:list-item>
          <text:p text:style-name="P21"><text:span text:style-name="T1">Caddy mordille l’épaule de Konar pour le tenir tranquille alors que ses frottements deviennent plus intenses. Finalement, Konar et Caddy jouissent, la bioluminescence de cette dernière pulsant plus vivement encore.</text:span></text:p>
        </text:list-item>
      </text:list>
      <text:p text:style-name="P20"><text:span text:style-name="T1"/></text:p>
      <text:p text:style-name="P20"><text:span text:style-name="T1"><text:tab/>Finalement, ses rayures s’éteignent. Caddy libère Konar et part rejoindre son banc sans plus de cérémonie. </text:span><text:span text:style-name="T43">Seul dans le noir le plus total, Konar décide de s’enfuir pour sauver sa peau, jusqu’au moment où il remarque </text:span><text:span text:style-name="T44">sous ses pieds la fameuse lumière rose qu’il recherchait, grandir et grossir jusqu’à former un banc tourbillonnant de rayures roses survolant les carcasses jonchant les fonds marins. Konar comprend que ces créatures se nourrissent du festin, </text:span><text:span text:style-name="T47">et </text:span><text:span text:style-name="T48">profite de l’occasion</text:span><text:span text:style-name="T47"> pour s’enfuir aussi vite que son bras blessé ne le lui permet. </text:span><text:span text:style-name="T48">Il parvient à regagner la surface et rejoindre son bateau, et repart vers la rive sans demander son reste.</text:span></text:p>
      <text:p text:style-name="P16"><text:span text:style-name="T48"/></text:p>
      <text:p text:style-name="P16"><text:span text:style-name="T48"><text:tab/></text:span><text:span text:style-name="T49">Quelques jours plus tard, Konar décide d’y retourner un jour d’activité de pêche, ce qui diminuerait ses chances de se faire attaquer. Fort heureusement, son bas n’a eu que des coupures superficielles qu’il a pu rapidement traiter. Décidant de plonger non loin d’une petite chaloupe de pêche, il découvre avec horreur que quelques cadborosaures ont été pris dans les filets du chalutier, qui s’apprêtait à les remonter à la surface. Konar hésite à les aider, mais il se rappelle que si ces créatures rares sont découvertes avant lui, il pourrait rater sa chance d’obtenir la prime et la reconnaissance qu’il cherchait. Il sort alors un couteau de sa poche et décide de couper le filet, permettant aux créatures de s’enfuir. Alors qu’elles se retournent brièvement vers lui, Konar espère stupidement qu’elles se rappellent l’avoir sauvé des requins, et à son soulagement, décident de repartir vers la faille sans l’attaquer.</text:span></text:p>
      <text:p text:style-name="P16"><text:span text:style-name="T49"/></text:p>
      <text:p text:style-name="P17"><text:span text:style-name="T49"><text:tab/>Konar se résout une dernière fois à les observer de nuit dans la faille qui semble être leur demeure, prenant soin de rester cette fois à distance de sécurité. Face à l’absence d’activité à son arrivée, il craignait être arrivée trop tôt, ou dans la mauvaise faille, ou que les créatures aient déménagé après la pêche infructueuse plus tôt, mais il s’avère que les cryptides le rejoignent rapidement dans la faille pour commencer leur ronde </text:span><text:span text:style-name="T50">autour de la carcasse de baleine</text:span><text:span text:style-name="T49">, </text:span><text:span text:style-name="T50">attaquant les quelques requins malchanceux croisant leur chemin pour les ajouter au festin</text:span><text:span text:style-name="T49">.</text:span></text:p>
      <text:p text:style-name="P17"><text:span text:style-name="T44"/></text:p>
      <text:p text:style-name="P17"><text:span text:style-name="T51"><text:tab/>Soudain,</text:span><text:span text:style-name="T44"> leurs lumières s’éteignent toutes rapidement, </text:span><text:span text:style-name="T45">laissant place à une lueur sinueuse remontant de la faille vers sa hauteur. Konar distingue des rayures et ses nageoires particulières, et comprend à sa taille </text:span><text:span text:style-name="T54">et à sa crête bioluminescente</text:span><text:span text:style-name="T45"> qu’il doit s’agir du chef de ses créatures ; s’il en croit la description qu’il a reçu, ce doit être cette fameuse « Cabby » qu’il cherchait, </text:span><text:span text:style-name="T51">plus majestueuse que la dernière Cadborosaure qu’il avait rencontré</text:span><text:span text:style-name="T45">.</text:span></text:p>
      <text:p text:style-name="P17"><text:span text:style-name="T45"/></text:p>
      <text:p text:style-name="P17"><text:span text:style-name="T45"><text:tab/></text:span><text:span text:style-name="T55">Alors que les cryptides au fond du récif reprennent leur banquet, le crâne de Konar est parcouru de vibrations alors que Caddy s’enroule lentement autour de son corps. Bien qu’elle ne puisse pas parler, Konar semble étrangement comprendre ses intentions ; Caddy semble curieuse de voir un humain dans ces profondeurs et appréciative de son courage, et semble vouloir le récompenser d’avoir sauvé ses filles des pêcheurs, alors que sa mâchoire se détend pour arracher sa combinaison de plongée.</text:span></text:p>
      <text:p text:style-name="P17"><text:span text:style-name="T55"/></text:p>
      <text:p text:style-name="P24"><text:span text:style-name="T1">Scène X : </text:span></text:p>
      <text:list xml:id="list3596431805" text:style-name="L2">
        <text:list-item>
          <text:p text:style-name="P25"><text:soft-page-break/><text:span text:style-name="T1">Au lieu de se contenter de lécher le membre de Konar pour forcer son érection, Caddy engouffre son membre entier dans sa mâchoire rétractable, prenant soin d’éviter de le blesser avec ses dents, laissant sa langue bleutée parcourir son membre de long en large.</text:span></text:p>
        </text:list-item>
        <text:list-item>
          <text:p text:style-name="P26"><text:span text:style-name="T1">Caddy se retourne pour positionner son vagin au niveau du visage de Konar, l’incitant à la lécher à son tour. Konar, ne pouvant pas retirer son masque, décide de la doigter à la place, satisfaisant Caddy tout autant.</text:span></text:p>
        </text:list-item>
        <text:list-item>
          <text:p text:style-name="P22"><text:span text:style-name="T1">Caddy desserre légèrement son emprise sur Konar pour repositionner son vagin au-dessus de son membre, </text:span><text:span text:style-name="T56">frottant leurs deux sexes au rythme des pulsions multicolores de la bioluminescence du cryptide.</text:span></text:p>
        </text:list-item>
        <text:list-item>
          <text:p text:style-name="P22"><text:span text:style-name="T1">Caddy s’abat violemment sur son membre et frotte son corps répétitivement contre celui de Konar. Ses rayures s’illuminent au rythme de ses va et viens.</text:span></text:p>
        </text:list-item>
        <text:list-item>
          <text:p text:style-name="P22"><text:span text:style-name="T1">Caddy </text:span><text:span text:style-name="T57">offre une mimique d’un baiser à Konar, enroulant sa longue langue autour de la sienne jusqu’à sa gorge,</text:span><text:span text:style-name="T1"> alors que ses frottements deviennent plus intenses. Finalement, Konar et Caddy jouissent, la bioluminescence de cette dernière pulsant plus vivement encore.</text:span></text:p>
        </text:list-item>
      </text:list>
      <text:p text:style-name="P23"><text:span text:style-name="T1"/></text:p>
      <text:p text:style-name="P23"><text:span text:style-name="T1"><text:tab/></text:span><text:span text:style-name="T58">Finalement, Caddy accepte de libérer Konar, et après une dernière étreinte, replonge vers ses filles pour profiter du festin à son tour. Ayant enfin établi un lien avec les Cadborosaures, Konar remonte vers la surface, se maudissant pour avoir oublié d’emporter un appareil photo avec lui cette fois.</text:span></text:p>
      <text:p text:style-name="P23"><text:span text:style-name="T58"/></text:p>
      <text:p text:style-name="P23"><text:span text:style-name="T58"><text:tab/></text:span><text:span text:style-name="T59">A son retour à la caravane, Konar établit un rapport avec son client, s’excusant de ne pas avoir pu récupérer de preuves de leur rencontre, mais son client lui pardonne, ne désirant que sa confirmation de leur existence dans la baie. Konar a un soupçon d’inquiétude pour les cryptides marines, douteux des intentions de son client, mais balaie ses suspicions vu que ces créatures peuvent partir à tout moment vers une autre baie si elles le souhaitent. Ayant encore un peu de temps avant de s’endormir, Konar décide de dessiner ses rencontres précédentes de mémoire. Elles ne constitueront pas de preuve tangible, mais elles lui serviront de souvenirs.</text:span></text:p>
      <text:p text:style-name="P18"><text:span text:style-name="T46"/></text:p>
      <text:p text:style-name="P18"><text:span text:style-name="T4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6H10M14S</meta:editing-duration>
    <meta:editing-cycles>95</meta:editing-cycles>
    <meta:generator>LibreOffice/7.3.3.2$Windows_X86_64 LibreOffice_project/d1d0ea68f081ee2800a922cac8f79445e4603348</meta:generator>
    <dc:date>2023-07-15T11:07:50.046000000</dc:date>
    <meta:document-statistic meta:table-count="0" meta:image-count="0" meta:object-count="0" meta:page-count="5" meta:paragraph-count="36" meta:word-count="2856" meta:character-count="17125" meta:non-whitespace-character-count="14284"/>
  </office:meta>
</office:document-meta>
</file>