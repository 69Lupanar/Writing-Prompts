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29e945"/>
    </style:style>
    <style:style style:name="P2" style:family="paragraph" style:parent-style-name="Standard">
      <style:paragraph-properties fo:text-align="justify" style:justify-single-word="false"/>
      <style:text-properties style:font-name="Calibri" officeooo:rsid="000ec709" officeooo:paragraph-rsid="002db035"/>
    </style:style>
    <style:style style:name="P3" style:family="paragraph" style:parent-style-name="Standard">
      <style:paragraph-properties fo:text-align="justify" style:justify-single-word="false"/>
      <style:text-properties style:font-name="Calibri" officeooo:rsid="000ec709" officeooo:paragraph-rsid="0051fa35"/>
    </style:style>
    <style:style style:name="P4" style:family="paragraph" style:parent-style-name="Standard">
      <style:paragraph-properties fo:text-align="justify" style:justify-single-word="false"/>
      <style:text-properties style:font-name="Calibri" officeooo:rsid="000ec709" officeooo:paragraph-rsid="005a4e76"/>
    </style:style>
    <style:style style:name="P5" style:family="paragraph" style:parent-style-name="Standard">
      <style:paragraph-properties fo:text-align="justify" style:justify-single-word="false"/>
      <style:text-properties style:font-name="Calibri" officeooo:rsid="000ec709" officeooo:paragraph-rsid="005c78a8"/>
    </style:style>
    <style:style style:name="P6" style:family="paragraph" style:parent-style-name="Standard">
      <style:paragraph-properties fo:text-align="justify" style:justify-single-word="false"/>
      <style:text-properties style:font-name="Calibri" officeooo:rsid="002c2b4f" officeooo:paragraph-rsid="002db035"/>
    </style:style>
    <style:style style:name="P7" style:family="paragraph" style:parent-style-name="Standard">
      <style:paragraph-properties fo:text-align="justify" style:justify-single-word="false"/>
      <style:text-properties officeooo:paragraph-rsid="002db035"/>
    </style:style>
    <style:style style:name="P8" style:family="paragraph" style:parent-style-name="Standard">
      <style:paragraph-properties fo:text-align="justify" style:justify-single-word="false"/>
      <style:text-properties officeooo:paragraph-rsid="005163e6"/>
    </style:style>
    <style:style style:name="P9" style:family="paragraph" style:parent-style-name="Standard">
      <style:paragraph-properties fo:text-align="justify" style:justify-single-word="false"/>
      <style:text-properties style:font-name="Calibri" officeooo:rsid="004e3b4b" officeooo:paragraph-rsid="005163e6"/>
    </style:style>
    <style:style style:name="P10" style:family="paragraph" style:parent-style-name="Standard">
      <style:paragraph-properties fo:text-align="justify" style:justify-single-word="false"/>
      <style:text-properties style:font-name="Calibri" officeooo:rsid="000ec709" officeooo:paragraph-rsid="005c78a8"/>
    </style:style>
    <style:style style:name="P11" style:family="paragraph" style:parent-style-name="Standard">
      <style:paragraph-properties fo:text-align="justify" style:justify-single-word="false"/>
      <style:text-properties style:font-name="Calibri" officeooo:rsid="000ec709" officeooo:paragraph-rsid="005f7092"/>
    </style:style>
    <style:style style:name="P12" style:family="paragraph" style:parent-style-name="Standard">
      <style:paragraph-properties fo:text-align="justify" style:justify-single-word="false"/>
      <style:text-properties style:font-name="Calibri" officeooo:rsid="000ec709" officeooo:paragraph-rsid="0051fa35"/>
    </style:style>
    <style:style style:name="P13" style:family="paragraph" style:parent-style-name="Standard">
      <style:paragraph-properties fo:text-align="justify" style:justify-single-word="false"/>
      <style:text-properties style:font-name="Calibri" officeooo:rsid="00616bba" officeooo:paragraph-rsid="00616bba"/>
    </style:style>
    <style:style style:name="T1" style:family="text">
      <style:text-properties officeooo:rsid="00241570"/>
    </style:style>
    <style:style style:name="T2" style:family="text">
      <style:text-properties style:font-name="Calibri" officeooo:rsid="000ec709"/>
    </style:style>
    <style:style style:name="T3" style:family="text">
      <style:text-properties style:font-name="Calibri" officeooo:rsid="00241570"/>
    </style:style>
    <style:style style:name="T4" style:family="text">
      <style:text-properties style:font-name="Calibri" officeooo:rsid="002abb55"/>
    </style:style>
    <style:style style:name="T5" style:family="text">
      <style:text-properties style:font-name="Calibri" officeooo:rsid="002c2b4f"/>
    </style:style>
    <style:style style:name="T6" style:family="text">
      <style:text-properties style:font-name="Calibri" officeooo:rsid="002db035"/>
    </style:style>
    <style:style style:name="T7" style:family="text">
      <style:text-properties style:font-name="Calibri" officeooo:rsid="0046d3f7"/>
    </style:style>
    <style:style style:name="T8" style:family="text">
      <style:text-properties style:font-name="Calibri" officeooo:rsid="0048876f"/>
    </style:style>
    <style:style style:name="T9" style:family="text">
      <style:text-properties style:font-name="Calibri" officeooo:rsid="004a3097"/>
    </style:style>
    <style:style style:name="T10" style:family="text">
      <style:text-properties style:font-name="Calibri" officeooo:rsid="004b3a6c"/>
    </style:style>
    <style:style style:name="T11" style:family="text">
      <style:text-properties style:font-name="Calibri" officeooo:rsid="004c314d"/>
    </style:style>
    <style:style style:name="T12" style:family="text">
      <style:text-properties style:font-name="Calibri" officeooo:rsid="004e3b4b"/>
    </style:style>
    <style:style style:name="T13" style:family="text">
      <style:text-properties style:font-name="Calibri" officeooo:rsid="004ed38e"/>
    </style:style>
    <style:style style:name="T14" style:family="text">
      <style:text-properties style:font-name="Calibri" officeooo:rsid="004fff27"/>
    </style:style>
    <style:style style:name="T15" style:family="text">
      <style:text-properties style:font-name="Calibri" officeooo:rsid="005163e6"/>
    </style:style>
    <style:style style:name="T16" style:family="text">
      <style:text-properties style:font-name="Calibri" officeooo:rsid="0051fa35"/>
    </style:style>
    <style:style style:name="T17" style:family="text">
      <style:text-properties officeooo:rsid="0029e945"/>
    </style:style>
    <style:style style:name="T18" style:family="text">
      <style:text-properties officeooo:rsid="002db035"/>
    </style:style>
    <style:style style:name="T19" style:family="text">
      <style:text-properties officeooo:rsid="00302982"/>
    </style:style>
    <style:style style:name="T20" style:family="text">
      <style:text-properties officeooo:rsid="0051fa35"/>
    </style:style>
    <style:style style:name="T21" style:family="text">
      <style:text-properties officeooo:rsid="002c2b4f"/>
    </style:style>
    <style:style style:name="T22" style:family="text">
      <style:text-properties officeooo:rsid="005259b8"/>
    </style:style>
    <style:style style:name="T23" style:family="text">
      <style:text-properties officeooo:rsid="00525ac4"/>
    </style:style>
    <style:style style:name="T24" style:family="text">
      <style:text-properties officeooo:rsid="0052f6b6"/>
    </style:style>
    <style:style style:name="T25" style:family="text">
      <style:text-properties officeooo:rsid="005325d6"/>
    </style:style>
    <style:style style:name="T26" style:family="text">
      <style:text-properties officeooo:rsid="0054f610"/>
    </style:style>
    <style:style style:name="T27" style:family="text">
      <style:text-properties officeooo:rsid="00569c74"/>
    </style:style>
    <style:style style:name="T28" style:family="text">
      <style:text-properties officeooo:rsid="00578bc9"/>
    </style:style>
    <style:style style:name="T29" style:family="text">
      <style:text-properties officeooo:rsid="0058987d"/>
    </style:style>
    <style:style style:name="T30" style:family="text">
      <style:text-properties officeooo:rsid="0058f741"/>
    </style:style>
    <style:style style:name="T31" style:family="text">
      <style:text-properties officeooo:rsid="005a4e76"/>
    </style:style>
    <style:style style:name="T32" style:family="text">
      <style:text-properties officeooo:rsid="005b8c73"/>
    </style:style>
    <style:style style:name="T33" style:family="text">
      <style:text-properties officeooo:rsid="005c78a8"/>
    </style:style>
    <style:style style:name="T34" style:family="text">
      <style:text-properties officeooo:rsid="005d2b23"/>
    </style:style>
    <style:style style:name="T35" style:family="text">
      <style:text-properties officeooo:rsid="005e4407"/>
    </style:style>
    <style:style style:name="T36" style:family="text">
      <style:text-properties officeooo:rsid="005f7092"/>
    </style:style>
    <style:style style:name="T37" style:family="text">
      <style:text-properties officeooo:rsid="00616bba"/>
    </style:style>
    <style:style style:name="T38" style:family="text">
      <style:text-properties officeooo:rsid="00620684"/>
    </style:style>
    <style:style style:name="T39" style:family="text">
      <style:text-properties officeooo:rsid="006256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7">Description d</text:span><text:span text:style-name="T18">u</text:span><text:span text:style-name="T17"> cryptide (dans la réalité)</text:span> : </text:p>
      <text:p text:style-name="P2"/>
      <text:p text:style-name="P7"><text:span text:style-name="T2"><text:tab/></text:span><text:span text:style-name="T3">Le </text:span><text:span text:style-name="T7">Kongamato</text:span><text:span text:style-name="T4"> </text:span><text:span text:style-name="T5">est un volatile</text:span><text:span text:style-name="T8">,</text:span><text:span text:style-name="T5"> semblable à un ptérosaure, qui vivrait dans les marais de Jiundu, au nord-ouest de la Zambie. </text:span><text:span text:style-name="T8">Faisant deux mètres d’envergures avec ses ailes de chauve-souris </text:span><text:span text:style-name="T9">et sa queue pointu</text:span><text:span text:style-name="T10">e</text:span><text:span text:style-name="T8">, sa peau noire est c</text:span><text:span text:style-name="T7">ouvert</text:span><text:span text:style-name="T8">e</text:span><text:span text:style-name="T7"> d’écailles azur </text:span><text:span text:style-name="T8">et son</text:span><text:span text:style-name="T7"> bec jaune et rouge </text:span><text:span text:style-name="T8">est</text:span><text:span text:style-name="T7"> garni de dents acérées. </text:span><text:span text:style-name="T8">I</text:span><text:span text:style-name="T7">l a la réputation de manger de la viande crue et de s’attaquer au bateaux des hommes traversant les eaux de son habitat. </text:span><text:span text:style-name="T8">Présent dans le folklore de la tribu des Kaonde, ils utilisent un charme magique pour se protéger de ses attaques.</text:span></text:p>
      <text:p text:style-name="P6"/>
      <text:p text:style-name="P2"><text:span text:style-name="T17">Description d</text:span><text:span text:style-name="T18">u</text:span><text:span text:style-name="T17"> cryptide (</text:span><text:span text:style-name="T18">en jeu</text:span><text:span text:style-name="T17">)</text:span> : </text:p>
      <text:p text:style-name="P2"/>
      <text:p text:style-name="P8"><text:span text:style-name="T2"><text:tab/></text:span><text:span text:style-name="T3">Le </text:span><text:span text:style-name="T7">Kongamato</text:span><text:span text:style-name="T4"> </text:span><text:span text:style-name="T6">est un spécimen féminin de</text:span><text:span text:style-name="T11"> chauve-souris géante née avec une mutation génétique causant sa grande taille et sa pigmentation particulière, notamment son museau jaune et sa fourrure bleue ; bien qu’elle n’ait pas les écailles ni le bec des légendes. </text:span><text:span text:style-name="T12">Ce cryptide vit en autarcie depuis que son espèce est chassée par les tribus locales pour les vertus prétendument médicinales que ces dernières ont attribué à sa chair et ses os. </text:span></text:p>
      <text:p text:style-name="P9"/>
      <text:p text:style-name="P8"><text:span text:style-name="T12"><text:tab/></text:span><text:span text:style-name="T13">Ce Kongamato en particulier s’est réfugié dans un marais difficile d’accès pour </text:span><text:span text:style-name="T14">élever</text:span><text:span text:style-name="T13"> ses petits, </text:span><text:span text:style-name="T14">et est très hostile à l’approche d’humains depuis la mort de son compagnon, dont le corps a été utilisé pour fabriquer des charmes supposés les protéger de ses attaques. </text:span><text:span text:style-name="T15">En conséquence, la solitude l’a rendue</text:span><text:span text:style-name="T16"> non seulement obsessivement attachée à ses petits, mais aussi</text:span><text:span text:style-name="T15"> très frustrée sexuellement, s’aidant souvent d’animaux et plantes locales pour satisfaire ses besoins libidineux.</text:span></text:p>
      <text:p text:style-name="P2"/>
      <text:p text:style-name="P1">Idées de scénario : </text:p>
      <text:p text:style-name="P1"/>
      <text:p text:style-name="P3"><text:tab/><text:span text:style-name="T1">Le protagoniste, </text:span><text:span text:style-name="T19">Konar Lebarbant, </text:span><text:span text:style-name="T20">reçoit un ticket d’avion pour la Zambie de la part de son mystérieux donateur. Son objectif : Retrouver la trace du Kongamato, un supposé fossile vivant vivant dans de nombreux pays d’Afrique centrale, dont les derniers témoignages proviennent de tribus locales auraient dévoilé l’existence d’un spécimen </text:span><text:span text:style-name="T21">dans les marais de Jiundu, au nord-ouest de la Zambie. </text:span><text:span text:style-name="T22">Konar est peu enclin à visiter un pays du tiers-monde pour rentrer bredouille avec quelques maladies locales, mais la somme de dédommagement versée par son client lui fait rapidement oublier ses inquiétudes.</text:span></text:p>
      <text:p text:style-name="P3"/>
      <text:p text:style-name="P3"><text:tab/><text:span text:style-name="T23">A son arrivée, Konar sera guidé par un garde forestier local, qui lui servira d’interprète pour entendre les témoignages de la tribu des Kaonde, une tribu vivant non loin des marais qui a rapporté plusieurs disparitions d’enfants ayant visité les marais. Konar doute bien sûr de la véracité des origines de leurs disparitions, pensant plutôt à une tribu rivale ou à un pédophile, mais le chef de leur village leur montre les lances et pendentifs de leurs chasseurs, utilisant des os taillés d’une créature que Konar ne reconnaît pas. Pensant qu’il s’agisse plus d’ignorance que d’un canular, il décide d’accepter de les suivre jusqu’au lieu </text:span><text:span text:style-name="T24">de la dernière attaque, où de nombreux </text:span><text:span text:style-name="T25">débris</text:span><text:span text:style-name="T24"> de bois jonche</text:span><text:span text:style-name="T25">nt</text:span><text:span text:style-name="T24"> les rives d’une rivière.</text:span></text:p>
      <text:p text:style-name="P3"/>
      <text:p text:style-name="P3"><text:tab/><text:span text:style-name="T26">Alors que l’équipe s’apprête à rentrer, les chasseurs remarquent une ombre survoler la canopée au-dessus de leurs têtes. </text:span><text:span text:style-name="T27">S’abattant sur eux comme un coup de tonnerre, l’embarcation manque de chavirer alors que l’ombre disparaît aussi vite qu’elle est apparue. Les chasseurs tirent leurs ars et lances alors que Konar plisse les yeux, distinguant à contre-jour l’ombre fondre à nouveau sur eux avec la furie d’un animal enragé, brisant la bicoque en deux.</text:span></text:p>
      <text:p text:style-name="P3"/>
      <text:p text:style-name="P3"><text:soft-page-break/><text:tab/><text:span text:style-name="T27">Ko</text:span><text:span text:style-name="T28">na</text:span><text:span text:style-name="T27">r parvient à s’extirper des rapides avec l’aide des chasseurs, et le groupe rentre au village bredouille, les chasseurs refusant de retourner affronter cette créature sans meilleur équipement. </text:span><text:span text:style-name="T29">Le crytozoologue, pensant qu’il s’agissait d’un grand aigle chassant des intrus de son territoire, décide d’y retourner seul, pensant pouvoir s’approcher de la zone en attirant moins l’intention, emportant cette fois son appareil photo.</text:span></text:p>
      <text:p text:style-name="P3"/>
      <text:p text:style-name="P4"><text:tab/><text:span text:style-name="T30">Au crépuscule, Konar embarque sur une petite barque et remonte la même rivière, ayant également emporté un pistolet pour repousser d’éventuels prédateurs. Cette fois, l’ombre tarde à arriver alors que le soleil marque la fin de sa course à l’horizon. Alors que Konar s’apprête à faire demi-tour, un cri strident perce le ciel alors qu’une silhouette familière trace des cercles autour de sa barque. Cette fois, Konar attrape son appareil photo et déclenche un flash juste au moment où l’ombre fond sur lui et manque de retourner la barque ; l’éclat de lumière aveugle la créature qui </text:span><text:span text:style-name="T31">s’envole vers la jungle. </text:span><text:span text:style-name="T32">Konar jubile de l’avoir pris en photo, mais celle-ci est floue dû au mouvement, et Konar décide de la pourchasser pour avoir le cliché qu’il recherche.</text:span></text:p>
      <text:p text:style-name="P4"/>
      <text:p text:style-name="P5"><text:span text:style-name="T31"><text:tab/>Konar </text:span><text:span text:style-name="T33">continue en ligne droite jusqu’à trouver son repaire, un baobab géant entouré d’ossements animaux et humains. Konar grimpe jusqu’à son nid et trouve les petits Kongamatos qu’il prend en photo. Leurs cris alertent leur mère qui attaque Konar, mais un autre flash photo lui laisse le temps de s’enfuir, le forçant à abandonner l’appareil derrière lui. </text:span></text:p>
      <text:p text:style-name="P5"/>
      <text:p text:style-name="P5"><text:span text:style-name="T33"><text:tab/>A son retour au village, il alerte les chasseurs qui organisent une battue pour retrouver le nid du Kongamato. Konar se sépare du groupe pour tenter de retrouver son appareil photo, et entend des bruits suspects non loin de là ; le Kongamato avait capturé un léopard qu’elle muselait et violait, offrant à Konar une chance de prendre une photo. Le flash attire l’attention du Kangamato qui laisse s’enfuir le léopard par erreur, et compense sa frustration sexuelle en arrachant les vêtements de Konar pour le violer à son tour. </text:span><text:span text:style-name="T34">Puis elle chasse les humains de son territoire, laissant Konar douter des raisons de son hostilité envers les humains.</text:span></text:p>
      <text:p text:style-name="P5"/>
      <text:p text:style-name="P11"><text:tab/><text:span text:style-name="T35">Konar y retourne seul le lendemain, </text:span><text:span text:style-name="T36">et trouve à nouveau le Kangamato en train de violer un léopards. Konar prend une photo au moment où le reste de la meute de léopards attaque le cryptide, l’empêchant de s’envoler. Ne voulant pas prendre le risque de le laisser de faire tuer, Konar sort son pistolet et blesse un des léopards, </text:span><text:span text:style-name="T37">incitant les autres à s’enfuir. La Kangamato plaque Konar contre un arbre, mais refuse de le tuer, semblant plus intéressée par son membre, sa frénésie sexuelle ne s’étant toujours pas calmée.</text:span></text:p>
      <text:p text:style-name="P3"/>
      <text:p text:style-name="P13"><text:tab/>Après l’avoir violé, le cryptide semble s’être calmé. Konar tente de prendre une photo d’elle, ce qui la surprend, mais il parvient à la calmer. Ne semblant pas ouvertement violente, il décide de retourner au village pour s renseigner auprès du chef de la tribu pour en savoir plus sur elle. Il apprend que les pendentifs et lances ont été créés à partir des ossements du compagnon de la Kangamato, ce qui explique son hostilité envers les humains. Konar décide alors de leur mentir sur la position de son nid, espérant lui acheter suffisamment de temps pour lui payer une seconde visite.</text:p>
      <text:p text:style-name="P13"/>
      <text:p text:style-name="P13"><text:tab/>Arrivé au crépuscule à son repaire, le Kangamato tente de l’intimider pour l’inciter à partir, mais Konar s’assied pour montrer ses bonnes intentions, lui jetant des bouts de viande pour l’amadouer. Le cryptide ne grogne plus, mais garde sa position et met du temps avant de manger la viande. Konar décide de la dessiner en espérant immortaliser ce moment tout en calmant les peurs du spécimen en face de lui. Une fois terminé, il montre le dessin à la Kangamato, qui s’approche avec curiosité, mais semble plus intéressé en lui qu’en son brouillon. Comprenant ses <text:soft-page-break/>intentions, Konar se déshabille pour éviter de voir ses vêtements déchiquetés, et entame un court rapport sexuel avec le cryptide, qui remonte alors dans son nid.</text:p>
      <text:p text:style-name="P13"/>
      <text:p text:style-name="P13"><text:tab/><text:span text:style-name="T38">A son retour à l’aéroport, Konar hésite à dire la vérité à son client, car cela pourrait mettre en péril la survie des Kangamatos de la région si ce nid venait à être découvert. Il décide de parler de leur rencontre, mais omet volontairement la localisation exacte des petits et l’existence des clichés du cryptide qu’il a pris. Cependant, son client ne semble pas lui en tenir rigueur, semblant simplement satisfait de la confirmation de leur existence. </text:span><text:span text:style-name="T39">Konar, quant à lui, grince des dents pour avoir perdu cette occasion de devenir célèbre par ses clichés, mais juste cette fois, il est satisfait d’avoir pu sauver cette espèce, qu’il pourra toujours revenir visiter plus tard s’il le faut.</text:span></text:p>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15T19:37:04.787000000</dc:date>
    <meta:editing-duration>PT4H28M40S</meta:editing-duration>
    <meta:editing-cycles>89</meta:editing-cycles>
    <meta:generator>LibreOffice/7.3.3.2$Windows_X86_64 LibreOffice_project/d1d0ea68f081ee2800a922cac8f79445e4603348</meta:generator>
    <meta:document-statistic meta:table-count="0" meta:image-count="0" meta:object-count="0" meta:page-count="3" meta:paragraph-count="17" meta:word-count="1327" meta:character-count="8086" meta:non-whitespace-character-count="6757"/>
  </office:meta>
</office:document-meta>
</file>