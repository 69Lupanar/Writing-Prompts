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0ec709"/>
    </style:style>
    <style:style style:name="P2" style:family="paragraph" style:parent-style-name="Standard">
      <style:paragraph-properties fo:text-align="justify" style:justify-single-word="false"/>
      <style:text-properties style:font-name="Calibri" officeooo:rsid="000ec709" officeooo:paragraph-rsid="0029e945"/>
    </style:style>
    <style:style style:name="P3" style:family="paragraph" style:parent-style-name="Standard">
      <style:paragraph-properties fo:text-align="justify" style:justify-single-word="false"/>
      <style:text-properties style:font-name="Calibri" officeooo:rsid="000ec709" officeooo:paragraph-rsid="002db035"/>
    </style:style>
    <style:style style:name="P4" style:family="paragraph" style:parent-style-name="Standard">
      <style:paragraph-properties fo:text-align="justify" style:justify-single-word="false"/>
      <style:text-properties style:font-name="Calibri" officeooo:rsid="000ec709" officeooo:paragraph-rsid="00361b8e"/>
    </style:style>
    <style:style style:name="P5" style:family="paragraph" style:parent-style-name="Standard">
      <style:paragraph-properties fo:text-align="justify" style:justify-single-word="false"/>
      <style:text-properties style:font-name="Calibri" officeooo:rsid="000ec709" officeooo:paragraph-rsid="0042c5e8"/>
    </style:style>
    <style:style style:name="P6" style:family="paragraph" style:parent-style-name="Standard">
      <style:paragraph-properties fo:text-align="justify" style:justify-single-word="false"/>
      <style:text-properties style:font-name="Calibri" officeooo:rsid="002c2b4f" officeooo:paragraph-rsid="002db035"/>
    </style:style>
    <style:style style:name="P7" style:family="paragraph" style:parent-style-name="Standard">
      <style:paragraph-properties fo:text-align="justify" style:justify-single-word="false"/>
      <style:text-properties style:font-name="Calibri" officeooo:rsid="002db035" officeooo:paragraph-rsid="002db035"/>
    </style:style>
    <style:style style:name="P8" style:family="paragraph" style:parent-style-name="Standard">
      <style:paragraph-properties fo:text-align="justify" style:justify-single-word="false"/>
      <style:text-properties style:font-name="Calibri" officeooo:rsid="003e5747" officeooo:paragraph-rsid="003e5747"/>
    </style:style>
    <style:style style:name="P9" style:family="paragraph" style:parent-style-name="Standard">
      <style:paragraph-properties fo:text-align="justify" style:justify-single-word="false"/>
      <style:text-properties style:font-name="Calibri" officeooo:rsid="004447b8" officeooo:paragraph-rsid="004447b8"/>
    </style:style>
    <style:style style:name="P10" style:family="paragraph" style:parent-style-name="Standard">
      <style:paragraph-properties fo:text-align="justify" style:justify-single-word="false"/>
      <style:text-properties style:font-name="Calibri" officeooo:rsid="00361b8e" officeooo:paragraph-rsid="00361b8e"/>
    </style:style>
    <style:style style:name="P11" style:family="paragraph" style:parent-style-name="Standard">
      <style:paragraph-properties fo:text-align="justify" style:justify-single-word="false"/>
      <style:text-properties style:font-name="Calibri" officeooo:rsid="00361b8e" officeooo:paragraph-rsid="003cccf4"/>
    </style:style>
    <style:style style:name="P12" style:family="paragraph" style:parent-style-name="Standard">
      <style:paragraph-properties fo:text-align="justify" style:justify-single-word="false"/>
      <style:text-properties style:font-name="Calibri" officeooo:rsid="00361b8e" officeooo:paragraph-rsid="0042c5e8"/>
    </style:style>
    <style:style style:name="P13" style:family="paragraph" style:parent-style-name="Standard">
      <style:paragraph-properties fo:text-align="justify" style:justify-single-word="false"/>
      <style:text-properties style:font-name="Calibri" officeooo:rsid="00376d6f" officeooo:paragraph-rsid="00361b8e"/>
    </style:style>
    <style:style style:name="P14" style:family="paragraph" style:parent-style-name="Standard">
      <style:paragraph-properties fo:text-align="justify" style:justify-single-word="false"/>
      <style:text-properties style:font-name="Calibri" officeooo:rsid="0039f192" officeooo:paragraph-rsid="0039f192"/>
    </style:style>
    <style:style style:name="P15" style:family="paragraph" style:parent-style-name="Standard">
      <style:paragraph-properties fo:text-align="justify" style:justify-single-word="false"/>
      <style:text-properties style:font-name="Calibri" officeooo:rsid="003c68cc" officeooo:paragraph-rsid="0039f192"/>
    </style:style>
    <style:style style:name="P16" style:family="paragraph" style:parent-style-name="Standard">
      <style:paragraph-properties fo:text-align="justify" style:justify-single-word="false"/>
      <style:text-properties officeooo:paragraph-rsid="002db035"/>
    </style:style>
    <style:style style:name="P17" style:family="paragraph" style:parent-style-name="Standard">
      <style:paragraph-properties fo:text-align="justify" style:justify-single-word="false"/>
      <style:text-properties officeooo:rsid="00361b8e" officeooo:paragraph-rsid="00361b8e"/>
    </style:style>
    <style:style style:name="P18" style:family="paragraph" style:parent-style-name="Standard">
      <style:paragraph-properties fo:text-align="justify" style:justify-single-word="false"/>
      <style:text-properties officeooo:rsid="0039f192" officeooo:paragraph-rsid="0039f192"/>
    </style:style>
    <style:style style:name="P19" style:family="paragraph" style:parent-style-name="Standard" style:list-style-name="L1">
      <style:paragraph-properties fo:text-align="justify" style:justify-single-word="false"/>
      <style:text-properties style:font-name="Calibri" officeooo:rsid="00361b8e" officeooo:paragraph-rsid="00361b8e"/>
    </style:style>
    <style:style style:name="P20" style:family="paragraph" style:parent-style-name="Standard" style:list-style-name="L1">
      <style:paragraph-properties fo:text-align="justify" style:justify-single-word="false"/>
      <style:text-properties style:font-name="Calibri" officeooo:rsid="001e38b0" officeooo:paragraph-rsid="003cccf4"/>
    </style:style>
    <style:style style:name="P21" style:family="paragraph" style:parent-style-name="Standard" style:list-style-name="L1">
      <style:paragraph-properties fo:text-align="justify" style:justify-single-word="false"/>
      <style:text-properties style:font-name="Calibri" officeooo:rsid="003e5747" officeooo:paragraph-rsid="003e5747"/>
    </style:style>
    <style:style style:name="P22" style:family="paragraph" style:parent-style-name="Standard" style:list-style-name="L1">
      <style:paragraph-properties fo:text-align="justify" style:justify-single-word="false"/>
      <style:text-properties style:font-name="Calibri" officeooo:rsid="0042c5e8" officeooo:paragraph-rsid="0042c5e8"/>
    </style:style>
    <style:style style:name="P23" style:family="paragraph" style:parent-style-name="Standard" style:list-style-name="L1">
      <style:paragraph-properties fo:text-align="justify" style:justify-single-word="false"/>
      <style:text-properties style:font-name="Calibri" officeooo:rsid="004447b8" officeooo:paragraph-rsid="004447b8"/>
    </style:style>
    <style:style style:name="T1" style:family="text">
      <style:text-properties officeooo:rsid="00241570"/>
    </style:style>
    <style:style style:name="T2" style:family="text">
      <style:text-properties style:font-name="Calibri"/>
    </style:style>
    <style:style style:name="T3" style:family="text">
      <style:text-properties style:font-name="Calibri" officeooo:rsid="000ec709"/>
    </style:style>
    <style:style style:name="T4" style:family="text">
      <style:text-properties style:font-name="Calibri" officeooo:rsid="00241570"/>
    </style:style>
    <style:style style:name="T5" style:family="text">
      <style:text-properties style:font-name="Calibri" officeooo:rsid="002abb55"/>
    </style:style>
    <style:style style:name="T6" style:family="text">
      <style:text-properties style:font-name="Calibri" officeooo:rsid="002b8ea6"/>
    </style:style>
    <style:style style:name="T7" style:family="text">
      <style:text-properties style:font-name="Calibri" officeooo:rsid="002c2b4f"/>
    </style:style>
    <style:style style:name="T8" style:family="text">
      <style:text-properties style:font-name="Calibri" officeooo:rsid="002c70dc"/>
    </style:style>
    <style:style style:name="T9" style:family="text">
      <style:text-properties style:font-name="Calibri" officeooo:rsid="002db035"/>
    </style:style>
    <style:style style:name="T10" style:family="text">
      <style:text-properties style:font-name="Calibri" officeooo:rsid="002e6a6d"/>
    </style:style>
    <style:style style:name="T11" style:family="text">
      <style:text-properties style:font-name="Calibri" officeooo:rsid="002fbc93"/>
    </style:style>
    <style:style style:name="T12" style:family="text">
      <style:text-properties style:font-name="Calibri" officeooo:rsid="00376d6f"/>
    </style:style>
    <style:style style:name="T13" style:family="text">
      <style:text-properties style:font-name="Calibri" officeooo:rsid="0038e0c1"/>
    </style:style>
    <style:style style:name="T14" style:family="text">
      <style:text-properties style:font-name="Calibri" officeooo:rsid="003a7e03"/>
    </style:style>
    <style:style style:name="T15" style:family="text">
      <style:text-properties style:font-name="Calibri" officeooo:rsid="003ac9ba"/>
    </style:style>
    <style:style style:name="T16" style:family="text">
      <style:text-properties style:font-name="Calibri" officeooo:rsid="003c68cc"/>
    </style:style>
    <style:style style:name="T17" style:family="text">
      <style:text-properties style:font-name="Calibri" officeooo:rsid="00402461"/>
    </style:style>
    <style:style style:name="T18" style:family="text">
      <style:text-properties style:font-name="Calibri" officeooo:rsid="0045f5d5"/>
    </style:style>
    <style:style style:name="T19" style:family="text">
      <style:text-properties officeooo:rsid="0029e945"/>
    </style:style>
    <style:style style:name="T20" style:family="text">
      <style:text-properties fo:font-style="italic"/>
    </style:style>
    <style:style style:name="T21" style:family="text">
      <style:text-properties officeooo:rsid="002db035"/>
    </style:style>
    <style:style style:name="T22" style:family="text">
      <style:text-properties officeooo:rsid="00302982"/>
    </style:style>
    <style:style style:name="T23" style:family="text">
      <style:text-properties officeooo:rsid="00302ccd"/>
    </style:style>
    <style:style style:name="T24" style:family="text">
      <style:text-properties officeooo:rsid="003224dc"/>
    </style:style>
    <style:style style:name="T25" style:family="text">
      <style:text-properties officeooo:rsid="0033ae99"/>
    </style:style>
    <style:style style:name="T26" style:family="text">
      <style:text-properties officeooo:rsid="003483b6"/>
    </style:style>
    <style:style style:name="T27" style:family="text">
      <style:text-properties officeooo:rsid="00361b8e"/>
    </style:style>
    <style:style style:name="T28" style:family="text">
      <style:text-properties officeooo:rsid="003e5747"/>
    </style:style>
    <style:style style:name="T29" style:family="text">
      <style:text-properties officeooo:rsid="003f888d"/>
    </style:style>
    <style:style style:name="T30" style:family="text">
      <style:text-properties officeooo:rsid="00402461"/>
    </style:style>
    <style:style style:name="T31" style:family="text">
      <style:text-properties officeooo:rsid="00420b68"/>
    </style:style>
    <style:style style:name="T32" style:family="text">
      <style:text-properties officeooo:rsid="0042c5e8"/>
    </style:style>
    <style:style style:name="T33" style:family="text">
      <style:text-properties officeooo:rsid="0044a0d8"/>
    </style:style>
    <style:style style:name="T34" style:family="text">
      <style:text-properties officeooo:rsid="0044c18e"/>
    </style:style>
    <style:style style:name="T35" style:family="text">
      <style:text-properties officeooo:rsid="0045214b"/>
    </style:style>
    <style:style style:name="T36" style:family="text">
      <style:text-properties officeooo:rsid="0045ad67"/>
    </style:style>
    <style:style style:name="T37" style:family="text">
      <style:text-properties officeooo:rsid="0046578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Description d</text:span><text:span text:style-name="T21">u</text:span><text:span text:style-name="T19"> cryptide (dans la réalité)</text:span> : </text:p>
      <text:p text:style-name="P3"/>
      <text:p text:style-name="P16"><text:span text:style-name="T3"><text:tab/></text:span><text:span text:style-name="T4">Le </text:span><text:span text:style-name="T5">Bigfoot est un primate géant détecté au Nord-Ouest des États-Unis et au Sud-Ouest du Canada. Vivant dans la forêt, </text:span><text:span text:style-name="T6">il laisse de grandes empreintes de pieds de primate dans le sol, </text:span><text:span text:style-name="T8">et fuit le contact humain, par hostilité ou par peur</text:span><text:span text:style-name="T6">. </text:span><text:span text:style-name="T7">Une hypothèse propose qu’il soit un descendant du </text:span><text:a xlink:type="simple" xlink:href="https://fr.wikipedia.org/wiki/Gigantopithecus_blacki" text:style-name="Internet_20_link" text:visited-style-name="Visited_20_Internet_20_Link"><text:span text:style-name="T20">Gigantopithecus blacki</text:span></text:a><text:span text:style-name="T5">, un espèce éteinte </text:span><text:span text:style-name="T7">de primates géants originaire d’Asie du Sud-Est, et serait donc un cousin du Yéti.</text:span></text:p>
      <text:p text:style-name="P6"/>
      <text:p text:style-name="P3"><text:span text:style-name="T19">Description d</text:span><text:span text:style-name="T21">u</text:span><text:span text:style-name="T19"> cryptide (</text:span><text:span text:style-name="T21">en jeu</text:span><text:span text:style-name="T19">)</text:span> : </text:p>
      <text:p text:style-name="P3"/>
      <text:p text:style-name="P16"><text:span text:style-name="T3"><text:tab/></text:span><text:span text:style-name="T4">Le </text:span><text:span text:style-name="T5">Bigfoot </text:span><text:span text:style-name="T9">est un spécimen féminin de primate géant anthropomorphe d’une espèce inconnu</text:span><text:span text:style-name="T18">e</text:span><text:span text:style-name="T9">. Recouverte d’une fourrure brune épaisse qui masque partiellement son visage, son torse et son abdomen sont cependant recouverts d’un duvet de poils plus fin, laissant apparaître sa silhouette féminine et ses attributs féminins, à savoir ses seins et son vagin. Ses grands pieds, qu’elle peut contrôler aussi bien que ses mains, lui permettent d’attraper des objets ou des hommes qu’elle chasse de temps à autre dans sa forêt.</text:span></text:p>
      <text:p text:style-name="P7"/>
      <text:p text:style-name="P16"><text:span text:style-name="T9"><text:tab/>Vivant en autarcie à l’écart des hommes, Bigfoot n’a jamais eu de contact avec d’autres membres de son espèce et retient ainsi une forte frustration sexuelle qu’elle n’a jamais pu libérer autrement que par masturbation. </text:span><text:span text:style-name="T10">Ainsi, elle chasse régulièrement les humains curieux qui s’aventurent dans la forêt à sa recherche, et les dévore s’il s’agit de femmes, ou les viole s’il s’agit d’hommes. Parfois, elle s’entiche d’un humain et choisit de le garder ou le laisser partir, mais cela reste un cas rare. </text:span><text:span text:style-name="T11">Pendant ses rapports sexuels, Bigfoot se montre très proactive et dominante, aimant utiliser ses pieds pour bloquer et masturber ses partenaires.</text:span></text:p>
      <text:p text:style-name="P3"/>
      <text:p text:style-name="P2">Idées de scénario : </text:p>
      <text:p text:style-name="P2"/>
      <text:p text:style-name="P2"><text:tab/><text:span text:style-name="T1">Le protagoniste, </text:span><text:span text:style-name="T22">Konar Lebarbant, </text:span><text:span text:style-name="T23">arpente les états américains de l’Oregon et de Washington dans le Nord-Ouest Pacifique des États-Unis. Son but : Retrouver les traces de Bigfoot, après qu’un message d’un mystérieux donateur l’ai informé de nombreux témoignages récents dans la région. Craignant d’abord de se faire avoir par un canular, ses craintes s’apaisent vite quand il découvre que son bénédictin lui a offert une caution généreuse en cas d’erreur. Il accepte rapidement la mission, pouvant repartir avec une bonne somme dans le pire des cas.</text:span></text:p>
      <text:p text:style-name="P2"/>
      <text:p text:style-name="P2"><text:tab/><text:span text:style-name="T23">Arrivé de nuit dans la Capitol State Forest, Washington, Konar évite les gardes forestiers et s’aventure dans les profondeurs du parc naturel, persuadé au fond de lui qu’il ne poursuivait qu’une chimère. Ses doutes de consolident après deux heures d’errance, n’ayant trouvé aucune piste, jusqu’à ce qu’il décide d’établir un petit camp pour se reposer. C’est alors qu’il est leurré à distance par des bruits étranges, et qu’il découvre son camp détruit et ses provisions emportées par une grande ombre inquiétante. Décidant de la poursuivre, il tombe dans un piège et perd connaissance après avoir été attaqué par derrière par une étrange créature.</text:span></text:p>
      <text:p text:style-name="P2"/>
      <text:p text:style-name="P2"><text:tab/><text:span text:style-name="T24">Se réveillant des heures plus tard, il se retrouve dans une caverne entouré de nombreux sacs et outils humains, visiblement rattroupés ici au fil des années, </text:span><text:span text:style-name="T25">et plus inquiétant, de nombreux squelettes d’animaux et d’ossements humains</text:span><text:span text:style-name="T24">. Ses espoirs de s’enfuir s’envolent vite cependant, lorsque leur propriétaire revient dans sa demeure : C’est le légendaire Bigfoot, qui se révèle être une femelle anthropomorphe avec une silhouette généreuse. </text:span><text:span text:style-name="T25">Tentant de la soudoyer avec son équipement pour la convaincre de le laisser s’enfuir, </text:span><text:span text:style-name="T26">elle l’ignore pour se focaliser sur ses bouteilles de bière qu’elle éventre et s’enfile sans broncher, semblant aimer l’effet de l’alcool. </text:span><text:soft-page-break/><text:span text:style-name="T26">Konar y voir une opportunité pour la saouler jusqu’à l’épuisement, et décide de lui faire boire toutes ses bouteilles jusqu’à l’assommer sous l’effet de l’alcool.</text:span></text:p>
      <text:p text:style-name="P2"/>
      <text:p text:style-name="P4"><text:tab/><text:span text:style-name="T26">Cependant, son plan à l’effet inverse : Bigfoot semble être plus excitée qu’au début de leur échange, et commence à le plaquer contre la paroi de la grotte, la fourrure autour de son vagin semblant plus sombre et humide qu’auparavant. Konar comprend alors que l’alcool, loin de l’avoir fatigué, a au contraire décuplé sa libido. </text:span></text:p>
      <text:p text:style-name="P4"/>
      <text:p text:style-name="P10">Scene X : </text:p>
      <text:list xml:id="list3125940982" text:style-name="L1">
        <text:list-item>
          <text:p text:style-name="P19">Konar tente de s’enfuir.</text:p>
        </text:list-item>
        <text:list-item>
          <text:p text:style-name="P19">Bigfoot le plaque au sol et lui arrache ses vêtements avec force. </text:p>
        </text:list-item>
        <text:list-item>
          <text:p text:style-name="P19">Bigfoot son immense pied sur son membre, le malaxant comme un nouveau jouet.</text:p>
        </text:list-item>
        <text:list-item>
          <text:p text:style-name="P19">Konar jouit malgré lui. Bigfoot, ayant remarqué sa réaction, frotte son vagin contre son membre pour le lubrifier avec ses propres sécrétions.</text:p>
        </text:list-item>
        <text:list-item>
          <text:p text:style-name="P19">Bigfoot fait rentrer son membre dans son vagin et commence par de fortes poussées qui pl<text:span text:style-name="T37">a</text:span>quent Konar au sol, Bigfoot ayant lié ses poings d’une main.</text:p>
        </text:list-item>
        <text:list-item>
          <text:p text:style-name="P19">Bigfoot soulève Konar par les jambes et le baise en position d’amazone jusqu’à ce qu’il jouisse à nouveau.</text:p>
        </text:list-item>
        <text:list-item>
          <text:p text:style-name="P19">Bigfoot soulève le corps de Konar et le plaque contre le mur, le baisant pendant qu’il est suspensu en l’air par la seule force des bras du cryptide.</text:p>
        </text:list-item>
        <text:list-item>
          <text:p text:style-name="P19">Après que tous deux aient joui, Bigfoot s’effondre sur le corps de Konar qui ne peut plus s’enfuir. Le souffle coupé par le poids de Bigfoot, il finit par s’endormir peu après elle.</text:p>
        </text:list-item>
      </text:list>
      <text:p text:style-name="P10"/>
      <text:p text:style-name="P17"><text:span text:style-name="T2"><text:tab/>A son réveil, </text:span><text:span text:style-name="T12">Konar se retrouve toujours sous le corps d’une Bigfoot rattrapée par les effets secondaires de l’alcool. Parvenant difficilement à s’extirper de son étreinte, il récupère le peu d’affaires encore en état de marche et s’enfuit de la caverne. Il découvre avec désemparement qu’il ne reconnaît pas cette région de la forêt, supposant que Bigfoot l’a emporté bien au-delà des limites du parc national, </text:span><text:span text:style-name="T13">la caverne se trouvant au pied d’une montagne voisine</text:span><text:span text:style-name="T12">.</text:span></text:p>
      <text:p text:style-name="P13"/>
      <text:p text:style-name="P18"><text:span text:style-name="T12"><text:tab/></text:span><text:span text:style-name="T2">Rassemblant son courage, Konar décide de partir avant le réveil de Bigfoot, craignant ce qu’il pourrait lui arriver quand elle découvrirait sa disparition. En chemin, il ne peut s’empêcher de repenser à ce qu’il s’est passé dans la caverne : Pourquoi Bigfoot l’a capturé au lieu de le tuer, pourquoi elle semblait presque amicale et curieuse, pourquoi elle a décidé de le baiser, etc. </text:span><text:span text:style-name="T14">En chemin, alors que le Soleil baisse à l’horizon, une aurore boréale apparaît, et la surréalité de la situation le saisit soudainement, réalisant qu’il venait de rencontrer un cryptide et qu’il n’avait </text:span><text:span text:style-name="T15">pu <text:s/>rassembler</text:span><text:span text:style-name="T14"> aucune preuve de son existence.</text:span></text:p>
      <text:p text:style-name="P14"/>
      <text:p text:style-name="P18"><text:span text:style-name="T2"><text:tab/></text:span><text:span text:style-name="T14">Cepe</text:span><text:span text:style-name="T16">ndant, ce n’est que le dernier de ses soucis alors que la nuit approche, et que Konar doit trouver un abri pour la nuit, sa tente ayant été détruite par Bigfoot. Craignant les prédateurs locaux, il tente de grimper à un arbre mais une branche peu solide le fait tomber à terre dans un cri, qui alerte une meute de loups non loin de là. Konar tente d’utiliser une torche pour les effrayer, mais il ne doit son salut qu’à Bigfoot, qui s’interpose pour le protéger, les loups s’enfuyant après qu’elle ait tué l’un des leurs. Comprenant alors qu’elle l’avait suivi jusqu’ici, Konar se prépare pour ses derniers instants, mais Bigfoot se contente de poser la carcasse à terre et de rattrouper du bois et des silex pour faire un feu, surprenant Konar qui ne pensait pas que Bigfoot savait cuire de la viande. </text:span><text:span text:style-name="T17">Il en profite pour sortir un crayon et une feuille pour la dessiner, n’ayant plus d’appareil photo ni de portable pour capturer ce moment, et tente de noter le plus de détails sur son comportement.</text:span></text:p>
      <text:p text:style-name="P15"/>
      <text:p text:style-name="P15"><text:soft-page-break/><text:tab/>Pendant qu’ils mangent, Bigfoot fouille le sac de Konar en quête d’alcool, mais celle-ci a bu toutes les bouteilles qu’il s’était réservé. Elle s’absente alors quelques minutes, donnant à Konar le temps de songer à s’enfuir, mais s’en abstient en voyant qu’aucun prédateur ne les attaquait tant que Bigfoot était à proximité. Elle finit par revenir avec des fruits trop murs, qu’elle s’empresse de presser dans sa bouche avant d’embrasser Konar, lui partageant le jus fermenté proche de l’alcool. Sa vision se brouille alors que Bigfoot lui retire à nouveau ses vêtements de rechange.</text:p>
      <text:p text:style-name="P1"/>
      <text:p text:style-name="P11">Scene X : </text:p>
      <text:list xml:id="list192842681496193" text:continue-numbering="true" text:style-name="L1">
        <text:list-item>
          <text:p text:style-name="P20"><text:span text:style-name="T27">Konar tente de </text:span><text:span text:style-name="T28">résister, craignant que des prédateurs profitent de l’occasion, mais Bigfoot lui lie les mains derrière la tête d’une main.</text:span></text:p>
        </text:list-item>
        <text:list-item>
          <text:p text:style-name="P21">Bigfoot plaque ses seins contre son corps en missionnaire et fait de violentes poussées pour faire entre son membre le plus loin possible dans son vagin.</text:p>
        </text:list-item>
        <text:list-item>
          <text:p text:style-name="P21">Distraite, Bigfoot laisse Konar lui agripper les seins, espérant que ce geste la ferait jouir plus vite. </text:p>
        </text:list-item>
        <text:list-item>
          <text:p text:style-name="P21">Bigfoot tombe à la renverse de plaisir après avoir joui une première fois. Konar finit lui aussi par prendre du plaisir, et décide de la monter à son tour, agrippant et suçant ses seins.</text:p>
        </text:list-item>
        <text:list-item>
          <text:p text:style-name="P21">Bigfoot l’enserre de ses bras puissants tandis que Konar accélère la cadence jusqu’à l’orgasme. Pensant pouvoir profiter de l’instant pour s’extirper, Bigfoot roule sur le côté et le plaque son son corps comme dans la caverne.</text:p>
        </text:list-item>
      </text:list>
      <text:p text:style-name="P8"/>
      <text:p text:style-name="P8"><text:tab/><text:span text:style-name="T29">A son réveil, Konar trouve toujours Bigfoot à ses côtés, cette fois réveillée peu après lui. Se levant pour reprendre de la viande, elle gronde en constatant que les loups sont revenus la nuit pour voler sa nourriture. Konar essaie de lui faire comprendre qu’il doit partir, mais Bigfoot lui prend le bras pour l’emmener jusqu’à une rivière non loin d’ici où des ours viennent régulièrement pêcher. Elle en profite pour attraper deux poissons dont un pour Konar, gêné par sa subite gentillesse, lui qui s’imaginait un animal sans cervelle. </text:span><text:span text:style-name="T30">Pendant qu’elle pêche, il se décide à la dessiner à nouveau, prenant plus de notes sur son comportement.</text:span></text:p>
      <text:p text:style-name="P8"/>
      <text:p text:style-name="P8"><text:tab/><text:span text:style-name="T31">Le reste de leur voyage se passe sans grand soucis, Bigfoot semblant tout aussi curieuse de Konar que l’inverse. Cependant, il craint un autre journée de voyage et ce qu’il adviendrait de lui si Bigfoot se décidait à le ramener à sa caverne, ou pire, l’abandonner en pleine forêt. Cependant, ses peurs disparaissent quand il réalise que Bigfoot l’a emmené à l’orée du parc national ; loin de son point de départ certes, mais Konar n’aurait pas de problème pour repartir. </text:span><text:span text:style-name="T32">Remerciant Bigfoot malgré ses doutes sur ses capacités de compréhension, il réalise vite qu’elle attend de lui un autre type de remerciement sous forme de rapport sexuel.</text:span></text:p>
      <text:p text:style-name="P5"/>
      <text:p text:style-name="P12">Scene X : </text:p>
      <text:list xml:id="list192844268230101" text:continue-numbering="true" text:style-name="L1">
        <text:list-item>
          <text:p text:style-name="P22">Bigfoot s’allonge sur le dos et entraîne gentiment Konar d’une main. Konar se laisse faire, étant plus satisfait de la situation et estimant que Bigfoot ne lui ferait plus de mal.</text:p>
        </text:list-item>
        <text:list-item>
          <text:p text:style-name="P23">La scène est similaire à la précédente, mais cette fois Konar veille à donner plus de plaisir à Bigfoot, qui semble faire de même pour lui.</text:p>
        </text:list-item>
        <text:list-item>
          <text:p text:style-name="P23">Une fois l’orgasme atteint, Bigfoot l’enserre doucement dans ses bras, leur laissant à tous les deux le temps de respirer.</text:p>
        </text:list-item>
      </text:list>
      <text:p text:style-name="P9"/>
      <text:p text:style-name="P9"><text:tab/><text:span text:style-name="T33">Au bout d’un moment, Bigfoot accepte de le laisser partir, un air attristé sur le visage, ce qui déroute Konar. Elle finit cependant par disparaître dans la forêt, aussi soudainement qu’elle est apparue lors de leur première rencontre. </text:span><text:span text:style-name="T34">Konar retrouve sa caravane après s’être rapidement </text:span><text:soft-page-break/><text:span text:style-name="T34">expliqué aux gardes forestiers. Puis reprend la route pour sa prochaine mission.</text:span></text:p>
      <text:p text:style-name="P9"/>
      <text:p text:style-name="P9"><text:tab/><text:span text:style-name="T34">Bien qu’il n’ait aucune preuve tangible de sa rencontre avec Bigfoot, son mystérieux contracteur semble très intéressé par sa version des faits, et même satisfait des résultats de son expérience, ce qui déroute Konar. Cependant, il ignore rapidement la réaction de son bienfaiteur lorsqu’il reçoit le reste de sa somme, ainsi que les indications vers sa prochaine mission. Konar accepte avec joie si la paye reste aussi bonne, </text:span><text:span text:style-name="T35">espérant découvrir</text:span><text:span text:style-name="T34"> un </text:span><text:span text:style-name="T35">nouveau</text:span><text:span text:style-name="T34"> cryptide à baiser, </text:span><text:span text:style-name="T36">regardant à nouveau les quelques dessins de Bigfoot qu’il a pu tracer au crayon noir</text:span><text:span text:style-name="T3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25T19:28:41.847000000</dc:date>
    <meta:editing-duration>PT2H47M9S</meta:editing-duration>
    <meta:editing-cycles>64</meta:editing-cycles>
    <meta:generator>LibreOffice/7.3.3.2$Windows_X86_64 LibreOffice_project/d1d0ea68f081ee2800a922cac8f79445e4603348</meta:generator>
    <meta:document-statistic meta:table-count="0" meta:image-count="0" meta:object-count="0" meta:page-count="4" meta:paragraph-count="37" meta:word-count="1848" meta:character-count="11133" meta:non-whitespace-character-count="9313"/>
  </office:meta>
</office:document-meta>
</file>