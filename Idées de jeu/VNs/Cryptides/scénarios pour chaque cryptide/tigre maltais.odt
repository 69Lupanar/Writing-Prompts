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304bef"/>
    </style:style>
    <style:style style:name="P2" style:family="paragraph" style:parent-style-name="Standard">
      <style:paragraph-properties fo:text-align="justify" style:justify-single-word="false"/>
      <style:text-properties style:font-name="Calibri" officeooo:rsid="000ec709" officeooo:paragraph-rsid="00304bef"/>
    </style:style>
    <style:style style:name="P3" style:family="paragraph" style:parent-style-name="Standard">
      <style:paragraph-properties fo:text-align="justify" style:justify-single-word="false"/>
      <style:text-properties style:font-name="Calibri" officeooo:paragraph-rsid="00304bef"/>
    </style:style>
    <style:style style:name="P4" style:family="paragraph" style:parent-style-name="Standard">
      <style:paragraph-properties fo:text-align="justify" style:justify-single-word="false"/>
      <style:text-properties style:font-name="Calibri" officeooo:rsid="0034b3b9" officeooo:paragraph-rsid="00304bef"/>
    </style:style>
    <style:style style:name="P5" style:family="paragraph" style:parent-style-name="Standard">
      <style:paragraph-properties fo:text-align="justify" style:justify-single-word="false"/>
      <style:text-properties style:font-name="Calibri" officeooo:rsid="003468f8" officeooo:paragraph-rsid="00304bef"/>
    </style:style>
    <style:style style:name="P6" style:family="paragraph" style:parent-style-name="Standard" style:list-style-name="L1">
      <style:paragraph-properties fo:text-align="justify" style:justify-single-word="false"/>
      <style:text-properties style:font-name="Calibri" officeooo:rsid="00353e4c" officeooo:paragraph-rsid="00353e4c"/>
    </style:style>
    <style:style style:name="P7" style:family="paragraph" style:parent-style-name="Standard" style:list-style-name="L1">
      <style:paragraph-properties fo:text-align="justify" style:justify-single-word="false"/>
      <style:text-properties style:font-name="Calibri" officeooo:rsid="0035b3d6" officeooo:paragraph-rsid="0035b3d6"/>
    </style:style>
    <style:style style:name="P8" style:family="paragraph" style:parent-style-name="Standard" style:list-style-name="L1">
      <style:paragraph-properties fo:text-align="justify" style:justify-single-word="false"/>
      <style:text-properties style:font-name="Calibri" officeooo:rsid="0039ee92" officeooo:paragraph-rsid="0039ee92"/>
    </style:style>
    <style:style style:name="P9" style:family="paragraph" style:parent-style-name="Standard" style:list-style-name="L1">
      <style:paragraph-properties fo:text-align="justify" style:justify-single-word="false"/>
      <style:text-properties style:font-name="Calibri" officeooo:rsid="003a698a" officeooo:paragraph-rsid="003b946f"/>
    </style:style>
    <style:style style:name="P10" style:family="paragraph" style:parent-style-name="Standard" style:list-style-name="L1">
      <style:paragraph-properties fo:text-align="justify" style:justify-single-word="false"/>
      <style:text-properties style:font-name="Calibri" officeooo:rsid="003c46e5" officeooo:paragraph-rsid="003c46e5"/>
    </style:style>
    <style:style style:name="P11" style:family="paragraph" style:parent-style-name="Standard" style:list-style-name="L1">
      <style:paragraph-properties fo:text-align="justify" style:justify-single-word="false"/>
      <style:text-properties style:font-name="Calibri" officeooo:rsid="003d8996" officeooo:paragraph-rsid="003d8996"/>
    </style:style>
    <style:style style:name="P12" style:family="paragraph" style:parent-style-name="Standard" style:list-style-name="L1">
      <style:paragraph-properties fo:text-align="justify" style:justify-single-word="false"/>
      <style:text-properties style:font-name="Calibri" officeooo:rsid="003f0dd3" officeooo:paragraph-rsid="003f0dd3"/>
    </style:style>
    <style:style style:name="P13" style:family="paragraph" style:parent-style-name="Standard" style:list-style-name="L1">
      <style:paragraph-properties fo:text-align="justify" style:justify-single-word="false"/>
      <style:text-properties style:font-name="Calibri" officeooo:rsid="00422808" officeooo:paragraph-rsid="0042a5ba"/>
    </style:style>
    <style:style style:name="P14" style:family="paragraph" style:parent-style-name="Standard" style:list-style-name="L1">
      <style:paragraph-properties fo:text-align="justify" style:justify-single-word="false"/>
      <style:text-properties style:font-name="Calibri" officeooo:rsid="0042a5ba" officeooo:paragraph-rsid="0042a5ba"/>
    </style:style>
    <style:style style:name="T1" style:family="text">
      <style:text-properties style:font-name="Calibri"/>
    </style:style>
    <style:style style:name="T2" style:family="text">
      <style:text-properties style:font-name="Calibri" fo:font-size="12pt" officeooo:rsid="0031d2bd" style:font-size-asian="12pt" style:font-size-complex="12pt"/>
    </style:style>
    <style:style style:name="T3" style:family="text">
      <style:text-properties style:font-name="Calibri" fo:font-size="12pt" officeooo:rsid="00327279" style:font-size-asian="12pt" style:font-size-complex="12pt"/>
    </style:style>
    <style:style style:name="T4" style:family="text">
      <style:text-properties style:font-name="Calibri" fo:font-size="12pt" officeooo:rsid="00335f71" style:font-size-asian="12pt" style:font-size-complex="12pt"/>
    </style:style>
    <style:style style:name="T5" style:family="text">
      <style:text-properties style:font-name="Calibri" officeooo:rsid="00335f71"/>
    </style:style>
    <style:style style:name="T6" style:family="text">
      <style:text-properties style:font-name="Calibri" officeooo:rsid="003468f8"/>
    </style:style>
    <style:style style:name="T7" style:family="text">
      <style:text-properties style:font-name="Calibri" officeooo:rsid="00350c24"/>
    </style:style>
    <style:style style:name="T8" style:family="text">
      <style:text-properties officeooo:rsid="003a698a"/>
    </style:style>
    <style:style style:name="T9" style:family="text">
      <style:text-properties officeooo:rsid="003b252f"/>
    </style:style>
    <style:style style:name="T10" style:family="text">
      <style:text-properties officeooo:rsid="003b946f"/>
    </style:style>
    <style:style style:name="T11" style:family="text">
      <style:text-properties officeooo:rsid="003cea66"/>
    </style:style>
    <style:style style:name="T12" style:family="text">
      <style:text-properties officeooo:rsid="003d8996"/>
    </style:style>
    <style:style style:name="T13" style:family="text">
      <style:text-properties officeooo:rsid="003e60f0"/>
    </style:style>
    <style:style style:name="T14" style:family="text">
      <style:text-properties officeooo:rsid="004036d2"/>
    </style:style>
    <style:style style:name="T15" style:family="text">
      <style:text-properties officeooo:rsid="00444b4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scription du cryptide (dans la réalité) : </text:p>
      <text:p text:style-name="P3"/>
      <text:p text:style-name="P1"><text:span text:style-name="T1"><text:tab/>L</text:span><text:span text:style-name="T2">e tigre maltais est une variante extrêmement rare du tigre chinois qui a la particularité d’avoir une fourrure bleue. Son existence, bien que supposée possible dû à des mutations génétiques, n’a jamais été prouvée. Les rumeurs de son existence proviennent de quelques signalements dans la province chinoise du Fu</text:span><text:span text:style-name="T3">j</text:span><text:span text:style-name="T2">ian, </text:span><text:span text:style-name="T4">dans le sud de la Chine, où les tigres sont en voie d’extinction dû à leur chasse et leur usage illégal dans la médecine traditionnelle chinoise.</text:span></text:p>
      <text:p text:style-name="P4"/>
      <text:p text:style-name="P3">Description du cryptide (en jeu) : </text:p>
      <text:p text:style-name="P3"/>
      <text:p text:style-name="P1"><text:span text:style-name="T1"><text:tab/></text:span><text:span text:style-name="T5">En jeu, le cryptide </text:span><text:span text:style-name="T6">est un spécimen femelle de tigre bleu, et</text:span><text:span text:style-name="T5"> est très peu différent du cryptide d’origine. </text:span><text:span text:style-name="T6">Son habitat est très restreint à cause de l’activité humaine, et elle doit constamment changer de cachette pour échapper à un chasseur, cherchant à la tuer pour s’approprier sa fourrure et vendre sa chair, ses os et ses organes en tant que médecin traditionnelle pour engranger le plus d’argent que possible.</text:span></text:p>
      <text:p text:style-name="P5"/>
      <text:p text:style-name="P1"><text:span text:style-name="T6"><text:tab/>En conséquence, elle est très méfiante des humains, et ne peut s’établir nulle part pour élever une portée, consciente qu’ils se feront tuer si elle arrête sa fuite ne serait-ce qu’un mois. </text:span><text:span text:style-name="T7">L’absence d’un mâle dans sa vie n’a fait qu’exacerber sa solitude et sa frustration sexuelle.</text:span></text:p>
      <text:p text:style-name="P3"/>
      <text:p text:style-name="P3">Idées de scénario : </text:p>
      <text:p text:style-name="P3"/>
      <text:p text:style-name="P2"><text:tab/>Le protagoniste, Konar Lebarbant, </text:p>
      <text:p text:style-name="P2"/>
      <text:list xml:id="list743889347" text:style-name="L1">
        <text:list-item>
          <text:p text:style-name="P6">Konar arrive dans la province de Fujian sous le prétexte d’être un photographe cherchant à présenter la faune locale pour une exhibition, et rencontre son interprète pour la journée. Il part ensuite pour les montagnes, regrettant que le cryptide ne se trouve pas plutôt vers les plages.</text:p>
        </text:list-item>
        <text:list-item>
          <text:p text:style-name="P6">Atteignant le parc naturel, il commence à photographier des animaux au hasard afin d’esquiver les soupçons, puis annonce à son guide qu’il explorera le parc seul pour trouver ce qu’il cherche, le guide, réticent, accepte après que Konar le baratine sur l’efficacité de ses méthodes.</text:p>
        </text:list-item>
        <text:list-item>
          <text:p text:style-name="P7">S’éloignant du chemin pour s’aventurer dans les bois enneigés, la vue le rend nostalgique de l’école d’art et de photographie où il a étudié, bien qu’il n’ait pas réussi à obtenir son diplôme.</text:p>
        </text:list-item>
        <text:list-item>
          <text:p text:style-name="P8">Konar aperçoit le cryptide <text:span text:style-name="T8">en arrière-plan d’une de ses photos, </text:span><text:span text:style-name="T10">avant que la bête ne s’enfuie vers les montagnes. Hésitant à la poursuivre, il décide de rentrer à l’hôtel pour vérifier que ce n’était pas une illusion d’optique. </text:span></text:p>
        </text:list-item>
        <text:list-item>
          <text:p text:style-name="P9">Le lendemain, Konar tente de quitter les sentiers battus <text:span text:style-name="T10">pour retrouver le cryptide</text:span> et se retrouve dans une zone de chasse. <text:span text:style-name="T9">Evitant tant que possible les chasseurs, il tombe </text:span><text:span text:style-name="T10">par hasard sur le tigre le toisant depuis une colline escarpée.</text:span></text:p>
        </text:list-item>
        <text:list-item>
          <text:p text:style-name="P9"><text:span text:style-name="T10">Konar</text:span> tente de s’approcher mais celui-ci s’enfuit. Konar part à sa recherche mais ne trouve rien ; il retourne auprès de son guide et rentre à l’hôtel.</text:p>
        </text:list-item>
        <text:list-item>
          <text:p text:style-name="P10">Le lendemain, Konar s’aventure à nouveau dans la zone de chasse et <text:span text:style-name="T11">croise le tigre maltais en train de dévorer un sanglier. Il tente de prendre une photo d’elle mais celle-ci l’attaque, croyant qu’il venait la défier pour son repas. Un chasseur passant par là tire une balle sur le tigre qui s’enfuit, sauvant la vie de Konar. Celui-ci maudit le chasseur d’avoir failli tuer une créature aussi rare, mais est content d’avoir pu rester en vie. </text:span><text:span text:style-name="T12">Ne pouvant pas continuer </text:span><text:soft-page-break/><text:span text:style-name="T12">avec le chasseur dans les parages, il est forcé d’attendre le lendemain, espérant que le tigre ait survécu jusque là.</text:span></text:p>
        </text:list-item>
        <text:list-item>
          <text:p text:style-name="P11">Le lendemain, Konar repart dans la zone interdite à la recherche de la tigresse. Il <text:span text:style-name="T13">la trouve grâce à ses traces de sang jusqu’à une niche sous une falaise, où elle se trouve allongée, à l’article de la mort dû à sa blessure par balle. Trop faible, elle n’oppose presque pas de résistance à Konar lorsqu’il la panse et désinfecte sa plaie, puis la laisse se reposer. A son réveil, des prédateurs locaux tentent de l’attaquer pour la dévorer, mais Konar utilise son pistolet et des produits répulsifs pour les dissuader. Quand le cryptide se réveille, Konar lui laisse à manger et à boire, puis retourne à l’hôtel.</text:span></text:p>
        </text:list-item>
        <text:list-item>
          <text:p text:style-name="P12">Le lendemain, Konar longe le périmètre de la zone de chasse, espérant pouvoir la trouver à ses frontières. Il trouve cependant une cabine abandonnée, et tombe nez à nez avec la cryptide qui fait sa toilette, léchant ses tétons et ses parties intimes. Konar tente de la prendre en photo, mais le mouvement attire son attention, qui la fait s’enfuir, après un bref échange de regards entre les deux. <text:span text:style-name="T15">Plus tard dans la journée, il tente de la retrouver, mais une tempête de neige le force à repartir vers l’hôtel.</text:span></text:p>
        </text:list-item>
        <text:list-item>
          <text:p text:style-name="P12"><text:span text:style-name="T15">Le lendemain</text:span>, reprenant un chemin plus sûr, il l’aperçoit au somment d’un falaise rocailleuse et parvient à la prendre en photo correctement. Cependant, le chasseur est à portée de tir ; Konar parvient à le pousser juste à temps pour dévier le tir, permettant à la cryptide de s’enfuir. <text:span text:style-name="T14">Konar s’en va sous les injures du chasseur chinois qu’il ne comprend pas de toute façon.</text:span></text:p>
        </text:list-item>
        <text:list-item>
          <text:p text:style-name="P13">Le lendemain, Konar parvient à retrouver la cabine abandonnée où se terrait la tigresse, surprise que le chasseur ne l’ait pas encore découverte. Celle-ci arrive peu de temps après, bloquant sa seule issue possible. Seulement, elle ne semble pas vouloir l’attaquer, mais reste sur ses gardes. Konar parvient à la calmer avec un peu de nourriture, et après quelques heures à se dévisager, elle finit pas accepter de lui faire confiance et se frotte à lui pour tester les eaux. Voyant que Konar ne lui veut aucun mal, elle le laisse changer ses pansements et nettoyer sa plaie. </text:p>
        </text:list-item>
        <text:list-item>
          <text:p text:style-name="P14">En remerciements, elle lui lèche le membre à travers son pantalon, indiquant son intention de copuler. Elle abaisse son pantalon d’une patte, le faisant tomber à la renverse, et lèche son membre mis à nu avec sa langue barbelée. Puis elle se retourne et invite Konar à copuler, ce qu’il accepte, celui-ci agrippant ses tétons et malaxant son vagin au passage.</text:p>
        </text:list-item>
        <text:list-item>
          <text:p text:style-name="P14">Les deux doivent se dire au revoir, Konar repartant pour l’hôtel, espérant que la tigresse pourra survivre assez longtemps pour la revoir. Cependant, tout n’est pas perdu, puisqu’il a pu obtenir une photo d’elle, qu’il compte cependant garder, refusant de la mentionner à son client, craignant la mettre en danger en attirant l’attention sur ell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7-21T00:11:32.359000000</dc:date>
    <meta:editing-duration>PT2H39M3S</meta:editing-duration>
    <meta:editing-cycles>51</meta:editing-cycles>
    <meta:generator>LibreOffice/7.3.3.2$Windows_X86_64 LibreOffice_project/d1d0ea68f081ee2800a922cac8f79445e4603348</meta:generator>
    <meta:document-statistic meta:table-count="0" meta:image-count="0" meta:object-count="0" meta:page-count="2" meta:paragraph-count="20" meta:word-count="1034" meta:character-count="6054" meta:non-whitespace-character-count="5043"/>
  </office:meta>
</office:document-meta>
</file>