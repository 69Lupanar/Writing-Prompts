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1" officeooo:rsid="001e38b0" officeooo:paragraph-rsid="000ec709"/>
    </style:style>
    <style:style style:name="P2" style:family="paragraph" style:parent-style-name="Standard">
      <style:paragraph-properties fo:text-align="justify" style:justify-single-word="false"/>
      <style:text-properties style:font-name="Calibri"/>
    </style:style>
    <style:style style:name="P3" style:family="paragraph" style:parent-style-name="Standard">
      <style:paragraph-properties fo:text-align="justify" style:justify-single-word="false"/>
      <style:text-properties style:font-name="Calibri" officeooo:rsid="000ec709" officeooo:paragraph-rsid="000ec709"/>
    </style:style>
    <style:style style:name="P4" style:family="paragraph" style:parent-style-name="Standard">
      <style:paragraph-properties fo:text-align="justify" style:justify-single-word="false"/>
      <style:text-properties style:font-name="Calibri" officeooo:rsid="000ec709" officeooo:paragraph-rsid="004014aa"/>
    </style:style>
    <style:style style:name="P5" style:family="paragraph" style:parent-style-name="Standard">
      <style:paragraph-properties fo:text-align="justify" style:justify-single-word="false"/>
      <style:text-properties style:font-name="Calibri" officeooo:rsid="000ec709" officeooo:paragraph-rsid="00465ade"/>
    </style:style>
    <style:style style:name="P6" style:family="paragraph" style:parent-style-name="Standard">
      <style:paragraph-properties fo:text-align="justify" style:justify-single-word="false"/>
      <style:text-properties style:font-name="Calibri" officeooo:rsid="0034b3b9"/>
    </style:style>
    <style:style style:name="P7" style:family="paragraph" style:parent-style-name="Standard">
      <style:paragraph-properties fo:text-align="justify" style:justify-single-word="false"/>
      <style:text-properties style:font-name="Calibri" officeooo:rsid="00328a0a" officeooo:paragraph-rsid="0034ff6b"/>
    </style:style>
    <style:style style:name="P8" style:family="paragraph" style:parent-style-name="Standard">
      <style:paragraph-properties fo:text-align="justify" style:justify-single-word="false"/>
      <style:text-properties style:font-name="Calibri" officeooo:rsid="003a4108" officeooo:paragraph-rsid="002ece92"/>
    </style:style>
    <style:style style:name="P9" style:family="paragraph" style:parent-style-name="Standard">
      <style:paragraph-properties fo:text-align="justify" style:justify-single-word="false"/>
      <style:text-properties officeooo:paragraph-rsid="0034ff6b"/>
    </style:style>
    <style:style style:name="P10" style:family="paragraph" style:parent-style-name="Standard">
      <style:paragraph-properties fo:text-align="justify" style:justify-single-word="false"/>
      <style:text-properties officeooo:paragraph-rsid="002ece92"/>
    </style:style>
    <style:style style:name="P11" style:family="paragraph" style:parent-style-name="Standard">
      <style:paragraph-properties fo:text-align="justify" style:justify-single-word="false"/>
      <style:text-properties officeooo:paragraph-rsid="003dcfd8"/>
    </style:style>
    <style:style style:name="P12" style:family="paragraph" style:parent-style-name="Standard">
      <style:paragraph-properties fo:text-align="justify" style:justify-single-word="false"/>
      <style:text-properties style:font-name="Calibri" officeooo:rsid="00465ade" officeooo:paragraph-rsid="00465ade"/>
    </style:style>
    <style:style style:name="T1" style:family="text">
      <style:text-properties style:font-name="Calibri"/>
    </style:style>
    <style:style style:name="T2" style:family="text">
      <style:text-properties style:font-name="Calibri" officeooo:rsid="002ece92"/>
    </style:style>
    <style:style style:name="T3" style:family="text">
      <style:text-properties style:font-name="Calibri" officeooo:rsid="0030998a"/>
    </style:style>
    <style:style style:name="T4" style:family="text">
      <style:text-properties style:font-name="Calibri" officeooo:rsid="00328a0a"/>
    </style:style>
    <style:style style:name="T5" style:family="text">
      <style:text-properties style:font-name="Calibri" officeooo:rsid="00339655"/>
    </style:style>
    <style:style style:name="T6" style:family="text">
      <style:text-properties style:font-name="Calibri" officeooo:rsid="0033a05c"/>
    </style:style>
    <style:style style:name="T7" style:family="text">
      <style:text-properties style:font-name="Calibri" officeooo:rsid="0034b3b9"/>
    </style:style>
    <style:style style:name="T8" style:family="text">
      <style:text-properties style:font-name="Calibri" officeooo:rsid="0034ff6b"/>
    </style:style>
    <style:style style:name="T9" style:family="text">
      <style:text-properties style:font-name="Calibri" fo:font-size="12pt" officeooo:rsid="0034b3b9" style:font-size-asian="12pt" style:font-size-complex="12pt"/>
    </style:style>
    <style:style style:name="T10" style:family="text">
      <style:text-properties style:font-name="Calibri" officeooo:rsid="0036f5f9"/>
    </style:style>
    <style:style style:name="T11" style:family="text">
      <style:text-properties style:font-name="Calibri" officeooo:rsid="0037ecc0"/>
    </style:style>
    <style:style style:name="T12" style:family="text">
      <style:text-properties style:font-name="Calibri" officeooo:rsid="003862bd"/>
    </style:style>
    <style:style style:name="T13" style:family="text">
      <style:text-properties style:font-name="Calibri" officeooo:rsid="003a4108"/>
    </style:style>
    <style:style style:name="T14" style:family="text">
      <style:text-properties style:font-name="Calibri" officeooo:rsid="003b5019"/>
    </style:style>
    <style:style style:name="T15" style:family="text">
      <style:text-properties style:font-name="Calibri" officeooo:rsid="003cb835"/>
    </style:style>
    <style:style style:name="T16" style:family="text">
      <style:text-properties fo:font-variant="normal" fo:text-transform="none" fo:color="#202122" loext:opacity="100%" style:font-name="Calibri" fo:font-size="12pt" fo:letter-spacing="normal" fo:font-style="normal" fo:font-weight="normal" officeooo:rsid="0034b3b9" style:font-size-asian="12pt" style:font-size-complex="12pt"/>
    </style:style>
    <style:style style:name="T17" style:family="text">
      <style:text-properties officeooo:rsid="003ef23e"/>
    </style:style>
    <style:style style:name="T18" style:family="text">
      <style:text-properties officeooo:rsid="002ece92"/>
    </style:style>
    <style:style style:name="T19" style:family="text">
      <style:text-properties officeooo:rsid="004014aa"/>
    </style:style>
    <style:style style:name="T20" style:family="text">
      <style:text-properties officeooo:rsid="0041fc65"/>
    </style:style>
    <style:style style:name="T21" style:family="text">
      <style:text-properties officeooo:rsid="0043894c"/>
    </style:style>
    <style:style style:name="T22" style:family="text">
      <style:text-properties officeooo:rsid="004554aa"/>
    </style:style>
    <style:style style:name="T23" style:family="text">
      <style:text-properties officeooo:rsid="00465ade"/>
    </style:style>
    <style:style style:name="T24" style:family="text">
      <style:text-properties officeooo:rsid="004754ed"/>
    </style:style>
    <style:style style:name="T25" style:family="text">
      <style:text-properties officeooo:rsid="00477750"/>
    </style:style>
    <style:style style:name="T26" style:family="text">
      <style:text-properties officeooo:rsid="00479e83"/>
    </style:style>
    <style:style style:name="T27" style:family="text">
      <style:text-properties officeooo:rsid="00490c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scription du cryptide (dans la réalité) : </text:p>
      <text:p text:style-name="P2"/>
      <text:p text:style-name="P9"><text:span text:style-name="T1"><text:tab/>L’o</text:span><text:span text:style-name="T2">lgoï-khorkoï, </text:span><text:span text:style-name="T3">ou vers-intestin,</text:span><text:span text:style-name="T2"> est un </text:span><text:span text:style-name="T3">petit ver de 30 à 90 cm vivant dans le désert de Gobi, dans le sud de la Mongolie. </text:span><text:span text:style-name="T8">De couleur rouge sang, sa tête est indiférenciable de sa queue, sans bouche ni yeux.</text:span><text:span text:style-name="T3"> Il est réput</text:span><text:span text:style-name="T4">é</text:span><text:span text:style-name="T3"> pour être venimeux au toucher et capable de cracher du venin mort</text:span><text:span text:style-name="T4">e</text:span><text:span text:style-name="T3">l, </text:span><text:span text:style-name="T4">ainsi que de causer une décharge électrique de plusieurs centaines de volts au contact, dû aux frottements de son corps rampant sur le </text:span><text:span text:style-name="T5">sol se</text:span><text:span text:style-name="T6">c</text:span><text:span text:style-name="T4"> du désert. </text:span></text:p>
      <text:p text:style-name="P7"/>
      <text:p text:style-name="P9"><text:span text:style-name="T4"><text:tab/></text:span><text:span text:style-name="T7">Il est aussi possible que ce cryptide soit un Eryx Miliaris, un serpent du désert confirmé par les autochtones comme similaire en</text:span><text:span text:style-name="T9"> apparence. </text:span><text:span text:style-name="T16">D’après les témoignages, l’animal serait attiré par la couleur jaune et ne sortirait qu’au début de l'été.</text:span><text:span text:style-name="T9"> </text:span></text:p>
      <text:p text:style-name="P6"/>
      <text:p text:style-name="P2">Description du cryptide (en jeu) : </text:p>
      <text:p text:style-name="P2"/>
      <text:p text:style-name="P10"><text:span text:style-name="T1"><text:tab/>L</text:span><text:span text:style-name="T10">es </text:span><text:span text:style-name="T1">o</text:span><text:span text:style-name="T2">lgoï-khorkoï</text:span><text:span text:style-name="T10">s</text:span><text:span text:style-name="T2"> </text:span><text:span text:style-name="T10">que le joueur croisera au cours de l’épisode dont des membres d’une même colonie, tous de différentes tailles et longueurs, allant de la taille d’un chien à celle d’une maison à deux étages. </text:span><text:span text:style-name="T11">Les mâles sont rouges, et sort</text:span><text:span text:style-name="T12">ent</text:span><text:span text:style-name="T11"> parfois à la surface pour chasser des mammifères pour nourrir la colonie ; les femelles sont jaunes, et servent de reproductrices et éleveuses des larves qu’elles pondent. </text:span><text:span text:style-name="T13">Cependant, les vers-intestins ont une mauvaise vue au-delà de leur distinction de la lumière et des couleurs ; un humain vêtu de rouge ou de jaune peut facilement se faire passer pour l’un des leurs et traverser leur colonie sans soucis.</text:span></text:p>
      <text:p text:style-name="P8"/>
      <text:p text:style-name="P11"><text:span text:style-name="T13"><text:tab/></text:span><text:span text:style-name="T14">Les vers-intestins sécrètent bien du venin comme les locaux le prétendent, mais ce venin n’est pas mortel ; il s’agit d’une sécrétion débilitante causant des vertiges que les vers utilisent sur leurs proies pour faciliter leur capture. Cependant, il leur arrive d’utiliser leur venin sur leurs proies pour augmenter leur </text:span><text:span text:style-name="T15">taux de testostérone et d’œstrogène</text:span><text:span text:style-name="T14"> ; ces vers copulant pour le plaisir et non par instinct, il leur arrive de s’accoupler avec leurs proies avant de les dévorer.</text:span></text:p>
      <text:p text:style-name="P2"/>
      <text:p text:style-name="P2">Idées de scénario : </text:p>
      <text:p text:style-name="P2"/>
      <text:p text:style-name="P4"><text:tab/>Le protagoniste, Konar Lebarbant, <text:span text:style-name="T17">est cette fois envoyé par son mystérieux client dans le désert de Gobi, en Mongolie, </text:span><text:span text:style-name="T19">à la recherche de l</text:span><text:span text:style-name="T17">’o</text:span><text:span text:style-name="T18">lgoï-khorkoï, </text:span><text:span text:style-name="T19">un ver prédateur aux propriétés inconnues, </text:span><text:span text:style-name="T25">après que des locaux rapportent des effondrements de bâtiments de plus en plus fréquents aux alentours du désert de Gobi</text:span><text:span text:style-name="T19">. </text:span><text:span text:style-name="T20">Il est reçu par un groupe de guides locaux chargés de sa sécurité et du ravitaillement en provisions, tandis qu’il se fait passer pour un spéléologue chargé d’étudier les formations rocheuses de la région ; un cryptozoologue n’aurait pas grande réputation auprès d’eux.</text:span></text:p>
      <text:p text:style-name="P4"/>
      <text:p text:style-name="P4"><text:tab/><text:span text:style-name="T20">Alors qu’ils arpentent les régions rocailleuses aux frontières du désert sablonneux, un séisme soudain ouvre la terre et sépare Konar de ses guides, ce dernier tombant dans une rivière souterraine d’une grotte plongée dans le noir </text:span><text:span text:style-name="T21">le plus</text:span><text:span text:style-name="T20"> total, </text:span><text:span text:style-name="T27">perdant son appareil photo dans la chute</text:span><text:span text:style-name="T20">. </text:span><text:span text:style-name="T21">Manquant de s’être cassé une jambe, il tente de trouver un moyen de remonter à la surface, tandis que des grondements sourds retentissent </text:span><text:span text:style-name="T22">et que des ombres gigantesques déplacent</text:span><text:span text:style-name="T21"> autour de lui. </text:span><text:span text:style-name="T23">Dirigeant sa lampe torche vers l’une d’entre elles, il découvre un ver géant qui manque de peu de l’asperger de son venin réputé pour tuer. Konar tente de s’enfuir mais tombe dans l’eau, et se fait facilement capturer.</text:span></text:p>
      <text:p text:style-name="P4"/>
      <text:p text:style-name="P5"><text:tab/><text:span text:style-name="T23">Konar se réveille quelques heures plus tard alors que le poison se dissipe. Il se retrouve encastré dans un mur de mucus tandis que son membre est inexplicablement tendu, résultat du </text:span><text:soft-page-break/><text:span text:style-name="T23">poison qui exacerbe ses pulsion sexuelles. Plusieurs vers jaunes de petite taille descendent du plafond et s’enroulent autour de son membre, le suçant tour à tour et s’accouplant avec Konar, avant de repartir par les petits trous de la caverne. </text:span></text:p>
      <text:p text:style-name="P5"/>
      <text:p text:style-name="P12"><text:tab/>Rassemblant ses dernières forces, il parvient à attraper un couteau et à découper son linceul pour s’enfuir, explorant la colonie à la recherche d’une sortie, horrifié de la quantité de vers qui parcourent le sol, les murs et le plafond de la grotte. Sa visite est rapidement découverte par plusieurs gros vers qui s’approchent de lui, le faisant lâcher sa lampe torche de surprise qui se met à éclairer sa combinaison rouge. Voyant sa couleur, les vers le laissent tranquille et repartent, Konar se rappelant que ces vers ont une mauvaise vue et le prennent pour un des leurs à cause de sa couleur ; il décide alors de s’éclairer avec sa lampe torche s’il s’attire d’autres ennuis.</text:p>
      <text:p text:style-name="P5"/>
      <text:p text:style-name="P5"><text:tab/><text:span text:style-name="T23">Toujours embrumé par le poison, il parvient à trouver une issue derrière un mur de vers jaunes, se rappelant qu’il s’agit de femelles. Essayant de les caresser pour les inciter à partir, son geste ne lui vaut que d’engluer sa main dans encore plus de poison, tandis que les femelles s’excitent à son intrusion dans leur orgie. Le poison réveillant à nouveau son érection, il décide d’essayer de les doigter pour leur faire terminer leur orgie plus vite, ce qui ne fait qu’empirer sa situation. Il décide alors de prendre les choses en main et de baiser le plus de vers que possible afin de les faire partir, ce qui fonctionne ; les femelles repues quittent l’orgie et le mur de vers se désagrège de lui-même, permettant à Konar de passer.</text:span></text:p>
      <text:p text:style-name="P5"/>
      <text:p text:style-name="P5"><text:tab/><text:span text:style-name="T23">Alors que le nombre de vers diminue mais leur taille augmente, Konar est abasourdi par la taille de la caverne à certains endroits, surpris que cet endroit n’ait pas été découvert plus tôt avec toute l’activité souterraine des vers ; </text:span><text:span text:style-name="T26">il suppose que cela explique les effondrements : Si les humains s’installent dans le désert, leurs instruments doivent perturber les vers qui cherchent alors un nouvel endroit pour nicher</text:span><text:span text:style-name="T23">. </text:span><text:span text:style-name="T24">Il finit cependant par remarquer un rayon de lumière venant de la surface ; seulement, l’entrée est bloquée par un gigantesque ver femelle. Tentant de la contourner puis de la pousser, il ne réussit qu’à s’embourber dans son poison qui le fait délirer. Il finit par se mettre à s’accoupler avec elle malgré lui, ce qui la fait quitter son nid pour s’enfonce davantage dans les ténèbres de la caverne.</text:span></text:p>
      <text:p text:style-name="P5"/>
      <text:p text:style-name="P5"><text:tab/><text:span text:style-name="T24">Konar sort de la grotte et se retrouve seul, couvert du mucus, de l’autre côté de la frontière naturelle séparant le désert de sable des montagnes. Heureusement pour lui, il se fait rapidement retrouver par ses guides qui le ramènent à son hôtel. Konar fait alors son rapport à son client, se jurant de ne plus jamais remettre les pieds dans ce désert.</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6H12M56S</meta:editing-duration>
    <meta:editing-cycles>54</meta:editing-cycles>
    <meta:generator>LibreOffice/7.3.3.2$Windows_X86_64 LibreOffice_project/d1d0ea68f081ee2800a922cac8f79445e4603348</meta:generator>
    <dc:date>2023-07-19T15:26:08.010000000</dc:date>
    <meta:document-statistic meta:table-count="0" meta:image-count="0" meta:object-count="0" meta:page-count="2" meta:paragraph-count="14" meta:word-count="1056" meta:character-count="6252" meta:non-whitespace-character-count="5193"/>
  </office:meta>
</office:document-meta>
</file>