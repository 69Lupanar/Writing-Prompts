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0ec709"/>
    </style:style>
    <style:style style:name="P2" style:family="paragraph" style:parent-style-name="Standard">
      <style:paragraph-properties fo:text-align="justify" style:justify-single-word="false"/>
      <style:text-properties style:font-name="Calibri" officeooo:rsid="000ec709" officeooo:paragraph-rsid="0029e945"/>
    </style:style>
    <style:style style:name="P3" style:family="paragraph" style:parent-style-name="Standard">
      <style:paragraph-properties fo:text-align="justify" style:justify-single-word="false"/>
      <style:text-properties style:font-name="Calibri" officeooo:rsid="000ec709" officeooo:paragraph-rsid="00309060"/>
    </style:style>
    <style:style style:name="P4" style:family="paragraph" style:parent-style-name="Standard">
      <style:paragraph-properties fo:text-align="justify" style:justify-single-word="false"/>
      <style:text-properties style:font-name="Calibri" officeooo:rsid="001e38b0" officeooo:paragraph-rsid="000ec709"/>
    </style:style>
    <style:style style:name="P5" style:family="paragraph" style:parent-style-name="Standard">
      <style:paragraph-properties fo:text-align="justify" style:justify-single-word="false"/>
      <style:text-properties style:font-name="Calibri" officeooo:rsid="00330ca7" officeooo:paragraph-rsid="00361d48"/>
    </style:style>
    <style:style style:name="T1" style:family="text">
      <style:text-properties officeooo:rsid="00241570"/>
    </style:style>
    <style:style style:name="T2" style:family="text">
      <style:text-properties officeooo:rsid="0025a37c"/>
    </style:style>
    <style:style style:name="T3" style:family="text">
      <style:text-properties officeooo:rsid="00263713"/>
    </style:style>
    <style:style style:name="T4" style:family="text">
      <style:text-properties officeooo:rsid="00309060"/>
    </style:style>
    <style:style style:name="T5" style:family="text">
      <style:text-properties officeooo:rsid="0031db72"/>
    </style:style>
    <style:style style:name="T6" style:family="text">
      <style:text-properties officeooo:rsid="0034c80c"/>
    </style:style>
    <style:style style:name="T7" style:family="text">
      <style:text-properties officeooo:rsid="00361d48"/>
    </style:style>
    <style:style style:name="T8" style:family="text">
      <style:text-properties officeooo:rsid="00362999"/>
    </style:style>
    <style:style style:name="T9" style:family="text">
      <style:text-properties officeooo:rsid="003756b4"/>
    </style:style>
    <style:style style:name="T10" style:family="text">
      <style:text-properties officeooo:rsid="00377e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Description du protagoniste</text:span> : </text:p>
      <text:p text:style-name="P2"/>
      <text:p text:style-name="P3"><text:tab/><text:span text:style-name="T1">Le protagoniste, </text:span><text:span text:style-name="T4">nommable par le joueur (nommé ci-après « Konar Lebarbant » ), </text:span><text:span text:style-name="T1">est un </text:span><text:span text:style-name="T2">cryptozoologue </text:span><text:span text:style-name="T3">et cryptobotanique</text:span><text:span text:style-name="T2">,</text:span><text:span text:style-name="T1"> </text:span><text:span text:style-name="T4">aussi peu </text:span><text:span text:style-name="T8">talentueux</text:span><text:span text:style-name="T4"> que renommé, souvent moqué par ses pairs pour son manque de sérieux et son </text:span><text:span text:style-name="T10">ambition</text:span><text:span text:style-name="T4"> approchant </text:span><text:span text:style-name="T9">l’</text:span><text:span text:style-name="T10">arrogance</text:span><text:span text:style-name="T4">. Son but est de recenser </text:span><text:span text:style-name="T1">des monstres et phénomènes paranormaux </text:span><text:span text:style-name="T4">partout dans le monde afin</text:span><text:span text:style-name="T1"> de les étudier, espérant un jour obtenir l’</text:span><text:span text:style-name="T4">argent et l</text:span><text:span text:style-name="T1">a célébrité </text:span><text:span text:style-name="T4">dont il rêve</text:span><text:span text:style-name="T1">.</text:span></text:p>
      <text:p text:style-name="P3"/>
      <text:p text:style-name="P3"><text:tab/><text:span text:style-name="T4">Son rêve parvient à se concrétiser le jour où il est contacté par un généreux sponsor anonyme, qui accepte de lui fournir des fonds, équipement et moyens de transport en échange de parcourir le monde et retrouver la trace de cryptides particuliers pour leur compte. D’abord suspicieux de son premier échange, la quantité d’effort et de ressources que son donateur déploie pour lui suffit à le convaincre de se lancer à l’aventure, </text:span><text:span text:style-name="T5">voyant là une porte ouverte vers la gloire et la richesse.</text:span></text:p>
      <text:p text:style-name="P3"/>
      <text:p text:style-name="P5"><text:tab/>Niveau physique et personnalité, Konar est un homme générique peu habitué au sport et rechigne souvent à l’effort, quel qu’il soit. <text:span text:style-name="T6">De nature cynique et peu raffiné, Konar passe souvent pour un macho arrogant et arriviste, mû uniquement par son avidité et son ambition. </text:span><text:span text:style-name="T7">Cependant, il est doté d’un fort sens de la curiosité et est réellement passionné </text:span><text:span text:style-name="T1"><text:s/>de mythes et légendes urbaines.</text:span></text:p>
      <text:p text:style-name="P1"/>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8T13:20:51.905000000</dc:date>
    <meta:editing-duration>PT1H21M30S</meta:editing-duration>
    <meta:editing-cycles>50</meta:editing-cycles>
    <meta:generator>LibreOffice/7.3.3.2$Windows_X86_64 LibreOffice_project/d1d0ea68f081ee2800a922cac8f79445e4603348</meta:generator>
    <meta:document-statistic meta:table-count="0" meta:image-count="0" meta:object-count="0" meta:page-count="1" meta:paragraph-count="4" meta:word-count="217" meta:character-count="1325" meta:non-whitespace-character-count="1107"/>
  </office:meta>
</office:document-meta>
</file>