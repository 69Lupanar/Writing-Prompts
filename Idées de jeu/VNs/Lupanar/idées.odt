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aed3" officeooo:paragraph-rsid="0018aed3"/>
    </style:style>
    <style:style style:name="P2" style:family="paragraph" style:parent-style-name="Standard">
      <style:text-properties officeooo:rsid="0019aeef" officeooo:paragraph-rsid="0019aeef"/>
    </style:style>
    <style:style style:name="T1" style:family="text">
      <style:text-properties officeooo:rsid="0019ae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 </text:p>
      <text:p text:style-name="P1"/>
      <text:p text:style-name="P1">Après un rencart raté sur Tinder, le PP rentre chez lui déprimé, repensant à ses tentatives passées pour obtenir une petite-amie, sans succès. Dans le bus pour rentrer chez lui, un homme laisse tomber un ticket de sa poche; le PP ne parvient pas à le rattraper avant que les portes ne se referment. Remarquant que le ticket est un titre VIP pour une séance dans une maison close, il le cache dans sa poche avant que d’autres passagers ne l’aperçoivent.</text:p>
      <text:p text:style-name="P1"/>
      <text:p text:style-name="P1">Une fois de retour chez lui, il jette le ticket à la poubelle et s’allonge sur son lit, ressassant sa mauvaise journée. Ayant cherché depuis des années à obtenir une petite amie, il commence sérieusement à considérer commander une pute pour perdre sa virginité, puisque de toute façon, il n’avait personne devant qui parader sa petite-amie non-existante.</text:p>
      <text:p text:style-name="P1"/>
      <text:p text:style-name="P1">Reprenant le ticket de la poubelle, il tente de trouver des infos sur internet, mais ne trouve aucune info sur la maison close, pas même un numéro de téléphone. Se disant qu’il devait s’agir un club tenu par des vieux réfractaires aux nouvelles technologies, il décide le week-end venu d’y aller directement en suivant les coordonnées écrites sur le papier.</text:p>
      <text:p text:style-name="P1"/>
      <text:p text:style-name="P1">A son arrivée, il arrive à un escalier qu’il emprunte. Les instructions du papier sont vagues, ne référençant aucune adresse précise, se contenant de vagues directions. Une fois descendu, il se retrouve dans une rue souterraine, semblable à celles de la surface, mais à l’apparence plus ancienne, baignée dans un brouillard dense percé ici et là par de vieilles lanternes au fioul. Plus étrangement, il ne croise personne en chemin, si ce n’est quelques silhouettes se mouvant entre les quelques ombres des bâtiments. Craignant de se faire agresser, il presse le pas jusqu’à la maison close.</text:p>
      <text:p text:style-name="P1"/>
      <text:p text:style-name="P1">Une fois arrivé, il fait la rencontre d’une l’hôtesse à l’allure surprenante: Couverte de fourrure, possédant deux bras de chaque côté du corps bougeant à l’unisson, ne portant <text:span text:style-name="T1">rien d’autre qu’un léotard et un masque de louve. Elle fait référence à l’endroit comme un « Lupanar », et après avoir pris son ticket, l’invite à choisir immédiatement la fille de son choix.</text:span></text:p>
      <text:p text:style-name="P1"/>
      <text:p text:style-name="P2">Souhaitant ralentir les choses, le PP choisit de lui poser qques questions. Il questionne d’abord son apparence, qu’elle dévie rapidement sur son costume, sans apparemment comprendre qu’il fait référence à sa physiologie. Il mentionne ensuite l’isolement de l’endroit, et la jeune femme soupire en lui confiant que les temps sont durs et que l’isolement est le meilleur moyen de protéger leurs filles de la surface; c’est pourquoi le ticket n’a pas de coordonnées: L’existence de l’endroit est transmis de bouche à oreille. Le PP comprend, pensant que des putes seraient en effet arrêtées à la surface, sans comprendre qu’il s’agit en réalité de monstres.</text:p>
      <text:p text:style-name="P2"/>
      <text:p text:style-name="P2">Il demande ensuite ce que ce ticket VIP lui offre; normalement, un client normal n’aurait droit qu’à une fille et l’accès au bar, mais pour un VIP, il a accès à autant de filles qu’il veut pour la soirée, ainsi qu’à la suite VIP où bon nombre de clients se rencontrent en <text:soft-page-break/>compagnie de leurs « hôtesses ». Le PP? Peu désireux de parler à des gens, mais cherchant aussi à omettre le fait qu’il a trouvé le ticket par terre, saute sur l’opportunité pour commander une fille.</text:p>
      <text:p text:style-name="P2"/>
      <text:p text:style-name="P2">A la vue de la liste et des descriptions faites par l’hôtesse, le PP est surpris de voir qu’il s’agit d’une maison close à monstres : Chacune des filles est une créature qu’il n’a jamais vue, avec des membres et paires de sein supplémentaires ou manquants. Croyant à une vaste blague ou à une soirée costumée, il décide de mordre à l’hameçon. Le jeu laisse alors au joueur le choix de la fil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0M34S</meta:editing-duration>
    <meta:editing-cycles>2</meta:editing-cycles>
    <meta:generator>LibreOffice/25.2.4.3$Windows_X86_64 LibreOffice_project/33e196637044ead23f5c3226cde09b47731f7e27</meta:generator>
    <meta:creation-date>2025-11-14T18:15:45.770718500</meta:creation-date>
    <dc:title>Format de texte</dc:title>
    <dc:date>2025-11-14T18:37:42.134824800</dc:date>
    <meta:document-statistic meta:table-count="0" meta:image-count="0" meta:object-count="0" meta:page-count="2" meta:paragraph-count="9" meta:word-count="625" meta:character-count="3662" meta:non-whitespace-character-count="3045"/>
    <meta:template xlink:type="simple" xlink:actuate="onRequest" xlink:title="Format de texte" xlink:href="file:///C:/Users/Clément/AppData/Roaming/LibreOffice/4/user/template/Format%20de%20texte1.ott" meta:date="2025-11-14T18:15:44.546526300"/>
  </office:meta>
</office:document-meta>
</file>