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style:text-properties officeooo:rsid="001c0b17" officeooo:paragraph-rsid="001c0b1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dées de scénario : </text:p>
      <text:p text:style-name="P1"/>
      <text:p text:style-name="P1">Le père du PP adopte une chienne en espérant sortir son fils de sa coquille, celui-ci étant très isolé des jeunes de son âge et ne passant son temps qu’en jouant aux JV et à naviguer le net. Le PP n’a pas vraiment envie d’un chien, qu’il considère comme une perte de temps et d’énergie et ne lui accorde aucun égard.</text:p>
      <text:p text:style-name="P1"/>
      <text:p text:style-name="P1">Un jour, la chienne se transforme soudainement en furry et annonce qu’elle est la fiancée de son père, annonçant leur mariage futur. Le PP, choqué de voir cet acte paranormal, est d’autant plus choqué de voir que personne d’autre ne semble trouver étrange que sa belle-mère soit une chienne, ni même son père, qui la traitent comme si elle était une humaine normale.</text:p>
      <text:p text:style-name="P1"/>
      <text:p text:style-name="P1">Le PP devra dès lors s’adapter à sa nouvelle vie, et tissera au fil de l’histoire des liens avec sa nouvelle belle-mère, qu’il apprendra à respecter et apprécier. Il commencera même à se tisser les liens avec d’autres jeunes (et furries de son âge), inspiré par les liens forts que les chiens sont capables de tisser avec d’autres êtres, comme sa belle-mère et son pèr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00%" fo:text-align="justify" style:justify-single-word="false"/>
      <style:text-properties style:font-name="Calibri3" fo:font-family="Calibri" style:font-style-name="Normal" style:font-family-generic="swiss" style:font-pitch="variable" fo:font-size="13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color="#00588c" loext:opacity="100%" style:font-name="Calibri3" fo:font-family="Calibri" style:font-style-name="Normal"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color="#00588c" loext:opacity="100%" style:font-name="Calibri3" fo:font-family="Calibri" style:font-style-name="Normal" style:font-family-generic="swiss" style:font-pitch="variable"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color="#00588c" loext:opacity="100%" style:font-name="Calibri3" fo:font-family="Calibri" style:font-style-name="Normal" style:font-family-generic="swiss" style:font-pitch="variable"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00588c" loext:opacity="100%" style:font-name="Calibri2" fo:font-family="Calibri" style:font-style-name="Italique gras" style:font-family-generic="swiss" style:font-pitch="variable" fo:font-size="16pt" fo:font-style="italic" fo:font-weight="normal" officeooo:rsid="00106f63"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00588c" loext:opacity="100%" style:font-name="Calibri Light2" fo:font-family="'Calibri Light'" style:font-style-name="Normal" style:font-family-generic="swiss" style:font-pitch="variable" fo:font-size="14pt" fo:font-weight="250"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00588c" loext:opacity="100%" style:font-name="Calibri Light1" fo:font-family="'Calibri Light'" style:font-style-name="Italique gras" style:font-family-generic="swiss" style:font-pitch="variable" fo:font-size="13pt" fo:font-style="italic" fo:font-weight="250"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color="#00588c" loext:opacity="100%" style:font-name="Calibri" fo:font-family="Calibri" style:font-style-name="Gras" style:font-family-generic="swiss" style:font-pitch="variable"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00588c" loext:opacity="1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color="#00588c" loext:opacity="100%" style:font-name="Calibri1" fo:font-family="Calibri" style:font-style-name="Italique" style:font-family-generic="swiss" style:font-pitch="variable" fo:font-style="italic"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fo:color="#00588c" loext:opacity="100%" style:font-name="Calibri Light2" fo:font-family="'Calibri Light'" style:font-style-name="Normal" style:font-family-generic="swiss" style:font-pitch="variable" fo:font-weight="250"/>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text-properties fo:color="#00588c" loext:opacity="100%" style:font-name="Calibri Light" fo:font-family="'Calibri Light'" style:font-style-name="Italique" style:font-family-generic="swiss" style:font-pitch="variable" fo:font-style="italic" fo:font-weight="25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duration>PT7M19S</meta:editing-duration>
    <meta:editing-cycles>2</meta:editing-cycles>
    <meta:generator>LibreOffice/7.3.3.2$Windows_X86_64 LibreOffice_project/d1d0ea68f081ee2800a922cac8f79445e4603348</meta:generator>
    <meta:creation-date>2024-11-04T14:00:35.685000000</meta:creation-date>
    <dc:date>2024-11-04T14:07:51.880000000</dc:date>
    <meta:document-statistic meta:table-count="0" meta:image-count="0" meta:object-count="0" meta:page-count="1" meta:paragraph-count="4" meta:word-count="193" meta:character-count="1072" meta:non-whitespace-character-count="882"/>
  </office:meta>
</office:document-meta>
</file>