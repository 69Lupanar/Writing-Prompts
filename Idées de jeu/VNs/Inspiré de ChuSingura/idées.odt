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50d4" officeooo:paragraph-rsid="001850d4"/>
    </style:style>
    <style:style style:name="P2" style:family="paragraph" style:parent-style-name="Text_20_body" style:list-style-name="L1">
      <style:text-properties officeooo:rsid="001850d4" officeooo:paragraph-rsid="001850d4"/>
    </style:style>
    <style:style style:name="P3" style:family="paragraph" style:parent-style-name="Text_20_body" style:list-style-name="L1">
      <style:text-properties officeooo:rsid="00192ad9" officeooo:paragraph-rsid="00192ad9"/>
    </style:style>
    <style:style style:name="P4" style:family="paragraph" style:parent-style-name="Standard">
      <style:text-properties officeooo:paragraph-rsid="00106f63"/>
    </style:style>
    <style:style style:name="T1" style:family="text">
      <style:text-properties officeooo:rsid="00192a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text:p>
      <text:p text:style-name="P1"/>
      <text:p text:style-name="P1">Inspiré de ChuSingura, où le PP remonte dans le temps pour empêcher un mal inconnu de modifier le cours de l’histoire et de plonger le monde dans le chaos.</text:p>
      <text:list text:style-name="L1">
        <text:list-item>
          <text:p text:style-name="P2">Le PP est envoyé dans le temps suite à une magie ancienne [à détailler] qui le renvoie dans le passé, plusieurs mois avant le début de la Révolution Française. Il devra alors découvrir pourquoi il a été renvoyé dans le passé, tout en s’assurant que l’histoire suive son cours normal.</text:p>
        </text:list-item>
        <text:list-item>
          <text:p text:style-name="P2">Il découvrira alors que X, un descendant de Napoléon Bonaparte, tente de changer le cours de l’histoire pour s’assurer que la Révolution soit un échec, et que la France reste une monarchie. Selon lui, la France resterait forte avec un monarque à sa tête, ce qui lui permettrait de conserver son influence encore aujourd’hui parmi les grands de ce monde, au grand dam des libertés et droits de l’homme acquis par le peuple, <text:span text:style-name="T1">et des alliances modernes passées avec les pays voisins comme l’UE.</text:span></text:p>
        </text:list-item>
        <text:list-item>
          <text:p text:style-name="P3">Le joueur doit alors lui montrer que les droits de l’homme et la liberté sont des principes fondamentaux du pays, et que ce n’est qu’ensemble, avec les autres pays de l’UE, que la France a un avenir dans ce monde; qu’il faut laisser le passé à leurs ancêtres, et que c’est à leurs descendants de forger leur propre destinée.</text:p>
        </text:list-item>
      </text:list>
      <text:p text:style-name="P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M48S</meta:editing-duration>
    <meta:editing-cycles>3</meta:editing-cycles>
    <meta:generator>LibreOffice/25.2.4.3$Windows_X86_64 LibreOffice_project/33e196637044ead23f5c3226cde09b47731f7e27</meta:generator>
    <meta:creation-date>2025-10-19T14:17:15.348038700</meta:creation-date>
    <dc:title>Format de texte</dc:title>
    <dc:date>2025-10-19T14:24:03.325976600</dc:date>
    <meta:document-statistic meta:table-count="0" meta:image-count="0" meta:object-count="0" meta:page-count="1" meta:paragraph-count="5" meta:word-count="229" meta:character-count="1274" meta:non-whitespace-character-count="1053"/>
    <meta:template xlink:type="simple" xlink:actuate="onRequest" xlink:title="Format de texte" xlink:href="file:///C:/Users/Clément/AppData/Roaming/LibreOffice/4/user/template/Format%20de%20texte1.ott" meta:date="2025-10-19T14:17:14.977428300"/>
  </office:meta>
</office:document-meta>
</file>