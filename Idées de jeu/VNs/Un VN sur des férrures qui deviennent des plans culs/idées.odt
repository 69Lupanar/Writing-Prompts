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3531" officeooo:paragraph-rsid="00193531"/>
    </style:style>
    <style:style style:name="T1" style:family="text">
      <style:text-properties officeooo:rsid="001a62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gameplay : </text:p>
      <text:p text:style-name="P1"/>
      <text:p text:style-name="P1">Structure de VN classique mélangé à un mode mobile, où l’interface devient intra-diégétique et où les personnages interagissent entre eux via SMS sur téléphone.</text:p>
      <text:p text:style-name="P1"/>
      <text:p text:style-name="P1">Idées de scénario : </text:p>
      <text:p text:style-name="P1"/>
      <text:p text:style-name="P1">Le PP, un jeune humain ayant perdu son travail, a des pensées suicidaires après de multiples échecs de retrouver un emploi stable. Décidant de tirer son coup avant de mourir, il se rappelle de l’existence de « nids à plans culs », où de nombreux Aviens s’échangent des faveurs sexuelles en échange de cadeaux. Il décide d’y tenter sa chance et tombe sur Lou, un jeune Avien avec une bite de cheval. Bien qu’il ne se pensait pas gay, le PP ne ressent pas de répulsion face à un membre mâle d’une autre espèce et décide de lui offrir une pipe.</text:p>
      <text:p text:style-name="P1">A partir de là, tout s’enchaîne : Le PP rencontre de plus en plus d’Aviens qui deviennent ses plans culs. Il s’établit rapidement un réseau d’amis, avec qui il échange des contacts, lieux de divertissement, et tuyaux pour prendre soin de soi et son apparence. Le PP se découvre une nouvelle vie, avec un entrain qu’il pensait avoir perdu depuis longtemps. Il soigne son apparence et porte des vêtements plus aguicheurs, servant les ferrures mâles comme femelles, <text:span text:style-name="T1">et se trouve même un petit ami chez une des connaissances de son nouveau cercle d’amis, un DJ organisant des soirées non loin de chez lui.</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9M5S</meta:editing-duration>
    <meta:editing-cycles>3</meta:editing-cycles>
    <meta:generator>LibreOffice/25.2.4.3$Windows_X86_64 LibreOffice_project/33e196637044ead23f5c3226cde09b47731f7e27</meta:generator>
    <meta:creation-date>2025-12-18T08:20:42.733352700</meta:creation-date>
    <dc:title>Format de texte</dc:title>
    <dc:date>2025-12-18T08:29:48.208981700</dc:date>
    <meta:document-statistic meta:table-count="0" meta:image-count="0" meta:object-count="0" meta:page-count="1" meta:paragraph-count="5" meta:word-count="236" meta:character-count="1342" meta:non-whitespace-character-count="1109"/>
    <meta:template xlink:type="simple" xlink:actuate="onRequest" xlink:title="Format de texte" xlink:href="file:///C:/Users/Clément/AppData/Roaming/LibreOffice/4/user/template/Format%20de%20texte1.ott" meta:date="2025-12-18T08:20:42.444778300"/>
  </office:meta>
</office:document-meta>
</file>