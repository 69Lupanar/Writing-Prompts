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c2f65" officeooo:paragraph-rsid="001c2f65"/>
    </style:style>
    <style:style style:name="T1" style:family="text">
      <style:text-properties officeooo:rsid="001d2675"/>
    </style:style>
    <style:style style:name="T2" style:family="text">
      <style:text-properties officeooo:rsid="001ec5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p text:style-name="P1">Le protag, A, est un jeune garçon efféminé malgré lui qui cherche à vaincre la seigneure des monstres pour amener la paix au monde des humains, mais surtout pour prouver sa valeur et montrer qu’il n’est pas un être fragile et mérite le respect <text:span text:style-name="T1">de ses pairs, qui n’ont que du dédain pour lui</text:span>. Il fera cependant la rencontre de B, une hyène guerrière qui se révèle être son opposé parfait : Rude, vulgaire, impulsive, perverse, et surtout, extrêmement compétente en combat, étant l’une des femmes de main de la seigneure des monstres. Malgré ses airs machos, elle a un faible pour les jeunes garçons efféminés comme A, qu’elle ne traite que comme une fillette bonne à être sauvée. <text:s/>Voyant cependant son désir de devenir plus fort <text:span text:style-name="T2">et de trouver sa place parmi les siens</text:span>, elle acceptera de le prendre sous son aile et de l’entraîner, et tous deux se rapprocheront au fil des aventures qui les conduiront au domaine de la seigneure des monst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9M10S</meta:editing-duration>
    <meta:editing-cycles>4</meta:editing-cycles>
    <meta:generator>LibreOffice/7.3.3.2$Windows_X86_64 LibreOffice_project/d1d0ea68f081ee2800a922cac8f79445e4603348</meta:generator>
    <meta:creation-date>2025-01-15T20:27:50.147000000</meta:creation-date>
    <dc:date>2025-01-15T20:36:35.198000000</dc:date>
    <meta:document-statistic meta:table-count="0" meta:image-count="0" meta:object-count="0" meta:page-count="1" meta:paragraph-count="2" meta:word-count="169" meta:character-count="960" meta:non-whitespace-character-count="791"/>
  </office:meta>
</office:document-meta>
</file>