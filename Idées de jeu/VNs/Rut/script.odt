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1" officeooo:rsid="001df209" officeooo:paragraph-rsid="001cdc5d"/>
    </style:style>
    <style:style style:name="P2" style:family="paragraph" style:parent-style-name="Standard">
      <style:paragraph-properties fo:text-align="justify" style:justify-single-word="false"/>
      <style:text-properties style:font-name="Calibri1" officeooo:rsid="002372dc" officeooo:paragraph-rsid="002372dc"/>
    </style:style>
    <style:style style:name="P3" style:family="paragraph" style:parent-style-name="Standard">
      <style:paragraph-properties fo:text-align="justify" style:justify-single-word="false"/>
      <style:text-properties style:font-name="Calibri1" officeooo:rsid="002372dc" officeooo:paragraph-rsid="0023a0eb"/>
    </style:style>
    <style:style style:name="P4" style:family="paragraph" style:parent-style-name="Standard">
      <style:paragraph-properties fo:text-align="justify" style:justify-single-word="false"/>
      <style:text-properties style:font-name="Calibri1" officeooo:rsid="0023a0eb" officeooo:paragraph-rsid="0023a0eb"/>
    </style:style>
    <style:style style:name="P5" style:family="paragraph" style:parent-style-name="Standard">
      <style:paragraph-properties fo:text-align="justify" style:justify-single-word="false"/>
      <style:text-properties style:font-name="Calibri1" officeooo:rsid="00242330" officeooo:paragraph-rsid="00242330"/>
    </style:style>
    <style:style style:name="P6" style:family="paragraph" style:parent-style-name="Standard">
      <style:paragraph-properties fo:text-align="justify" style:justify-single-word="false"/>
      <style:text-properties style:font-name="Calibri1" officeooo:rsid="0024364d" officeooo:paragraph-rsid="0024364d"/>
    </style:style>
    <style:style style:name="P7" style:family="paragraph" style:parent-style-name="Standard">
      <style:paragraph-properties fo:text-align="justify" style:justify-single-word="false"/>
      <style:text-properties style:font-name="Calibri1" officeooo:rsid="00244f30" officeooo:paragraph-rsid="00244f30"/>
    </style:style>
    <style:style style:name="P8" style:family="paragraph" style:parent-style-name="Standard">
      <style:paragraph-properties fo:text-align="justify" style:justify-single-word="false"/>
      <style:text-properties style:font-name="Calibri1" officeooo:rsid="00244f30" officeooo:paragraph-rsid="0024c335"/>
    </style:style>
    <style:style style:name="P9" style:family="paragraph" style:parent-style-name="Standard">
      <style:paragraph-properties fo:text-align="justify" style:justify-single-word="false"/>
      <style:text-properties style:font-name="Calibri1" officeooo:rsid="0024c335" officeooo:paragraph-rsid="0024c335"/>
    </style:style>
    <style:style style:name="P10" style:family="paragraph" style:parent-style-name="Standard">
      <style:paragraph-properties fo:text-align="justify" style:justify-single-word="false"/>
      <style:text-properties style:font-name="Calibri1" officeooo:rsid="002652b9" officeooo:paragraph-rsid="002652b9"/>
    </style:style>
    <style:style style:name="P11" style:family="paragraph" style:parent-style-name="Standard">
      <style:paragraph-properties fo:text-align="justify" style:justify-single-word="false"/>
      <style:text-properties style:font-name="Calibri1" officeooo:rsid="002723c7" officeooo:paragraph-rsid="002723c7"/>
    </style:style>
    <style:style style:name="P12" style:family="paragraph" style:parent-style-name="Standard">
      <style:paragraph-properties fo:text-align="justify" style:justify-single-word="false"/>
      <style:text-properties style:font-name="Calibri1" officeooo:rsid="0027fee4" officeooo:paragraph-rsid="0027fee4"/>
    </style:style>
    <style:style style:name="P13" style:family="paragraph" style:parent-style-name="Standard">
      <style:paragraph-properties fo:text-align="justify" style:justify-single-word="false"/>
      <style:text-properties style:font-name="Calibri1" officeooo:rsid="0027fee4" officeooo:paragraph-rsid="00292172"/>
    </style:style>
    <style:style style:name="P14" style:family="paragraph" style:parent-style-name="Standard">
      <style:paragraph-properties fo:text-align="justify" style:justify-single-word="false"/>
      <style:text-properties style:font-name="Calibri1" officeooo:rsid="00292172" officeooo:paragraph-rsid="00292172"/>
    </style:style>
    <style:style style:name="P15" style:family="paragraph" style:parent-style-name="Standard">
      <style:paragraph-properties fo:text-align="justify" style:justify-single-word="false"/>
      <style:text-properties style:font-name="Calibri1" officeooo:rsid="002a8c3b" officeooo:paragraph-rsid="002a8c3b"/>
    </style:style>
    <style:style style:name="T1" style:family="text">
      <style:text-properties officeooo:rsid="002372dc"/>
    </style:style>
    <style:style style:name="T2" style:family="text">
      <style:text-properties style:font-name="Calibri"/>
    </style:style>
    <style:style style:name="T3" style:family="text">
      <style:text-properties style:font-name="Calibri" officeooo:rsid="002372dc"/>
    </style:style>
    <style:style style:name="T4" style:family="text">
      <style:text-properties style:font-name="Calibri" officeooo:rsid="0023a0eb"/>
    </style:style>
    <style:style style:name="T5" style:family="text">
      <style:text-properties style:font-name="Calibri" officeooo:rsid="0023c1ae"/>
    </style:style>
    <style:style style:name="T6" style:family="text">
      <style:text-properties style:font-name="Calibri" officeooo:rsid="00242330"/>
    </style:style>
    <style:style style:name="T7" style:family="text">
      <style:text-properties style:font-name="Calibri" officeooo:rsid="0024364d"/>
    </style:style>
    <style:style style:name="T8" style:family="text">
      <style:text-properties style:font-name="Calibri" officeooo:rsid="0024c335"/>
    </style:style>
    <style:style style:name="T9" style:family="text">
      <style:text-properties style:font-name="Calibri" officeooo:rsid="002652b9"/>
    </style:style>
    <style:style style:name="T10" style:family="text">
      <style:text-properties style:font-name="Calibri" officeooo:rsid="00275a38"/>
    </style:style>
    <style:style style:name="T11" style:family="text">
      <style:text-properties style:font-name="Calibri" officeooo:rsid="0027fee4"/>
    </style:style>
    <style:style style:name="T12" style:family="text">
      <style:text-properties style:font-name="Calibri" officeooo:rsid="00292172"/>
    </style:style>
    <style:style style:name="T13" style:family="text">
      <style:text-properties style:font-name="Calibri" officeooo:rsid="002977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1">Ah… Ahh</text:span><text:span text:style-name="T3">~</text:span></text:p>
      <text:p text:style-name="P1"><text:span text:style-name="T3">- En-dessous, filme par en-dessous.</text:span></text:p>
      <text:p text:style-name="P1"><text:span text:style-name="T3"/></text:p>
      <text:p text:style-name="P2"><text:span text:style-name="T2">Avec un dernier va et vient de ma main, j’explose dans le mouchoir qui recouvrait ma bite. L’écran vire rapidement sur un gros plan de la chatte de la brunette, ses gémissements de plaisirs éclipsés par le hennissement de son « monteur ».</text:span></text:p>
      <text:p text:style-name="P2"><text:span text:style-name="T2"/></text:p>
      <text:p text:style-name="P2"><text:span text:style-name="T2">Elle écarte ses cuisses, laissant un filet de foutre glisser le long de ses jambes. La vidéo fond vers le noir. Ne reste plus dans l’écran que mon propre reflet, seul et essoufflé par l’effort.</text:span></text:p>
      <text:p text:style-name="P2"><text:span text:style-name="T2"/></text:p>
      <text:p text:style-name="P2"><text:span text:style-name="T2">- Mec… J’aurais tellement voulu être à sa place.</text:span></text:p>
      <text:p text:style-name="P2"><text:span text:style-name="T2"/></text:p>
      <text:p text:style-name="P2"><text:span text:style-name="T2">Sans me lever, je jette le mouchoir gluant dans la poubelle. Les premiers rayons du soleil percent à travers les stores et inondent ma chambre d’un jaune pisse.</text:span></text:p>
      <text:p text:style-name="P2"><text:span text:style-name="T2"/></text:p>
      <text:p text:style-name="P4"><text:span text:style-name="T2">Mon envie de baiser est toujours pa</text:span><text:span text:style-name="T5">s</text:span><text:span text:style-name="T2"> partie. Ça me manque de travailler à la ferme. Le soir après que mon père ferme les granges, je me faufilais dans l’enclos des cochons. J’en laissais un me monter dessus, et si j’étais chanceux, j’en suçais un qui était assez proche. Ouais, ça c’était le bon vieux temps. Aujourd’hui, je serais chanceux de voir autre chose que des pigeons.</text:span></text:p>
      <text:p text:style-name="P2"><text:span text:style-name="T2"/></text:p>
      <text:p text:style-name="P3"><text:span text:style-name="T2">Ça fait deux ans que j’ai rejoint la grande ville. La seule </text:span><text:span text:style-name="T6">verdure</text:span><text:span text:style-name="T2"> de mon quotidien est la jungle grise d’immeubles </text:span><text:span text:style-name="T6">autour de mon appart’</text:span><text:span text:style-name="T2">, et la seule faune locale est le bétail s’agglutinant chaque jour autour des arrêts de bus. </text:span><text:span text:style-name="T4">Je vois plus mes vieux potes de la campagne. </text:span><text:span text:style-name="T6">Pas un seul bestiau’ à baiser. Je me fais juste chier ici.</text:span></text:p>
      <text:p text:style-name="P3"><text:span text:style-name="T6"/></text:p>
      <text:p text:style-name="P5"><text:span text:style-name="T2">Machinalement, j’éteins mon PC et me prépare pour sortir. Heureusement, c’est les vacances d’été. Mais sans personne à qui parler, je me contente de traverser les rues sans réelle raison. Parfois, je me contente de marcher tout droit, jusqu’à ce que je me fatigue ou que la nuit tombe, avant de revenir. On dirait qu’aujourd’hui est une des ces journées.</text:span></text:p>
      <text:p text:style-name="P5"><text:span text:style-name="T2"><text:line-break/></text:span><text:span text:style-name="T7">Par chance, j’habite dans la périphérie de la métropole. Les immeubles s’éclipsent vite pour laisser place à des baraques. Puis à des champs. Beaucoup de cultures dans le coin, mais aucune ferme. C’est déprimant.</text:span></text:p>
      <text:p text:style-name="P5"><text:span text:style-name="T7"/></text:p>
      <text:p text:style-name="P6"><text:span text:style-name="T2">Un petit bois retient mon attention. Il avait rien de spécial, mais un chemin mal entretenu le reliait à la route ppale où je me trouvais. Avec un peu de curiosité, peut-être que je trouverais un bestiau’ à baiser. Un sanglier, peut-être. En vrai, je suis tellement excité que je me contenterais d’un trou dans un arbre. J’ai juste envie de le faire à l’extérieur, complètement à poil au milieu de la nature. Je suppose que ça m’excite de pouvoir être potentiellement vu par des étrangers. Au bercail, je devais faire super gaffe parce que tout le monde connaissait. Ma vie sociale aurait été foutue si mon père avait découvert pourquoi sa jument boitait un jour sur deux. Hé hé… Il a rien capté pendant des semaines, c’était excellent.</text:span></text:p>
      <text:p text:style-name="P6"><text:span text:style-name="T2"/></text:p>
      <text:p text:style-name="P7"><text:span text:style-name="T2">Il y a pu il y a quelques jours, et ça sent: L’odeur de mousse et de pierre humide empreint l’air autour de moi. C’est plutôt agréable, j’aime bien cette odeur ; ce que j’aime moins, c’est les restes de gadoue qui collent à mes godasses. Si j’avais su que j’emprunterais ce chemin, j’aurais pris des bottes.</text:span></text:p>
      <text:p text:style-name="P7"><text:span text:style-name="T2"/></text:p>
      <text:p text:style-name="P7"><text:span text:style-name="T2">L’endroit mène à une petite clairière. Un autre que moi aurait pu trouver le coin relaxant, mais les </text:span><text:soft-page-break/><text:span text:style-name="T2">paysages me font chier plus qu’autre chose. Puisqu’il n’y a rien ici, autant rentrer chez moi.</text:span></text:p>
      <text:p text:style-name="P7"><text:span text:style-name="T2"/></text:p>
      <text:p text:style-name="P8"><text:span text:style-name="T2">Alors que je m’apprête à partir, </text:span><text:span text:style-name="T8">j’entends des branches craquer derrière moi. Une sorte de biche apparaît d’entre les arbres; on dirait qu’elle m’a pas vu. </text:span></text:p>
      <text:p text:style-name="P8"><text:span text:style-name="T8"/></text:p>
      <text:p text:style-name="P8"><text:span text:style-name="T8">&gt; J’essaie de faire aucun bruit pour ne pas l’effrayer.</text:span></text:p>
      <text:p text:style-name="P8"><text:span text:style-name="T8">- « Salut ma belle »</text:span></text:p>
      <text:p text:style-name="P8"><text:span text:style-name="T8"/></text:p>
      <text:p text:style-name="P9"><text:span text:style-name="T2">Mon sort d’invisibilité ne marche pas longtemps. Elle me repère rapidement et s’enfuit aussitôt dans les bois. Tss. Au moins j’ai eu le temps de voir son entrejambe; c’était bien une femelle, et pas un jeune mâle comme je le craignais. J’ai rien contre baiser un mâle, mais je veux pas risquer de le sodomiser et de me choper des vers, ya plein d’animaux sauvages qui en ont.</text:span></text:p>
      <text:p text:style-name="P9"><text:span text:style-name="T2"><text:line-break/></text:span><text:span text:style-name="T9">Mais ça me fait quand même chier. T’as une biche qui apparaît, qui t’excite avec le rêve de pouvoir la baiser, et elle s’enfuit. Je serais chanceux si je la revois encore à l’avenir.</text:span></text:p>
      <text:p text:style-name="P9"><text:span text:style-name="T9"><text:line-break/>Irrité, je rentre. Peut-être qu’il y a un moyen de gagner sa confiance…</text:span></text:p>
      <text:p text:style-name="P9"><text:span text:style-name="T9"/></text:p>
      <text:p text:style-name="P10"><text:span text:style-name="T2">JOUR 1</text:span></text:p>
      <text:p text:style-name="P10"><text:span text:style-name="T2"/></text:p>
      <text:p text:style-name="P10"><text:span text:style-name="T2">Je fais des recherches sur les biches qui vivent dans le coin. J’ai pas trouvé quand chose sur les techniques pour gagner sa confiance. La plupart, c’était des articles de bonniches qui recommandaient la patience et ce genre de conneries. Mais je suppose que j’ai pas vraiment le choix. </text:span><text:span text:style-name="T10">En revanche, j’ai trouvé quelque chose d’intéressant : La saison des amours de son espèce arrive en fin de semaine, normalement. Si je parviens à gagner un minimum sa confiance, peut-être qu’elle sera assez excitée pour me confondre avec un mâle.</text:span></text:p>
      <text:p text:style-name="P10"><text:span text:style-name="T2"/></text:p>
      <text:p text:style-name="P11"><text:span text:style-name="T2">Je sais même pas pourquoi je suis revenu. J’ai même acheté des pommes comme un couillon. Je sais même pas si elle va revenir. </text:span><text:span text:style-name="T11">Peut-être que si je maintiens une routine de visite, elle s’adaptera à ma présence?</text:span></text:p>
      <text:p text:style-name="P11"><text:span text:style-name="T11"/></text:p>
      <text:p text:style-name="P12"><text:span text:style-name="T2">Je me rends au même endroit qu’hier. Évidemment, elle n’est pas là. Je m’assieds sur un rocher, j’attends, et malgré l’endroit inconfortable, je finis par m’endormir. </text:span></text:p>
      <text:p text:style-name="P12"><text:span text:style-name="T2"/></text:p>
      <text:p text:style-name="P12"><text:span text:style-name="T2">Je suis réveillé au crépuscule par des bruits de pas autour de moi. Je me réveille, et elle est là! A moins que ça en soit une autre. Aucune idée, elles se ressemblent toutes.</text:span></text:p>
      <text:p text:style-name="P12"><text:span text:style-name="T2"/></text:p>
      <text:p text:style-name="P12"><text:span text:style-name="T2">Elle s’enfuit quand elle me voit me réveiller. Mais à ma surprise, elle ne disparaît pas dans les bois, et se contente de me surveiller depuis l’entrée du bois. Peut-être que c’est sa curiosité qui l’a poussé à s’approcher. Je devrais peut-être…</text:span></text:p>
      <text:p text:style-name="P12"><text:span text:style-name="T2"/></text:p>
      <text:p text:style-name="P12"><text:span text:style-name="T2">- Lui lancer une pomme.</text:span></text:p>
      <text:p text:style-name="P12"><text:span text:style-name="T2">&gt; Poser une pomme et m’en aller.</text:span></text:p>
      <text:p text:style-name="P12"><text:span text:style-name="T2"/></text:p>
      <text:p text:style-name="P12"><text:span text:style-name="T2">Lentement, je prends une pomme de mon sac et la pose sur le rocher où je dormais. La biche se tend et ne me quitte pas du regard. Je me tourne lentement et rentre chez moi. L’important pour l’instant c’est d’instaurer un climat de confiance.</text:span></text:p>
      <text:p text:style-name="P12"><text:span text:style-name="T2"/></text:p>
      <text:p text:style-name="P13"><text:span text:style-name="T2">PENDANT LES JOURS QUI SUIVENT </text:span><text:span text:style-name="T12">(on va pas se faire chier on va abréger)</text:span></text:p>
      <text:p text:style-name="P14"><text:soft-page-break/><text:span text:style-name="T2">Le PP revient tous les jours à la clairière, où la biche attend. Le PP l’habitue à sa présence en lui offrant des pommes (qu’il peut maintenant lui jeter) et en se déshabillant et se branlant régulièrement devant elle pour lui communiquer ses intentions. </text:span><text:span text:style-name="T13">Quand vient la saison des amours, un cerf se pointe et « défie » le PP en duel. Heureusement, il s’est préparé, et a emporté des pierres et une tronçonneuse électrique pour l’apeurer. Ça a fonctionné et le cerf est parti. La biche s’approche de lui et le reconnaît comme mâle dominant.</text:span></text:p>
      <text:p text:style-name="P14"><text:span text:style-name="T13"/></text:p>
      <text:p text:style-name="P15"><text:span text:style-name="T13">L</text:span><text:span text:style-name="T2">e PP en profite pour se désabiller et lui écarter les cuisses, révélant les énormes lèvres férales couronnant son vagin. Le PP le lèche abondamment, repensant aux juments et vaches qu’il léchait régulièrement à la ferme de son père. Après l’avoir doigté, il entreprend de la baiser, et en a des larmes de plaisir après avoir manqué de sexe zoophile pendant plus de deux ans. </text:span></text:p>
      <text:p text:style-name="P15"><text:span text:style-name="T2"/></text:p>
      <text:p text:style-name="P15"><text:span text:style-name="T2">A la fin de l’histoire, le PP revient régulièrement dans les bois, où l’y attend sa biche pour la baiser.</text:span></text:p>
      <text:p text:style-name="P15"><text:span text:style-name="T2"/></text:p>
      <text:p text:style-name="P12"><text:span text:style-name="T2"/></text:p>
      <text:p text:style-name="P12"><text:span text:style-name="T2"/></text:p>
      <text:p text:style-name="P3"><text:span text:style-name="T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4-30T14:55:58.153000000</dc:date>
    <meta:editing-duration>PT1H14M56S</meta:editing-duration>
    <meta:editing-cycles>19</meta:editing-cycles>
    <meta:generator>LibreOffice/7.3.3.2$Windows_X86_64 LibreOffice_project/d1d0ea68f081ee2800a922cac8f79445e4603348</meta:generator>
    <meta:document-statistic meta:table-count="0" meta:image-count="0" meta:object-count="0" meta:page-count="3" meta:paragraph-count="32" meta:word-count="1207" meta:character-count="6783" meta:non-whitespace-character-count="5602"/>
  </office:meta>
</office:document-meta>
</file>