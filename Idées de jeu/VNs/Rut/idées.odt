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officeooo:rsid="001cdc5d" officeooo:paragraph-rsid="001cdc5d"/>
    </style:style>
    <style:style style:name="P2" style:family="paragraph" style:parent-style-name="Standard">
      <style:paragraph-properties fo:text-align="justify" style:justify-single-word="false"/>
      <style:text-properties style:font-name="Calibri" officeooo:rsid="001df209" officeooo:paragraph-rsid="001df209"/>
    </style:style>
    <style:style style:name="T1" style:family="text">
      <style:text-properties officeooo:rsid="001ec811"/>
    </style:style>
    <style:style style:name="T2" style:family="text">
      <style:text-properties officeooo:rsid="001f6df4"/>
    </style:style>
    <style:style style:name="T3" style:family="text">
      <style:text-properties officeooo:rsid="00211a8e"/>
    </style:style>
    <style:style style:name="T4" style:family="text">
      <style:text-properties officeooo:rsid="0022b464"/>
    </style:style>
    <style:style style:name="T5" style:family="text">
      <style:text-properties officeooo:rsid="0022bb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u ultra court à essayer de sortir <text:span text:style-name="T5">histoire de se mettre à Renpy.</text:span> <text:span text:style-name="T3">Ça devrait être rapide, comme ça on pourra passer le reste du temps à dessiner les illustration en mode brouillon à la Teraurge.</text:span></text:p>
      <text:p text:style-name="P1"/>
      <text:p text:style-name="P1">Idées de scénario : </text:p>
      <text:p text:style-name="P1"/>
      <text:p text:style-name="P1">Le protagoniste est un affamé sexuel qui rêve de baiser un animal sauvage, chose difficile dans la région où il vit, très urbanisée et où les animaux sont rares et farouches. Il décide cependant d’aller dans le bois près de chez lui dans l’espoir de trouver des loups, sangliers ou biches à baiser. Il finit par trouver un groupe de <text:span text:style-name="T4">chevreuils</text:span> vivant dans les bois, dont il se résout à baiser l’un des membres avant la saison des amours, où ces animaux seront en rut et impossibles à apprivoiser sans se faire blesser par les cerfs.</text:p>
      <text:p text:style-name="P1"/>
      <text:p text:style-name="P2">Il finira par trouver une <text:span text:style-name="T4">chevrette</text:span> et son daim <text:span text:style-name="T4">(un brocard)</text:span>, qu’il apprivoisera peu à peu pour qu’ils le laissent approcher la mère et la baiser. <text:span text:style-name="T1">Le jeu sera juste </text:span><text:span text:style-name="T2">un RV statique</text:span><text:span text:style-name="T1"> </text:span><text:span text:style-name="T2">avec </text:span><text:span text:style-name="T1">une suite de choix </text:span><text:span text:style-name="T2">sans gameplay. Une bonne réponse améliore la relation avec la mère, une mauvaise fait juste perdre un jour au joueu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21T12:37:11.343000000</dc:date>
    <meta:editing-duration>PT10M37S</meta:editing-duration>
    <meta:editing-cycles>7</meta:editing-cycles>
    <meta:generator>LibreOffice/7.3.3.2$Windows_X86_64 LibreOffice_project/d1d0ea68f081ee2800a922cac8f79445e4603348</meta:generator>
    <meta:document-statistic meta:table-count="0" meta:image-count="0" meta:object-count="0" meta:page-count="1" meta:paragraph-count="4" meta:word-count="194" meta:character-count="1068" meta:non-whitespace-character-count="877"/>
  </office:meta>
</office:document-meta>
</file>