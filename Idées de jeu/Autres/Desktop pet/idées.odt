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d3fb5" officeooo:paragraph-rsid="001d3fb5"/>
    </style:style>
    <style:style style:name="P2" style:family="paragraph" style:parent-style-name="Text_20_body">
      <style:paragraph-properties fo:line-height="115%"/>
      <style:text-properties officeooo:paragraph-rsid="001a08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 :</text:p>
      <text:p text:style-name="P1"><text:line-break/>Pas de jeu, juste un animal de bureau à qui on peu faire faire des choses adultes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3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30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30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30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41S</meta:editing-duration>
    <meta:editing-cycles>2</meta:editing-cycles>
    <meta:generator>LibreOffice/26.2.3.2$Windows_X86_64 LibreOffice_project/70e089b17412e4cb7773e41413306b17a2328c34</meta:generator>
    <meta:creation-date>2026-06-10T20:45:48.641830000</meta:creation-date>
    <dc:title>Format de texte</dc:title>
    <dc:date>2026-06-10T20:46:29.969334400</dc:date>
    <meta:document-statistic meta:table-count="0" meta:image-count="0" meta:object-count="0" meta:page-count="1" meta:paragraph-count="2" meta:word-count="19" meta:character-count="89" meta:non-whitespace-character-count="71"/>
    <meta:template xlink:type="simple" xlink:actuate="onRequest" xlink:title="Format de texte" xlink:href="file:///C:/Users/Clément/AppData/Roaming/LibreOffice/4/user/template/Format%20de%20texte.ott" meta:date="2026-06-10T20:45:48.296023200"/>
  </office:meta>
</office:document-meta>
</file>