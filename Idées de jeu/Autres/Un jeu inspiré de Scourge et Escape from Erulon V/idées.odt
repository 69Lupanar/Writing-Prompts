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paragraph-rsid="001a089c"/>
    </style:style>
    <style:style style:name="P2" style:family="paragraph" style:parent-style-name="Text_20_body">
      <style:paragraph-properties fo:line-height="115%"/>
      <style:text-properties officeooo:rsid="001c8bcc" officeooo:paragraph-rsid="001c8bcc"/>
    </style:style>
    <style:style style:name="P3" style:family="paragraph" style:parent-style-name="Text_20_body" style:list-style-name="L1">
      <style:paragraph-properties fo:line-height="115%"/>
      <style:text-properties officeooo:rsid="001c8bcc" officeooo:paragraph-rsid="001c8bcc"/>
    </style:style>
    <style:style style:name="T1" style:family="text">
      <style:text-properties officeooo:rsid="001d133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dées de scénario :</text:p>
      <text:p text:style-name="P2"/>
      <text:list xml:id="list2830343111" text:style-name="L1">
        <text:list-item>
          <text:p text:style-name="P3">Le joueur incarne un pilote spatial qui enquête sur une étrange planète avec l’aide de son IA assistante. Son vaisseau s’écrase et le sépare de son IA. Explorant la planète, il découvre une ancienne civilisation ayant été effacée par une ancienne créature marine ayant réussi à conquérir la terre ferme et détruire toute autre forme de vie sur la planète, les corrompant et les transformant en masses de chair cherchant uniquement à satisfaire leurs pulsions sexuelles. Le joueur découvre que son IA a été également corrompue, et cherche maintenant à utiliser leur vaisseau pour conquérir d’autres planètes et étendre l’influence de cette créature. Le joueur devra secourir les derniers survivants de la planète pour concevoir un sérum afin de neutraliser les effets de la créature et sauver son IA, <text:span text:style-name="T1">tout en prenant garde à ne pas succomber lui-même à l’infection</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3M44S</meta:editing-duration>
    <meta:editing-cycles>3</meta:editing-cycles>
    <meta:generator>LibreOffice/7.3.3.2$Windows_X86_64 LibreOffice_project/d1d0ea68f081ee2800a922cac8f79445e4603348</meta:generator>
    <meta:creation-date>2024-01-27T08:38:57.716000000</meta:creation-date>
    <dc:date>2024-01-27T08:43:31.451000000</dc:date>
    <meta:document-statistic meta:table-count="0" meta:image-count="0" meta:object-count="0" meta:page-count="1" meta:paragraph-count="2" meta:word-count="145" meta:character-count="884" meta:non-whitespace-character-count="742"/>
  </office:meta>
</office:document-meta>
</file>