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2cf3" officeooo:paragraph-rsid="00192cf3"/>
    </style:style>
    <style:style style:name="P2" style:family="paragraph" style:parent-style-name="Text_20_body" style:list-style-name="L1">
      <style:text-properties fo:font-style="normal" officeooo:rsid="00192cf3" officeooo:paragraph-rsid="00192cf3" style:font-style-asian="normal" style:font-style-complex="normal"/>
    </style:style>
    <style:style style:name="P3" style:family="paragraph" style:parent-style-name="Text_20_body" style:list-style-name="L1">
      <style:text-properties fo:font-style="normal" officeooo:rsid="001b033b" officeooo:paragraph-rsid="001b033b" style:font-style-asian="normal" style:font-style-complex="normal"/>
    </style:style>
    <style:style style:name="P4" style:family="paragraph" style:parent-style-name="Text_20_body">
      <style:text-properties fo:font-style="normal" officeooo:rsid="001b033b" officeooo:paragraph-rsid="001b033b" style:font-style-asian="normal" style:font-style-complex="normal"/>
    </style:style>
    <style:style style:name="P5" style:family="paragraph" style:parent-style-name="Text_20_body" style:list-style-name="L2">
      <style:text-properties fo:font-style="normal" officeooo:rsid="001b033b" officeooo:paragraph-rsid="001b033b" style:font-style-asian="normal" style:font-style-complex="normal"/>
    </style:style>
    <style:style style:name="P6" style:family="paragraph" style:parent-style-name="Text_20_body">
      <style:text-properties fo:font-style="normal" officeooo:rsid="001cd306" officeooo:paragraph-rsid="001cd306" style:font-style-asian="normal" style:font-style-complex="normal"/>
    </style:style>
    <style:style style:name="P7" style:family="paragraph" style:parent-style-name="Text_20_body" style:list-style-name="L3">
      <style:text-properties fo:font-style="normal" officeooo:rsid="001cd306" officeooo:paragraph-rsid="001cd306" style:font-style-asian="normal" style:font-style-complex="normal"/>
    </style:style>
    <style:style style:name="P8" style:family="paragraph" style:parent-style-name="Text_20_body" style:list-style-name="L3">
      <style:text-properties fo:font-style="normal" officeooo:rsid="001f26e1" officeooo:paragraph-rsid="001f26e1" style:font-style-asian="normal" style:font-style-complex="normal"/>
    </style:style>
    <style:style style:name="P9" style:family="paragraph" style:parent-style-name="Text_20_body" style:list-style-name="L3">
      <style:text-properties fo:font-style="normal" officeooo:rsid="00209d6d" officeooo:paragraph-rsid="00209d6d" style:font-style-asian="normal" style:font-style-complex="normal"/>
    </style:style>
    <style:style style:name="T1" style:family="text">
      <style:text-properties officeooo:rsid="001ab4ae"/>
    </style:style>
    <style:style style:name="T2" style:family="text">
      <style:text-properties officeooo:rsid="001cd27e"/>
    </style:style>
    <style:style style:name="T3" style:family="text">
      <style:text-properties officeooo:rsid="001d7763"/>
    </style:style>
    <style:style style:name="T4"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tions : </text:p>
      <text:list text:style-name="L1">
        <text:list-item>
          <text:p text:style-name="P2">Inspiré de <text:a xlink:type="simple" xlink:href="https://www.newgrounds.com/portal/view/506445" text:style-name="Internet_20_link" text:visited-style-name="Visited_20_Internet_20_Link">Public Viewing</text:a>, un jeu flash <text:span text:style-name="T1">clicker </text:span>où le joueur incarne <text:span text:style-name="T1">un homme nu attirant l’attention sur lui pendant un match de foot en faisant des gestes obscènes devant la caméra, tandis que les joueurs / sécurité / police tentent de l’arrêter. Le but est de gagner le plus de points possible en achetant des danses réalisables sur le terrain, chacune plus compliquée et récompensante que la précédente.</text:span></text:p>
        </text:list-item>
        <text:list-item>
          <text:p text:style-name="P3">Inspiré aussi des mouvements de censure cherchant à passer sous silence les développeurs de jeux adultes.</text:p>
        </text:list-item>
      </text:list>
      <text:p text:style-name="P4"/>
      <text:p text:style-name="P4">Idées de scénario : </text:p>
      <text:list text:style-name="L2">
        <text:list-item>
          <text:p text:style-name="P5">Aux États-Unis, une jeune femme cherche un moyen de payer ses études. Refusant de faire un prêt pour ne pas s’enchaîner à une dette à vie, elle peine cependant à trouver de travail. Elle songe donc à faire du direct où elle pourrait se prostituer à la OnlyFans. Problème : Comment <text:span text:style-name="T2">s</text:span>e faire de la pub ? La solution est toute simple : Aller là où se trouve son public – dans les parcs, écoles, stades, etc. – et faire son show là-bas. Deuxième problème : Tout le monde n’apprécie pas avoir une star du porn parasiter leur audience…</text:p>
        </text:list-item>
      </text:list>
      <text:p text:style-name="P6"/>
      <text:p text:style-name="P6">Idées de gameplay : </text:p>
      <text:list text:style-name="L3">
        <text:list-item>
          <text:p text:style-name="P7">Le joueur contrôle une jeune femme devant attirer l’attention du public pour faire de la pub pour son direct et gagner de l’argent. Le but du jeu est de réaliser des actes sexuels à l’écran pour garder l’attention du public (représenté par 10 personnes) ; si son public se lasse (les 10 personnes sont parties), c’est perdu. <text:span text:style-name="T3">Si le joueur parvient à tenir pendant un temps défini, il gagne la partie.</text:span></text:p>
          <text:list>
            <text:list-item>
              <text:p text:style-name="P8">A voir si on fait un seul niveau (avec une seule difficulté), un seul niveau avec différents niveaux de difficulté, ou plusieurs niveaux, chacun avec leurs propres obstacles. Si un seul niveau, ne pas mettre de temps limite, on utilise just un highscore. Si plusieurs niveaux, mettre un temps limite pour débloquer le niveau suivant.</text:p>
            </text:list-item>
            <text:list-item>
              <text:p text:style-name="P7">Pour gagner de l’argent, le joueur doit maintenir une combinaison de touches pendant un certain temps pour réaliser une technique sexuelle et gagner de l’argent. Il peut ensuite dépenser cet argent pour obtenir des techniques plus difficiles à maintenir, mais qui rapportent plus d’argent. <text:span text:style-name="T4">(Avoir un système de combo pour multiplier les gains si le joueur enchaîne différentes techniques ?)</text:span></text:p>
            </text:list-item>
            <text:list-item>
              <text:p text:style-name="P7">Au fil de la progression d’une partie, de plus en plus d’ennemis apparaîtront <text:soft-page-break/>pour empêcher le joueur de gagner de l’attention. Quand ils touchent le joueur, son combo est rompu <text:span text:style-name="T3">et il perd de l’attention. Les ennemis peuvent avoir différents effets, allant d’arrêter le joueur quelques instants jusqu’à lui voler l’attention.</text:span></text:p>
            </text:list-item>
            <text:list-item>
              <text:p text:style-name="P9">De temps en temps, certains membres du public pourront faire une demande, comme exécuter une technique précise pendant un certain temps. Si le joueur réussit cette demande, il gagne un bonus multiplicateur pendant l’exécution, et un gros gain d’argent à la fi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6M16S</meta:editing-duration>
    <meta:editing-cycles>9</meta:editing-cycles>
    <meta:generator>LibreOffice/25.2.4.3$Windows_X86_64 LibreOffice_project/33e196637044ead23f5c3226cde09b47731f7e27</meta:generator>
    <meta:creation-date>2025-08-11T12:33:40.329392800</meta:creation-date>
    <dc:title>Format de texte</dc:title>
    <dc:date>2025-08-11T13:00:13.102844100</dc:date>
    <meta:document-statistic meta:table-count="0" meta:image-count="0" meta:object-count="0" meta:page-count="2" meta:paragraph-count="11" meta:word-count="479" meta:character-count="2812" meta:non-whitespace-character-count="2347"/>
    <meta:template xlink:type="simple" xlink:actuate="onRequest" xlink:title="Format de texte" xlink:href="file:///C:/Users/Clément/AppData/Roaming/LibreOffice/4/user/template/Format%20de%20texte1.ott" meta:date="2025-08-11T12:33:39.888432400"/>
  </office:meta>
</office:document-meta>
</file>