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17b524" officeooo:paragraph-rsid="0017b5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scénario : </text:p>
      <text:p text:style-name="P1"/>
      <text:p text:style-name="P1"><text:tab/>Inspiré de la bande annonce des Loonatics, l’origine de nos Toons serait que la dessinatrice de leur concept art aurait eu un rapport sexuel pendant qu’elle dessinait ses personnages. Après une éjaculation sur son visage, quelques gouttes de sperme auraient atterri dans le pot d’encre noire qu’elle utilisait sur son dessin. Le renversant par accident, elle s’absente en chercher un autre, tandis que l’encre remplie de sperme coule sur les tracés des personnages, leur donnant la vie et la libido pour lesquelles ils sont bien conn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7T21:39:42.281000000</dc:date>
    <meta:editing-duration>PT2M24S</meta:editing-duration>
    <meta:editing-cycles>1</meta:editing-cycles>
    <meta:document-statistic meta:table-count="0" meta:image-count="0" meta:object-count="0" meta:page-count="1" meta:paragraph-count="2" meta:word-count="90" meta:character-count="557" meta:non-whitespace-character-count="467"/>
    <meta:generator>LibreOffice/7.3.3.2$Windows_X86_64 LibreOffice_project/d1d0ea68f081ee2800a922cac8f79445e4603348</meta:generator>
  </office:meta>
</office:document-meta>
</file>