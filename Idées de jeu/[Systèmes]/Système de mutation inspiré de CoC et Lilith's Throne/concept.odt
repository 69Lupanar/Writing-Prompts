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1cf671" officeooo:paragraph-rsid="001cf671"/>
    </style:style>
    <style:style style:name="P2" style:family="paragraph" style:parent-style-name="Standard">
      <style:text-properties officeooo:rsid="00106f63" officeooo:paragraph-rsid="00106f63"/>
    </style:style>
    <style:style style:name="P3" style:family="paragraph" style:parent-style-name="Subtitle">
      <style:text-properties officeooo:rsid="001cf671" officeooo:paragraph-rsid="001cf671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line-height="115%"/>
      <style:text-properties officeooo:rsid="00106f63" officeooo:paragraph-rsid="00106f63"/>
    </style:style>
    <style:style style:name="P9" style:family="paragraph" style:parent-style-name="Standard">
      <style:paragraph-properties fo:line-height="115%"/>
      <style:text-properties officeooo:rsid="00106f63" officeooo:paragraph-rsid="001cf671"/>
    </style:style>
    <style:style style:name="P10" style:family="paragraph" style:parent-style-name="Heading_20_1">
      <style:paragraph-properties fo:line-height="115%"/>
      <style:text-properties officeooo:rsid="001cf671" officeooo:paragraph-rsid="001cf671"/>
    </style:style>
    <style:style style:name="P11" style:family="paragraph" style:parent-style-name="Heading_20_2">
      <style:text-properties officeooo:rsid="002be21a" officeooo:paragraph-rsid="002be21a"/>
    </style:style>
    <style:style style:name="P12" style:family="paragraph" style:parent-style-name="Standard">
      <style:paragraph-properties fo:line-height="115%"/>
      <style:text-properties officeooo:rsid="001d463e" officeooo:paragraph-rsid="002be21a"/>
    </style:style>
    <style:style style:name="P13" style:family="paragraph" style:parent-style-name="Standard" style:list-style-name="L1">
      <style:paragraph-properties fo:line-height="115%"/>
      <style:text-properties officeooo:rsid="002be21a" officeooo:paragraph-rsid="002be21a"/>
    </style:style>
    <style:style style:name="P14" style:family="paragraph" style:parent-style-name="Standard" style:list-style-name="L1">
      <style:paragraph-properties fo:line-height="115%"/>
      <style:text-properties officeooo:rsid="00310964" officeooo:paragraph-rsid="00310964"/>
    </style:style>
    <style:style style:name="P15" style:family="paragraph" style:parent-style-name="Standard">
      <style:paragraph-properties fo:line-height="115%"/>
      <style:text-properties officeooo:rsid="00310964" officeooo:paragraph-rsid="00310964"/>
    </style:style>
    <style:style style:name="P16" style:family="paragraph" style:parent-style-name="Standard">
      <style:paragraph-properties fo:line-height="115%"/>
      <style:text-properties officeooo:rsid="00320760" officeooo:paragraph-rsid="00320760"/>
    </style:style>
    <style:style style:name="P17" style:family="paragraph" style:parent-style-name="Heading_20_2">
      <style:text-properties officeooo:rsid="001d463e" officeooo:paragraph-rsid="001d463e"/>
    </style:style>
    <style:style style:name="P18" style:family="paragraph" style:parent-style-name="Standard">
      <style:paragraph-properties fo:line-height="115%"/>
      <style:text-properties officeooo:rsid="001d463e" officeooo:paragraph-rsid="001d463e"/>
    </style:style>
    <style:style style:name="P19" style:family="paragraph" style:parent-style-name="Standard" style:list-style-name="L2">
      <style:paragraph-properties fo:line-height="115%"/>
      <style:text-properties officeooo:rsid="001d463e" officeooo:paragraph-rsid="001d463e"/>
    </style:style>
    <style:style style:name="P20" style:family="paragraph" style:parent-style-name="Standard" style:list-style-name="L2">
      <style:paragraph-properties fo:line-height="115%"/>
      <style:text-properties officeooo:rsid="001f324d" officeooo:paragraph-rsid="001f324d"/>
    </style:style>
    <style:style style:name="P21" style:family="paragraph" style:parent-style-name="Standard">
      <style:paragraph-properties fo:line-height="115%"/>
      <style:text-properties officeooo:rsid="001f324d" officeooo:paragraph-rsid="001f324d"/>
    </style:style>
    <style:style style:name="P22" style:family="paragraph" style:parent-style-name="Standard" style:list-style-name="L2">
      <style:paragraph-properties fo:line-height="115%"/>
      <style:text-properties officeooo:rsid="002641f8" officeooo:paragraph-rsid="002641f8"/>
    </style:style>
    <style:style style:name="P23" style:family="paragraph" style:parent-style-name="Standard" style:list-style-name="L2">
      <style:paragraph-properties fo:line-height="115%"/>
      <style:text-properties officeooo:rsid="0020c80d" officeooo:paragraph-rsid="0020c80d"/>
    </style:style>
    <style:style style:name="P24" style:family="paragraph" style:parent-style-name="Standard" style:list-style-name="L2">
      <style:paragraph-properties fo:line-height="115%"/>
      <style:text-properties officeooo:rsid="002355d0" officeooo:paragraph-rsid="002355d0"/>
    </style:style>
    <style:style style:name="P25" style:family="paragraph" style:parent-style-name="Standard" style:list-style-name="L2">
      <style:paragraph-properties fo:line-height="115%"/>
      <style:text-properties officeooo:rsid="002e5f7b" officeooo:paragraph-rsid="002e5f7b"/>
    </style:style>
    <style:style style:name="P26" style:family="paragraph" style:parent-style-name="Standard" style:list-style-name="L2">
      <style:paragraph-properties fo:line-height="115%"/>
      <style:text-properties officeooo:rsid="00254263" officeooo:paragraph-rsid="00254263"/>
    </style:style>
    <style:style style:name="P27" style:family="paragraph" style:parent-style-name="Standard" style:list-style-name="L2">
      <style:paragraph-properties fo:line-height="115%"/>
      <style:text-properties officeooo:rsid="0020c80d" officeooo:paragraph-rsid="002641f8"/>
    </style:style>
    <style:style style:name="P28" style:family="paragraph" style:parent-style-name="Standard" style:list-style-name="L2">
      <style:paragraph-properties fo:line-height="115%"/>
      <style:text-properties officeooo:rsid="002aa1cf" officeooo:paragraph-rsid="002aa1cf"/>
    </style:style>
    <style:style style:name="P29" style:family="paragraph" style:parent-style-name="Standard" style:list-style-name="L2">
      <style:paragraph-properties fo:line-height="115%"/>
      <style:text-properties officeooo:rsid="002355d0" officeooo:paragraph-rsid="002641f8"/>
    </style:style>
    <style:style style:name="P30" style:family="paragraph" style:parent-style-name="Standard" style:list-style-name="L2">
      <style:paragraph-properties fo:line-height="115%"/>
      <style:text-properties officeooo:rsid="0027919a" officeooo:paragraph-rsid="0027919a"/>
    </style:style>
    <style:style style:name="P31" style:family="paragraph" style:parent-style-name="Standard" style:list-style-name="L2">
      <style:paragraph-properties fo:line-height="115%"/>
      <style:text-properties officeooo:rsid="002970ff" officeooo:paragraph-rsid="002970ff"/>
    </style:style>
    <style:style style:name="P32" style:family="paragraph" style:parent-style-name="Standard" style:list-style-name="L2">
      <style:paragraph-properties fo:line-height="115%"/>
      <style:text-properties officeooo:rsid="002af88d" officeooo:paragraph-rsid="002af88d"/>
    </style:style>
    <style:style style:name="P33" style:family="paragraph" style:parent-style-name="Standard" style:list-style-name="L2">
      <style:paragraph-properties fo:line-height="115%"/>
      <style:text-properties officeooo:rsid="002b6046" officeooo:paragraph-rsid="002b6046"/>
    </style:style>
    <style:style style:name="P34" style:family="paragraph" style:parent-style-name="Standard">
      <style:paragraph-properties fo:line-height="115%"/>
      <style:text-properties officeooo:rsid="00106f63" officeooo:paragraph-rsid="001d463e"/>
    </style:style>
    <style:style style:name="P35" style:family="paragraph" style:parent-style-name="Standard" style:list-style-name="L3">
      <style:paragraph-properties fo:line-height="115%"/>
      <style:text-properties officeooo:rsid="001d463e" officeooo:paragraph-rsid="001d463e"/>
    </style:style>
    <style:style style:name="P36" style:family="paragraph" style:parent-style-name="Standard">
      <style:paragraph-properties fo:line-height="115%"/>
      <style:text-properties officeooo:paragraph-rsid="001cf671"/>
    </style:style>
    <style:style style:name="T1" style:family="text">
      <style:text-properties officeooo:rsid="002be21a"/>
    </style:style>
    <style:style style:name="T2" style:family="text">
      <style:text-properties officeooo:rsid="002cb3ed"/>
    </style:style>
    <style:style style:name="T3" style:family="text">
      <style:text-properties officeooo:rsid="002deeeb"/>
    </style:style>
    <style:style style:name="T4" style:family="text">
      <style:text-properties officeooo:rsid="002283b8"/>
    </style:style>
    <style:style style:name="T5" style:family="text">
      <style:text-properties officeooo:rsid="0021d703"/>
    </style:style>
    <style:style style:name="T6" style:family="text">
      <style:text-properties officeooo:rsid="002641f8"/>
    </style:style>
    <style:style style:name="T7" style:family="text">
      <style:text-properties officeooo:rsid="002b5bd1"/>
    </style:style>
    <style:style style:name="T8" style:family="text">
      <style:text-properties officeooo:rsid="001d463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ème de mutation</text:p>
      <text:p text:style-name="P2"/>
      <text:p text:style-name="P3">Conception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 text:protected="true">
            <text:p text:style-name="Contents_20_Heading">Sommaire</text:p>
          </text:index-title>
          <text:p text:style-name="P4"><text:a xlink:type="simple" xlink:href="#__RefHeading___Toc715_353095010" text:style-name="Index_20_Link" text:visited-style-name="Index_20_Link">Titre 1<text:tab/>1</text:a></text:p>
          <text:p text:style-name="P5"><text:a xlink:type="simple" xlink:href="#__RefHeading___Toc717_353095010" text:style-name="Index_20_Link" text:visited-style-name="Index_20_Link">Titre 2<text:tab/>1</text:a></text:p>
          <text:p text:style-name="P6"><text:a xlink:type="simple" xlink:href="#__RefHeading___Toc719_353095010" text:style-name="Index_20_Link" text:visited-style-name="Index_20_Link">Titre 3<text:tab/>1</text:a></text:p>
          <text:p text:style-name="P7"><text:a xlink:type="simple" xlink:href="#__RefHeading___Toc721_353095010" text:style-name="Index_20_Link" text:visited-style-name="Index_20_Link">Titre 4<text:tab/>1</text:a></text:p>
        </text:index-body>
      </text:table-of-content>
      <text:p text:style-name="P8"/>
      <text:p text:style-name="P9"/>
      <text:h text:style-name="P10" text:outline-level="1"><text:bookmark-start text:name="__RefHeading___Toc715_353095010"/>Données<text:bookmark-end text:name="__RefHeading___Toc715_353095010"/></text:h>
      <text:h text:style-name="P11" text:outline-level="2">Stats sexuelles</text:h>
      <text:p text:style-name="P12"/>
      <text:p text:style-name="P12">Représente l’ensemble des <text:span text:style-name="T1">statistiques liées aux performances sexuelles du personnage :</text:span></text:p>
      <text:p text:style-name="P12"/>
      <text:list text:style-name="L1">
        <text:list-item>
          <text:p text:style-name="P13">Désir (Indique le niveau de dépravation du perso, indique s’il est propice à faire des actes sexuels)</text:p>
        </text:list-item>
        <text:list-item>
          <text:p text:style-name="P13">Libido (Vitesse d’augmentation du désir)</text:p>
        </text:list-item>
        <text:list-item>
          <text:p text:style-name="P13"><text:span text:style-name="T2">Volume de </text:span><text:span text:style-name="T3">p</text:span>roduction de fluides (lait, sperme, etc.)</text:p>
        </text:list-item>
        <text:list-item>
          <text:p text:style-name="P14">Fertilité (probabilité de tomber enceinte ou d’engrosser un autre perso)</text:p>
        </text:list-item>
        <text:list-item>
          <text:p text:style-name="P14">Taille de la portée (nb d’enfants par portée)</text:p>
        </text:list-item>
      </text:list>
      <text:p text:style-name="P15"/>
      <text:p text:style-name="P16">Chaque perso possède aussi un degré de mutation dans une espèce précise (humain, chien, chat, etc.) qui influe sur le degré d’efficacité d’un objet transformatif.</text:p>
      <text:p text:style-name="P12"/>
      <text:h text:style-name="P17" text:outline-level="2">Anatomie</text:h>
      <text:p text:style-name="P18"/>
      <text:p text:style-name="P18">Représente l’ensemble des parties du corps pouvant être modifiées par un objet transformatif.</text:p>
      <text:p text:style-name="P18"/>
      <text:list text:style-name="L2">
        <text:list-item>
          <text:p text:style-name="P19">Tête</text:p>
          <text:list>
            <text:list-item>
              <text:p text:style-name="P19">Forme <text:span text:style-name="T4">(humaine, animale, insectoïde, etc.)</text:span></text:p>
            </text:list-item>
            <text:list-item>
              <text:p text:style-name="P19">Yeux</text:p>
              <text:list>
                <text:list-item>
                  <text:p text:style-name="P19"><text:soft-page-break/>Couleur</text:p>
                </text:list-item>
                <text:list-item>
                  <text:p text:style-name="P19">Type <text:span text:style-name="T5">(normal, fendus, composés, etc...)</text:span></text:p>
                </text:list-item>
              </text:list>
            </text:list-item>
            <text:list-item>
              <text:p text:style-name="P19">Cheveux</text:p>
              <text:list>
                <text:list-item>
                  <text:p text:style-name="P19">Couleur</text:p>
                </text:list-item>
                <text:list-item>
                  <text:p text:style-name="P19">Type <text:span text:style-name="T5">(Fourrure, chitine, etc.)</text:span></text:p>
                </text:list-item>
              </text:list>
            </text:list-item>
            <text:list-item>
              <text:p text:style-name="P20">Nez</text:p>
              <text:list>
                <text:list-item>
                  <text:p text:style-name="P20">Type <text:span text:style-name="T5">(normal, museau, trompe, etc.)</text:span></text:p>
                </text:list-item>
              </text:list>
            </text:list-item>
            <text:list-item>
              <text:p text:style-name="P20">Bouche</text:p>
              <text:list>
                <text:list-item>
                  <text:p text:style-name="P20">Type <text:span text:style-name="T5">(Normal, mâchoire, mandibule, etc.)</text:span></text:p>
                </text:list-item>
              </text:list>
            </text:list-item>
          </text:list>
        </text:list-item>
      </text:list>
      <text:p text:style-name="P21"/>
      <text:list text:continue-numbering="true" text:style-name="L2">
        <text:list-item>
          <text:p text:style-name="P22">Torse</text:p>
          <text:list>
            <text:list-item>
              <text:p text:style-name="P23">Couleur de peau</text:p>
            </text:list-item>
            <text:list-item>
              <text:p text:style-name="P23">Type de peau (fourrure, chitine, etc.)</text:p>
            </text:list-item>
            <text:list-item>
              <text:p text:style-name="P24">Corpulence</text:p>
            </text:list-item>
            <text:list-item>
              <text:p text:style-name="P24">Seins</text:p>
              <text:list>
                <text:list-item>
                  <text:p text:style-name="P24">Nombre</text:p>
                </text:list-item>
                <text:list-item>
                  <text:p text:style-name="P25">Type de fluide sécrété (lait, sperme, etc...)</text:p>
                </text:list-item>
                <text:list-item>
                  <text:p text:style-name="P24">Tétons</text:p>
                  <text:list>
                    <text:list-item>
                      <text:p text:style-name="P24">Couleur</text:p>
                    </text:list-item>
                    <text:list-item>
                      <text:p text:style-name="P24">Nombre</text:p>
                    </text:list-item>
                    <text:list-item>
                      <text:p text:style-name="P24">Type (normal, pis, auréole, etc.)</text:p>
                    </text:list-item>
                    <text:list-item>
                      <text:p text:style-name="P26">Taille d’auréole</text:p>
                    </text:list-item>
                  </text:list>
                </text:list-item>
              </text:list>
              <text:p text:style-name="P26"><text:s/></text:p>
            </text:list-item>
          </text:list>
        </text:list-item>
        <text:list-item>
          <text:p text:style-name="P22">Abdomen</text:p>
          <text:list>
            <text:list-item>
              <text:p text:style-name="P22">Type (Bipède, quadripède, etc.)</text:p>
            </text:list-item>
            <text:list-item>
              <text:p text:style-name="P27">Couleur de peau</text:p>
            </text:list-item>
            <text:list-item>
              <text:p text:style-name="P27">Type de peau (fourrure, chitine, etc.)</text:p>
            </text:list-item>
            <text:list-item>
              <text:p text:style-name="P22">Queue</text:p>
              <text:list>
                <text:list-item>
                  <text:p text:style-name="P22">Type (mammifère, reptilienne, insectoïde, etc.)</text:p>
                </text:list-item>
                <text:list-item>
                  <text:p text:style-name="P28">Ovipositeur (oui ou non)</text:p>
                </text:list-item>
              </text:list>
              <text:p text:style-name="P29"><text:s/></text:p>
            </text:list-item>
          </text:list>
        </text:list-item>
        <text:list-item>
          <text:p text:style-name="P30">Bras</text:p>
          <text:list>
            <text:list-item>
              <text:p text:style-name="P30">Nombre</text:p>
            </text:list-item>
            <text:list-item>
              <text:p text:style-name="P30">Type (normal, ailes, etc.)</text:p>
            </text:list-item>
            <text:list-item>
              <text:p text:style-name="P30">Mains</text:p>
              <text:list>
                <text:list-item>
                  <text:p text:style-name="P30">Type (normal, griffes, ventouses, etc.)</text:p>
                </text:list-item>
                <text:list-item>
                  <text:p text:style-name="P30">Préhensiles (oui ou non)</text:p>
                </text:list-item>
              </text:list>
            </text:list-item>
          </text:list>
          <text:p text:style-name="P30"><text:s/></text:p>
        </text:list-item>
        <text:list-item>
          <text:p text:style-name="P31">Jambes</text:p>
          <text:list>
            <text:list-item>
              <text:p text:style-name="P31">Nombre</text:p>
            </text:list-item>
            <text:list-item>
              <text:p text:style-name="P31"><text:soft-page-break/>Type (normales, <text:span text:style-name="T6">mammifère, reptilienne</text:span>, insectoïdes, etc.)</text:p>
            </text:list-item>
            <text:list-item>
              <text:p text:style-name="P31">Pieds</text:p>
              <text:list>
                <text:list-item>
                  <text:p text:style-name="P31">Type (plantigrade, serres, sabots, etc.)</text:p>
                </text:list-item>
              </text:list>
            </text:list-item>
          </text:list>
          <text:p text:style-name="P31"><text:s/></text:p>
        </text:list-item>
        <text:list-item>
          <text:p text:style-name="P28">Parties génitales :</text:p>
          <text:list>
            <text:list-item>
              <text:p text:style-name="P32">Type (mâle, femelle, asexué, hermaphrodite)</text:p>
            </text:list-item>
            <text:list-item>
              <text:p text:style-name="P32">Nombre d’organes</text:p>
            </text:list-item>
            <text:list-item>
              <text:p text:style-name="P32">Nombre de testicules par pénis</text:p>
            </text:list-item>
            <text:list-item>
              <text:p text:style-name="P32">Nombre de clitoris par vagin</text:p>
            </text:list-item>
            <text:list-item>
              <text:p text:style-name="P32">Type de naissance (vivipare, ovipare)</text:p>
            </text:list-item>
            <text:list-item>
              <text:p text:style-name="P32">Position (en fonction du type d’abdomen, <text:span text:style-name="T7">à l’avant et/ou à l’arrière</text:span>)</text:p>
            </text:list-item>
            <text:list-item>
              <text:p text:style-name="P33">Taille</text:p>
            </text:list-item>
            <text:list-item>
              <text:p text:style-name="P33">Couleur</text:p>
            </text:list-item>
          </text:list>
        </text:list-item>
      </text:list>
      <text:p text:style-name="P34"/>
      <text:h text:style-name="Heading_20_2" text:outline-level="2">Objets transformatif<text:span text:style-name="T8">s</text:span></text:h>
      <text:p text:style-name="P18"/>
      <text:list text:style-name="L3">
        <text:list-item>
          <text:p text:style-name="P35">Nom</text:p>
        </text:list-item>
        <text:list-item>
          <text:p text:style-name="P35">Icône</text:p>
        </text:list-item>
      </text:list>
      <text:p text:style-name="P9"/>
      <text:h text:style-name="P10" text:outline-level="1"><text:bookmark-start text:name="__RefHeading___Toc715_353095010 Copie 1"/>Logique<text:bookmark-end text:name="__RefHeading___Toc715_353095010 Copie 1"/></text:h>
      <text:p text:style-name="P9"/>
      <text:p text:style-name="P9">Défaut</text:p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25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25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25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25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25M1S</meta:editing-duration>
    <meta:editing-cycles>23</meta:editing-cycles>
    <meta:generator>LibreOffice/25.2.4.3$Windows_X86_64 LibreOffice_project/33e196637044ead23f5c3226cde09b47731f7e27</meta:generator>
    <meta:creation-date>2026-01-22T11:25:59.901092200</meta:creation-date>
    <dc:title>Format de texte</dc:title>
    <dc:date>2026-01-22T11:51:11.973583500</dc:date>
    <meta:document-statistic meta:table-count="0" meta:image-count="0" meta:object-count="0" meta:page-count="3" meta:paragraph-count="78" meta:word-count="339" meta:character-count="1920" meta:non-whitespace-character-count="1713"/>
    <meta:template xlink:type="simple" xlink:actuate="onRequest" xlink:title="Format de texte" xlink:href="file:///C:/Users/Clément/AppData/Roaming/LibreOffice/4/user/template/Format%20de%20texte.ott" meta:date="2026-01-22T11:25:59.526165500"/>
  </office:meta>
</office:document-meta>
</file>