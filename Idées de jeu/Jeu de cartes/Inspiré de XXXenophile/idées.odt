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f5f1" officeooo:paragraph-rsid="0019f5f1"/>
    </style:style>
    <style:style style:name="P2" style:family="paragraph" style:parent-style-name="Standard" style:list-style-name="L1">
      <style:text-properties officeooo:rsid="001bd4d8" officeooo:paragraph-rsid="001bd4d8"/>
    </style:style>
    <style:style style:name="P3" style:family="paragraph" style:parent-style-name="Standard" style:list-style-name="L1">
      <style:text-properties officeooo:rsid="001ca070" officeooo:paragraph-rsid="001ca0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 </text:p>
      <text:p text:style-name="P1"/>
      <text:list text:style-name="L1">
        <text:list-item>
          <text:p text:style-name="P2">Inspiré de XXXenophile pour le gameplay et le thème : Chaque carte Personnage possède une valeur de compatibilité que le joueur doit faire correspondre avec celle d’une carte d’une autre espèce. Lorsqu’il collecte assez de couples de différentes espèces, il gagne la partie.</text:p>
        </text:list-item>
        <text:list-item>
          <text:p text:style-name="P3">On pourrait faire un gameplay asymétrique comme dans Netrunner, où un joueur doit établir assez de coupes pour gagner, tandis que l’autre doit l’en empêcher et accomplir son propre objectif (leque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9M45S</meta:editing-duration>
    <meta:editing-cycles>6</meta:editing-cycles>
    <meta:generator>LibreOffice/25.2.4.3$Windows_X86_64 LibreOffice_project/33e196637044ead23f5c3226cde09b47731f7e27</meta:generator>
    <meta:creation-date>2025-05-31T12:42:21.350547600</meta:creation-date>
    <dc:title>Format de texte</dc:title>
    <dc:date>2025-08-05T22:52:04.371040600</dc:date>
    <meta:document-statistic meta:table-count="0" meta:image-count="0" meta:object-count="0" meta:page-count="1" meta:paragraph-count="3" meta:word-count="79" meta:character-count="484" meta:non-whitespace-character-count="409"/>
    <meta:template xlink:type="simple" xlink:actuate="onRequest" xlink:title="Format de texte" xlink:href="file:///C:/Users/Clément/AppData/Roaming/LibreOffice/4/user/template/Format%20de%20texte1.ott" meta:date="2025-05-31T12:42:21.251508600"/>
  </office:meta>
</office:document-meta>
</file>