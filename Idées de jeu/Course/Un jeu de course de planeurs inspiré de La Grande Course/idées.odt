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8390c" officeooo:paragraph-rsid="0018390c"/>
    </style:style>
    <style:style style:name="P2" style:family="paragraph" style:parent-style-name="Standard">
      <style:text-properties officeooo:rsid="00106f63" officeooo:paragraph-rsid="0018390c"/>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Standard">
      <style:text-properties officeooo:rsid="00106f63" officeooo:paragraph-rsid="00106f63"/>
    </style:style>
    <style:style style:name="P5" style:family="paragraph" style:parent-style-name="Heading_20_1">
      <style:text-properties officeooo:rsid="0018390c" officeooo:paragraph-rsid="0018390c"/>
    </style:style>
    <style:style style:name="P6" style:family="paragraph" style:parent-style-name="Standard" style:list-style-name="L1">
      <style:paragraph-properties fo:text-align="justify" style:justify-single-word="false"/>
      <style:text-properties officeooo:rsid="0014d461" officeooo:paragraph-rsid="0019889f"/>
    </style:style>
    <style:style style:name="P7" style:family="paragraph" style:parent-style-name="Standard" style:list-style-name="L1">
      <style:paragraph-properties fo:text-align="justify" style:justify-single-word="false"/>
      <style:text-properties officeooo:rsid="001975d8" officeooo:paragraph-rsid="0019889f"/>
    </style:style>
    <style:style style:name="P8" style:family="paragraph" style:parent-style-name="Standard" style:list-style-name="L1">
      <style:paragraph-properties fo:text-align="justify" style:justify-single-word="false"/>
      <style:text-properties officeooo:rsid="001aada3" officeooo:paragraph-rsid="0019889f"/>
    </style:style>
    <style:style style:name="P9" style:family="paragraph" style:parent-style-name="Standard" style:list-style-name="L1">
      <style:paragraph-properties fo:text-align="justify" style:justify-single-word="false"/>
      <style:text-properties officeooo:rsid="00199a71" officeooo:paragraph-rsid="0019889f"/>
    </style:style>
    <style:style style:name="P10" style:family="paragraph" style:parent-style-name="Standard" style:list-style-name="L1">
      <style:paragraph-properties fo:text-align="justify" style:justify-single-word="false"/>
      <style:text-properties fo:color="#00a933" loext:opacity="100%" officeooo:rsid="00199a71" officeooo:paragraph-rsid="0019889f"/>
    </style:style>
    <style:style style:name="P11" style:family="paragraph" style:parent-style-name="Standard" style:list-style-name="L1">
      <style:paragraph-properties fo:text-align="justify" style:justify-single-word="false"/>
      <style:text-properties fo:color="#00a933" loext:opacity="100%" officeooo:rsid="001975d8" officeooo:paragraph-rsid="0019889f"/>
    </style:style>
    <style:style style:name="P12" style:family="paragraph" style:parent-style-name="Standard">
      <style:paragraph-properties fo:text-align="justify" style:justify-single-word="false"/>
      <style:text-properties fo:color="#00a933" loext:opacity="100%" officeooo:rsid="001975d8" officeooo:paragraph-rsid="0019889f"/>
    </style:style>
    <style:style style:name="P13" style:family="paragraph" style:parent-style-name="Standard">
      <style:text-properties officeooo:rsid="00106f63" officeooo:paragraph-rsid="001b9d41"/>
    </style:style>
    <style:style style:name="P14" style:family="paragraph" style:parent-style-name="Heading_20_1">
      <style:text-properties officeooo:rsid="0018390c" officeooo:paragraph-rsid="001b9d41"/>
    </style:style>
    <style:style style:name="P15" style:family="paragraph" style:parent-style-name="Standard" style:list-style-name="L1">
      <style:paragraph-properties fo:text-align="justify" style:justify-single-word="false"/>
      <style:text-properties officeooo:rsid="0014d461" officeooo:paragraph-rsid="001b9d41"/>
    </style:style>
    <style:style style:name="P16" style:family="paragraph" style:parent-style-name="Standard" style:list-style-name="L1">
      <style:paragraph-properties fo:text-align="justify" style:justify-single-word="false"/>
      <style:text-properties officeooo:rsid="0014d461" officeooo:paragraph-rsid="002115d3"/>
    </style:style>
    <style:style style:name="P17" style:family="paragraph" style:parent-style-name="Standard" style:list-style-name="L1">
      <style:paragraph-properties fo:text-align="justify" style:justify-single-word="false"/>
      <style:text-properties officeooo:rsid="0024171d" officeooo:paragraph-rsid="0024171d"/>
    </style:style>
    <style:style style:name="P18" style:family="paragraph" style:parent-style-name="Standard" style:list-style-name="L1">
      <style:paragraph-properties fo:text-align="justify" style:justify-single-word="false"/>
      <style:text-properties officeooo:rsid="001975d8" officeooo:paragraph-rsid="0026cc4d"/>
    </style:style>
    <style:style style:name="P19" style:family="paragraph" style:parent-style-name="Standard" style:list-style-name="L1">
      <style:paragraph-properties fo:text-align="justify" style:justify-single-word="false"/>
      <style:text-properties officeooo:rsid="001aada3" officeooo:paragraph-rsid="0026cc4d"/>
    </style:style>
    <style:style style:name="P20" style:family="paragraph" style:parent-style-name="Standard" style:list-style-name="L1">
      <style:paragraph-properties fo:text-align="justify" style:justify-single-word="false"/>
      <style:text-properties officeooo:rsid="002ca42d" officeooo:paragraph-rsid="002ca42d"/>
    </style:style>
    <style:style style:name="P21" style:family="paragraph" style:parent-style-name="Standard" style:list-style-name="L1">
      <style:paragraph-properties fo:text-align="justify" style:justify-single-word="false"/>
      <style:text-properties officeooo:rsid="002d402a" officeooo:paragraph-rsid="002d402a"/>
    </style:style>
    <style:style style:name="P22" style:family="paragraph" style:parent-style-name="Standard" style:list-style-name="L1">
      <style:paragraph-properties fo:text-align="justify" style:justify-single-word="false"/>
      <style:text-properties officeooo:rsid="002f2cd3" officeooo:paragraph-rsid="002f2cd3"/>
    </style:style>
    <style:style style:name="T1" style:family="text">
      <style:text-properties officeooo:rsid="0019889f"/>
    </style:style>
    <style:style style:name="T2" style:family="text">
      <style:text-properties officeooo:rsid="001e712b"/>
    </style:style>
    <style:style style:name="T3" style:family="text">
      <style:text-properties officeooo:rsid="001e7284"/>
    </style:style>
    <style:style style:name="T4" style:family="text">
      <style:text-properties officeooo:rsid="002073db"/>
    </style:style>
    <style:style style:name="T5" style:family="text">
      <style:text-properties officeooo:rsid="001eeab6"/>
    </style:style>
    <style:style style:name="T6" style:family="text">
      <style:text-properties officeooo:rsid="00171ca1"/>
    </style:style>
    <style:style style:name="T7" style:family="text">
      <style:text-properties officeooo:rsid="00182049"/>
    </style:style>
    <style:style style:name="T8" style:family="text">
      <style:text-properties officeooo:rsid="001975d8"/>
    </style:style>
    <style:style style:name="T9" style:family="text">
      <style:text-properties officeooo:rsid="00199a71"/>
    </style:style>
    <style:style style:name="T10" style:family="text">
      <style:text-properties officeooo:rsid="001c4948"/>
    </style:style>
    <style:style style:name="T11" style:family="text">
      <style:text-properties officeooo:rsid="0029f98d"/>
    </style:style>
    <style:style style:name="T12" style:family="text">
      <style:text-properties officeooo:rsid="001d4d01"/>
    </style:style>
    <style:style style:name="T13" style:family="text">
      <style:text-properties officeooo:rsid="0022c010"/>
    </style:style>
    <style:style style:name="T14" style:family="text">
      <style:text-properties officeooo:rsid="002688e0"/>
    </style:style>
    <style:style style:name="T15" style:family="text">
      <style:text-properties officeooo:rsid="00272148"/>
    </style:style>
    <style:style style:name="T16" style:family="text">
      <style:text-properties officeooo:rsid="0020bd5b"/>
    </style:style>
    <style:style style:name="T17" style:family="text">
      <style:text-properties officeooo:rsid="0021ef3e"/>
    </style:style>
    <style:style style:name="T18" style:family="text">
      <style:text-properties officeooo:rsid="001aada3"/>
    </style:style>
    <style:style style:name="T19" style:family="text">
      <style:text-properties officeooo:rsid="00284483"/>
    </style:style>
    <style:style style:name="T20" style:family="text">
      <style:text-properties officeooo:rsid="00285a11"/>
    </style:style>
    <style:style style:name="T21" style:family="text">
      <style:text-properties officeooo:rsid="001b9d41"/>
    </style:style>
    <style:style style:name="T22" style:family="text">
      <style:text-properties officeooo:rsid="002db95a"/>
    </style:style>
    <style:style style:name="T23" style:family="text">
      <style:text-properties officeooo:rsid="001fe9fd"/>
    </style:style>
    <style:style style:name="T24" style:family="text">
      <style:text-properties officeooo:rsid="001ea236"/>
    </style:style>
    <style:style style:name="T25" style:family="text">
      <style:text-properties officeooo:rsid="001cec27"/>
    </style:style>
    <style:style style:name="T26" style:family="text">
      <style:text-properties officeooo:rsid="00258d56"/>
    </style:style>
    <style:style style:name="T27" style:family="text">
      <style:text-properties officeooo:rsid="00285ecd"/>
    </style:style>
    <style:style style:name="T28" style:family="text">
      <style:text-properties officeooo:rsid="0029d356"/>
    </style:style>
    <style:style style:name="T29" style:family="text">
      <style:text-properties officeooo:rsid="002b294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ées de scénario :</text:p>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3"><text:a xlink:type="simple" xlink:href="#__RefHeading___Toc715_353095010" text:style-name="Index_20_Link" text:visited-style-name="Index_20_Link">Idée 1 : Travail pour proxénète, course seule<text:tab/>1</text:a></text:p>
          <text:p text:style-name="P3"><text:a xlink:type="simple" xlink:href="#__RefHeading___Toc715_353095010%20Copie%201" text:style-name="Index_20_Link" text:visited-style-name="Index_20_Link">Idée 1 : Travail pour club libertin, course multiple<text:tab/>2</text:a></text:p>
        </text:index-body>
      </text:table-of-content>
      <text:p text:style-name="P4"/>
      <text:p text:style-name="P4"/>
      <text:h text:style-name="P5" text:outline-level="1"><text:bookmark-start text:name="__RefHeading___Toc715_353095010"/>Idée 1 : <text:span text:style-name="T1">Travail pour proxénète, course seule</text:span><text:bookmark-end text:name="__RefHeading___Toc715_353095010"/></text:h>
      <text:p text:style-name="P2"/>
      <text:list xml:id="list132109049" text:style-name="L1">
        <text:list-item>
          <text:p text:style-name="P6">Plus ou moins le même postulat de départ que La Grande Course, avec Samira qui veut devenir championne. <text:span text:style-name="T1">L</text:span>es courses sont uniquement individuelles <text:span text:style-name="T2">et fonctionnent un peu comme les courses de chevaux de PMU, </text:span><text:span text:style-name="T3">où Samira serait un</text:span><text:span text:style-name="T4">e sorte de</text:span><text:span text:style-name="T3"> </text:span><text:span text:style-name="T5">j</text:span><text:span text:style-name="T3">ockey</text:span>.</text:p>
          <text:p text:style-name="P6"><text:s/></text:p>
        </text:list-item>
        <text:list-item>
          <text:p text:style-name="P6">Samira a besoin d’argent <text:span text:style-name="T6">pour s’acheter de meilleures pièces pour son planeur et de s’entraîner pour attirer l’attention de sponsors pour participer à la Grande Course. Ne pouvant pas compter sur ses parents, elle doit trouver de l’argent par elle-même, mais les petits boulots ne courent pas les rues. Elle attire cependant l’attention d’un proxénète, qui lui propose d’abord des séances photos en petite tenue pour </text:span><text:span text:style-name="T7">se faire de l’argent facile. D’abord réticente, elle constate que la qté d’argent qu’elle pourrait gagner est énorme et finit par accepter, d’abord en maillots de bain pour un public restreint, puis en lingerie sexy </text:span><text:span text:style-name="T8">pour des magazines de cul. </text:span></text:p>
          <text:p text:style-name="P6"><text:s/></text:p>
        </text:list-item>
        <text:list-item>
          <text:p text:style-name="P7">Samira cherche à garder ses opérations secrètes, mais son proxénète cherche à la pousser plus loin, voyant que la jeune fille était très populaire auprès de ses clients. Il lui propose donc ensuite des photos de nu à prix plus élevé pour l’appâter, ce qu’elle accepte à contrecœur, <text:span text:style-name="T9">puis enchaînera avec des fétiches de plus en plus extrêmes (escorte, </text:span><text:span text:style-name="T10">strip-tease</text:span><text:span text:style-name="T9">, </text:span><text:span text:style-name="T11">webcam</text:span><text:span text:style-name="T9">, fellation, gloryhole, </text:span><text:span text:style-name="T12">exhibitionisme, </text:span><text:span text:style-name="T13">vidéos </text:span><text:span text:style-name="T14">érotiques </text:span><text:span text:style-name="T15">et pornos</text:span><text:span text:style-name="T9">, etc.) jusqu’à la prostitution pure et dure.</text:span></text:p>
          <text:p text:style-name="P7"/>
        </text:list-item>
        <text:list-item>
          <text:p text:style-name="P8">Petit à petit, sa notoriété lui ouvriront des portes dans le monde du porno et de la course, l’argent lui offrant toutes les opportunités et la notoriété qu’elle n’aurait pas pu voir autrement. <text:span text:style-name="T16">Il y aura aussi des petits moments d’humour où Samira manquera de peu de se faire reconnaître en public par certains de ses clients et tentera de se déguiser, </text:span><text:span text:style-name="T17">de mentir</text:span><text:span text:style-name="T16"> ou de chercher des excuses. </text:span></text:p>
          <text:p text:style-name="P9"/>
        </text:list-item>
        <text:list-item>
          <text:p text:style-name="P10"><text:span text:style-name="T1">Optionnel : Grossesse : Samira pourra tomber enceinte de ses clients.</text:span> <text:s/>Elle pourra aussi tomber enceinte de son père lors d’une séance avec bandeaux pour baiser des inconnus, son père allant voir les putes depuis peu après s’être disputé avec sa femme. <text:span text:style-name="T18">A la fin du jeu, après avoir remporté la course, elle choisira de garder l’enfant qu’elle a eu avec son père, sans que celui-ci ne sache que c’est le sien.</text:span></text:p>
          <text:p text:style-name="P11"><text:soft-page-break/></text:p>
          <text:list>
            <text:list-item>
              <text:p text:style-name="P11"><text:span text:style-name="T9">Cependant, elle pourra vendre ses enfants à un prétendu centre d’accueil pour enfants de prostitués (qui est juste une boîte vitrine pour un fabriquant de bouffe pour animaux), ou faire une fausse couche en tombant de son planeur. </text:span><text:span text:style-name="T19">Elle ne pourra cependant plus voir ses enfants (vus qu’ils seront changés en bouffe), sous le prétexte de vouloir donner une seconde chance aux enfants et ne pas entacher leur avenir avec une mère célibataire qui fait du porno </text:span><text:span text:style-name="T20">et n’a pas les moyens de s’en occuper.</text:span></text:p>
            </text:list-item>
          </text:list>
        </text:list-item>
      </text:list>
      <text:p text:style-name="P12"/>
      <text:p text:style-name="P13"/>
      <text:h text:style-name="P14" text:outline-level="1"><text:bookmark-start text:name="__RefHeading___Toc715_353095010 Copie 1"/>Idée 1 : <text:span text:style-name="T1">Travail pour </text:span><text:span text:style-name="T21">club </text:span><text:span text:style-name="T22">de strip tease</text:span><text:span text:style-name="T21">, course mu</text:span><text:span text:style-name="T23">l</text:span><text:span text:style-name="T21">tiple</text:span><text:bookmark-end text:name="__RefHeading___Toc715_353095010 Copie 1"/></text:h>
      <text:p text:style-name="P13"/>
      <text:list text:continue-numbering="true" text:style-name="L1">
        <text:list-item>
          <text:p text:style-name="P15">Plus ou moins le même postulat de départ que La Grande Course, avec Samira qui veut devenir championne <text:span text:style-name="T24">et l</text:span>es courses <text:span text:style-name="T24">étant</text:span> <text:span text:style-name="T25">en équipe.</text:span></text:p>
          <text:p text:style-name="P15"/>
        </text:list-item>
        <text:list-item>
          <text:p text:style-name="P16">Samira a besoin d’argent <text:span text:style-name="T6">pour s’acheter de meilleures pièces pour son planeur et de s’entraîner pour attirer l’attention de sponsors pour participer à la Grande Course. Ne pouvant pas compter sur ses parents, elle doit trouver de l’argent par elle-même, mais les petits boulots ne courent pas les rues. </text:span></text:p>
          <text:p text:style-name="P16"><text:s/></text:p>
        </text:list-item>
        <text:list-item>
          <text:p text:style-name="P17">Après une altercation avec un gang durant laquelle son planeur est endommagé, Samira est recueilli par une strip-teaseuse qui parvient à lui obtenir un métier de serveuse, voyant qu’elle avait de l’expérience au resto de son père. Elle fera alors connaissance avec les autres travailleuses du sexe, et sera exposée au monde du porno, érodant peu à peu son puritanisme.</text:p>
          <text:p text:style-name="P17"><text:s/></text:p>
        </text:list-item>
        <text:list-item>
          <text:p text:style-name="P17">Mais la vraie raison de son recrutement n’est pas seulement d’être serveuse : <text:span text:style-name="T6">Elle attire l’attention d</text:span>e la patronne des lieux<text:span text:style-name="T6">, qui lui propose </text:span><text:span text:style-name="T26">de travailler aussi pour son époux, tenant un studio de photographie (qui se révélera plus tard être un studio porno), commençant d</text:span><text:span text:style-name="T6">’abord </text:span><text:span text:style-name="T26">avec </text:span><text:span text:style-name="T6">des séances photos en petite tenue pour </text:span><text:span text:style-name="T7">se faire de l’argent facile. D’abord réticente, elle constate que la qté d’argent qu’elle pourrait gagner est énorme et finit par accepter, d’abord en maillots de bain pour un public restreint, puis en lingerie sexy </text:span><text:span text:style-name="T8">pour des magazines de cul. </text:span></text:p>
          <text:p text:style-name="P17"/>
        </text:list-item>
        <text:list-item>
          <text:p text:style-name="P18">Samira cherche à garder ses opérations secrètes, mais s<text:span text:style-name="T27">es proxénètes</text:span> cherche<text:span text:style-name="T27">nt</text:span> à la pousser plus loin, voyant que la jeune fille était très populaire auprès de <text:span text:style-name="T28">leurs</text:span> clients. Il<text:span text:style-name="T28">s</text:span> <text:span text:style-name="T28">lui</text:span> propose<text:span text:style-name="T28">nt</text:span> donc ensuite des photos de nu à prix plus élevé pour l’appâter, ce qu’elle accepte à contrecœur, <text:span text:style-name="T9">puis enchaînera avec </text:span><text:span text:style-name="T29">un travail de strip-teaseuse, puis</text:span><text:span text:style-name="T9"> des fétiches de plus en plus extrêmes (escorte, </text:span><text:span text:style-name="T10">strip-tease</text:span><text:span text:style-name="T9">, </text:span><text:span text:style-name="T11">webcam</text:span><text:span text:style-name="T9">, fellation, gloryhole, </text:span><text:span text:style-name="T12">exhibitionisme, </text:span><text:span text:style-name="T13">vidéos </text:span><text:span text:style-name="T14">érotiques </text:span><text:span text:style-name="T15">et pornos</text:span><text:span text:style-name="T9">, etc.) jusqu’à la prostitution pure et dure.</text:span></text:p>
          <text:p text:style-name="P18"/>
        </text:list-item>
        <text:list-item>
          <text:p text:style-name="P19">Petit à petit, sa notoriété lui ouvriront des portes dans le monde du porno et de la course, l’argent lui offrant toutes les opportunités et la notoriété qu’elle n’aurait <text:soft-page-break/>pas pu voir autrement. <text:span text:style-name="T16">Il y aura aussi des petits moments d’humour où Samira manquera de peu de se faire reconnaître en public par certains de ses clients et tentera de se déguiser, </text:span><text:span text:style-name="T17">de mentir</text:span><text:span text:style-name="T16"> ou de chercher des excuses. </text:span></text:p>
          <text:p text:style-name="P19"><text:s/></text:p>
        </text:list-item>
        <text:list-item>
          <text:p text:style-name="P20">En parallèle, Samira n’abandonne toujours pas son rêve de devenir Coureuse, et parvient à recruter Louis et Techno dans son équipe. Samira confessera ses sentiments à Louis pour coucher avec lui avant de faire son 1er porno, et découvrira qu’il a choisi la même voie qu’elle pour gagner de l’argent. Elle acceptera de tourner des films uniquement avec lui, jusqu’à ce qu’il arrête car la paie ne vaut pas l’effort. Samira continuera cependant.</text:p>
          <text:p text:style-name="P20"><text:s/></text:p>
        </text:list-item>
        <text:list-item>
          <text:p text:style-name="P21">Elle recrutera aussi deux autres Coureurs, Simon et Modestie, deux membres d’un gang qui travailleront pour la Championne actuelle, cherchant des scandales sur ses adversaires pour les disqualifier. Ils découvriront que Samira et Louis travaillent dans le porno et leur feront du chantage pour forcer leur abandon du tournoi, tout en volant leurs planches, mais Simon et Modestie parviendront à voler les preuves et récupérer les planches avant que la situation ne dégénère.</text:p>
          <text:p text:style-name="P21"><text:s/></text:p>
        </text:list-item>
        <text:list-item>
          <text:p text:style-name="P22">L’histoire dans son ensemble parlera du monde du sexe, du fait que ce n’est pas forcément un choix et que les travailleurs du sexe sont aussi des êtres humains envers lesquels le jeu montrera un grand respect tout au long de la partie.</text:p>
        </text:list-item>
      </text:list>
      <text:p text:style-name="P2"/>
      <text:h text:style-name="Heading_20_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24M18S</meta:editing-duration>
    <meta:editing-cycles>21</meta:editing-cycles>
    <meta:generator>LibreOffice/25.2.4.3$Windows_X86_64 LibreOffice_project/33e196637044ead23f5c3226cde09b47731f7e27</meta:generator>
    <meta:creation-date>2025-10-12T19:42:34.099378500</meta:creation-date>
    <dc:title>Format de texte</dc:title>
    <dc:date>2025-10-12T20:19:26.916732400</dc:date>
    <meta:document-statistic meta:table-count="0" meta:image-count="0" meta:object-count="0" meta:page-count="3" meta:paragraph-count="34" meta:word-count="1084" meta:character-count="6387" meta:non-whitespace-character-count="5339"/>
    <meta:template xlink:type="simple" xlink:actuate="onRequest" xlink:title="Format de texte" xlink:href="file:///C:/Users/Clément/AppData/Roaming/LibreOffice/4/user/template/Format%20de%20texte1.ott" meta:date="2025-10-12T19:42:33.757144900"/>
  </office:meta>
</office:document-meta>
</file>