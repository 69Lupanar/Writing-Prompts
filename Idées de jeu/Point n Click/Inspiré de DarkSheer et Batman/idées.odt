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d3e62" officeooo:paragraph-rsid="001d3e62"/>
    </style:style>
    <style:style style:name="P2" style:family="paragraph" style:parent-style-name="Standard">
      <style:paragraph-properties fo:line-height="115%"/>
      <style:text-properties officeooo:rsid="001d3e62" officeooo:paragraph-rsid="002104fd"/>
    </style:style>
    <style:style style:name="P3" style:family="paragraph" style:parent-style-name="Standard">
      <style:paragraph-properties fo:line-height="115%"/>
      <style:text-properties officeooo:rsid="001d3e62" officeooo:paragraph-rsid="001f2a18"/>
    </style:style>
    <style:style style:name="P4" style:family="paragraph" style:parent-style-name="Standard">
      <style:paragraph-properties fo:line-height="115%"/>
      <style:text-properties officeooo:rsid="001f2a18" officeooo:paragraph-rsid="001f2a18"/>
    </style:style>
    <style:style style:name="P5" style:family="paragraph" style:parent-style-name="Standard" style:list-style-name="L1">
      <style:paragraph-properties fo:line-height="115%"/>
      <style:text-properties officeooo:rsid="001f2a18" officeooo:paragraph-rsid="001f2a18"/>
    </style:style>
    <style:style style:name="P6" style:family="paragraph" style:parent-style-name="Standard" style:list-style-name="L1">
      <style:paragraph-properties fo:line-height="115%"/>
      <style:text-properties officeooo:rsid="002980c0" officeooo:paragraph-rsid="002980c0"/>
    </style:style>
    <style:style style:name="P7" style:family="paragraph" style:parent-style-name="Standard" style:list-style-name="L1">
      <style:paragraph-properties fo:line-height="115%"/>
      <style:text-properties officeooo:rsid="001f2b29" officeooo:paragraph-rsid="001f2b29"/>
    </style:style>
    <style:style style:name="P8" style:family="paragraph" style:parent-style-name="Standard" style:list-style-name="L1">
      <style:paragraph-properties fo:line-height="115%"/>
      <style:text-properties officeooo:rsid="0022a504" officeooo:paragraph-rsid="0022a504"/>
    </style:style>
    <style:style style:name="P9" style:family="paragraph" style:parent-style-name="Standard" style:list-style-name="L1">
      <style:paragraph-properties fo:line-height="115%"/>
      <style:text-properties officeooo:rsid="002563d4" officeooo:paragraph-rsid="002563d4"/>
    </style:style>
    <style:style style:name="P10" style:family="paragraph" style:parent-style-name="Standard" style:list-style-name="L1">
      <style:paragraph-properties fo:line-height="115%"/>
      <style:text-properties officeooo:rsid="00273153" officeooo:paragraph-rsid="00273153"/>
    </style:style>
    <style:style style:name="P11" style:family="paragraph" style:parent-style-name="Standard" style:list-style-name="L1">
      <style:paragraph-properties fo:line-height="115%"/>
      <style:text-properties officeooo:rsid="00287a7a" officeooo:paragraph-rsid="00287a7a"/>
    </style:style>
    <style:style style:name="T1" style:family="text">
      <style:text-properties officeooo:rsid="002104fd"/>
    </style:style>
    <style:style style:name="T2" style:family="text">
      <style:text-properties officeooo:rsid="001f2b29"/>
    </style:style>
    <style:style style:name="T3" style:family="text">
      <style:text-properties officeooo:rsid="001f2a18"/>
    </style:style>
    <style:style style:name="T4" style:family="text">
      <style:text-properties officeooo:rsid="00237060"/>
    </style:style>
    <style:style style:name="T5" style:family="text">
      <style:text-properties officeooo:rsid="0027f3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text:p>
      <text:p text:style-name="P1"/>
      <text:p text:style-name="P1">Dans une ville américaine fictive inspirée de Gotham, la paix est maintenue par un superhéros, X, gardant les supervilains locaux sous clé depuis de nombreuses années. Cependant, au début de l’histoire, celui-ci disparaît sans faire de trace, laissant ses ennemis libres de reprendre le pouvoir.</text:p>
      <text:p text:style-name="P1"/>
      <text:p text:style-name="P2">Le protagoniste, A (le joueur peut choisir son sexe) est un jeune ordinaire sans super-pouvoir particulier, mais une ingéniosité et un sens de l’improvisation hors-pair, lui permettant de créer des gadgets et se sortir de situations impossibles. Il recevra l’appel à l’aventure malgré lui et sera contrait de reprendre le nom et l’héritage de X, faisant de lui une cible de choix pour les vilains de la ville, dont l’ancien ennemi juré de X, Y, désirant faire main basse sur la ville, puis le reste du monde <text:span text:style-name="T1">grâce aux Vils, </text:span><text:span text:style-name="T2">le syndicat du crime régnant sur la ville </text:span><text:span text:style-name="T1">dont il est le dirigeant</text:span>.</text:p>
      <text:p text:style-name="P1"/>
      <text:p text:style-name="P3">Cependant, A ne sera pas seul dans ses aventures ; en plus des quelques héros et inspecteurs venus enquêter sur la disparition de X, il sera accompagné par B, l’ancienne héroïne <text:span text:style-name="T3">disciple</text:span> de X qui l’aidera dans ses aventures.</text:p>
      <text:p text:style-name="P1"/>
      <text:p text:style-name="P4">Idées de personnages :</text:p>
      <text:p text:style-name="P4"/>
      <text:list text:style-name="L1">
        <text:list-item>
          <text:p text:style-name="P5">B, l’acolyte malgré elle de A et l’ancienne disciple de X. Au début sceptique quant aux capacités de A, elle reconnaîtra sa bravoure, son ingéniosité et sa grandeur d’âme, et en tombera amoureuse.</text:p>
        </text:list-item>
        <text:list-item>
          <text:p text:style-name="P6">Z, une inspectrice de la police enquêtant sur la disparition de X. Méfiante envers les héros qui défient constamment l’autorité publique, elle accepte néanmoins toute aide para-humaine lui permettant de mettre les vilains derrière les barreaux. Elle reconnaîtra aussi la valeur de A et l’acceptera comme héros local.</text:p>
        </text:list-item>
        <text:list-item>
          <text:p text:style-name="P7">C, l’une des supervilains composant les Vils, est une psychique capable de modifier la réalité dans un rayon restreint autour d’elle. Autrefois une jeune femme peu sûre d’elle utilisant ses pouvoirs pour faire des tours de magie dans des théâtres, ses pouvoirs attireront l’attention d’un homme dont elle tombera amoureuse ; cet homme, manipulateur, la fera travailler à son compte et commettre des crimes avant de l’abandonner à la police et partir avec ses gains. Se sentant trahie et naïve d’avoir cru à la sincérité de cet homme, elle utilise depuis ses pouvoirs pour se venger de toute figure d’autorité masculine qu’elle croise, notamment la police.</text:p>
        </text:list-item>
        <text:list-item>
          <text:p text:style-name="P8">D, un autre Vil, était autrefois un vétérinaire reclus et anitpathique, préférant la compagnie des animaux à celle des hommes depuis son enfance, trouvant ces derniers lâches et cruels <text:span text:style-name="T4">après de nombreuses expériences négatives qu’il a eu au cours de sa vie avec eux</text:span>. Constatant de la négligence et la cruauté que démontrent <text:soft-page-break/>les humains aux animaux qu’ils possèdent, D a créé son propre laboratoire dans lequel il expérimente sur des humains afin de créer des sérums capables de transformer les animaux en mutants féroces, qu’il lâche ensuite dans la ville pour accomplir ses bases besognes.</text:p>
        </text:list-item>
        <text:list-item>
          <text:p text:style-name="P9">E, un ancien psychiatre devenu Vil, en guerre froide avec Y pour la domination des Vils et de la ville. Capable de télépathie, il peut lire les émotions négatives des gens et manipuler ces derniers pour les forcer à accomplir ses ordres, que ce soit par la menace ou coercion. E tente régulièrement de rallier les autres Vils à sa cause par usage de rhétorique et en puisant dans leurs blessures psychologiques les plus profondes, et tentera même d’utiliser A pour détrôner Y avant de le trahir, puis se faire tuer par Y.</text:p>
        </text:list-item>
        <text:list-item>
          <text:p text:style-name="P10">F, une hypnotiseuse, utilisant les écrans pour contrôler quiconque les regarde trop longtemps. Y exploite ses pouvoirs pour créer un rayon hypnotiseur capable de contrôler toute la population de la ville. F réalise des enlèvements de femme<text:span text:style-name="T5">s</text:span> par pur désir sexuel, les livrant à son époux pour grossir son harem de femmes captives.</text:p>
        </text:list-item>
        <text:list-item>
          <text:p text:style-name="P11">G, une succube venu des enfers cherchant à transformer la surface en une immense orgie, ayant désacré une église pour en faire son domaine. Contrairement aux autres Vils, elle n’est pas ouvertement hostile à A et ses alliés, et leur offre même son aide pour vaincre leurs ennemis. Elle est aussi très fleur bleue et adore les histoires de romance.</text:p>
        </text:list-item>
        <text:list-item>
          <text:p text:style-name="P11">H, un gentil géant autiste ne comprenant pas bien les interactions humaines. Ayant rejoint les Vils pour rester avec ses « amis », H est la brute invincible du groupe, mais ne se bat que pour protéger ceux qu’il considère ses amis. A parviendra à le rallier à sa cause en échange d’une fem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6M40S</meta:editing-duration>
    <meta:editing-cycles>13</meta:editing-cycles>
    <meta:generator>LibreOffice/26.2.3.2$Windows_X86_64 LibreOffice_project/70e089b17412e4cb7773e41413306b17a2328c34</meta:generator>
    <meta:creation-date>2026-06-04T18:09:17.732903000</meta:creation-date>
    <dc:title>Format de texte</dc:title>
    <dc:date>2026-06-04T19:11:24.269594500</dc:date>
    <meta:document-statistic meta:table-count="0" meta:image-count="0" meta:object-count="0" meta:page-count="2" meta:paragraph-count="13" meta:word-count="746" meta:character-count="4405" meta:non-whitespace-character-count="3680"/>
    <meta:template xlink:type="simple" xlink:actuate="onRequest" xlink:title="Format de texte" xlink:href="file:///C:/Users/Clément/AppData/Roaming/LibreOffice/4/user/template/Format%20de%20texte.ott" meta:date="2026-06-04T18:09:16.873915100"/>
  </office:meta>
</office:document-meta>
</file>