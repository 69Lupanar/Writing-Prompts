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0be46c" officeooo:paragraph-rsid="000be46c"/>
    </style:style>
    <style:style style:name="P2" style:family="paragraph" style:parent-style-name="Standard" style:list-style-name="L1">
      <style:text-properties style:font-name="Calibri" officeooo:rsid="000be46c" officeooo:paragraph-rsid="000be46c"/>
    </style:style>
    <style:style style:name="P3" style:family="paragraph" style:parent-style-name="Standard">
      <style:text-properties style:font-name="Calibri" officeooo:rsid="000cfbf6" officeooo:paragraph-rsid="000cfbf6"/>
    </style:style>
    <style:style style:name="P4" style:family="paragraph" style:parent-style-name="Standard" style:list-style-name="L2">
      <style:text-properties style:font-name="Calibri" officeooo:rsid="000cfbf6" officeooo:paragraph-rsid="000cfbf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ations : </text:p>
      <text:p text:style-name="P1"/>
      <text:list xml:id="list1784778847" text:style-name="L1">
        <text:list-item>
          <text:p text:style-name="P2">Arenus pour le gameplay et l’univers SF.</text:p>
        </text:list-item>
      </text:list>
      <text:p text:style-name="P1"/>
      <text:p text:style-name="P3">Idées de scénario : </text:p>
      <text:p text:style-name="P3"/>
      <text:list xml:id="list435984986" text:style-name="L2">
        <text:list-item>
          <text:p text:style-name="P4">Un monde où la sexualité est plus débridée que dans le nôtre, faisant émerger les combats sexuels d’arène, où les hommes comme les femmes entrent en compétition et baisent leurs adversaires pour remporter des tournois à la manière de gladiateur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12T14:25:17.163000000</dc:date>
    <meta:editing-duration>PT3M26S</meta:editing-duration>
    <meta:editing-cycles>2</meta:editing-cycles>
    <meta:generator>LibreOffice/7.3.3.2$Windows_X86_64 LibreOffice_project/d1d0ea68f081ee2800a922cac8f79445e4603348</meta:generator>
    <meta:document-statistic meta:table-count="0" meta:image-count="0" meta:object-count="0" meta:page-count="1" meta:paragraph-count="4" meta:word-count="55" meta:character-count="323" meta:non-whitespace-character-count="272"/>
  </office:meta>
</office:document-meta>
</file>