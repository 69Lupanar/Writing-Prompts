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15%"/>
      <style:text-properties officeooo:rsid="001b2777" officeooo:paragraph-rsid="001b2777"/>
    </style:style>
    <style:style style:name="T1" style:family="text">
      <style:text-properties officeooo:rsid="001c42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 </text:p>
      <text:p text:style-name="P1">Un RPG où les personnages féminins peuvent facilement tomber enceintes de créatures magiques. Cette grossesse leur confère des pouvoirs liés à la bête qu’elles ont baisé. Une fois qu’elles ont accouché, elles peuvent se servir de leurs enfants comme unités au combat, mais perdent leur avantage magique, c’est pourquoi elles ont tout intérêt à rester enceinte<text:span text:style-name="T1">s</text:span> le plus longtemps possible. Cela donnerait une excuse à pourquoi les femmes de ce monde sont aussi ouvertes sur le sexe, et donne une motivation au PP de continuer à baiser tout le mond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3M55S</meta:editing-duration>
    <meta:editing-cycles>3</meta:editing-cycles>
    <meta:generator>LibreOffice/7.3.3.2$Windows_X86_64 LibreOffice_project/d1d0ea68f081ee2800a922cac8f79445e4603348</meta:generator>
    <meta:creation-date>2024-11-30T08:08:36.502000000</meta:creation-date>
    <dc:date>2024-11-30T08:12:28.607000000</dc:date>
    <meta:document-statistic meta:table-count="0" meta:image-count="0" meta:object-count="0" meta:page-count="1" meta:paragraph-count="2" meta:word-count="92" meta:character-count="556" meta:non-whitespace-character-count="465"/>
  </office:meta>
</office:document-meta>
</file>