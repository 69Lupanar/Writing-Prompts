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officeooo:rsid="001ca83e" officeooo:paragraph-rsid="001ca83e"/>
    </style:style>
    <style:style style:name="P2" style:family="paragraph" style:parent-style-name="Text_20_body" style:list-style-name="L1">
      <style:paragraph-properties fo:line-height="115%"/>
      <style:text-properties officeooo:paragraph-rsid="001ca83e"/>
    </style:style>
    <style:style style:name="P3" style:family="paragraph" style:parent-style-name="Text_20_body" style:list-style-name="L1">
      <style:paragraph-properties fo:line-height="115%"/>
      <style:text-properties officeooo:rsid="0020f8be" officeooo:paragraph-rsid="0020f8be"/>
    </style:style>
    <style:style style:name="P4" style:family="paragraph" style:parent-style-name="Text_20_body" style:list-style-name="L1">
      <style:paragraph-properties fo:line-height="115%"/>
      <style:text-properties officeooo:rsid="00202cfd" officeooo:paragraph-rsid="00202cfd"/>
    </style:style>
    <style:style style:name="P5" style:family="paragraph" style:parent-style-name="Text_20_body" style:list-style-name="L1">
      <style:paragraph-properties fo:line-height="115%"/>
      <style:text-properties officeooo:rsid="0020d56b" officeooo:paragraph-rsid="0020d56b"/>
    </style:style>
    <style:style style:name="P6" style:family="paragraph" style:parent-style-name="Text_20_body">
      <style:paragraph-properties fo:line-height="115%"/>
      <style:text-properties officeooo:rsid="0020d56b" officeooo:paragraph-rsid="0020d56b"/>
    </style:style>
    <style:style style:name="P7" style:family="paragraph" style:parent-style-name="Text_20_body">
      <style:paragraph-properties fo:line-height="115%"/>
      <style:text-properties officeooo:rsid="00231031" officeooo:paragraph-rsid="00231031"/>
    </style:style>
    <style:style style:name="P8" style:family="paragraph" style:parent-style-name="Text_20_body" style:list-style-name="L2">
      <style:paragraph-properties fo:line-height="115%"/>
      <style:text-properties officeooo:rsid="00231031" officeooo:paragraph-rsid="00231031"/>
    </style:style>
    <style:style style:name="P9" style:family="paragraph" style:parent-style-name="Text_20_body" style:list-style-name="L2">
      <style:paragraph-properties fo:line-height="115%"/>
      <style:text-properties officeooo:rsid="0027550e" officeooo:paragraph-rsid="0027550e"/>
    </style:style>
    <style:style style:name="P10" style:family="paragraph" style:parent-style-name="Text_20_body" style:list-style-name="L2">
      <style:paragraph-properties fo:line-height="115%"/>
      <style:text-properties officeooo:rsid="002a2a9c" officeooo:paragraph-rsid="002a2a9c"/>
    </style:style>
    <style:style style:name="P11" style:family="paragraph" style:parent-style-name="Text_20_body" style:list-style-name="L2">
      <style:paragraph-properties fo:line-height="115%"/>
      <style:text-properties officeooo:rsid="002ece12" officeooo:paragraph-rsid="002ece12"/>
    </style:style>
    <style:style style:name="P12" style:family="paragraph" style:parent-style-name="Text_20_body">
      <style:paragraph-properties fo:line-height="115%"/>
      <style:text-properties officeooo:rsid="002ece12" officeooo:paragraph-rsid="002ece12"/>
    </style:style>
    <style:style style:name="P13" style:family="paragraph" style:parent-style-name="Text_20_body">
      <style:paragraph-properties fo:line-height="115%"/>
      <style:text-properties officeooo:rsid="0032f721" officeooo:paragraph-rsid="0032f721"/>
    </style:style>
    <style:style style:name="P14" style:family="paragraph" style:parent-style-name="Text_20_body" style:list-style-name="L3">
      <style:paragraph-properties fo:line-height="115%"/>
      <style:text-properties officeooo:rsid="0032f721" officeooo:paragraph-rsid="0032f721"/>
    </style:style>
    <style:style style:name="P15" style:family="paragraph" style:parent-style-name="Text_20_body" style:list-style-name="L3">
      <style:paragraph-properties fo:line-height="115%"/>
      <style:text-properties officeooo:rsid="0033a361" officeooo:paragraph-rsid="0033a361"/>
    </style:style>
    <style:style style:name="P16" style:family="paragraph" style:parent-style-name="Text_20_body">
      <style:paragraph-properties fo:line-height="115%"/>
      <style:text-properties officeooo:rsid="0034ad4c" officeooo:paragraph-rsid="0034ad4c"/>
    </style:style>
    <style:style style:name="P17" style:family="paragraph" style:parent-style-name="Text_20_body" style:list-style-name="L4">
      <style:paragraph-properties fo:line-height="115%"/>
      <style:text-properties officeooo:rsid="0034ad4c" officeooo:paragraph-rsid="0034ad4c"/>
    </style:style>
    <style:style style:name="P18" style:family="paragraph" style:parent-style-name="Text_20_body" style:list-style-name="L4">
      <style:paragraph-properties fo:line-height="115%"/>
      <style:text-properties officeooo:rsid="003a2084" officeooo:paragraph-rsid="003a2084"/>
    </style:style>
    <style:style style:name="P19" style:family="paragraph" style:parent-style-name="Text_20_body" style:list-style-name="L4">
      <style:paragraph-properties fo:line-height="115%"/>
      <style:text-properties officeooo:rsid="0038dc66" officeooo:paragraph-rsid="0038dc66"/>
    </style:style>
    <style:style style:name="P20" style:family="paragraph" style:parent-style-name="Text_20_body">
      <style:paragraph-properties fo:line-height="115%"/>
      <style:text-properties officeooo:rsid="001ca83e" officeooo:paragraph-rsid="0036fabe"/>
    </style:style>
    <style:style style:name="P21" style:family="paragraph" style:parent-style-name="Text_20_body" style:list-style-name="L1">
      <style:paragraph-properties fo:line-height="115%"/>
      <style:text-properties officeooo:rsid="0036fabe" officeooo:paragraph-rsid="0036fabe"/>
    </style:style>
    <style:style style:name="P22" style:family="paragraph" style:parent-style-name="Text_20_body">
      <style:paragraph-properties fo:line-height="115%"/>
      <style:text-properties officeooo:rsid="0036fabe" officeooo:paragraph-rsid="0036fabe"/>
    </style:style>
    <style:style style:name="P23" style:family="paragraph" style:parent-style-name="Text_20_body">
      <style:paragraph-properties fo:line-height="115%"/>
      <style:text-properties officeooo:rsid="00231031" officeooo:paragraph-rsid="003eadb5"/>
    </style:style>
    <style:style style:name="P24" style:family="paragraph" style:parent-style-name="Text_20_body" style:list-style-name="L2">
      <style:paragraph-properties fo:line-height="115%"/>
      <style:text-properties officeooo:rsid="00231031" officeooo:paragraph-rsid="003eadb5"/>
    </style:style>
    <style:style style:name="P25" style:family="paragraph" style:parent-style-name="Text_20_body">
      <style:paragraph-properties fo:line-height="115%"/>
      <style:text-properties officeooo:rsid="003eadb5" officeooo:paragraph-rsid="003eadb5"/>
    </style:style>
    <style:style style:name="P26" style:family="paragraph" style:parent-style-name="Text_20_body" style:list-style-name="L5">
      <style:paragraph-properties fo:line-height="115%"/>
      <style:text-properties officeooo:rsid="003eadb5" officeooo:paragraph-rsid="003eadb5"/>
    </style:style>
    <style:style style:name="P27" style:family="paragraph" style:parent-style-name="Text_20_body" style:list-style-name="L5">
      <style:paragraph-properties fo:line-height="115%"/>
      <style:text-properties officeooo:rsid="003fc1dd" officeooo:paragraph-rsid="003fc1dd"/>
    </style:style>
    <style:style style:name="P28" style:family="paragraph" style:parent-style-name="Text_20_body" style:list-style-name="L5">
      <style:paragraph-properties fo:line-height="115%"/>
      <style:text-properties officeooo:rsid="00407e83" officeooo:paragraph-rsid="00407e83"/>
    </style:style>
    <style:style style:name="T1" style:family="text">
      <style:text-properties officeooo:rsid="001ca83e"/>
    </style:style>
    <style:style style:name="T2" style:family="text">
      <style:text-properties officeooo:rsid="001e7ab0"/>
    </style:style>
    <style:style style:name="T3" style:family="text">
      <style:text-properties officeooo:rsid="0022570e"/>
    </style:style>
    <style:style style:name="T4" style:family="text">
      <style:text-properties officeooo:rsid="0020d56b"/>
    </style:style>
    <style:style style:name="T5" style:family="text">
      <style:text-properties officeooo:rsid="002481a5"/>
    </style:style>
    <style:style style:name="T6" style:family="text">
      <style:text-properties officeooo:rsid="0026327c"/>
    </style:style>
    <style:style style:name="T7" style:family="text">
      <style:text-properties officeooo:rsid="00291fd2"/>
    </style:style>
    <style:style style:name="T8" style:family="text">
      <style:text-properties officeooo:rsid="003210a5"/>
    </style:style>
    <style:style style:name="T9" style:family="text">
      <style:text-properties officeooo:rsid="002c9e32"/>
    </style:style>
    <style:style style:name="T10" style:family="text">
      <style:text-properties officeooo:rsid="002d15b4"/>
    </style:style>
    <style:style style:name="T11" style:family="text">
      <style:text-properties officeooo:rsid="002e7773"/>
    </style:style>
    <style:style style:name="T12" style:family="text">
      <style:text-properties officeooo:rsid="00304bfd"/>
    </style:style>
    <style:style style:name="T13" style:family="text">
      <style:text-properties officeooo:rsid="0031427a"/>
    </style:style>
    <style:style style:name="T14" style:family="text">
      <style:text-properties officeooo:rsid="0031c494"/>
    </style:style>
    <style:style style:name="T15" style:family="text">
      <style:text-properties officeooo:rsid="0033a361"/>
    </style:style>
    <style:style style:name="T16" style:family="text">
      <style:text-properties officeooo:rsid="003ba28b"/>
    </style:style>
    <style:style style:name="T17" style:family="text">
      <style:text-properties officeooo:rsid="003d9982"/>
    </style:style>
    <style:style style:name="T18" style:family="text">
      <style:text-properties officeooo:rsid="00363197"/>
    </style:style>
    <style:style style:name="T19" style:family="text">
      <style:text-properties officeooo:rsid="003a07b1"/>
    </style:style>
    <style:style style:name="T20" style:family="text">
      <style:text-properties officeooo:rsid="0036fabe"/>
    </style:style>
    <style:style style:name="T21" style:family="text">
      <style:text-properties officeooo:rsid="003eadb5"/>
    </style:style>
    <style:style style:name="T22" style:family="text">
      <style:text-properties officeooo:rsid="004116f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1"/>
      <text:list xml:id="list1098809367" text:style-name="L1">
        <text:list-item>
          <text:p text:style-name="P2"><text:span text:style-name="T1">Un jeune homme sans talent particulier qui rêve de devenir un héros dans un monde médiéval peuplé de chevaliers, royaumes et monstres. </text:span><text:span text:style-name="T2">D’abord dénigré par ses pairs, il se fera lentement un nom dans son monde, d’abord en aidant des étrangers dans le besoin, puis en sauvant des vies, sa quête culminant en un conflit avec des forces démoniaques cherchant à conquérir le monde. Petit à petit, il ralliera des gens à sa cause et les ouvrira à sa vision du monde, au point d’être aimé et respecté par bon nombre de sujets du royaume.</text:span></text:p>
        </text:list-item>
        <text:list-item>
          <text:p text:style-name="P3">Il est malgré lui empêtré dans les complots du royaume lorsqu’il sauve la vie d’une jeune fille ordinaire ayant été témoin d’un complot contre l’ordre établi. Bien que ces gens soient ordinaires, il doivent s’enfuir et prendre les armes pour se protéger des attaques contre leurs vies, <text:span text:style-name="T3">se mêlant davantage des affaires du royaume.</text:span></text:p>
        </text:list-item>
        <text:list-item>
          <text:p text:style-name="P4">Le monde de ce jeu est peuplé de différentes races en plus des humains, et toutes sont en conflit régulier avec les autres, leur monde n’ayant jamais connu une période de paix entre les espèces depuis le meu<text:span text:style-name="T4">r</text:span>tre de X, un héros humain dont le rêve était d’apporter la paix entre humains et les autres espèces.</text:p>
        </text:list-item>
        <text:list-item>
          <text:p text:style-name="P5">Ce monde a été conçu par plusieurs dieux, capables de sélectionner des êtres de la surface comme champions appelés « Agents ». Les dieux prêtent alors leurs pouvoirs à ces agents à condition que ceux-ci appliquent leurs valeurs et règles en combat. Certains dieux n’apprécient pas les actes allant à l’encontre de leurs valeurs et peuvent excommunier les agents trahissant ces dernières, ou punir ceux se convertissant à un autre dieu.</text:p>
        </text:list-item>
      </text:list>
      <text:p text:style-name="P6"/>
      <text:p text:style-name="P7">Idée de scénario n°1 :</text:p>
      <text:list xml:id="list3155347645" text:style-name="L2">
        <text:list-item>
          <text:p text:style-name="P8">Le protagoniste, A, vit dans un monde médiéval où les humains cohabitent difficilement avec d’autres espèces anthropomorphes, <text:span text:style-name="T5">résultant en de nombreuses guerres entre eux. </text:span><text:span text:style-name="T6">Ce monde a failli atteindre la paix grâce à un héros humain, B, ayant réussi à rassembler une équipe des champions de chaque espèce afin de mettre à un terme à la longue guerre qui ravageait le continent. Il fut cependant tué lors d’une bataille décisive, ce qui a conduit à l’anéantissement de ses efforts.</text:span></text:p>
        </text:list-item>
        <text:list-item>
          <text:p text:style-name="P9">A vit dans un royaume aux frontières servant de médiateur entre deux autres royaumes en conflit entre eux. <text:span text:style-name="T7">Il est le fils de C, un haut-mage </text:span><text:span text:style-name="T8">de combat</text:span><text:span text:style-name="T7"> ayant autrefois servi dans l’armée, et D, une chevalière royale et générale respectée et adulée de l’armée du pays, et une agente de D*, un des nombreux dieux de ce monde, lui accordant ses pouvoirs divins à la tête des bataillons qu’elle emmène à la </text:span><text:soft-page-break/><text:span text:style-name="T7">victoire.</text:span></text:p>
          <text:p text:style-name="P9"><text:s/></text:p>
        </text:list-item>
        <text:list-item>
          <text:p text:style-name="P10">Autrefois un jeune écuyer brillant à l’académie de Combat et de Magie de la capitale, A ne supportait plus de vivre dans l’ombre de ses parents et souhaitait suivre son propre chemin et prouver sa valeur par lui-même. Il a donc quitté l’académie et s’est enfui loin de sa famille afin de devenir un aventurier, aidant les gens partout où il allait, et accomplissant des quêtes pour gagner sa vie, préférant ce style de vie plus éreintant mais satisfaisant à la vie facile qu’il vivait jusqu’alors. <text:span text:style-name="T9">Bien qu’il sache se servir de la magie, il n’aime pas s’en servir car il aime le goût de l’effort ; de plus, A possède l’unique capacité d’être en phase avec tous les dieux, pouvant puiser mineurement dans leurs pouvoirs divins sans réelle conséquence néfaste sur son corps et son esprit, ce qui l’a toujours troublé étant plus jeune </text:span><text:span text:style-name="T10">depuis son contact accidentel avec A*, un dieu banni qui l’observe depuis </text:span><text:span text:style-name="T11">ce jour.</text:span></text:p>
        </text:list-item>
        <text:list-item>
          <text:p text:style-name="P11">A vit donc une vie tranquille d’aventurier dans un petit village loin de la capitale, jusqu’au jour où, lors d’une <text:span text:style-name="T12">excursion dans un village reculé du royaume pour une quête, il découvre ce village mis à feu et à sang, et sauve de justesse une jeune fille sur le point d’être tuée par des mercenaires, </text:span><text:span text:style-name="T13">avant de la cacher au village de la gui</text:span><text:span text:style-name="T14">l</text:span><text:span text:style-name="T13">de.</text:span></text:p>
        </text:list-item>
      </text:list>
      <text:p text:style-name="P12"/>
      <text:p text:style-name="P13">Idées de personnages : </text:p>
      <text:list text:style-name="L3">
        <text:list-item>
          <text:p text:style-name="P14"><text:span text:style-name="T15">E</text:span>, une fille de fermière emmêlée malgré elle dans un complot nécessitant sa mort pour se dérouler sans accroc. Après que A la sauve d’un incendie ravageant son village, il la laissera vivre dans ses appartements quelques temps, avant de l’emmener dans le royaume voisin pour la protéger. Tous deux développeront des sentiments l’un pour l’autre et finiront en couple. En parallèle, B rejoindra un ordre militaire féminin, désireuse d’apprendre à se protéger et ne plus se reposer sur A pour sa sécurité. <text:span text:style-name="T16">Elle finira par vénérer un dieu de la violence, lui apprenant à exprimer par la force la colère et le chagrin qu’elle gardait enfermés en elle depuis la mort de ses parents, </text:span><text:span text:style-name="T17">et lui apprendra à assumer pleinement ses désirs, sexuels ou autre.</text:span></text:p>
        </text:list-item>
        <text:list-item>
          <text:p text:style-name="P15">F, un ancien camarade de B, qui fut alors un guerrier légendaire, a depuis sombré dans l’oubli depuis la mort de ce dernier. Coureur de jupons, il est surtout réputé pour baiser tout ce qui bouge, humaines comme animorphes ; c’est un mécanisme de défense qu’il a développé pour fuir ses regrets de ne pas avoir dit à sa fiancé qu’il l’aimait avant sa mort. Il apprendra à arrêter de jouer avec le cœur des femmes et à se caser avec une femme à la fin du récit.</text:p>
        </text:list-item>
        <text:list-item>
          <text:p text:style-name="P15">G, un mage noir autrefois servant le camp ennemi, ayant déserté celui-ci pour servir <text:soft-page-break/>de compagnon de voyage/combat et mentor à B et son équipe. Depuis leur échec, G est devenu un homme aigri, se sermonnant chaque jour de ne pas avoir été à la hauteur malgré les mois passés à entraîner ses disciples. En voyant A et ses progrès ainsi que ceux de ses amis, G voit en eux l’équipe qu’il avait suivi autrefois, et acceptera vers la fin de l’histoire de leur servir de mentor, apprenant à A la magie noire interdite, que son corps de démon lui permet de contrôler.</text:p>
        </text:list-item>
      </text:list>
      <text:p text:style-name="P16"/>
      <text:p text:style-name="P16">Idées de passages intéressants : </text:p>
      <text:list text:style-name="L4">
        <text:list-item>
          <text:p text:style-name="P17">Afin de protéger la jeune fille, le PP la cache dans un cabaret, faisant appel à une dette qu’une des employées lui devait après lui avoir sauvé la vie. Travaillant d’abord comme nettoyeuse pour compenser le propriétaire, une des danseuses du cabaret tombe malade qques jours avant une démonstration et la jf doit prendre sa place. Le PP, après l’avoir découvert, s’offusque de la voir prendre de tels risques pour sa sécurité, mais l’organisatrice de la performance lui assure que son identité reste cachée. La jf, trouvant l’expérience amusante, accepte de continuer à danser, mais déchante rapidement quand elle apprend que ce cabaret est plus proche de la maison close que d’un théâtre. <text:span text:style-name="T18">Ce passage servirait comme témoin de la gentillesse du PP et de la jf, et de montrer l’envers de ces performances, montrant les répétitions, l’entraide entre les danseuses et le lien d’amitié qui se tisse entre la jf et elles.</text:span></text:p>
        </text:list-item>
        <text:list-item>
          <text:p text:style-name="P18">Le PP serait né de l’union du héros de la légende et de la reine des démons, faisant de lui et sa sœur jumelle ds demi-démons. Le héros souhaite élever leurs enfants dans la paix, mais la reine, soucieuse de sa succession, au héros un compromis : Prendre l’un de ses enfants et l’emmener en sûreté, tandis qu’elle élève l’autre comme son successeur ; s’il refuse, elle le tuera et gardera les deux enfants. Tiraillé par ce choix, il décide d’en emmener un au hasard – le PP – et de revenir plus tard affronter sa compagne pour récupérer l’autre mais échouera, avant qu’elle ne le tue. Les deux enfants vivront donc leurs vies séparées, le PP vivant au sein d’une famille aimante et suivant ses idéaux, tandis que sa sœur vit au sein des complots politiques et suit son devoir, aigrie et jalouse de la vie de son frère jumeau.</text:p>
        </text:list-item>
        <text:list-item>
          <text:p text:style-name="P19">Inspiré de la présentation de Barbe Noire de OnePiece : </text:p>
          <text:list>
            <text:list-item>
              <text:p text:style-name="P19">le PP est un jeune homme empli d’ambition, cherchant à atteindre la coexistence entre les races peuplant le monde. Si lui pense y arriver en résolvant les problèmes des habitants et en menant l’exemple en en faisant cohabiter dans son équipe, il croise la route de Z, un homme charismatique cherchant à accomplir la même chose, mais pensant que cela ne peut être atteint que par la violence, en tuant les grands hommes influents maintenant le statut quo. Les <text:soft-page-break/>deux persos sont les deux faces d’une même pièce, le PP étant terrorisé par Z, ayant été très tenté de le rejoindre lors de leur 1è confrontation, inspiré par son charisme et son ambition.</text:p>
            </text:list-item>
            <text:list-item>
              <text:p text:style-name="P19">Ce même personnage, Z, va également recruter Y, une jeune maîtresse assassine autrefois l’amie du PP mais s’étant séparée de lui dû à différents idéaux, qui a rejoint Z par but commun, elle aussi possédant une ambition démesurée <text:span text:style-name="T19">et un désir de briser le statut quo</text:span>. Elle est également extrêmement compétente en infiltration et assassinat, tuant de nombreux persos importants sans jamais perdre un seul combat et sera un obstacle constant sur la route du PP.</text:p>
            </text:list-item>
          </text:list>
        </text:list-item>
      </text:list>
      <text:p text:style-name="P16"/>
      <text:p text:style-name="P20">Idées de scénario <text:span text:style-name="T20">n°2</text:span> : </text:p>
      <text:p text:style-name="P20"/>
      <text:list text:continue-list="list1098809367" text:style-name="L1">
        <text:list-item>
          <text:p text:style-name="P21">Après la disparition de A, le héros de la légende, une jeune femme monte une équipe de héros pour contrer les plans maléfiques de B, une jeune femme tentant de réveiller un démon bannit pour prendre sa revanche sur le monde. A revient plus tard dans l’histoire, et on apprend qu’il est le père de B, ayant dû la laisser derrière pour sauver le plus grand nombre. B, tourmenté par les pouvoirs démoniaques et rongée par le chagrin, a décidé de lancer son plan pour se venger de A, mais est arrêtée par celui-ci et les jeunes héros.</text:p>
        </text:list-item>
        <text:list-item>
          <text:p text:style-name="P21">Après leur célébration, A demande à C de l’aider à tuer le démon une bonne fois pour toutes, dans le dos de tout le monde. C était autrefois sous la protection de A, mais depuis sa disparition, s’est juré de le tuer, le considérant comme responsable de la mort de son père. Apprenant le vrai plan de A, réveiller le démon en faisant de lui-même son réceptacle, il apprend également que A était son gardien, ayant depuis abandonné les dieux pour se consacrer aux arts noirs en préparation pour ce moment, rongé par le regret de ne pas avoir protéger les personnes les plus chères à ses yeux. Il accepte de le tuer, et C est vu comme un héros ayant arrêté un mal naissant, bien que seul C connaisse à présent la vérité. Il décide cependant de quitter son rôle de héros, errant sur le continent à la recherche de paix intérieure.</text:p>
        </text:list-item>
      </text:list>
      <text:p text:style-name="P22"/>
      <text:p text:style-name="P23">Idée de scénario n°<text:span text:style-name="T21">3</text:span> :</text:p>
      <text:list text:continue-list="list3155347645" text:style-name="L2">
        <text:list-item>
          <text:p text:style-name="P24">L<text:span text:style-name="T21">a</text:span> protagoniste, A, <text:span text:style-name="T21">est une jeune femme vivant recluse dans un petit village depuis sa plus tendre enfance, ses parents ayant été autrefois des héros de légende ayant disparu lors de leur confrontation avec B, le seigneur démon ayant tenté alors de conquérir les Sept Continents. Maintenant adulte, A décide de quitter le domicile de sa tante, sa tutrice, pour parcourir le monde à la recherche de force et d’alliés pour </text:span><text:soft-page-break/><text:span text:style-name="T21">mettre un terme au règne de B. Au fil de son périple, elle rencontrera bon nombre de personnages, tous ayant un arc narratif qui les verra évoluer tout au long de l’histoire, avec de nombreux obstacles sur leur route desquels A les aidera à se débarrasser pour les recruter.</text:span></text:p>
        </text:list-item>
      </text:list>
      <text:p text:style-name="P23"/>
      <text:p text:style-name="P25">Idées de personnages :</text:p>
      <text:list text:style-name="L5">
        <text:list-item>
          <text:p text:style-name="P26">A’ est la mère de A et l’un des rares héros de la légende ayant survécu à l’assaut final contre B. Si les autres héros ont choisi de faire profil bas pour former la prochaine génération de héros, A’ a choisi de rejoindre les rangs de B afin d’utiliser sa position pour diminuer l’influence de B autant qu’elle le pouvait sans lever de soupçons. Contrairement aux autres, elle tentera d’arrêter le voyage d’A à de nombreuses reprises, ne souhaitant pas voir sa fille de mettre en danger, lui préférant une vie de servitude sous l’empire de B que de la voir mourir inutilement. Sous la bannière de B, A’ est une générale se battant presque toujours à dos d’un cheval démoniaque. <text:span text:style-name="T22">L’âme de son époux, le père de A et chef des héros, est enfermée dans son épée par B pour le punir de s’être levé contre lui.</text:span></text:p>
        </text:list-item>
        <text:list-item>
          <text:p text:style-name="P27">C est une fille-dragon venant d’une village du continent désertique. Enfant bâtarde de l’union d’un dragon et d’un humain qui l’ont abandonné, C a vécu toute sa vie sous la loi du plus fort, jusqu’à ce que A la batte et lui apprenne à user de sa force pour protéger les plus faibles. Fière de sa force, C ne se bat qu’avec ses griffes et son feu.</text:p>
        </text:list-item>
        <text:list-item>
          <text:p text:style-name="P27">D est la fille d’un ingénieur de renom responsable pour la création d’automates magiques, armes et moyens de transports steampunk aperçus à travers l’histoire. Les parents de D ont été tués par un collègue jaloux qui souhaitait s’approprier sa gloire et sa fortune, ne laissant la jeune fille que D’, l’automate majordome de sa famille. Depuis l’incident, D cherche à se venger de l’homme qui lui a tout pris ; bien que A l’aide à l’arrêter, elle lui montre que protéger les autres grâce à ses créations est plus important que se ruiner à poursuivre une vengeance inutile. D est elle-même brillante, capable de créer et contrôler toutes sortes d’armes et automates, et ira jusqu’à améliorer les armes et armures de son équipe.</text:p>
        </text:list-item>
        <text:list-item>
          <text:p text:style-name="P28">E est une jeune femme d’affaire ayant repris le réseau de fret maritime de son père. A la tête d’une grande fortune, elle sera la source principale de ressources pour l’équipe et leur permettra de se servir de ses bateaux pour voyager entre les continents. E manie l’hallebarde comme personne, ayant servi dans l’armée de son pays pendant plusieurs années comme service militaire, intégrée de force par son père qui souhaitait lui apprendre la dureté de la vie et à se défendr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H11M52S</meta:editing-duration>
    <meta:editing-cycles>30</meta:editing-cycles>
    <meta:generator>LibreOffice/25.2.4.3$Windows_X86_64 LibreOffice_project/33e196637044ead23f5c3226cde09b47731f7e27</meta:generator>
    <meta:creation-date>2023-07-06T19:36:21.618000000</meta:creation-date>
    <dc:date>2026-04-26T21:22:01.497982700</dc:date>
    <meta:document-statistic meta:table-count="0" meta:image-count="0" meta:object-count="0" meta:page-count="5" meta:paragraph-count="31" meta:word-count="2317" meta:character-count="13013" meta:non-whitespace-character-count="10742"/>
  </office:meta>
</office:document-meta>
</file>