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officeooo:rsid="001d032b" officeooo:paragraph-rsid="001d032b"/>
    </style:style>
    <style:style style:name="P2" style:family="paragraph" style:parent-style-name="Text_20_body" style:list-style-name="L1">
      <style:paragraph-properties fo:line-height="115%"/>
      <style:text-properties officeooo:rsid="001d032b" officeooo:paragraph-rsid="001d032b"/>
    </style:style>
    <style:style style:name="P3" style:family="paragraph" style:parent-style-name="Text_20_body" style:list-style-name="L1">
      <style:paragraph-properties fo:line-height="115%"/>
      <style:text-properties officeooo:rsid="0027bf96" officeooo:paragraph-rsid="0027bf96"/>
    </style:style>
    <style:style style:name="P4" style:family="paragraph" style:parent-style-name="Text_20_body" style:list-style-name="L1">
      <style:paragraph-properties fo:line-height="115%"/>
      <style:text-properties officeooo:rsid="002081b7" officeooo:paragraph-rsid="0027bf96"/>
    </style:style>
    <style:style style:name="P5" style:family="paragraph" style:parent-style-name="Text_20_body" style:list-style-name="L1">
      <style:paragraph-properties fo:line-height="115%"/>
      <style:text-properties officeooo:rsid="001e7006" officeooo:paragraph-rsid="0027bf96"/>
    </style:style>
    <style:style style:name="P6" style:family="paragraph" style:parent-style-name="Text_20_body" style:list-style-name="L1">
      <style:paragraph-properties fo:line-height="115%"/>
      <style:text-properties officeooo:rsid="001d4501" officeooo:paragraph-rsid="0027bf96"/>
    </style:style>
    <style:style style:name="P7" style:family="paragraph" style:parent-style-name="Text_20_body" style:list-style-name="L1">
      <style:paragraph-properties fo:line-height="115%"/>
      <style:text-properties officeooo:rsid="00272f32" officeooo:paragraph-rsid="0027db12"/>
    </style:style>
    <style:style style:name="P8" style:family="paragraph" style:parent-style-name="Text_20_body" style:list-style-name="L1">
      <style:paragraph-properties fo:line-height="115%"/>
      <style:text-properties officeooo:rsid="002cdcd7" officeooo:paragraph-rsid="002cdcd7"/>
    </style:style>
    <style:style style:name="P9" style:family="paragraph" style:parent-style-name="Text_20_body" style:list-style-name="L1">
      <style:paragraph-properties fo:line-height="115%"/>
      <style:text-properties officeooo:rsid="0028d5a3" officeooo:paragraph-rsid="0028d5a3"/>
    </style:style>
    <style:style style:name="P10" style:family="paragraph" style:parent-style-name="Text_20_body" style:list-style-name="L1">
      <style:paragraph-properties fo:line-height="115%"/>
      <style:text-properties officeooo:rsid="001d4501" officeooo:paragraph-rsid="002c12a2"/>
    </style:style>
    <style:style style:name="P11" style:family="paragraph" style:parent-style-name="Text_20_body" style:list-style-name="L1">
      <style:paragraph-properties fo:line-height="115%"/>
      <style:text-properties officeooo:rsid="001dd886" officeooo:paragraph-rsid="002c12a2"/>
    </style:style>
    <style:style style:name="P12" style:family="paragraph" style:parent-style-name="Text_20_body" style:list-style-name="L1">
      <style:paragraph-properties fo:line-height="115%"/>
      <style:text-properties officeooo:rsid="001dd886" officeooo:paragraph-rsid="0028d5a3"/>
    </style:style>
    <style:style style:name="P13" style:family="paragraph" style:parent-style-name="Text_20_body" style:list-style-name="L1">
      <style:paragraph-properties fo:line-height="115%"/>
      <style:text-properties officeooo:rsid="001e7006" officeooo:paragraph-rsid="0028d5a3"/>
    </style:style>
    <style:style style:name="P14" style:family="paragraph" style:parent-style-name="Text_20_body" style:list-style-name="L1">
      <style:paragraph-properties fo:line-height="115%"/>
      <style:text-properties officeooo:rsid="001dd886" officeooo:paragraph-rsid="001dd886"/>
    </style:style>
    <style:style style:name="P15" style:family="paragraph" style:parent-style-name="Text_20_body" style:list-style-name="L1">
      <style:paragraph-properties fo:line-height="115%"/>
      <style:text-properties officeooo:rsid="0027bb35" officeooo:paragraph-rsid="0028d5a3"/>
    </style:style>
    <style:style style:name="P16" style:family="paragraph" style:parent-style-name="Text_20_body">
      <style:paragraph-properties fo:line-height="115%"/>
      <style:text-properties officeooo:rsid="0027bb35" officeooo:paragraph-rsid="0028d5a3"/>
    </style:style>
    <style:style style:name="P17" style:family="paragraph" style:parent-style-name="Text_20_body" style:list-style-name="L1">
      <style:paragraph-properties fo:line-height="115%"/>
      <style:text-properties officeooo:rsid="002ee3b7" officeooo:paragraph-rsid="002ee3b7"/>
    </style:style>
    <style:style style:name="T1" style:family="text">
      <style:text-properties officeooo:rsid="001d032b"/>
    </style:style>
    <style:style style:name="T2" style:family="text">
      <style:text-properties officeooo:rsid="001d4501"/>
    </style:style>
    <style:style style:name="T3" style:family="text">
      <style:text-properties officeooo:rsid="002081b7"/>
    </style:style>
    <style:style style:name="T4" style:family="text">
      <style:text-properties officeooo:rsid="0027bf96"/>
    </style:style>
    <style:style style:name="T5" style:family="text">
      <style:text-properties officeooo:rsid="00271cb1"/>
    </style:style>
    <style:style style:name="T6" style:family="text">
      <style:text-properties officeooo:rsid="002ce317"/>
    </style:style>
    <style:style style:name="T7" style:family="text">
      <style:text-properties officeooo:rsid="002ed23d"/>
    </style:style>
    <style:style style:name="T8" style:family="text">
      <style:text-properties officeooo:rsid="002a67a4"/>
    </style:style>
    <style:style style:name="T9" style:family="text">
      <style:text-properties officeooo:rsid="001e7006"/>
    </style:style>
    <style:style style:name="T10" style:family="text">
      <style:text-properties officeooo:rsid="0032d6e4"/>
    </style:style>
    <style:style style:name="T11" style:family="text">
      <style:text-properties officeooo:rsid="0033dea4"/>
    </style:style>
    <style:style style:name="T12" style:family="text">
      <style:text-properties officeooo:rsid="0035663b"/>
    </style:style>
    <style:style style:name="T13" style:family="text">
      <style:text-properties officeooo:rsid="0035a859"/>
    </style:style>
    <style:style style:name="T14" style:family="text">
      <style:text-properties officeooo:rsid="002000db"/>
    </style:style>
    <style:style style:name="T15" style:family="text">
      <style:text-properties officeooo:rsid="002fafb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 de gameplay :</text:p>
      <text:p text:style-name="P1"/>
      <text:list text:style-name="L1">
        <text:list-item>
          <text:p text:style-name="P2">Fusion entre Gleam et Fossil Fighters.</text:p>
          <text:p text:style-name="P2"/>
        </text:list-item>
        <text:list-item>
          <text:p text:style-name="P3">Minage :</text:p>
          <text:list>
            <text:list-item>
              <text:p text:style-name="P3"><text:span text:style-name="T1">Mécanique de minage, naviguer dans une mine pour </text:span><text:span text:style-name="T2">récolter</text:span><text:span text:style-name="T1"> des minerais et fossiles.</text:span></text:p>
            </text:list-item>
            <text:list-item>
              <text:p text:style-name="P4">Mine générée procéduralement.</text:p>
            </text:list-item>
            <text:list-item>
              <text:p text:style-name="P4">Miner requiert de l’énergie. S’il n’en a plus, il est renvoyé à la base.</text:p>
            </text:list-item>
            <text:list-item>
              <text:p text:style-name="P5">Système de chaleur : Plus le joueur est profond dans la mine, plus sa jauge de chaleur augmente. S’<text:span text:style-name="T3">il a trop chaud, il perd de la santé </text:span><text:span text:style-name="T4">et</text:span> enlève une couche de vêtements. Son niveau de nudité affecte ses dialogues avec les PNJs, <text:span text:style-name="T3">et applique des bonus et malus à ses dinos en combat.</text:span></text:p>
            </text:list-item>
            <text:list-item>
              <text:p text:style-name="P6">Cases avec des effets spéciaux : Zones fragiles, gaz explosifs, <text:span text:style-name="T5">etc.</text:span></text:p>
            </text:list-item>
            <text:list-item>
              <text:p text:style-name="P7">Zones d’eau et de lave dans la mine ? Ça pourrait permettre au joueur de remonter (dans le cas de l’eau) ou de détruire d’autre cases avec la lave ?</text:p>
            </text:list-item>
            <text:list-item>
              <text:p text:style-name="P8">Méthode de minage alternative : Au lieu de creuser sur une grille, on pourrait creuser à la Sonic Colors avec le pouvoir Drill. Ça nous permettrait un mouvement plus rapide et amusant, <text:span text:style-name="T6">et ça nous permettrait un gameplay plus riche demandant plus de précision, </text:span><text:span text:style-name="T7">avec des épreuves utilisant cette mécanique.</text:span></text:p>
              <text:p text:style-name="P6"/>
            </text:list-item>
          </text:list>
        </text:list-item>
        <text:list-item>
          <text:p text:style-name="P9">Objets :</text:p>
          <text:list>
            <text:list-item>
              <text:p text:style-name="P10">Améliorations pour l’équipement du perso.</text:p>
            </text:list-item>
            <text:list-item>
              <text:p text:style-name="P11"><text:span text:style-name="T8">Fabrication</text:span> d’objets ? A voir l’utilité.</text:p>
            </text:list-item>
            <text:list-item>
              <text:p text:style-name="P12">Les dinosaures peuvent être créés à partir des fossiles récoltés. A voir si on fait une mécanique de fusion <text:span text:style-name="T9">de matériaux</text:span> ?</text:p>
            </text:list-item>
            <text:list-item>
              <text:p text:style-name="P12"><text:span text:style-name="T10">Des animaux préhistoriques pourraient être fossilisés en plus des dinosaures. Ça nous permettrait de cloner des animaux </text:span><text:span text:style-name="T11">du </text:span><text:span text:style-name="T10">genre mammouths </text:span><text:span text:style-name="T12">ou</text:span><text:span text:style-name="T10"> tigres à dents de sabre, et les fusionner avec les fossiles de dinosaures pour créer des mélanges uniques.</text:span></text:p>
            </text:list-item>
            <text:list-item>
              <text:p text:style-name="P13"><text:span text:style-name="T10">En plus des fossiles, il y aurait des insectes prisonniers dans de l’ambre. Ces insectes pourraient soit contenir de l’ADN de dinosaure </text:span><text:span text:style-name="T13">de meilleure qualité</text:span><text:span text:style-name="T10">, soit être ranimés eux-mêmes en tant qu’insectes géants.</text:span></text:p>
              <text:list>
                <text:list-header>
                  <text:p text:style-name="P14"><text:soft-page-break/></text:p>
                </text:list-header>
              </text:list>
            </text:list-item>
          </text:list>
        </text:list-item>
        <text:list-item>
          <text:p text:style-name="P3">Combat :</text:p>
          <text:list>
            <text:list-item>
              <text:p text:style-name="P14">Équipe de dinosaures accompagnant le joueur.</text:p>
            </text:list-item>
            <text:list-item>
              <text:p text:style-name="P14">Les dinosaures peuvent être envoyés au combat (ou utilisés dans le niveau pour activer certains événements ou débloquer des passages ?)</text:p>
            </text:list-item>
            <text:list-item>
              <text:p text:style-name="P13">Système de combat<text:span text:style-name="T14"> en 3v3 entre dinosaures. </text:span><text:span text:style-name="T3">Chaque dinosaure a sa propre liste d’attaque élémentaires, capacités de statut, et Talent.</text:span></text:p>
            </text:list-item>
            <text:list-item>
              <text:p text:style-name="P15">Système de terrains de combat comme dans Pokémon Reborn ? Certaines attaques peuvent changer le terrain et donner des bonus/malus aux attaques.</text:p>
            </text:list-item>
          </text:list>
        </text:list-item>
      </text:list>
      <text:p text:style-name="P16"/>
      <text:list text:continue-numbering="true" text:style-name="L1">
        <text:list-item>
          <text:p text:style-name="P17">Clonage :</text:p>
          <text:list>
            <text:list-item>
              <text:p text:style-name="P17">Le joueur doit fusionner l’ADN de différents luxurosaures pour en obtenir un clone. Ce clone peut être soit d’une espèce précise, soit un hybride d’autres espèces <text:span text:style-name="T15">requérant des conditions spécifiques (attribut, espèces ou diète des parents.)</text:span></text:p>
            </text:list-item>
            <text:list-item>
              <text:p text:style-name="P17">Le joueur peut obtenir cet ADN soit de fossiles, soit d’extraits de sperme qu’ils doivent collecter après un combat (qu’ils gagnent ou non).</text:p>
            </text:list-item>
            <text:list-item>
              <text:p text:style-name="P17">Le jeu pourrait avoir un mini-jeu de clonage similaire à celui de Fossil Fighters, mais au lieu de nettoyer des fossiles, on pourrait inséminer un œuf à partir de spermatozoïdes.</text:p>
            </text:list-item>
            <text:list-item>
              <text:p text:style-name="P17">Certains luxurosaures seraient uniques à ce mini-jeu et ne pourraient pas être obtenus naturellement, comme par ex. les hybrid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3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30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30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3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39M32S</meta:editing-duration>
    <meta:editing-cycles>26</meta:editing-cycles>
    <meta:generator>LibreOffice/26.2.3.2$Windows_X86_64 LibreOffice_project/70e089b17412e4cb7773e41413306b17a2328c34</meta:generator>
    <meta:creation-date>2026-03-30T12:48:25.470820000</meta:creation-date>
    <dc:title>Format de texte</dc:title>
    <dc:date>2026-05-04T06:32:58.060518400</dc:date>
    <meta:document-statistic meta:table-count="0" meta:image-count="0" meta:object-count="0" meta:page-count="2" meta:paragraph-count="29" meta:word-count="503" meta:character-count="2911" meta:non-whitespace-character-count="2462"/>
    <meta:template xlink:type="simple" xlink:actuate="onRequest" xlink:title="Format de texte" xlink:href="file:///C:/Users/Clément/AppData/Roaming/LibreOffice/4/user/template/Format%20de%20texte.ott" meta:date="2026-03-30T12:48:25.129325000"/>
  </office:meta>
</office:document-meta>
</file>