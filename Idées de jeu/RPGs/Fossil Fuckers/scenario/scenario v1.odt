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e7e36" officeooo:paragraph-rsid="001e7e36"/>
    </style:style>
    <style:style style:name="P2" style:family="paragraph" style:parent-style-name="Standard">
      <style:text-properties officeooo:rsid="00106f63" officeooo:paragraph-rsid="00106f63"/>
    </style:style>
    <style:style style:name="P3" style:family="paragraph" style:parent-style-name="Subtitle">
      <style:text-properties officeooo:rsid="001e7e36" officeooo:paragraph-rsid="001e7e36"/>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line-height="115%"/>
      <style:text-properties officeooo:rsid="00106f63" officeooo:paragraph-rsid="00106f63"/>
    </style:style>
    <style:style style:name="P6" style:family="paragraph" style:parent-style-name="Heading_20_1">
      <style:paragraph-properties fo:line-height="115%"/>
      <style:text-properties officeooo:rsid="001e7e36" officeooo:paragraph-rsid="001e7e36"/>
    </style:style>
    <style:style style:name="P7" style:family="paragraph" style:parent-style-name="Text_20_body">
      <style:paragraph-properties fo:line-height="115%"/>
      <style:text-properties officeooo:rsid="001dd48e" officeooo:paragraph-rsid="001e7e36"/>
    </style:style>
    <style:style style:name="P8" style:family="paragraph" style:parent-style-name="Standard">
      <style:paragraph-properties fo:line-height="115%"/>
      <style:text-properties officeooo:rsid="001e7e36" officeooo:paragraph-rsid="001e7e36"/>
    </style:style>
    <style:style style:name="P9" style:family="paragraph" style:parent-style-name="Standard">
      <style:paragraph-properties fo:line-height="115%"/>
      <style:text-properties officeooo:paragraph-rsid="003fb309"/>
    </style:style>
    <style:style style:name="P10" style:family="paragraph" style:parent-style-name="Standard">
      <style:paragraph-properties fo:line-height="115%"/>
      <style:text-properties officeooo:rsid="00106f63" officeooo:paragraph-rsid="0028f3a8"/>
    </style:style>
    <style:style style:name="P11" style:family="paragraph" style:parent-style-name="Heading_20_1">
      <style:paragraph-properties fo:line-height="115%"/>
      <style:text-properties officeooo:rsid="0028f3a8" officeooo:paragraph-rsid="0028f3a8"/>
    </style:style>
    <style:style style:name="P12" style:family="paragraph" style:parent-style-name="Text_20_body">
      <style:paragraph-properties fo:line-height="115%"/>
      <style:text-properties officeooo:rsid="001dd48e" officeooo:paragraph-rsid="0028f3a8"/>
    </style:style>
    <style:style style:name="P13" style:family="paragraph" style:parent-style-name="Text_20_body">
      <style:paragraph-properties fo:line-height="115%"/>
      <style:text-properties officeooo:rsid="0029c579" officeooo:paragraph-rsid="00300e2e"/>
    </style:style>
    <style:style style:name="P14" style:family="paragraph" style:parent-style-name="Text_20_body">
      <style:paragraph-properties fo:line-height="115%"/>
      <style:text-properties officeooo:rsid="001dd48e" officeooo:paragraph-rsid="0029c579"/>
    </style:style>
    <style:style style:name="P15" style:family="paragraph" style:parent-style-name="Standard" style:list-style-name="L1">
      <style:paragraph-properties fo:line-height="115%"/>
      <style:text-properties officeooo:rsid="003cec70" officeooo:paragraph-rsid="003fb309"/>
    </style:style>
    <style:style style:name="P16" style:family="paragraph" style:parent-style-name="Standard" style:list-style-name="L1">
      <style:paragraph-properties fo:line-height="115%"/>
      <style:text-properties officeooo:rsid="003eb873" officeooo:paragraph-rsid="0029c8b6"/>
    </style:style>
    <style:style style:name="P17" style:family="paragraph" style:parent-style-name="Standard">
      <style:paragraph-properties fo:line-height="115%"/>
      <style:text-properties officeooo:rsid="003eb873" officeooo:paragraph-rsid="0029c8b6"/>
    </style:style>
    <style:style style:name="P18" style:family="paragraph" style:parent-style-name="Standard">
      <style:paragraph-properties fo:line-height="115%"/>
      <style:text-properties officeooo:rsid="00304172" officeooo:paragraph-rsid="00448bdf"/>
    </style:style>
    <style:style style:name="P19" style:family="paragraph" style:parent-style-name="Standard">
      <style:paragraph-properties fo:line-height="115%"/>
      <style:text-properties officeooo:rsid="00304172" officeooo:paragraph-rsid="00304172"/>
    </style:style>
    <style:style style:name="P20" style:family="paragraph" style:parent-style-name="Standard">
      <style:paragraph-properties fo:line-height="115%"/>
      <style:text-properties officeooo:rsid="0031bcd2" officeooo:paragraph-rsid="0031bcd2"/>
    </style:style>
    <style:style style:name="P21" style:family="paragraph" style:parent-style-name="Heading_20_1">
      <style:paragraph-properties fo:line-height="115%"/>
      <style:text-properties officeooo:rsid="0028f3a8" officeooo:paragraph-rsid="00357830"/>
    </style:style>
    <style:style style:name="P22" style:family="paragraph" style:parent-style-name="Text_20_body">
      <style:paragraph-properties fo:line-height="115%"/>
      <style:text-properties officeooo:rsid="001dd48e" officeooo:paragraph-rsid="00357830"/>
    </style:style>
    <style:style style:name="P23" style:family="paragraph" style:parent-style-name="Text_20_body">
      <style:paragraph-properties fo:line-height="115%"/>
      <style:text-properties officeooo:rsid="0036aa22" officeooo:paragraph-rsid="0036aa22"/>
    </style:style>
    <style:style style:name="P24" style:family="paragraph" style:parent-style-name="Text_20_body">
      <style:paragraph-properties fo:line-height="115%"/>
      <style:text-properties officeooo:rsid="0031bcd2" officeooo:paragraph-rsid="00375b40"/>
    </style:style>
    <style:style style:name="P25" style:family="paragraph" style:parent-style-name="Heading_20_1">
      <style:paragraph-properties fo:line-height="115%"/>
      <style:text-properties officeooo:rsid="0028f3a8" officeooo:paragraph-rsid="00375b40"/>
    </style:style>
    <style:style style:name="P26" style:family="paragraph" style:parent-style-name="Text_20_body">
      <style:paragraph-properties fo:line-height="115%"/>
      <style:text-properties officeooo:rsid="001dd48e" officeooo:paragraph-rsid="00375b40"/>
    </style:style>
    <style:style style:name="P27" style:family="paragraph" style:parent-style-name="Text_20_body">
      <style:paragraph-properties fo:line-height="115%"/>
      <style:text-properties officeooo:rsid="0036aa22" officeooo:paragraph-rsid="00375b40"/>
    </style:style>
    <style:style style:name="P28" style:family="paragraph" style:parent-style-name="Text_20_body">
      <style:paragraph-properties fo:line-height="115%"/>
      <style:text-properties officeooo:rsid="0036aa22" officeooo:paragraph-rsid="00391a6c"/>
    </style:style>
    <style:style style:name="P29" style:family="paragraph" style:parent-style-name="Heading_20_1">
      <style:paragraph-properties fo:line-height="115%"/>
      <style:text-properties officeooo:rsid="0028f3a8" officeooo:paragraph-rsid="00391a6c"/>
    </style:style>
    <style:style style:name="P30" style:family="paragraph" style:parent-style-name="Text_20_body">
      <style:paragraph-properties fo:line-height="115%"/>
      <style:text-properties officeooo:rsid="001dd48e" officeooo:paragraph-rsid="00391a6c"/>
    </style:style>
    <style:style style:name="P31" style:family="paragraph" style:parent-style-name="Text_20_body">
      <style:paragraph-properties fo:line-height="115%"/>
      <style:text-properties officeooo:rsid="0036aa22" officeooo:paragraph-rsid="003a5cf0"/>
    </style:style>
    <style:style style:name="P32" style:family="paragraph" style:parent-style-name="Heading_20_1">
      <style:paragraph-properties fo:line-height="115%"/>
      <style:text-properties officeooo:rsid="0028f3a8" officeooo:paragraph-rsid="003a5cf0"/>
    </style:style>
    <style:style style:name="P33" style:family="paragraph" style:parent-style-name="Text_20_body">
      <style:paragraph-properties fo:line-height="115%"/>
      <style:text-properties officeooo:rsid="001dd48e" officeooo:paragraph-rsid="003a5cf0"/>
    </style:style>
    <style:style style:name="P34" style:family="paragraph" style:parent-style-name="Heading_20_1">
      <style:paragraph-properties fo:line-height="115%"/>
      <style:text-properties officeooo:rsid="003a5cf0" officeooo:paragraph-rsid="003a5cf0"/>
    </style:style>
    <style:style style:name="T1" style:family="text">
      <style:text-properties officeooo:rsid="001e7e36"/>
    </style:style>
    <style:style style:name="T2" style:family="text">
      <style:text-properties officeooo:rsid="003fdc1b"/>
    </style:style>
    <style:style style:name="T3" style:family="text">
      <style:text-properties officeooo:rsid="003cc741"/>
    </style:style>
    <style:style style:name="T4" style:family="text">
      <style:text-properties officeooo:rsid="003fb309"/>
    </style:style>
    <style:style style:name="T5" style:family="text">
      <style:text-properties officeooo:rsid="002080cb"/>
    </style:style>
    <style:style style:name="T6" style:family="text">
      <style:text-properties officeooo:rsid="002634b9"/>
    </style:style>
    <style:style style:name="T7" style:family="text">
      <style:text-properties officeooo:rsid="00217e88"/>
    </style:style>
    <style:style style:name="T8" style:family="text">
      <style:text-properties officeooo:rsid="002730ef"/>
    </style:style>
    <style:style style:name="T9" style:family="text">
      <style:text-properties officeooo:rsid="00229326"/>
    </style:style>
    <style:style style:name="T10" style:family="text">
      <style:text-properties officeooo:rsid="00375b40"/>
    </style:style>
    <style:style style:name="T11" style:family="text">
      <style:text-properties officeooo:rsid="00300e2e"/>
    </style:style>
    <style:style style:name="T12" style:family="text">
      <style:text-properties officeooo:rsid="001dd48e"/>
    </style:style>
    <style:style style:name="T13" style:family="text">
      <style:text-properties officeooo:rsid="0024e144"/>
    </style:style>
    <style:style style:name="T14" style:family="text">
      <style:text-properties officeooo:rsid="00363782"/>
    </style:style>
    <style:style style:name="T15" style:family="text">
      <style:text-properties officeooo:rsid="00291f85"/>
    </style:style>
    <style:style style:name="T16" style:family="text">
      <style:text-properties officeooo:rsid="002ac1cf"/>
    </style:style>
    <style:style style:name="T17" style:family="text">
      <style:text-properties officeooo:rsid="0040ef21"/>
    </style:style>
    <style:style style:name="T18" style:family="text">
      <style:text-properties officeooo:rsid="001f0076"/>
    </style:style>
    <style:style style:name="T19" style:family="text">
      <style:text-properties officeooo:rsid="0029c8b6"/>
    </style:style>
    <style:style style:name="T20" style:family="text">
      <style:text-properties officeooo:rsid="0041336b"/>
    </style:style>
    <style:style style:name="T21" style:family="text">
      <style:text-properties officeooo:rsid="002d5d92"/>
    </style:style>
    <style:style style:name="T22" style:family="text">
      <style:text-properties officeooo:rsid="003ecb45"/>
    </style:style>
    <style:style style:name="T23" style:family="text">
      <style:text-properties officeooo:rsid="002f29d6"/>
    </style:style>
    <style:style style:name="T24" style:family="text">
      <style:text-properties officeooo:rsid="0031bcd2"/>
    </style:style>
    <style:style style:name="T25" style:family="text">
      <style:text-properties officeooo:rsid="0031d1ba"/>
    </style:style>
    <style:style style:name="T26" style:family="text">
      <style:text-properties officeooo:rsid="0032b13c"/>
    </style:style>
    <style:style style:name="T27" style:family="text">
      <style:text-properties officeooo:rsid="00357830"/>
    </style:style>
    <style:style style:name="T28" style:family="text">
      <style:text-properties officeooo:rsid="003c0b45"/>
    </style:style>
    <style:style style:name="T29" style:family="text">
      <style:text-properties officeooo:rsid="00391a6c"/>
    </style:style>
    <style:style style:name="T30" style:family="text">
      <style:text-properties officeooo:rsid="003a5cf0"/>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ssil Fuckers</text:p>
      <text:p text:style-name="P2"/>
      <text:p text:style-name="P3">Scénario v1</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Contents_20_Heading">Sommaire</text:p>
          </text:index-title>
          <text:p text:style-name="P4"><text:a xlink:type="simple" xlink:href="#__RefHeading___Toc715_353095010" office:name="Résumé" text:style-name="Index_20_Link" text:visited-style-name="Index_20_Link">Résumé<text:tab/>1</text:a></text:p>
          <text:p text:style-name="P4"><text:a xlink:type="simple" xlink:href="#__RefHeading___Toc715_353095010%20Copie%201" office:name="Chapitre 1 – Introduction de l’univers et les mécaniques" text:style-name="Index_20_Link" text:visited-style-name="Index_20_Link">Chapitre 1 – Introduction de l’univers et les mécaniques<text:tab/>2</text:a></text:p>
          <text:p text:style-name="P4"><text:a xlink:type="simple" xlink:href="#__RefHeading___Toc715_353095010%20Copie%201%20Copie%201" office:name="Chapitre 2 – Introduction des 1ers éléments de l’intrigue" text:style-name="Index_20_Link" text:visited-style-name="Index_20_Link">Chapitre 2 – Introduction des 1ers éléments de l’intrigue<text:tab/>3</text:a></text:p>
          <text:p text:style-name="P4"><text:a xlink:type="simple" xlink:href="#__RefHeading___Toc715_353095010%20Copie%201%20Copie%201%20Copie%201" office:name="Chapitre 3 – Changement de région - Collier" text:style-name="Index_20_Link" text:visited-style-name="Index_20_Link">Chapitre 3 – Changement de région - Collier<text:tab/>3</text:a></text:p>
          <text:p text:style-name="P4"><text:a xlink:type="simple" xlink:href="#__RefHeading___Toc715_353095010%20Copie%201%20Copie%201%20Copie%201%20Copie%201" office:name="Chapitre 4 – Changement de région - Transformation" text:style-name="Index_20_Link" text:visited-style-name="Index_20_Link">Chapitre 4 – Changement de région - Transformation<text:tab/>3</text:a></text:p>
          <text:p text:style-name="P4"><text:a xlink:type="simple" xlink:href="#__RefHeading___Toc715_353095010%20Copie%201%20Copie%201%20Copie%201%20Copie%201%20Copie%201" office:name="Chapitre 5 – Changement de région - Hybrides" text:style-name="Index_20_Link" text:visited-style-name="Index_20_Link">Chapitre 5 – Changement de région - Hybrides<text:tab/>3</text:a></text:p>
          <text:p text:style-name="P4"><text:a xlink:type="simple" xlink:href="#__RefHeading___Toc715_353095010%20Copie%201%20Copie%201%20Copie%201%20Copie%201%20Copie%201%20Copie%201" office:name="Chapitre 6 – Changement de région - Rut" text:style-name="Index_20_Link" text:visited-style-name="Index_20_Link">Chapitre 6 – Changement de région - Rut<text:tab/>4</text:a></text:p>
          <text:p text:style-name="P4"><text:a xlink:type="simple" xlink:href="#__RefHeading___Toc715_353095010%20Copie%201%20Copie%201%20Copie%201%20Copie%201%20Copie%201%20Copie%201%20Copie%201" office:name="Chapitre 7 – Révélation du grand méchant et son plan" text:style-name="Index_20_Link" text:visited-style-name="Index_20_Link">Chapitre 7 – Révélation du grand méchant et son plan<text:tab/>4</text:a></text:p>
          <text:p text:style-name="P4"><text:a xlink:type="simple" xlink:href="#__RefHeading___Toc715_353095010%20Copie%201%20Copie%201%20Copie%201%20Copie%201%20Copie%201%20Copie%201%20Copie%201%20Copie%201" office:name="Chapitre 8 – Confrontation du grand méchant &amp; retournement d’intrigue" text:style-name="Index_20_Link" text:visited-style-name="Index_20_Link">Chapitre 8 – Confrontation du grand méchant &amp; retournement d’intrigue<text:tab/>4</text:a></text:p>
          <text:p text:style-name="P4"><text:a xlink:type="simple" xlink:href="#__RefHeading___Toc715_353095010%20Copie%201%20Copie%201%20Copie%201%20Copie%201%20Copie%201%20Copie%201%20Copie%201%20Copie%201%20Copie%201" office:name="Chapitre 8 – Révélation du vrai méchant et confrontation finale" text:style-name="Index_20_Link" text:visited-style-name="Index_20_Link">Chapitre 8 – Révélation du vrai méchant et confrontation finale<text:tab/>4</text:a></text:p>
          <text:p text:style-name="P4"><text:a xlink:type="simple" xlink:href="#__RefHeading___Toc715_353095010%20Copie%201%20Copie%201%20Copie%201%20Copie%201%20Copie%201%20Copie%201%20Copie%201%20Copie%201%20Copie%201%20Copie%201" office:name="Epilogue" text:style-name="Index_20_Link" text:visited-style-name="Index_20_Link">Epilogue<text:tab/>4</text:a></text:p>
        </text:index-body>
      </text:table-of-content>
      <text:p text:style-name="P5"/>
      <text:p text:style-name="P5"/>
      <text:h text:style-name="P6" text:outline-level="1"><text:bookmark-start text:name="__RefHeading___Toc715_353095010"/>Résumé<text:bookmark-end text:name="__RefHeading___Toc715_353095010"/></text:h>
      <text:p text:style-name="P7"/>
      <text:p text:style-name="P7">Dans un futur proche, les avancées technologiques ont permis de ramener les dinosaures à la vie et de <text:span text:style-name="T1">grandement augmenter leurs capacités cognitives, leur permettant d’évoluer et travailler aux côtés des humains</text:span>. Les dinosaures sont depuis devenus des partenaires proches des humains, les assistant dans toutes sortes de tâches, intellectuelles comme physiques. Police, recherche, art, sports, les dinosaures so<text:span text:style-name="T2">n</text:span>t entrés dans toutes les strates de la société humaine.</text:p>
      <text:p text:style-name="P8"/>
      <text:p text:style-name="P9"><text:span text:style-name="T1">Le protagoniste, </text:span><text:span text:style-name="T3">Dina</text:span><text:span text:style-name="T1"> (</text:span><text:span text:style-name="T4">Dina si le joueur choisit d’être une fille</text:span><text:span text:style-name="T1">) est un jeune </text:span><text:span text:style-name="T5">universita</text:span><text:span text:style-name="T6">i</text:span><text:span text:style-name="T5">re</text:span><text:span text:style-name="T1"> venant d’être accepté à l’Institut de Génétiques, un centre de recherche </text:span><text:span text:style-name="T5">basé sur une île isolée servant de parc et réserve naturelle pour les luxurosaures, les clones modernes de ces fossiles de légende. </text:span><text:span text:style-name="T7">Son rôle </text:span><text:span text:style-name="T8">sera</text:span><text:span text:style-name="T7"> non seulement celui de chercheur, dédié à la découverte des derniers secrets sur ses compagnons reptiliens, mais aussi celui de ranger, utilisant ses partenaires luxurosaures en combat pour la protection de l’écosystème fragile de l’île, non seulement contre les luxurosaures plus violents, mais aussi contre </text:span><text:span text:style-name="T9">ceux cherchant à s’en prendre aux dinosaures résidents pour leur gain personnel.</text:span></text:p>
      <text:p text:style-name="P10"/>
      <text:p text:style-name="P10"><text:soft-page-break/></text:p>
      <text:h text:style-name="P11" text:outline-level="1"><text:bookmark-start text:name="__RefHeading___Toc715_353095010 Copie 1"/>Chapitre 1 – <text:span text:style-name="T10">Introduction de l’univers et les mécaniques</text:span><text:bookmark-end text:name="__RefHeading___Toc715_353095010 Copie 1"/></text:h>
      <text:p text:style-name="P12"/>
      <text:p text:style-name="P13"><text:span text:style-name="T11">Lors de son voyage en bateau en chemin vers l’île,</text:span> <text:span text:style-name="T11">le joueur doit répondre à un questionnaire déterminant son identité, ses préférences sexuelles, et son luxurosaure de départ. Puis, </text:span>le<text:span text:style-name="T12"> PP </text:span>sera accueilli<text:span text:style-name="T12"> </text:span>par son employeur, le<text:span text:style-name="T12"> professeur Génome, un chercheur réputé pour ses recherches en génétique </text:span><text:span text:style-name="T13">sur le clonage,</text:span><text:span text:style-name="T12"> ayant grandement augmenté les capacités cognitives des dinosaures. Cependant, le prof n’est pas satisfait de ses recherches, cherchant à rapprocher toujours plus les humains et dinosaures. Sa prochaine étape : Permettre la reproduction entre les deux espèces. Bien </text:span><text:span text:style-name="T14">que</text:span><text:span text:style-name="T12"> la reproduction entre deux espèces incompatibles de dinosaures,</text:span><text:span text:style-name="T15"> autrefois impossible, </text:span><text:span text:style-name="T14">soit</text:span><text:span text:style-name="T15"> maintenant réalité</text:span><text:span text:style-name="T12">, le faire avec un humain </text:span><text:span text:style-name="T16">est</text:span><text:span text:style-name="T12"> </text:span><text:span text:style-name="T17">encore</text:span><text:span text:style-name="T12"> impossible. Bien que le sujet reste encore tabou, les esprits s’ouvrent peu à peu sur le sujet, encourageant le prof dans sa démarche.</text:span></text:p>
      <text:p text:style-name="P14">C’est pourquoi il recrute le PP pour faire partie d’un groupe de jeunes chercheurs comme lui, <text:span text:style-name="T18">partageant son idéal et sa soif de connaissance. </text:span><text:span text:style-name="T19">Le PP fera également la connaissance des deux autres personnages ppaux qui l’accompagneront tout au long de l’histoire :</text:span></text:p>
      <text:list text:style-name="L1">
        <text:list-item>
          <text:p text:style-name="P15"><text:span text:style-name="T4">Dino/</text:span><text:span text:style-name="T20">Dina</text:span>, le second assistant du professeur, partenaire du joueur au cours de l’aventure. Son sexe est celui opposé du joueur, et représente le personnage que le joueur ne choisit pas au début du jeu. Si le joueur est un garçon, <text:span text:style-name="T3">Dina</text:span> est une jeune fille extrovertie et sportive ; s’il est une fille, <text:span text:style-name="T4">Dino</text:span> est un garçon tête en l’air mais plein de bon cœur et de respect pour autrui.</text:p>
        </text:list-item>
        <text:list-item>
          <text:p text:style-name="P16"><text:span text:style-name="T19">Sullie</text:span>, <text:span text:style-name="T21">un</text:span> luxurosaure adopté par le professeur Génome après sa naissance. Doué de la capacité de parler grâce à son collier traducteur, son intelligence égale celle des brillants chercheurs du centre. Contrairement aux autres luxurosaures <text:span text:style-name="T21">du parc</text:span>, B est très timide et peu confiant en <text:span text:style-name="T22">lui</text:span>, préférant la compagnie des livres à la bagarre. <text:span text:style-name="T22">Son sexe dépend des préférences du joueur, s’il est hétéro, homo ou bi, afin de garder </text:span><text:span text:style-name="T23">Sullie</text:span><text:span text:style-name="T22"> romançable.</text:span></text:p>
        </text:list-item>
      </text:list>
      <text:p text:style-name="P17"/>
      <text:p text:style-name="P18">Suite à leur réunion, le joueur et <text:span text:style-name="T3">Dina</text:span> se verront remettre leurs luxurosaures de départ, et rejoindront la caserne locale où ils auront un combat d’entraînement pour enseigner au joueur les mécaniques de base de combat. Ils seront également accompagnés par les rangers pour leur 1è mission en équipe : Calmer un autre luxurosaure semant la panique dans le parc <text:span text:style-name="T24">après s’être échappé de son enclos</text:span>. Cette fois, le PP et <text:span text:style-name="T3">Dina</text:span> enverront leurs deux dinos en combat, enseignant au joueur la mécanique de formation. Pour le reste de la journée, le joueur sera libre d’explorer le reste du parc pour se familiariser avec les différentes attractions et services disponibles.</text:p>
      <text:p text:style-name="P19"/>
      <text:p text:style-name="P20"><text:soft-page-break/>Le lendemain, les deux protagonistes sont amenés à un site de minage pour accomplir le second rôle de leur poste : Miner à la recherche de fossiles pour créer <text:span text:style-name="T25">des</text:span> clone<text:span text:style-name="T25">s</text:span> à partir de leur ADN <text:span text:style-name="T25">afin d’agrandir leur équipe, et pour faire progresser les recherches du professeur. </text:span><text:span text:style-name="T26">Le joueur découvrira la mécanique de santé, énergie et chaleur, et pourra aussi livrer des combats contre d’autres mineurs. Il remarquera aussi la présence de meilleures objets en profondeur, qu’il ne peut pas obtenir avec ses outils actuels, qu’il devra améliorer au fil de sa progression.</text:span></text:p>
      <text:p text:style-name="P20"/>
      <text:h text:style-name="P21" text:outline-level="1"><text:bookmark-start text:name="__RefHeading___Toc715_353095010 Copie 1 Copie 1"/>Chapitre <text:span text:style-name="T27">2 – </text:span><text:span text:style-name="T10">Introduction des 1ers éléments de l’intrigue</text:span><text:bookmark-end text:name="__RefHeading___Toc715_353095010 Copie 1 Copie 1"/></text:h>
      <text:p text:style-name="P22"/>
      <text:p text:style-name="P23">Une fois le gameplay et l’univers introduit au joueur, <text:span text:style-name="T28">celui-ci peut explorer l’île et remplir des quêtes pour ses habitants, dont le professeur.</text:span></text:p>
      <text:p text:style-name="P24"/>
      <text:h text:style-name="P25" text:outline-level="1"><text:bookmark-start text:name="__RefHeading___Toc715_353095010 Copie 1 Copie 1 Copie 1"/>Chapitre <text:span text:style-name="T10">3</text:span><text:span text:style-name="T27"> – </text:span><text:span text:style-name="T10">Changement de région - Collier</text:span><text:bookmark-end text:name="__RefHeading___Toc715_353095010 Copie 1 Copie 1 Copie 1"/></text:h>
      <text:p text:style-name="P26"/>
      <text:p text:style-name="P27">Une fois le gameplay et l’univers introduit au joueur, <text:span text:style-name="T3">le professeur envoie ses juniors sur le continent pour rencontrer le professeur</text:span></text:p>
      <text:p text:style-name="P27"/>
      <text:h text:style-name="P25" text:outline-level="1"><text:bookmark-start text:name="__RefHeading___Toc715_353095010 Copie 1 Copie 1 Copie 1 Copie 1"/>Chapitre <text:span text:style-name="T10">4</text:span><text:span text:style-name="T27"> – </text:span><text:span text:style-name="T10">Changement de région - Transformation</text:span><text:bookmark-end text:name="__RefHeading___Toc715_353095010 Copie 1 Copie 1 Copie 1 Copie 1"/></text:h>
      <text:p text:style-name="P26"/>
      <text:p text:style-name="P27">Une fois le gameplay et l’univers introduit au joueur,</text:p>
      <text:p text:style-name="P27"/>
      <text:p text:style-name="P28"/>
      <text:h text:style-name="P29" text:outline-level="1"><text:bookmark-start text:name="__RefHeading___Toc715_353095010 Copie 1 Copie 1 Copie 1 Copie 1 Copie 1"/>Chapitre <text:span text:style-name="T29">5</text:span><text:span text:style-name="T27"> – </text:span><text:span text:style-name="T10">Changement de région - </text:span><text:span text:style-name="T29">Hybrides</text:span><text:bookmark-end text:name="__RefHeading___Toc715_353095010 Copie 1 Copie 1 Copie 1 Copie 1 Copie 1"/></text:h>
      <text:p text:style-name="P30"/>
      <text:p text:style-name="P28">Une fois le gameplay et l’univers introduit au joueur,</text:p>
      <text:p text:style-name="P28"/>
      <text:p text:style-name="P28"/>
      <text:h text:style-name="P29" text:outline-level="1"><text:bookmark-start text:name="__RefHeading___Toc715_353095010 Copie 1 Copie 1 Copie 1 Copie 1 Copie 1 Copie 1"/><text:soft-page-break/>Chapitre <text:span text:style-name="T30">6</text:span><text:span text:style-name="T27"> – </text:span><text:span text:style-name="T10">Changement de région - </text:span><text:span text:style-name="T29">Rut</text:span><text:bookmark-end text:name="__RefHeading___Toc715_353095010 Copie 1 Copie 1 Copie 1 Copie 1 Copie 1 Copie 1"/></text:h>
      <text:p text:style-name="P30"/>
      <text:p text:style-name="P28">Une fois le gameplay et l’univers introduit au joueur,</text:p>
      <text:p text:style-name="P28"/>
      <text:p text:style-name="P31"/>
      <text:p text:style-name="P31"/>
      <text:h text:style-name="P32" text:outline-level="1"><text:bookmark-start text:name="__RefHeading___Toc715_353095010 Copie 1 Copie 1 Copie 1 Copie 1 Copie 1 Copie 1 Copie 1"/>Chapitre <text:span text:style-name="T30">7</text:span><text:span text:style-name="T27"> – <text:s/></text:span><text:span text:style-name="T30">Révélation du grand méchant et son plan</text:span><text:bookmark-end text:name="__RefHeading___Toc715_353095010 Copie 1 Copie 1 Copie 1 Copie 1 Copie 1 Copie 1 Copie 1"/></text:h>
      <text:p text:style-name="P33"/>
      <text:p text:style-name="P31">Une fois le gameplay et l’univers introduit au joueur,</text:p>
      <text:p text:style-name="P31"/>
      <text:h text:style-name="P32" text:outline-level="1"><text:bookmark-start text:name="__RefHeading___Toc715_353095010 Copie 1 Copie 1 Copie 1 Copie 1 Copie 1 Copie 1 Copie 1 Copie 1"/>Chapitre <text:span text:style-name="T30">8</text:span><text:span text:style-name="T27"> – <text:s/></text:span><text:span text:style-name="T30">Confrontation du grand méchant &amp; retournement d’intrigue</text:span><text:bookmark-end text:name="__RefHeading___Toc715_353095010 Copie 1 Copie 1 Copie 1 Copie 1 Copie 1 Copie 1 Copie 1 Copie 1"/></text:h>
      <text:p text:style-name="P33"/>
      <text:p text:style-name="P31">Une fois le gameplay et l’univers introduit au joueur,</text:p>
      <text:p text:style-name="P31"/>
      <text:p text:style-name="P31"/>
      <text:h text:style-name="P32" text:outline-level="1"><text:bookmark-start text:name="__RefHeading___Toc715_353095010 Copie 1 Copie 1 Copie 1 Copie 1 Copie 1 Copie 1 Copie 1 Copie 1 Copie 1"/>Chapitre <text:span text:style-name="T30">8</text:span><text:span text:style-name="T27"> – <text:s/></text:span><text:span text:style-name="T30">Révélation du vrai méchant et confrontation finale</text:span><text:bookmark-end text:name="__RefHeading___Toc715_353095010 Copie 1 Copie 1 Copie 1 Copie 1 Copie 1 Copie 1 Copie 1 Copie 1 Copie 1"/></text:h>
      <text:p text:style-name="P33"/>
      <text:p text:style-name="P31">Une fois le gameplay et l’univers introduit au joueur,</text:p>
      <text:p text:style-name="P31"/>
      <text:h text:style-name="P34" text:outline-level="1"><text:bookmark-start text:name="__RefHeading___Toc715_353095010 Copie 1 Copie 1 Copie 1 Copie 1 Copie 1 Copie 1 Copie 1 Copie 1 Copie 1 Copie 1"/>Epilogue<text:bookmark-end text:name="__RefHeading___Toc715_353095010 Copie 1 Copie 1 Copie 1 Copie 1 Copie 1 Copie 1 Copie 1 Copie 1 Copie 1 Copie 1"/></text:h>
      <text:p text:style-name="P33"/>
      <text:p text:style-name="P31">Une fois le gameplay et l’univers introduit au joueu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6H39M50S</meta:editing-duration>
    <meta:editing-cycles>38</meta:editing-cycles>
    <meta:generator>LibreOffice/26.2.3.2$Windows_X86_64 LibreOffice_project/70e089b17412e4cb7773e41413306b17a2328c34</meta:generator>
    <meta:creation-date>2026-05-10T10:44:07.302796900</meta:creation-date>
    <dc:title>Format de texte</dc:title>
    <dc:date>2026-05-10T18:48:32.790340100</dc:date>
    <meta:document-statistic meta:table-count="0" meta:image-count="0" meta:object-count="0" meta:page-count="4" meta:paragraph-count="42" meta:word-count="968" meta:character-count="6046" meta:non-whitespace-character-count="5100"/>
    <meta:template xlink:type="simple" xlink:actuate="onRequest" xlink:title="Format de texte" xlink:href="file:///C:/Users/Clément/AppData/Roaming/LibreOffice/4/user/template/Format%20de%20texte.ott" meta:date="2026-05-10T10:44:06.911404200"/>
  </office:meta>
</office:document-meta>
</file>