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15%"/>
      <style:text-properties officeooo:rsid="001dd48e" officeooo:paragraph-rsid="001dd48e"/>
    </style:style>
    <style:style style:name="P2" style:family="paragraph" style:parent-style-name="Text_20_body">
      <style:paragraph-properties fo:line-height="115%"/>
      <style:text-properties officeooo:rsid="001f0f67" officeooo:paragraph-rsid="001fbfff"/>
    </style:style>
    <style:style style:name="P3" style:family="paragraph" style:parent-style-name="Text_20_body" style:list-style-name="L1">
      <style:paragraph-properties fo:line-height="115%"/>
      <style:text-properties officeooo:rsid="001f0f67" officeooo:paragraph-rsid="001fbfff"/>
    </style:style>
    <style:style style:name="P4" style:family="paragraph" style:parent-style-name="Text_20_body" style:list-style-name="L1">
      <style:paragraph-properties fo:line-height="115%"/>
      <style:text-properties officeooo:rsid="001fbfff" officeooo:paragraph-rsid="001fbfff"/>
    </style:style>
    <style:style style:name="P5" style:family="paragraph" style:parent-style-name="Text_20_body" style:list-style-name="L1">
      <style:paragraph-properties fo:line-height="115%"/>
      <style:text-properties officeooo:rsid="00375450" officeooo:paragraph-rsid="00375450"/>
    </style:style>
    <style:style style:name="P6" style:family="paragraph" style:parent-style-name="Text_20_body">
      <style:paragraph-properties fo:line-height="115%"/>
      <style:text-properties officeooo:rsid="001fc228" officeooo:paragraph-rsid="002befa7"/>
    </style:style>
    <style:style style:name="P7" style:family="paragraph" style:parent-style-name="Text_20_body" style:list-style-name="L2">
      <style:paragraph-properties fo:line-height="115%"/>
      <style:text-properties officeooo:paragraph-rsid="002befa7"/>
    </style:style>
    <style:style style:name="P8" style:family="paragraph" style:parent-style-name="Text_20_body" style:list-style-name="L2">
      <style:paragraph-properties fo:line-height="115%"/>
      <style:text-properties officeooo:rsid="002befa7" officeooo:paragraph-rsid="002befa7"/>
    </style:style>
    <style:style style:name="P9" style:family="paragraph" style:parent-style-name="Text_20_body" style:list-style-name="L2">
      <style:paragraph-properties fo:line-height="115%"/>
      <style:text-properties officeooo:rsid="00381311" officeooo:paragraph-rsid="00381311"/>
    </style:style>
    <style:style style:name="P10" style:family="paragraph" style:parent-style-name="Standard">
      <style:paragraph-properties fo:line-height="115%"/>
      <style:text-properties officeooo:paragraph-rsid="001a089c"/>
    </style:style>
    <style:style style:name="P11" style:family="paragraph" style:parent-style-name="Standard">
      <style:paragraph-properties fo:line-height="115%"/>
      <style:text-properties officeooo:rsid="002df441" officeooo:paragraph-rsid="002df441"/>
    </style:style>
    <style:style style:name="P12" style:family="paragraph" style:parent-style-name="Standard" style:list-style-name="L3">
      <style:paragraph-properties fo:line-height="115%"/>
      <style:text-properties officeooo:rsid="003cec70" officeooo:paragraph-rsid="003cec70"/>
    </style:style>
    <style:style style:name="P13" style:family="paragraph" style:parent-style-name="Standard" style:list-style-name="L3">
      <style:paragraph-properties fo:line-height="115%"/>
      <style:text-properties officeooo:rsid="003eb873" officeooo:paragraph-rsid="003eb873"/>
    </style:style>
    <style:style style:name="P14" style:family="paragraph" style:parent-style-name="Standard" style:list-style-name="L3">
      <style:paragraph-properties fo:line-height="115%"/>
      <style:text-properties officeooo:rsid="002df441" officeooo:paragraph-rsid="002df441"/>
    </style:style>
    <style:style style:name="P15" style:family="paragraph" style:parent-style-name="Standard" style:list-style-name="L3">
      <style:paragraph-properties fo:line-height="115%"/>
      <style:text-properties officeooo:rsid="002f75e2" officeooo:paragraph-rsid="002f75e2"/>
    </style:style>
    <style:style style:name="T1" style:family="text">
      <style:text-properties officeooo:rsid="003fdc1b"/>
    </style:style>
    <style:style style:name="T2" style:family="text">
      <style:text-properties officeooo:rsid="0024e144"/>
    </style:style>
    <style:style style:name="T3" style:family="text">
      <style:text-properties officeooo:rsid="00363782"/>
    </style:style>
    <style:style style:name="T4" style:family="text">
      <style:text-properties officeooo:rsid="00291f85"/>
    </style:style>
    <style:style style:name="T5" style:family="text">
      <style:text-properties officeooo:rsid="002ac1cf"/>
    </style:style>
    <style:style style:name="T6" style:family="text">
      <style:text-properties officeooo:rsid="0040ef21"/>
    </style:style>
    <style:style style:name="T7" style:family="text">
      <style:text-properties officeooo:rsid="001f0076"/>
    </style:style>
    <style:style style:name="T8" style:family="text">
      <style:text-properties officeooo:rsid="001f0f67"/>
    </style:style>
    <style:style style:name="T9" style:family="text">
      <style:text-properties officeooo:rsid="001fbfff"/>
    </style:style>
    <style:style style:name="T10" style:family="text">
      <style:text-properties officeooo:rsid="002befa7"/>
    </style:style>
    <style:style style:name="T11" style:family="text">
      <style:text-properties officeooo:rsid="001fc228"/>
    </style:style>
    <style:style style:name="T12" style:family="text">
      <style:text-properties officeooo:rsid="0021b9a6"/>
    </style:style>
    <style:style style:name="T13" style:family="text">
      <style:text-properties officeooo:rsid="002d81a4"/>
    </style:style>
    <style:style style:name="T14" style:family="text">
      <style:text-properties officeooo:rsid="0026ba94"/>
    </style:style>
    <style:style style:name="T15" style:family="text">
      <style:text-properties officeooo:rsid="001dd48e"/>
    </style:style>
    <style:style style:name="T16" style:family="text">
      <style:text-properties officeooo:rsid="0027e05c"/>
    </style:style>
    <style:style style:name="T17" style:family="text">
      <style:text-properties officeooo:rsid="003bdc20"/>
    </style:style>
    <style:style style:name="T18" style:family="text">
      <style:text-properties officeooo:rsid="00381e2f"/>
    </style:style>
    <style:style style:name="T19" style:family="text">
      <style:text-properties officeooo:rsid="003ecb45"/>
    </style:style>
    <style:style style:name="T20" style:family="text">
      <style:text-properties officeooo:rsid="0038b9c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48cm" fo:text-indent="-0.635cm" fo:margin-left="1.48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15cm" fo:text-indent="-0.635cm" fo:margin-left="2.11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5cm" fo:text-indent="-0.635cm" fo:margin-left="2.75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85cm" fo:text-indent="-0.635cm" fo:margin-left="3.38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2cm" fo:text-indent="-0.635cm" fo:margin-left="4.02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55cm" fo:text-indent="-0.635cm" fo:margin-left="4.65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9cm" fo:text-indent="-0.635cm" fo:margin-left="5.29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25cm" fo:text-indent="-0.635cm" fo:margin-left="5.92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6cm" fo:text-indent="-0.635cm" fo:margin-left="6.56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95cm" fo:text-indent="-0.635cm" fo:margin-left="7.19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ées de scénario :</text:p>
      <text:p text:style-name="P1">Dans un futur proche, les avancées technologiques ont permis de ramener les dinosaures à la vie, et de leur attacher des dispositifs capables de les faire parler. Les dinosaures sont depuis devenus des partenaires proches des humains, les assistant dans toutes sortes de tâches, intellectuelles comme physiques : Police, recherche, art, sports, les dinosaures so<text:span text:style-name="T1">n</text:span>t entrés dans toutes les strates de la société humaine.</text:p>
      <text:p text:style-name="P1">Le PP est un chercheur junior travaillant pour un centre de recherche sous la tutelle du professeur Génome, un chercheur réputé pour ses recherches en génétique <text:span text:style-name="T2">sur le clonage,</text:span> ayant grandement augmenté les capacités cognitives des dinosaures. Cependant, le prof n’est pas satisfait de ses recherches, cherchant à rapprocher toujours plus les humains et dinosaures. Sa prochaine étape : Permettre la reproduction entre les deux espèces. Bien <text:span text:style-name="T3">que</text:span> la reproduction entre deux espèces incompatibles de dinosaures,<text:span text:style-name="T4"> autrefois impossible, </text:span><text:span text:style-name="T3">soit</text:span><text:span text:style-name="T4"> maintenant réalité</text:span>, le faire avec un humain <text:span text:style-name="T5">est</text:span> <text:span text:style-name="T6">encore</text:span> impossible. Bien que le sujet reste encore tabou, les esprits s’ouvrent peu à peu sur le sujet, encourageant le prof dans sa démarche.</text:p>
      <text:p text:style-name="P1">C’est pourquoi il recrute le PP pour faire partie d’un groupe de jeunes chercheurs comme lui, <text:span text:style-name="T7">partageant son idéal et sa soif de connaissance. </text:span><text:span text:style-name="T8">Au cours de leur aventure, le PP pourra également se former une équipe de dinosaures pour se battre à ses côtés (à voir, si on met du gameplay ?)</text:span></text:p>
      <text:p text:style-name="P2">Cependant, <text:span text:style-name="T9">deux groupuscules ennemis</text:span> leur barrer<text:span text:style-name="T9">ont</text:span> constamment la route : </text:p>
      <text:list text:style-name="L1">
        <text:list-item>
          <text:p text:style-name="P3">Le groupe C, un groupe de traditionalistes et d’extrémistes religieux, qui voient la résurrection des dinosaures et l’accouplement inter-espèces comme contre-nature, et tenteront régulièrement de contrecarrer le travail du professeur.</text:p>
        </text:list-item>
        <text:list-item>
          <text:p text:style-name="P4">Le groupe D, un groupe de criminels et de mercenaires qui ont volé les données des recherches du professeur pour créer des dinosaures super-soldats pour les vendre comme milice privée. Ces criminels financent leurs actions à travers le mercenariat, mais aussi le trafic et la prostitution de dinosaures.</text:p>
        </text:list-item>
        <text:list-item>
          <text:p text:style-name="P5">Le groupe E, un groupe de protection des dinosaures souhaitant rompre l’emprise des humains sur leurs compagnons reptiliens et leur offrir un endroit où vivre libre de toute influence humaine. Parmi eux, un vétérinaire travaillant pour un des centres de recherche que visitera le PP (à voir lequel) ; ce vétérinaire déteste voir des dinosaures blessés ou malades, et blâme les chercheurs pour les cloner encore et encore sans raison valable autre que leur propre amusement, leur causant ainsi des problèmes dus à leur inadaptabilité au monde moderne.</text:p>
        </text:list-item>
      </text:list>
      <text:p text:style-name="P6">Au fil de l’histoire, le joueur pourra être envoyé à différents centres de recherche, travaillant pour d’autres professeurs partageant la passion de Génome. Nombreux d’entre eux sont intéressés par la coexistence entre humains dinosaures, notamment :</text:p>
      <text:list text:style-name="L2">
        <text:list-item>
          <text:p text:style-name="P7"><text:soft-page-break/><text:span text:style-name="T10">U</text:span><text:span text:style-name="T11">ne chercheuse travaillant sur un prototype d’un élixir transformant les humains en dinosaures, et </text:span><text:span text:style-name="T12">son frère travaillant malgré lui sur le processus inverse, cherchant à rattraper les bêtises de sa sœur mais passant lui aussi pour un dalleux malgré lui ; </text:span><text:span text:style-name="T13">ses préférences portant plus sur l’étude des origines des dinosaures et leur amélioration génétique, offrant au joueur de booster ses dinosaures en combat.</text:span></text:p>
        </text:list-item>
        <text:list-item>
          <text:p text:style-name="P7"><text:span text:style-name="T10">U</text:span><text:span text:style-name="T14">n autre ami de Génome, un homme responsable pour</text:span><text:span text:style-name="T15"> la création du </text:span><text:span text:style-name="T16">tout nouveau</text:span><text:span text:style-name="T15"> collier traducteur que portent </text:span><text:span text:style-name="T14">certains</text:span><text:span text:style-name="T15"> dinosaures ajd’hui.</text:span></text:p>
        </text:list-item>
        <text:list-item>
          <text:p text:style-name="P8">Une autre docteure, à l’origine de la réussite de la reproduction inter-espèces de dinosaures, <text:span text:style-name="T17">offrant au joueur la possibilité de créer des luxurosaures hybrides.</text:span></text:p>
        </text:list-item>
        <text:list-item>
          <text:p text:style-name="P9">Un dresseur en charge du programme de reproduction des dinosaures et de l’éducation des juvéniles. Son parc possède de nombreux dinosaures en période de rut/chaleur, et le PP devra y survivre pendant la saison des amours <text:span text:style-name="T18">alors qu’une brèche de confinement libère des dinosaures en chaleur dans le complexe (épisode à la Jurrasic Park avec un côté faussement horreur ?)</text:span></text:p>
        </text:list-item>
      </text:list>
      <text:p text:style-name="P10"/>
      <text:p text:style-name="P11">Idées de personnages : </text:p>
      <text:p text:style-name="P11"/>
      <text:list text:style-name="L3">
        <text:list-item>
          <text:p text:style-name="P12">A, le second assistant du professeur, partenaire du joueur au cours de l’aventure. Son sexe est celui opposé du joueur, et représente le personnage que le joueur ne choisit pas au début du jeu. Si le joueur est un garçon, A est une jeune fille extrovertie et sportive ; s’il est une fille, A est un garçon tête en l’air mais plein de bon cœur et de respect pour autrui.</text:p>
        </text:list-item>
        <text:list-item>
          <text:p text:style-name="P13">B, l<text:span text:style-name="T19">e</text:span> luxurosaure adopté par le professeur Génome après sa naissance. Doué de la capacité de parler grâce à son collier traducteur, son intelligence égale celle des brillants chercheurs du centre. Contrairement aux autres luxurosaures, B est très timide et peu confiant en <text:span text:style-name="T19">lui</text:span>, préférant la compagnie des livres à la bagarre. <text:span text:style-name="T19">Son sexe dépend des préférences du joueur, s’il est hétéro, homo ou bi, afin de garder B romançable.</text:span></text:p>
        </text:list-item>
        <text:list-item>
          <text:p text:style-name="P14">Une luxurosaure qui provient d’un œuf dont le PP et ses amis avaient la charge. Elle éclot en une petite carnivore affectueuse qui aime la bagarre. Elle sera capturée par le groupe D pour tester un prototype d’une machine vieillissant les dinos pour en faire des supersoldats le plus vite possible, mais elle sera sauvé par le PP et ses amis avant d’être lobotomisée. Maintenant adulte, elle rejoindra l’équipe de dinos du PP.</text:p>
          <text:p text:style-name="P14"/>
        </text:list-item>
        <text:list-item>
          <text:p text:style-name="P15">Un luxurosaure destiné à devenir une unité de combat, devenu conscient de sa condition et ayant réussi à se révolter contre ses créateurs, menant une équipe de luxurosaures afin de se venger des humains, en libérant <text:span text:style-name="T20">l’agent chimique développé </text:span><text:soft-page-break/><text:span text:style-name="T20">par l’un des professeurs pour transformer les humains en dinos, puis en leur lavant le cerveau avec les machines du groupe terroriste pour en faire des soldats contre le reste des humains.</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5H25M25S</meta:editing-duration>
    <meta:editing-cycles>38</meta:editing-cycles>
    <meta:generator>LibreOffice/25.2.4.3$Windows_X86_64 LibreOffice_project/33e196637044ead23f5c3226cde09b47731f7e27</meta:generator>
    <meta:creation-date>2026-01-23T06:28:07.991454300</meta:creation-date>
    <dc:title>Format de texte</dc:title>
    <dc:date>2026-04-24T14:15:37.056383700</dc:date>
    <meta:document-statistic meta:table-count="0" meta:image-count="0" meta:object-count="0" meta:page-count="3" meta:paragraph-count="19" meta:word-count="913" meta:character-count="5628" meta:non-whitespace-character-count="4743"/>
    <meta:template xlink:type="simple" xlink:actuate="onRequest" xlink:title="Format de texte" xlink:href="file:///C:/Users/Clément/AppData/Roaming/LibreOffice/4/user/template/Format%20de%20texte.ott" meta:date="2026-01-23T06:28:07.188886400"/>
  </office:meta>
</office:document-meta>
</file>