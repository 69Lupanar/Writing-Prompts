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03c3d4" officeooo:paragraph-rsid="0003c3d4"/>
    </style:style>
    <style:style style:name="P2" style:family="paragraph" style:parent-style-name="Standard" style:list-style-name="L1">
      <style:text-properties style:font-name="Calibri" officeooo:rsid="0003c3d4" officeooo:paragraph-rsid="0003c3d4"/>
    </style:style>
    <style:style style:name="P3" style:family="paragraph" style:parent-style-name="Standard" style:list-style-name="L1">
      <style:text-properties style:font-name="Calibri" officeooo:rsid="0004dce9" officeooo:paragraph-rsid="0003c3d4"/>
    </style:style>
    <style:style style:name="P4" style:family="paragraph" style:parent-style-name="Standard">
      <style:text-properties style:font-name="Calibri" officeooo:rsid="0004dce9" officeooo:paragraph-rsid="0003c3d4"/>
    </style:style>
    <style:style style:name="P5" style:family="paragraph" style:parent-style-name="Standard">
      <style:text-properties style:font-name="Calibri" officeooo:rsid="00057842" officeooo:paragraph-rsid="0003c3d4"/>
    </style:style>
    <style:style style:name="P6" style:family="paragraph" style:parent-style-name="Standard" style:list-style-name="L2">
      <style:text-properties style:font-name="Calibri" officeooo:rsid="00057842" officeooo:paragraph-rsid="00057842"/>
    </style:style>
    <style:style style:name="P7" style:family="paragraph" style:parent-style-name="Standard">
      <style:text-properties style:font-name="Calibri" officeooo:rsid="00057842" officeooo:paragraph-rsid="00057842"/>
    </style:style>
    <style:style style:name="P8" style:family="paragraph" style:parent-style-name="Standard" style:list-style-name="L2">
      <style:text-properties style:font-name="Calibri" officeooo:rsid="00061f9f" officeooo:paragraph-rsid="00061f9f"/>
    </style:style>
    <style:style style:name="T1" style:family="text">
      <style:text-properties officeooo:rsid="00049d4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text:p>
      <text:p text:style-name="P1"/>
      <text:list text:style-name="L1">
        <text:list-item>
          <text:p text:style-name="P2">Inspiré de Pokemon H Version, on incarne un jeune dresseur vivant dans un monde en harmonie avec les monstres. Dans les temps anciens, humains et monstres pouvaient se reproduire entre eux, jusqu’à [trouver un événement magique ou biologique] dissociant trop leurs ADNs pour leur permettre d’avoir des enfants ensemble. </text:p>
          <text:p text:style-name="P2"><text:s/></text:p>
        </text:list-item>
        <text:list-item>
          <text:p text:style-name="P2">Le protag travaille au service d’un scientifique cherchant à rendre la reproduction à nouveau possible. Il lui permettra de débloquer des monstres hybrides plus puissants, mais sera en conflit avec [trouver une faction ennem<text:span text:style-name="T1">i</text:span>e], qui trouve ses recherches illégales et contre-nature et cherchera à séparer monstres et humains.</text:p>
          <text:p text:style-name="P2"><text:s/></text:p>
        </text:list-item>
        <text:list-item>
          <text:p text:style-name="P3">Sur la carte, les ennemis pourraient pourchasser le joueur à vue comme dans Pkmn H version afin de le violer.</text:p>
        </text:list-item>
      </text:list>
      <text:p text:style-name="P4"/>
      <text:p text:style-name="P5">Idées de PNJs : </text:p>
      <text:p text:style-name="P5"/>
      <text:list text:style-name="L2">
        <text:list-item>
          <text:p text:style-name="P6"><text:s/>Inspiré de <text:a xlink:type="simple" xlink:href="https://www.reddit.com/r/Losercity/comments/1lxa6ba/poor_sylveon_lady_beek/" text:style-name="Internet_20_link" text:visited-style-name="Visited_20_Internet_20_Link">https://www.reddit.com/r/Losercity/comments/1lxa6ba/poor_sylveon_lady_beek/</text:a> :</text:p>
          <text:p text:style-name="P6"/>
          <text:list>
            <text:list-item>
              <text:p text:style-name="P6">Un Pkmn qui évoluerait de plusieurs façons (amour, amitié) en fonction de la façon dont son dresseur l’entraîne. Celui-ci aurait entraîné son Pkmn par amitié, mais ce dernier, amoureux de son dresseur, évolue dans la mauvaise forme et est rejeté par ce dernier. </text:p>
            </text:list-item>
            <text:list-item>
              <text:p text:style-name="P6">Idée de personnalité : Au début aimant, perd la raison après avoir eu son cœur brisé et est obsédé par son ancien dresseur, violant tous les humains qu’il croise en cherchant l’affection que son ancien maître lui a refusé.</text:p>
            </text:list-item>
          </text:list>
        </text:list-item>
      </text:list>
      <text:p text:style-name="P7"/>
      <text:list text:continue-numbering="true" text:style-name="L2">
        <text:list-item>
          <text:p text:style-name="P8">Inspiré de l’histoire de Barpau du manga Pokémon(<text:a xlink:type="simple" xlink:href="https://www.youtube.com/watch?v=ne-eUC_IH0k" text:style-name="Internet_20_link" text:visited-style-name="Visited_20_Internet_20_Link">https://www.youtube.com/watch?v=ne-eUC_IH0k</text:a>)</text:p>
          <text:list>
            <text:list-header>
              <text:p text:style-name="P8"><text:s/></text:p>
            </text:list-header>
            <text:list-item>
              <text:p text:style-name="P8">Un dresseur obtient un Barpau, qui est trop laid pour gagner des tournois et que son maître abandonne. Mais le Barpau revient le sauver par amour pour son dresser, et celui-ci reconnaît sa beauté intérieure, lui permettant d’évoluer en une créature sublime. Le dresseur confesse alors son amour pour son Pkmn et le bais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1T21:35:42.311559500</dc:date>
    <meta:editing-duration>PT12M35S</meta:editing-duration>
    <meta:editing-cycles>5</meta:editing-cycles>
    <meta:generator>LibreOffice/25.2.4.3$Windows_X86_64 LibreOffice_project/33e196637044ead23f5c3226cde09b47731f7e27</meta:generator>
    <meta:document-statistic meta:table-count="0" meta:image-count="0" meta:object-count="0" meta:page-count="1" meta:paragraph-count="14" meta:word-count="283" meta:character-count="1779" meta:non-whitespace-character-count="1511"/>
  </office:meta>
</office:document-meta>
</file>