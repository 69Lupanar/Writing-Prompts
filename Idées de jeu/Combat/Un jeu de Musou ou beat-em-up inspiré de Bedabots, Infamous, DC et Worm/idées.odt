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officeooo:rsid="001cac3d" officeooo:paragraph-rsid="001cac3d"/>
    </style:style>
    <style:style style:name="P2" style:family="paragraph" style:parent-style-name="Standard" style:list-style-name="L1">
      <style:paragraph-properties fo:line-height="115%"/>
      <style:text-properties officeooo:rsid="001cac3d" officeooo:paragraph-rsid="001cac3d"/>
    </style:style>
    <style:style style:name="P3" style:family="paragraph" style:parent-style-name="Standard" style:list-style-name="L1">
      <style:paragraph-properties fo:line-height="115%"/>
      <style:text-properties officeooo:rsid="001d023c" officeooo:paragraph-rsid="001d023c"/>
    </style:style>
    <style:style style:name="P4" style:family="paragraph" style:parent-style-name="Standard">
      <style:paragraph-properties fo:line-height="115%"/>
      <style:text-properties officeooo:rsid="001d023c" officeooo:paragraph-rsid="001d023c"/>
    </style:style>
    <style:style style:name="P5" style:family="paragraph" style:parent-style-name="Standard" style:list-style-name="L2">
      <style:paragraph-properties fo:line-height="115%"/>
      <style:text-properties officeooo:rsid="001d023c" officeooo:paragraph-rsid="001d023c"/>
    </style:style>
    <style:style style:name="P6" style:family="paragraph" style:parent-style-name="Standard" style:list-style-name="L2">
      <style:paragraph-properties fo:line-height="115%"/>
      <style:text-properties officeooo:rsid="001ee516" officeooo:paragraph-rsid="001ee516"/>
    </style:style>
    <style:style style:name="T1" style:family="text">
      <style:text-properties officeooo:rsid="001ee51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de scénario : </text:p>
      <text:p text:style-name="P1"/>
      <text:list text:style-name="L1">
        <text:list-item>
          <text:p text:style-name="P2">Dans un monde futuriste où des cyborgs humanoïdes conscients cohabitent avec les humains, le protagoniste fait partie d’un groupuscule terroriste cherchant à éradiquer les cyborgs et supprimer l’influence omniprésente de la technologie dans le quotidien des hommes. Le protagoniste, dégoûté par les cyborgs et la volonté de leurs créateurs de les faire ressembler de plus en plus à des humains, est contraint malgré lui d’adopter chez lui une cyborg pour X raisons. Malgré son caractère enjoué et serviable, le cyborg ne parvient par à sortir le protag de sa carapace. L’histoire tournera autour du protag et du conflit entre terroristes et corpos, ainsi que du rapport du protag aux robots et à sa compagne de tous les jours.</text:p>
          <text:p text:style-name="P2"/>
        </text:list-item>
        <text:list-item>
          <text:p text:style-name="P3">Dans une ville gangrénée par les gangs et groupuscules terroristes, le joueur devra reconquérir peu à peu le territoire perdu des mains des ennemis du gouvernement.</text:p>
        </text:list-item>
      </text:list>
      <text:p text:style-name="P1"/>
      <text:p text:style-name="P4">Idées de gameplay :</text:p>
      <text:p text:style-name="P4"/>
      <text:list text:style-name="L2">
        <text:list-item>
          <text:p text:style-name="P5">Musou / Capture le drapeau : Le joueur doit reconquéri<text:span text:style-name="T1">r des portions de la carte appartenant à un groupe ennemi, OU protéger son territoire de l’invasion ennemie. Chaque vague d’ennemi peut aussi avoir un sous-boss que le joueur devra battre pour progresser.</text:span></text:p>
        </text:list-item>
        <text:list-item>
          <text:p text:style-name="P6">Avoir des conditions de victoire alternative ? Battre un grand nombre d’ennemis pour les faire battre en retraite, battre un certain nombre de sous-boss, etc...</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5H18M46S</meta:editing-duration>
    <meta:editing-cycles>8</meta:editing-cycles>
    <meta:generator>LibreOffice/25.2.4.3$Windows_X86_64 LibreOffice_project/33e196637044ead23f5c3226cde09b47731f7e27</meta:generator>
    <meta:creation-date>2024-02-29T13:36:14.267000000</meta:creation-date>
    <dc:date>2025-12-08T21:27:43.209568000</dc:date>
    <meta:document-statistic meta:table-count="0" meta:image-count="0" meta:object-count="0" meta:page-count="1" meta:paragraph-count="7" meta:word-count="224" meta:character-count="1352" meta:non-whitespace-character-count="1138"/>
  </office:meta>
</office:document-meta>
</file>