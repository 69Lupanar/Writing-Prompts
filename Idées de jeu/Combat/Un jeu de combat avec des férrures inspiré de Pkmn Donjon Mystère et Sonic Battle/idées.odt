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officeooo:rsid="001cb239" officeooo:paragraph-rsid="001cb239"/>
    </style:style>
    <style:style style:name="P2" style:family="paragraph" style:parent-style-name="Text_20_body">
      <style:paragraph-properties fo:line-height="115%"/>
      <style:text-properties officeooo:rsid="001cb239" officeooo:paragraph-rsid="001cb239"/>
    </style:style>
    <style:style style:name="T1" style:family="text">
      <style:text-properties officeooo:rsid="001efa32"/>
    </style:style>
    <style:style style:name="T2" style:family="text">
      <style:text-properties officeooo:rsid="001f4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s de scénario : </text:p>
      <text:p text:style-name="P1"/>
      <text:p text:style-name="P1"><text:tab/><text:span text:style-name="T1">L’histoire reprend celle qu’on a écrite pour la fanfic de Pkmn donjon Mystère avec Lika et Mysdibule.</text:span>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25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25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2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18M24S</meta:editing-duration>
    <meta:editing-cycles>4</meta:editing-cycles>
    <meta:generator>LibreOffice/7.3.3.2$Windows_X86_64 LibreOffice_project/d1d0ea68f081ee2800a922cac8f79445e4603348</meta:generator>
    <meta:creation-date>2023-07-16T19:34:07.554000000</meta:creation-date>
    <dc:date>2023-07-16T21:14:14.933000000</dc:date>
    <meta:document-statistic meta:table-count="0" meta:image-count="0" meta:object-count="0" meta:page-count="1" meta:paragraph-count="3" meta:word-count="21" meta:character-count="123" meta:non-whitespace-character-count="101"/>
  </office:meta>
</office:document-meta>
</file>