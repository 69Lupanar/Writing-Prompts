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02b0" officeooo:paragraph-rsid="001b02b0"/>
    </style:style>
    <style:style style:name="P2" style:family="paragraph" style:parent-style-name="Standard">
      <style:text-properties officeooo:rsid="001b02b0" officeooo:paragraph-rsid="001bbd31"/>
    </style:style>
    <style:style style:name="P3" style:family="paragraph" style:parent-style-name="Standard">
      <style:text-properties officeooo:paragraph-rsid="001b02b0"/>
    </style:style>
    <style:style style:name="P4" style:family="paragraph" style:parent-style-name="Standard">
      <style:text-properties officeooo:rsid="00225ef3" officeooo:paragraph-rsid="00225ef3"/>
    </style:style>
    <style:style style:name="P5" style:family="paragraph" style:parent-style-name="Standard">
      <style:text-properties officeooo:paragraph-rsid="00277d1a"/>
    </style:style>
    <style:style style:name="P6" style:family="paragraph" style:parent-style-name="Standard">
      <style:text-properties officeooo:paragraph-rsid="001bbd31"/>
    </style:style>
    <style:style style:name="P7" style:family="paragraph" style:parent-style-name="Standard" style:list-style-name="L1">
      <style:text-properties officeooo:paragraph-rsid="00277d1a"/>
    </style:style>
    <style:style style:name="P8" style:family="paragraph" style:parent-style-name="Standard" style:list-style-name="L1">
      <style:text-properties officeooo:paragraph-rsid="00484991"/>
    </style:style>
    <style:style style:name="P9" style:family="paragraph" style:parent-style-name="Standard" style:list-style-name="L1">
      <style:text-properties officeooo:paragraph-rsid="002dbabe"/>
    </style:style>
    <style:style style:name="P10" style:family="paragraph" style:parent-style-name="Standard" style:list-style-name="L1">
      <style:text-properties officeooo:paragraph-rsid="0033fb1c"/>
    </style:style>
    <style:style style:name="P11" style:family="paragraph" style:parent-style-name="Standard" style:list-style-name="L1">
      <style:text-properties officeooo:rsid="00277d1a" officeooo:paragraph-rsid="002dbabe"/>
    </style:style>
    <style:style style:name="P12" style:family="paragraph" style:parent-style-name="Standard" style:list-style-name="L1">
      <style:text-properties officeooo:rsid="00277d1a" officeooo:paragraph-rsid="005438d5"/>
    </style:style>
    <style:style style:name="P13" style:family="paragraph" style:parent-style-name="Standard" style:list-style-name="L1">
      <style:text-properties officeooo:rsid="003df9ef" officeooo:paragraph-rsid="005438d5"/>
    </style:style>
    <style:style style:name="P14" style:family="paragraph" style:parent-style-name="Standard" style:list-style-name="L1">
      <style:text-properties officeooo:rsid="0059177f" officeooo:paragraph-rsid="0059177f"/>
    </style:style>
    <style:style style:name="P15" style:family="paragraph" style:parent-style-name="Standard" style:list-style-name="L1">
      <style:text-properties officeooo:rsid="005c805f" officeooo:paragraph-rsid="005c805f"/>
    </style:style>
    <style:style style:name="P16" style:family="paragraph" style:parent-style-name="Standard" style:list-style-name="L1">
      <style:text-properties officeooo:rsid="005fc02f" officeooo:paragraph-rsid="005fc02f"/>
    </style:style>
    <style:style style:name="P17" style:family="paragraph" style:parent-style-name="Standard" style:list-style-name="L1">
      <style:text-properties officeooo:rsid="00602b4f" officeooo:paragraph-rsid="00602b4f"/>
    </style:style>
    <style:style style:name="P18" style:family="paragraph" style:parent-style-name="Standard" style:list-style-name="L1">
      <style:text-properties officeooo:rsid="0021453c" officeooo:paragraph-rsid="00277d1a"/>
    </style:style>
    <style:style style:name="P19" style:family="paragraph" style:parent-style-name="Standard" style:list-style-name="L2">
      <style:text-properties officeooo:rsid="00245ce8" officeooo:paragraph-rsid="00245ce8"/>
    </style:style>
    <style:style style:name="P20" style:family="paragraph" style:parent-style-name="Standard" style:list-style-name="L2">
      <style:text-properties officeooo:rsid="00252f16" officeooo:paragraph-rsid="00252f16"/>
    </style:style>
    <style:style style:name="P21" style:family="paragraph" style:parent-style-name="Standard" style:list-style-name="L2">
      <style:text-properties officeooo:rsid="0025afc3" officeooo:paragraph-rsid="0025afc3"/>
    </style:style>
    <style:style style:name="P22" style:family="paragraph" style:parent-style-name="Standard" style:list-style-name="L2">
      <style:text-properties officeooo:rsid="00274238" officeooo:paragraph-rsid="00274238"/>
    </style:style>
    <style:style style:name="P23" style:family="paragraph" style:parent-style-name="Standard" style:list-style-name="L2">
      <style:text-properties officeooo:rsid="00401ab4" officeooo:paragraph-rsid="00401ab4"/>
    </style:style>
    <style:style style:name="P24" style:family="paragraph" style:parent-style-name="Standard" style:list-style-name="L1">
      <style:text-properties officeooo:rsid="00611cb4" officeooo:paragraph-rsid="00611cb4"/>
    </style:style>
    <style:style style:name="T1" style:family="text">
      <style:text-properties officeooo:rsid="001ba1ac"/>
    </style:style>
    <style:style style:name="T2" style:family="text">
      <style:text-properties officeooo:rsid="001bbd31"/>
    </style:style>
    <style:style style:name="T3" style:family="text">
      <style:text-properties officeooo:rsid="001d420d"/>
    </style:style>
    <style:style style:name="T4" style:family="text">
      <style:text-properties officeooo:rsid="001e0919"/>
    </style:style>
    <style:style style:name="T5" style:family="text">
      <style:text-properties officeooo:rsid="001e2c69"/>
    </style:style>
    <style:style style:name="T6" style:family="text">
      <style:text-properties officeooo:rsid="0020a099"/>
    </style:style>
    <style:style style:name="T7" style:family="text">
      <style:text-properties officeooo:rsid="00258a13"/>
    </style:style>
    <style:style style:name="T8" style:family="text">
      <style:text-properties officeooo:rsid="002a863a"/>
    </style:style>
    <style:style style:name="T9" style:family="text">
      <style:text-properties officeooo:rsid="002dbabe"/>
    </style:style>
    <style:style style:name="T10" style:family="text">
      <style:text-properties officeooo:rsid="0030c574"/>
    </style:style>
    <style:style style:name="T11" style:family="text">
      <style:text-properties officeooo:rsid="00332911"/>
    </style:style>
    <style:style style:name="T12" style:family="text">
      <style:text-properties officeooo:rsid="0033fb1c"/>
    </style:style>
    <style:style style:name="T13" style:family="text">
      <style:text-properties officeooo:rsid="0036b919"/>
    </style:style>
    <style:style style:name="T14" style:family="text">
      <style:text-properties officeooo:rsid="00395dd6"/>
    </style:style>
    <style:style style:name="T15" style:family="text">
      <style:text-properties officeooo:rsid="003a0354"/>
    </style:style>
    <style:style style:name="T16" style:family="text">
      <style:text-properties officeooo:rsid="003b8c70"/>
    </style:style>
    <style:style style:name="T17" style:family="text">
      <style:text-properties officeooo:rsid="003ba145"/>
    </style:style>
    <style:style style:name="T18" style:family="text">
      <style:text-properties officeooo:rsid="003c8594"/>
    </style:style>
    <style:style style:name="T19" style:family="text">
      <style:text-properties officeooo:rsid="003d1591"/>
    </style:style>
    <style:style style:name="T20" style:family="text">
      <style:text-properties officeooo:rsid="003ecf02"/>
    </style:style>
    <style:style style:name="T21" style:family="text">
      <style:text-properties officeooo:rsid="003fac27"/>
    </style:style>
    <style:style style:name="T22" style:family="text">
      <style:text-properties officeooo:rsid="00412bd1"/>
    </style:style>
    <style:style style:name="T23" style:family="text">
      <style:text-properties officeooo:rsid="00426136"/>
    </style:style>
    <style:style style:name="T24" style:family="text">
      <style:text-properties officeooo:rsid="0044208d"/>
    </style:style>
    <style:style style:name="T25" style:family="text">
      <style:text-properties officeooo:rsid="004602eb"/>
    </style:style>
    <style:style style:name="T26" style:family="text">
      <style:text-properties officeooo:rsid="00464ccb"/>
    </style:style>
    <style:style style:name="T27" style:family="text">
      <style:text-properties officeooo:rsid="00484991"/>
    </style:style>
    <style:style style:name="T28" style:family="text">
      <style:text-properties officeooo:rsid="004948c4"/>
    </style:style>
    <style:style style:name="T29" style:family="text">
      <style:text-properties officeooo:rsid="004ae18a"/>
    </style:style>
    <style:style style:name="T30" style:family="text">
      <style:text-properties officeooo:rsid="004c717f"/>
    </style:style>
    <style:style style:name="T31" style:family="text">
      <style:text-properties officeooo:rsid="004df393"/>
    </style:style>
    <style:style style:name="T32" style:family="text">
      <style:text-properties officeooo:rsid="001b02b0"/>
    </style:style>
    <style:style style:name="T33" style:family="text">
      <style:text-properties officeooo:rsid="005024f7"/>
    </style:style>
    <style:style style:name="T34" style:family="text">
      <style:text-properties officeooo:rsid="00520246"/>
    </style:style>
    <style:style style:name="T35" style:family="text">
      <style:text-properties officeooo:rsid="005438d5"/>
    </style:style>
    <style:style style:name="T36" style:family="text">
      <style:text-properties officeooo:rsid="0054d728"/>
    </style:style>
    <style:style style:name="T37" style:family="text">
      <style:text-properties officeooo:rsid="00551f43"/>
    </style:style>
    <style:style style:name="T38" style:family="text">
      <style:text-properties officeooo:rsid="0056fefd"/>
    </style:style>
    <style:style style:name="T39" style:family="text">
      <style:text-properties officeooo:rsid="0057d702"/>
    </style:style>
    <style:style style:name="T40" style:family="text">
      <style:text-properties officeooo:rsid="005a8b88"/>
    </style:style>
    <style:style style:name="T41" style:family="text">
      <style:text-properties officeooo:rsid="005c48ac"/>
    </style:style>
    <style:style style:name="T42" style:family="text">
      <style:text-properties officeooo:rsid="005e72ef"/>
    </style:style>
    <style:style style:name="T43" style:family="text">
      <style:text-properties officeooo:rsid="005f39d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2"><text:tab/>Le jeu se veut plus être une comédie qu’une vraie histoire, donc pas ou peu de points sur l’histoire du monde ou des personnages, ces derniers </text:span><text:span text:style-name="T25">étant des caricatures</text:span><text:span text:style-name="T32"> s’apparentent à un seul (vo</text:span><text:span text:style-name="T1">ir</text:span><text:span text:style-name="T32">e deux) traits de caractère poussés à l’extrême.</text:span></text:p>
      <text:p text:style-name="P2"/>
      <text:p text:style-name="P2"/>
      <text:p text:style-name="P1">Idées de scénario : </text:p>
      <text:p text:style-name="P1"/>
      <text:p text:style-name="P1"/>
      <text:list xml:id="list2589097294" text:style-name="L1">
        <text:list-item>
          <text:p text:style-name="P7"><text:span text:style-name="T2">L’héroïne de l’histoire, Blondasse </text:span><text:span text:style-name="T36">(musique trash et inharmonieuse avec de nombreuses fausses notes)</text:span><text:span text:style-name="T2">, est jetée dans un pénitencier haute-sécurité pour avoir commis le crime d’avoir volé les bonbons d’un pédophile sur le point de l’enlever. Il lui est alors offert </text:span><text:span text:style-name="T3">de divertir</text:span><text:span text:style-name="T2"> les masses dans des combats d’arène dans </text:span><text:span text:style-name="T3">un tournoi organisé par</text:span><text:span text:style-name="T2"> la prison, le grand gagnant </text:span><text:span text:style-name="T3">retrouvant</text:span><text:span text:style-name="T2"> </text:span><text:span text:style-name="T3">s</text:span><text:span text:style-name="T2">a liberté. </text:span><text:span text:style-name="T3">Ne vou</text:span><text:span text:style-name="T4">lant au départ pas participer, préférant profiter de la bouffe et du logement gratuit (comme tous les autres participants), Blondasse finit par accepter quand elle apprend qu’une grosse somme d’argent </text:span><text:span text:style-name="T5">est offerte au gagnant du tournoi </text:span><text:span text:style-name="T15">(qui ne lui sera jamais remise)</text:span><text:span text:style-name="T5">, et que des connaissances à elle sont aussi enfermées dans ce pénitencier, dont :</text:span></text:p>
          <text:p text:style-name="P7"/>
          <text:list>
            <text:list-item>
              <text:p text:style-name="P8"><text:span text:style-name="T27">Botox, une fille-mannequin de crash test qui joue le rôle d’entraîneuse de Blondasse pour la préparer aux mécaniques du tournoi. Ses niveaux sont des tutoriels où le joueur apprend à se battre ainsi que les mécaniques d’élevage d’unités. </text:span><text:span text:style-name="T28">Complètement innocente des vices de ce monde, </text:span><text:span text:style-name="T29">n’étant jamais sorti de l’enceinte de la prison</text:span><text:span text:style-name="T28">, </text:span><text:span text:style-name="T29">et</text:span><text:span text:style-name="T28"> pensant l’accouplement avec les monstres comme une mission parmi tant d’autres de son métier, Blondasse se fera un plaisir de la pervertir</text:span><text:span text:style-name="T6"> </text:span><text:span text:style-name="T30">en corrompant son rêve de voir la surface et le monde réel, en un rêve de se faire sauter par tous les détenus et monstres du pénitencier </text:span><text:span text:style-name="T6">;</text:span></text:p>
            </text:list-item>
            <text:list-item>
              <text:p text:style-name="P8"><text:span text:style-name="T5">Sauvage, une fil</text:span><text:span text:style-name="T6">le noire </text:span><text:span text:style-name="T10">africaine</text:span><text:span text:style-name="T6"> très agressive, </text:span><text:span text:style-name="T22">contenant énormément de MSTs. Si le joueur a une relation sexuelle avec elle, il recevra une MST au hasard qu’il pourra ensuite tra</text:span><text:span text:style-name="T23">n</text:span><text:span text:style-name="T22">smettre à ses unités s’il le souhaite (voir section gameplay). </text:span><text:span text:style-name="T24">Évidemment, tous les enfants de Sauvage sont eux aussi infectés, ce qui introduira le joueur à cette mécanique. </text:span><text:span text:style-name="T31">Sauvage est aussi une cannibale, aimant manger ses enfants pour « gagner leur force » </text:span><text:span text:style-name="T37">(musique pop trashy à Nicky Minaj ; ex : Anaconda)</text:span><text:span text:style-name="T6"> ;</text:span></text:p>
            </text:list-item>
            <text:list-item>
              <text:p text:style-name="P9"><text:span text:style-name="T6">Ching-chong-chan, une fille asiatique adepte des machines de combat, </text:span><text:span text:style-name="T8">qui est en réalité une vietnamienne </text:span><text:span text:style-name="T33">fan d’anim</text:span><text:span text:style-name="T34">és</text:span><text:span text:style-name="T8"> ayant vécu deux semaines au Japon et prétendant tout connaître sur la culture japonaise, </text:span><text:span text:style-name="T16">et qui gère la section Gym de la prison </text:span><text:span text:style-name="T17">en offrant des cours de zumba et de remise en forme </text:span><text:span text:style-name="T20">(inspirée de </text:span><text:a xlink:type="simple" xlink:href="https://www.google.com/search?q=oban+star+racers+cat+girl&amp;rlz=1C1CHZL_frFR966FR966&amp;sxsrf=APwXEdfuryu_QoBRxppPR_lZVNc5B2IvDg:1680287817783&amp;source=lnms&amp;tbm=isch&amp;sa=X&amp;ved=2ahUKEwjJ-_7z54b-AhVVT6QEHbkNA1EQ_AUoAXoECAEQAw&amp;biw=1707&amp;bih=802&amp;dpr=1.13" text:style-name="Internet_20_link" text:visited-style-name="Visited_20_Internet_20_Link"><text:span text:style-name="T21">Para-Dice</text:span></text:a><text:span text:style-name="T20">, la fille-chat d’oban Star Racers)</text:span><text:span text:style-name="T8"> ;</text:span></text:p>
            </text:list-item>
            <text:list-item>
              <text:p text:style-name="P11">Spice Girl, une britannique d’origine indienne qui gère les cuisines de la prison et l’usine de conversion des enfants en bouffe pour chat ; ce qui explique la qualité douteuse de la nourriture du pénitencier ;</text:p>
            </text:list-item>
            <text:list-item>
              <text:p text:style-name="P12"><text:span text:style-name="T9">Capote-Trouée</text:span>, une <text:span text:style-name="T9">amérindienne qui remplit le rôle du stér</text:span><text:span text:style-name="T13">é</text:span><text:span text:style-name="T9">otype américain : Elle aime les flingues, vote à droite, et est plus stupide encore que Blondasse. Elle incarne aussi quelques éléments du folklore amérindien, avec les plumes, sa </text:span><text:soft-page-break/><text:span text:style-name="T9">façon de parler et les drogues qu’elle consume, </text:span><text:span text:style-name="T18">et est en charge de l’entraînement des gardes de la prison, sans que l’ironie de sa situation lui vienne à l’esprit (la blague est qu’elle est de droite et aide les forces de l’ordre même si ça vient à l’encontre de ses propres intérêts de cit</text:span><text:span text:style-name="T19">oyenne</text:span><text:span text:style-name="T18">) </text:span><text:span text:style-name="T37">(musique stéréotypée américaine ; ex : musique country et rock à la America, Fuck Yeah)</text:span><text:span text:style-name="T9"> ;</text:span></text:p>
            </text:list-item>
            <text:list-item>
              <text:p text:style-name="P13">Gringette, une espagnole passionnée de corrida qui coordonne les combats d’arène de la prison pour voir les participants souffrir et mourir. C’est une zoophile qui passe le reste de son temps à baiser les animaux et monstres de la prison, et en conséquence a une immense armée d’enfants pour se battre lors de ses combats, qu’elle gagne régulièrement <text:span text:style-name="T38">(musique stéréotypée espagnole)</text:span>.</text:p>
            </text:list-item>
            <text:list-item>
              <text:p text:style-name="P13"><text:span text:style-name="T35">Lil’ Joke</text:span>, <text:span text:style-name="T35">une animatrice d’émissions pour enfants à la C’est pas Sorcier, où elle offre des tutoriels de cuisine ou autre à son public. Elle était autrefois une folle de drogue et de sexe, qui s’est retrouvée ici pour avoir agressé sexuellement des enfants dans une école. Elle suit depuis une cure de désintoxication et un programme de rééducation pour contenir ses pulsions sexuelles, en la privant totalement de sexe et de sperme dont elle est accro. Blondasse pourra réveiller son ancienne personnalité en lui faisant ingérer du sperme de force ou en la faisant joindre une orgie de monstres </text:span><text:span text:style-name="T39">(parodie de musique pour enfants entrecoupée d’un autre clip de rap vulgaire à la Cooking By the Book mixé avec Lil Jon)</text:span><text:span text:style-name="T35">.</text:span></text:p>
            </text:list-item>
            <text:list-item>
              <text:p text:style-name="P14"><text:span text:style-name="T40">Aphrodite, </text:span><text:span text:style-name="T41">surnommée « Afro », « Négro » et « pompe à bite » par Sauvage</text:span>, une déesse grecque pauvre qui vit dans un bidonville fait de cartons et qui se prostitue pour s’acheter à manger à la cafétéria de la prison.</text:p>
            </text:list-item>
            <text:list-item>
              <text:p text:style-name="P15">Arthur, un trans nommé en référence au Arthur de Rosen Garten Saga, qui a du mal <text:span text:style-name="T42">à assumer s</text:span><text:span text:style-name="T43">on sexe</text:span> et que Blondasse corrompra pour le faire sodomiser par les brutes de la prison.</text:p>
            </text:list-item>
            <text:list-item>
              <text:p text:style-name="P16">Marie, une nonne de l’église de la prison qui s’avère être un succube à la langue barbelée, enfermée pour avoir tué des hommes avec ses fellations.</text:p>
            </text:list-item>
            <text:list-item>
              <text:p text:style-name="P17">DJ Hor, une DJ qui anime le club de danse et les fêtes de la prison.</text:p>
            </text:list-item>
            <text:list-item>
              <text:p text:style-name="P24">Madame Gode, une jeune fille ayant obtenu le droit d’administrer un des étages de la prison en récompense de sa bonne conduite. Très autoritaire et méprisante, elle aime rabaisser les autres concurrentes, et son fétiche se focalise sur ses pieds.</text:p>
            </text:list-item>
            <text:list-item>
              <text:p text:style-name="P24">Lucille, une bodybuildeuse qui focalise toute son attention sur la culture de son corps, ayant des bras, jambes et abdos bien développés et immaculés. Contrairement aux autres concurrentes, Lucille est plutôt gentille et attentionnée, mais sait tout de même se battre en combat, préférant se battre à mains nues.</text:p>
            </text:list-item>
          </text:list>
        </text:list-item>
      </text:list>
      <text:p text:style-name="P5"/>
      <text:list xml:id="list225156183456796" text:continue-numbering="true" text:style-name="L1">
        <text:list-item>
          <text:p text:style-name="P18">En chemin, elle croisera de nombreux monstres et capitaines d’équipe qu’elle devra battre (et baiser) pour constituer sa propre équipe de monstres et gravir les échelons de la micro-société carcérale.</text:p>
          <text:p text:style-name="P18"><text:s/></text:p>
        </text:list-item>
        <text:list-item>
          <text:p text:style-name="P10"><text:span text:style-name="T12">A la fin de l’histoire, on aura un moment comique avec la mère de Blondasse qui gronde sa fille pour avoir quitt</text:span><text:span text:style-name="T13">é</text:span><text:span text:style-name="T12"> la prison, qu’elle pensait être une pension pour </text:span><text:soft-page-break/><text:span text:style-name="T12">enfants difficiles. Blondasse prétend qu’</text:span><text:span text:style-name="T14">elle ne serait pas restée de toute façon car</text:span><text:span text:style-name="T12"> la bouffe était dégueulasse, et sa mère lui rétorque qu’elle a appris pour les bagarres dont s’est mêlée sa fille. Elle lui demande ensuite si elle ne pouvait pas juste vendre de la cocaïne à l’école comme les autres enfants de son âge, mais Blondasse lui répond que c’est démodé. Sa mère se désole du comportement de sa fille, murmurant pour elle-même qu’à son époque, les jeunes de son âge brûlaient des voitures et que c’était très bien comme ça.</text:span></text:p>
        </text:list-item>
      </text:list>
      <text:p text:style-name="P3"/>
      <text:p text:style-name="P4"/>
      <text:p text:style-name="P4">Idées de gameplay : </text:p>
      <text:p text:style-name="P4"/>
      <text:p text:style-name="P4">Les fétiches principaux de ce jeu sont le lolicon, l’interracial, la zoophilie, la grossesse, <text:span text:style-name="T26">et la naissance</text:span>. Bien que leur âge ne soit pas explicitement déclaré, il est lourdement impliqué que les personnages que le joueur pourra jouer sont mineures et ont déjà eu de nombreuses expériences sexuelles. Les personnages sont également très vulgaires dans ce jeu, Blondasse ayant régulièrement des remarques racistes envers ses camarades et ses enfants.</text:p>
      <text:p text:style-name="P4"/>
      <text:list xml:id="list3920349584" text:style-name="L2">
        <text:list-item>
          <text:p text:style-name="P19">Le jeu est un beat-em-up side-scroller se déroulant dans une arène de combat. Pour arriver à la fin du jeu, le joueur doit gravir des paliers comportant chacun une vague d’ennemis ou un boss. Chaque personnage contrôlé par le joueur possède un combo de coups lui permettant de vider la barre de vie des ennemis ou les éjecter hors de l’arène. Cette arène peut également parfois posséder un « thème » changeant le terrain et la façon que devra employer le joueur pour se battre (par ex: Un terrain miné où les explosions, pouvant éjecter le joueur, un terrain anti-gravité où la hauteur des sauts est doublée, etc...) </text:p>
          <text:p text:style-name="P19"><text:s/></text:p>
        </text:list-item>
        <text:list-item>
          <text:p text:style-name="P20">Au début du jeu, le joueur ne possède qu’un personnage pour se battre : Blondasse. Au fur et à mesure que la difficulté augmente, le joueur devra recruter de nouveaux personnages humains et les utiliser pour baiser les monstres ennemis, lui permettant de donner naissance à des monstres alliés aidant le joueur en combat.</text:p>
          <text:list>
            <text:list-header>
              <text:p text:style-name="P20"><text:s/></text:p>
            </text:list-header>
            <text:list-item>
              <text:p text:style-name="P20">Chaque monstre comporte <text:span text:style-name="T11">max. </text:span>3 attributs déterminant ses résistances, faiblesses et capacités en combat (feu, eau, etc.). Son apparence et ses attributs sont déterminés par le type de fille que le joueur utilise comme mère et les monstres utilisés comme père. Un monstre nécessite 3 rapports sexuels pour naître, et son apparence, ses attributs et ses capacités dépendant de celles de ses parents (un peu comme dans Pokémon), basé sur un système de chance et de rareté : Chaque monstre a une rareté et les monstres les plus communs ont le plus de chances d’être le « gène dominant » qui donnera à l’enfant ses attributs (Par exemple, 2 monstres EAU rares et un monstre FEU commun pourra donner un juste donner un monstre EAU rare, mais aura plus de chances de donner un hybride FEU-EAU ou un monstre FEU commun). <text:span text:style-name="T7">Chaque fille ne possède qu’un attribut, mais cet attribut donnera plus de chances d’avoir un enfant de cet attribut si un des pères le partage, et influencera sur ses capacités (par ex: Un </text:span><text:soft-page-break/><text:span text:style-name="T7">enfant de Sauvage pourra faire plus de dégâts, ou ceux de Ching-Chong pourront utiliser plus d’objets.)</text:span></text:p>
              <text:p text:style-name="P20"><text:s/></text:p>
            </text:list-item>
            <text:list-item>
              <text:p text:style-name="P21">Le joueur ne peut contrôler directement que la fille qu’il incarne, pas ses enfants, qui seront dirigés par des IAs. Cependant, il peut leur donner des ordres en cours de combat et modifier leur tactique de base pour leur donner différents comportements en fonctions de leurs atouts ou points faibles, un peu comme dans Pokémon Donjon Mystère (par ex: Le joueur peur donner l’ordre à un de ses enfants d’attaquer ou s’enfuir, ou lui donner comme tactique de rester proche du joueur pour l’assister.)</text:p>
              <text:p text:style-name="P21"><text:s/></text:p>
            </text:list-item>
            <text:list-item>
              <text:p text:style-name="P22">Le joueur peut aussi acheter et équiper des objets, armes et armures. Cependant, un enfant ne peut s’équiper que d’un objet à la fois.</text:p>
              <text:p text:style-name="P22"><text:s/></text:p>
            </text:list-item>
            <text:list-item>
              <text:p text:style-name="P23">Le joueur et ses unités peuvent aussi recevoir des MSTs transmises par certains ennemis, qui leur confèrent un bonus de stat ou de compétence au prix d’un autre malus. Le joueur pouvant choisir quand se faire infecter (en perdant volontairement par exemple), il pourra personnaliser ses unités avec les MSTs de son choix. Il est cependant possible de protéger ses persos des MSTs ou d’en guérir par certaines méthodes si le joueur désire avoir des relations avec ses personnages.</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6H50M10S</meta:editing-duration>
    <meta:editing-cycles>70</meta:editing-cycles>
    <meta:generator>LibreOffice/7.3.3.2$Windows_X86_64 LibreOffice_project/d1d0ea68f081ee2800a922cac8f79445e4603348</meta:generator>
    <meta:creation-date>2022-08-25T16:50:21.857000000</meta:creation-date>
    <dc:date>2024-02-21T22:51:53.900000000</dc:date>
    <meta:document-statistic meta:table-count="0" meta:image-count="0" meta:object-count="0" meta:page-count="4" meta:paragraph-count="33" meta:word-count="1737" meta:character-count="10144" meta:non-whitespace-character-count="8452"/>
  </office:meta>
</office:document-meta>
</file>