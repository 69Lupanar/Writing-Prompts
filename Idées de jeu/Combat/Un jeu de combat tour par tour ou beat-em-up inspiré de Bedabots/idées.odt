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cac3d" officeooo:paragraph-rsid="001cac3d"/>
    </style:style>
    <style:style style:name="P2" style:family="paragraph" style:parent-style-name="Standard" style:list-style-name="L1">
      <style:paragraph-properties fo:line-height="115%"/>
      <style:text-properties officeooo:rsid="001cac3d" officeooo:paragraph-rsid="001cac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list xml:id="list3549636324" text:style-name="L1">
        <text:list-item>
          <text:p text:style-name="P2">Dans un monde futuriste où des cyborgs humanoïdes conscients cohabitent avec les humains, le protagoniste fait partie d’un groupuscule terroriste cherchant à éradiquer les cyborgs et supprimer l’influence omniprésente de la technologie dans le quotidien des hommes. Le protagoniste, dégoûté par les cyborgs et la volonté de leurs créateurs de les faire ressembler de plus en plus à des humains, est contraint malgré lui d’adopter chez lui une cyborg pour X raisons. Malgré son caractère enjoué et serviable, le cyborg ne parvient par à sortir le protag de sa carapace. L’histoire tournera autour du protag et du conflit entre terroristes et corpos, ainsi que du rapport du protag aux robots et à sa compagne de tous les jour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H7M26S</meta:editing-duration>
    <meta:editing-cycles>2</meta:editing-cycles>
    <meta:generator>LibreOffice/7.3.3.2$Windows_X86_64 LibreOffice_project/d1d0ea68f081ee2800a922cac8f79445e4603348</meta:generator>
    <meta:creation-date>2024-02-29T13:36:14.267000000</meta:creation-date>
    <dc:date>2024-02-29T18:43:28.059000000</dc:date>
    <meta:document-statistic meta:table-count="0" meta:image-count="0" meta:object-count="0" meta:page-count="1" meta:paragraph-count="2" meta:word-count="123" meta:character-count="747" meta:non-whitespace-character-count="626"/>
  </office:meta>
</office:document-meta>
</file>