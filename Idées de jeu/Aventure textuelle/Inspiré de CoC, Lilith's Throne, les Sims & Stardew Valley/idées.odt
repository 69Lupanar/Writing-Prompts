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967d" officeooo:paragraph-rsid="0017967d"/>
    </style:style>
    <style:style style:name="P2" style:family="paragraph" style:parent-style-name="Text_20_body" style:list-style-name="L1">
      <style:text-properties officeooo:rsid="0017967d" officeooo:paragraph-rsid="0017967d"/>
    </style:style>
    <style:style style:name="T1" style:family="text">
      <style:text-properties officeooo:rsid="0017e7b1"/>
    </style:style>
    <style:style style:name="T2" style:family="text">
      <style:text-properties officeooo:rsid="0018169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 : </text:p>
      <text:list text:style-name="L1">
        <text:list-item>
          <text:p text:style-name="P2">Une aventure textuelle inspiré de <text:span text:style-name="T1">CoC,</text:span> Lilith’s Throne, les Sims et Stardew Valley : Le joueur vivrait dans un monde où chaque PNJ a son propre emploi du temps, apparence, personnalité et désirs, et le joueur peut faire des actes libidineux aussi nombreux que variés. Il pourra aussi, comme dans LT, modifier <text:span text:style-name="T2">les traits de</text:span> son personnage comme pour les PNJs, offrant un immense degré de libert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2M52S</meta:editing-duration>
    <meta:editing-cycles>4</meta:editing-cycles>
    <meta:generator>LibreOffice/25.2.4.3$Windows_X86_64 LibreOffice_project/33e196637044ead23f5c3226cde09b47731f7e27</meta:generator>
    <meta:creation-date>2025-07-12T06:53:45.593524300</meta:creation-date>
    <dc:title>Format de texte</dc:title>
    <dc:date>2025-07-27T12:05:27.333725400</dc:date>
    <meta:document-statistic meta:table-count="0" meta:image-count="0" meta:object-count="0" meta:page-count="1" meta:paragraph-count="2" meta:word-count="70" meta:character-count="404" meta:non-whitespace-character-count="336"/>
    <meta:template xlink:type="simple" xlink:actuate="onRequest" xlink:title="Format de texte" xlink:href="file:///C:/Users/Clément/AppData/Roaming/LibreOffice/4/user/template/Format%20de%20texte1.ott" meta:date="2025-07-12T06:53:40.799300900"/>
  </office:meta>
</office:document-meta>
</file>