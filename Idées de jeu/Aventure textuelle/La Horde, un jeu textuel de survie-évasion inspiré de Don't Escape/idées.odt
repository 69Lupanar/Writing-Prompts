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9efd1" officeooo:paragraph-rsid="0019efd1"/>
    </style:style>
    <style:style style:name="P2" style:family="paragraph" style:parent-style-name="Standard">
      <style:text-properties officeooo:rsid="0019efd1" officeooo:paragraph-rsid="0019efd1"/>
    </style:style>
    <style:style style:name="P3" style:family="paragraph" style:parent-style-name="Standard">
      <style:text-properties officeooo:rsid="001b2a0d" officeooo:paragraph-rsid="001b2a0d"/>
    </style:style>
    <style:style style:name="P4" style:family="paragraph" style:parent-style-name="Standard">
      <style:text-properties officeooo:rsid="001b35c9" officeooo:paragraph-rsid="001b35c9"/>
    </style:style>
    <style:style style:name="P5" style:family="paragraph" style:parent-style-name="Standard">
      <style:text-properties officeooo:paragraph-rsid="00106f63"/>
    </style:style>
    <style:style style:name="P6" style:family="paragraph" style:parent-style-name="Standard">
      <style:text-properties officeooo:rsid="0022cc9d" officeooo:paragraph-rsid="0022cc9d"/>
    </style:style>
    <style:style style:name="P7" style:family="paragraph" style:parent-style-name="Standard">
      <style:text-properties officeooo:rsid="0022cc9d" officeooo:paragraph-rsid="00253baa"/>
    </style:style>
    <style:style style:name="T1" style:family="text">
      <style:text-properties officeooo:rsid="001c94d7"/>
    </style:style>
    <style:style style:name="T2" style:family="text">
      <style:text-properties officeooo:rsid="001f0bbd"/>
    </style:style>
    <style:style style:name="T3" style:family="text">
      <style:text-properties officeooo:rsid="0020ec44"/>
    </style:style>
    <style:style style:name="T4" style:family="text">
      <style:text-properties officeooo:rsid="00247783"/>
    </style:style>
    <style:style style:name="T5" style:family="text">
      <style:text-properties officeooo:rsid="0024bea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ées de scénario : </text:p>
      <text:p text:style-name="P1"/>
      <text:p text:style-name="P1">Le protagoniste, X, déménage vers un village perdu en pleine campagne après une annonce de travail suspicieusement bien rémunérée lui demandant de travailler comme secrétaire à la mairie. Surpris d’avoir été aussi rapidement accepté, il ne tarde pas à faire la connaissance des habitantes du village, ce dernier semblant étrangement déserté de sa population masculine.</text:p>
      <text:p text:style-name="P1"/>
      <text:p text:style-name="P3">Au fil des jours, X fera la connaissance des habitantes du village, qui bien que chaleureuses au premier abord, gardent une certaine distance avec lui, avant de se montrer insistantes et agressives dans leurs avances alors que les jours passent. En parallèle, X sera régulièrement visité chez lui la nuit par d’étranges personnages qui, d’abord satisfaits de rôder autour de chez lui, se montreront de plus en plus invasifs et agressifs, tentant à de multiples reprises d’entrer par effraction chez lui pour des raisons inconnues, <text:span text:style-name="T1">allant jusqu’à saboter sa voiture pour l’empêcher de s’enfuir</text:span>.</text:p>
      <text:p text:style-name="P3"/>
      <text:p text:style-name="P4">Sans aide des villageoises, X décidera de prendre les choses en main et de barricader sa maison pour faire fuir les intrus, tout en espérant récupérer suffisamment de preuves pour rendre son cas crédible aux yeux de la police locale, qui semble ignorer ses demandes autant que le reste du village. <text:span text:style-name="T1">Cependant, il finira par découvrir la vérité : Les habitantes <text:s/>sont en réalité des louves-garous qui attirent de nouveaux hommes dans ce village pour les chasser comme du gibier, ces dernières prenant un grand plaisir à les violer puis les tuer ou les réduire en esclavage pour leur simple amusement. </text:span><text:span text:style-name="T2">A partir de là, X devra trouver un moyen de s’enfuir du village avec ses preuves et de révéler la vérité au grand jour </text:span><text:span text:style-name="T3">avant que la meute de louves ne décide de le faire taire pour de bon</text:span><text:span text:style-name="T2">.</text:span></text:p>
      <text:p text:style-name="P5"/>
      <text:p text:style-name="P6">Idées de gameplay : </text:p>
      <text:p text:style-name="P6"/>
      <text:p text:style-name="P7">Le jeu s’inspire des jeux Don’t Escape, où le but est de récupérer le plus d’objets et pièges en une journée afin de fortifier notre base et empêcher les vagues d’ennemis de nous atteindre la nuit tombée. </text:p>
      <text:p text:style-name="P7"/>
      <text:p text:style-name="P7"><text:span text:style-name="T4">Le jour, le jeu consiste à élucider le mystère de la disparition des hommes du village, et trouver des preuves de l’existence de la horde tout en récupérant des objets et pièges nécessaires à la survie du joueur. Le soir, le jeu consiste à rester enfermé dans la maison et repousser les membres de la horde tentant d’entrer par effraction ; </text:span><text:span text:style-name="T5">le joueur peut choisir de simplement les blesser ou les tuer, la 1è option les laissant en vie pour recommencer une autre nuit, et la deuxième diminuant leurs nombres mais rendant les prochains ennemis plus agressif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29M3S</meta:editing-duration>
    <meta:editing-cycles>12</meta:editing-cycles>
    <meta:generator>LibreOffice/7.3.3.2$Windows_X86_64 LibreOffice_project/d1d0ea68f081ee2800a922cac8f79445e4603348</meta:generator>
    <meta:creation-date>2023-05-10T22:53:34.532000000</meta:creation-date>
    <dc:date>2023-05-10T23:22:52.419000000</dc:date>
    <meta:document-statistic meta:table-count="0" meta:image-count="0" meta:object-count="0" meta:page-count="1" meta:paragraph-count="7" meta:word-count="431" meta:character-count="2551" meta:non-whitespace-character-count="2123"/>
  </office:meta>
</office:document-meta>
</file>