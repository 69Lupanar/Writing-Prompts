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officeooo:rsid="001ccbb8" officeooo:paragraph-rsid="001ccbb8"/>
    </style:style>
    <style:style style:name="P2" style:family="paragraph" style:parent-style-name="Standard" style:list-style-name="L1">
      <style:paragraph-properties fo:line-height="115%" fo:text-align="justify" style:justify-single-word="false" style:writing-mode="lr-tb" style:writing-mode-automatic="false"/>
      <style:text-properties officeooo:rsid="001ccbb8" officeooo:paragraph-rsid="001ccbb8"/>
    </style:style>
    <style:style style:name="P3" style:family="paragraph" style:parent-style-name="Standard" style:list-style-name="L1">
      <style:paragraph-properties fo:line-height="115%" fo:text-align="justify" style:justify-single-word="false" style:writing-mode="lr-tb" style:writing-mode-automatic="false"/>
      <style:text-properties officeooo:rsid="001d1386" officeooo:paragraph-rsid="001d1386"/>
    </style:style>
    <style:style style:name="P4" style:family="paragraph" style:parent-style-name="Standard">
      <style:paragraph-properties fo:line-height="115%" fo:text-align="right" style:justify-single-word="false"/>
      <style:text-properties officeooo:paragraph-rsid="001a089c"/>
    </style:style>
    <style:style style:name="T1" style:family="text">
      <style:text-properties officeooo:rsid="001dd81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de scénario :</text:p>
      <text:p text:style-name="P1"/>
      <text:list text:style-name="L1">
        <text:list-item>
          <text:p text:style-name="P2">Le joueur incarne un humain vivant au choix sur l’une des quelques planètes habitables de la Voie lactée, en compagnie de nombreuses autres espèces aliens. Le joueur peut choisir son sexe et d’autres attributs et partir explorer la galaxie à la recherche d’aventure. <text:span text:style-name="T1">(On peut en faire un livreur à son propre compte comme justification de voyager partout dans la galaxie ; il serait un ancien militaire qui a quitté les rangs après un désaccord avec ses supérieurs, et poursuit la vocation de livreur pour se rapprocher de son rêve d’explorer les étoiles)</text:span></text:p>
          <text:p text:style-name="P3"/>
        </text:list-item>
        <text:list-item>
          <text:p text:style-name="P3">Bien que le jeu ait une histoire partagée entre différentes factions en guerre dans une lutte pour le pouvoir, le joueur est libre d’explorer autant qu’il le souhaite et de faire ce qu’il lui chante.</text:p>
        </text:list-item>
      </text:list>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3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30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30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3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17M52S</meta:editing-duration>
    <meta:editing-cycles>5</meta:editing-cycles>
    <meta:generator>LibreOffice/26.2.3.2$Windows_X86_64 LibreOffice_project/70e089b17412e4cb7773e41413306b17a2328c34</meta:generator>
    <meta:creation-date>2026-05-21T23:44:47.969274800</meta:creation-date>
    <dc:title>Format de texte</dc:title>
    <dc:date>2026-05-31T20:41:00.011799500</dc:date>
    <meta:document-statistic meta:table-count="0" meta:image-count="0" meta:object-count="0" meta:page-count="1" meta:paragraph-count="4" meta:word-count="135" meta:character-count="776" meta:non-whitespace-character-count="647"/>
    <meta:template xlink:type="simple" xlink:actuate="onRequest" xlink:title="Format de texte" xlink:href="file:///C:/Users/Clément/AppData/Roaming/LibreOffice/4/user/template/Format%20de%20texte.ott" meta:date="2026-05-21T23:44:47.597507900"/>
  </office:meta>
</office:document-meta>
</file>