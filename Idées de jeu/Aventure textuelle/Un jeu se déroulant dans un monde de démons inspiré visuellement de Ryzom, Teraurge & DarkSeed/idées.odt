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d173" officeooo:paragraph-rsid="0019d173"/>
    </style:style>
    <style:style style:name="P2" style:family="paragraph" style:parent-style-name="Standard" style:list-style-name="L1">
      <style:text-properties officeooo:rsid="0019d173" officeooo:paragraph-rsid="0019d173"/>
    </style:style>
    <style:style style:name="P3" style:family="paragraph" style:parent-style-name="Standard" style:list-style-name="L1">
      <style:text-properties officeooo:rsid="001a2b83" officeooo:paragraph-rsid="001a2b83"/>
    </style:style>
    <style:style style:name="P4" style:family="paragraph" style:parent-style-name="Standard" style:list-style-name="L1">
      <style:text-properties officeooo:rsid="001ee4f4" officeooo:paragraph-rsid="001ee4f4"/>
    </style:style>
    <style:style style:name="P5" style:family="paragraph" style:parent-style-name="Standard">
      <style:text-properties officeooo:rsid="001ee4f4" officeooo:paragraph-rsid="001ee4f4"/>
    </style:style>
    <style:style style:name="P6" style:family="paragraph" style:parent-style-name="Standard">
      <style:text-properties officeooo:rsid="00202c6b" officeooo:paragraph-rsid="00202c6b"/>
    </style:style>
    <style:style style:name="P7" style:family="paragraph" style:parent-style-name="Standard" style:list-style-name="L2">
      <style:text-properties officeooo:rsid="00202c6b" officeooo:paragraph-rsid="00202c6b"/>
    </style:style>
    <style:style style:name="P8" style:family="paragraph" style:parent-style-name="Standard" style:list-style-name="L2">
      <style:text-properties officeooo:rsid="00210cd6" officeooo:paragraph-rsid="00210cd6"/>
    </style:style>
    <style:style style:name="P9" style:family="paragraph" style:parent-style-name="Standard" style:list-style-name="L2">
      <style:text-properties officeooo:rsid="002257c9" officeooo:paragraph-rsid="002257c9"/>
    </style:style>
    <style:style style:name="T1" style:family="text">
      <style:text-properties officeooo:rsid="001a5d3c"/>
    </style:style>
    <style:style style:name="T2" style:family="text">
      <style:text-properties officeooo:rsid="001e014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 de scénario : </text:p>
      <text:p text:style-name="P1"/>
      <text:list xml:id="list32859611" text:style-name="L1">
        <text:list-item>
          <text:p text:style-name="P2">Après <text:span text:style-name="T1">un rituel sataniste ayant mal tourné</text:span>, le protagoniste, X, se réveille dans un monde parallèle peuplé de démons et autres créatures cauchemardesques. Dans ce monde distordu reflétant les pulsions sexuelles de ses habitants, le protagoniste doit trouver un moyen de survivre et rentrer chez lui, tout en capturant des créatures de ce monde et s’en servir comme unités de combat, <text:span text:style-name="T2">OU, tout en altérant son corps avec d’étranges mutations physiques pour combattre ses ennemis</text:span>.</text:p>
          <text:p text:style-name="P2"><text:s/></text:p>
        </text:list-item>
        <text:list-item>
          <text:p text:style-name="P3">Le protagoniste atterrit dans un monde peuplé de démons, où les mœurs sexuelles de ses habitants sont complètement libérés, leur permettant d’assouvir leurs désirs sexuels les plus déviants. Bien que cela offre une plus grande tolérance envers ces fétiches, certains de ces derniers sont extrêmes et dangereux, et causent un conflit moral chez le protagoniste sur si oui ou non c’est une bonne chose d’avoir autant de liberté sexuelle au prix de nuire à autrui. En parallèle, un groupuscule religieux chercher à brimer sévèrement ces déviants sexuels tout en exerçant un contrôle sur toutes les activités sexuelles, réduisant leur liberté à néant. L’histoire du jeu tourne autour de ce conflit et de cet équilibre de la liberté sexuelle et ses limites.</text:p>
          <text:list>
            <text:list-item>
              <text:p text:style-name="P4">Visuellement, ce conflit pourrait être représenté par les monstres à capturer étant des créatures des rites païens (tarasque, voilouve…) et les ennemis du groupuscule religieux pourraient être des créatures de la bible (anges, etc.)</text:p>
            </text:list-item>
          </text:list>
        </text:list-item>
      </text:list>
      <text:p text:style-name="P5"/>
      <text:p text:style-name="P6">Idées de personnages :</text:p>
      <text:p text:style-name="P6"/>
      <text:list xml:id="list3359051473" text:style-name="L2">
        <text:list-item>
          <text:p text:style-name="P7">Le protagoniste ferait la route avec A, une démone envoyée par l’antagoniste du jeu pour guider le héros tout au long de sa quête, le but étant de réaliser la tâche de l’antagoniste pour lui à son insu. Au début, A ne verrait le héros que comme un pion, un homme un peu naïf qu’elle se plaît à séduire et tourmenter. Mais au fil de leur voyage, elle découvrira les qualités du héros et commencera à se réchauffer à son contact, pour finir par développer des sentiments pour lui. Mais étant une démone, le héros a du mal à discerner la vérité du mensonge avec elle, conscient qu’elle le manipule à ses propres fins.</text:p>
          <text:p text:style-name="P7"/>
          <text:list>
            <text:list-item>
              <text:p text:style-name="P8">A était autrefois une sorcière humaine, brûlée sur le bûcher pour sorcellerie, après s’être vengée de son premier amour ayant commis l’adultère et ruiné la réputation de sa famille. Ressuscitée par l’antagoniste en tant que démone à sa botte, son chagrin s’est traduit par un dédain pour les autres femmes, toisant celles qui font la cour au héros, et par un dégoût profond pour la trahison, testant régulièrement la loyauté du héros en lui demandant de commettre des actes à l’encontre de sa volonté, que le héros refusera d’accomplir. Elle sera cependant touchée par son idéalisme malgré les refus, retrouvant en lui les traits qui l’avaient fait tomber amoureuse de son premier amour il y a si longtemps.</text:p>
              <text:p text:style-name="P8"><text:s/></text:p>
            </text:list-item>
            <text:list-item>
              <text:p text:style-name="P9">Elle vivra un conflit interne entre son amour pour le héros et son devoir envers <text:soft-page-break/>l’antagoniste, et après avoir été pardonnée une fois par le héros après sa première trahison, elle lui sera totalement loyale, dévouée à leur quête d’arrêter les plans de l’antagoniste.</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34M46S</meta:editing-duration>
    <meta:editing-cycles>12</meta:editing-cycles>
    <meta:generator>LibreOffice/7.3.3.2$Windows_X86_64 LibreOffice_project/d1d0ea68f081ee2800a922cac8f79445e4603348</meta:generator>
    <meta:creation-date>2023-05-06T12:32:21.789000000</meta:creation-date>
    <dc:date>2024-08-28T21:57:44.036000000</dc:date>
    <meta:document-statistic meta:table-count="0" meta:image-count="0" meta:object-count="0" meta:page-count="2" meta:paragraph-count="11" meta:word-count="523" meta:character-count="3100" meta:non-whitespace-character-count="2591"/>
  </office:meta>
</office:document-meta>
</file>