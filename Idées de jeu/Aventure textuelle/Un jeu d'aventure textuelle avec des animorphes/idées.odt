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P1" style:family="paragraph" style:parent-style-name="List_20_Paragraph">
      <style:paragraph-properties fo:margin-left="1.27cm" fo:margin-right="0cm" fo:text-align="justify" style:justify-single-word="false" fo:text-indent="0cm" style:auto-text-indent="false"/>
      <style:text-properties fo:font-size="13pt" style:font-size-asian="13pt" style:font-size-complex="13pt"/>
    </style:style>
    <style:style style:name="P2" style:family="paragraph" style:parent-style-name="List_20_Paragraph">
      <style:paragraph-properties fo:margin-top="0cm" fo:margin-bottom="0.282cm" style:contextual-spacing="true" fo:text-align="justify" style:justify-single-word="false"/>
      <style:text-properties fo:font-size="13pt" style:font-size-asian="13pt" style:font-size-complex="13pt"/>
    </style:style>
    <style:style style:name="P3" style:family="paragraph" style:parent-style-name="List_20_Paragraph">
      <style:paragraph-properties fo:margin-left="2.54cm" fo:margin-right="0cm" fo:text-align="justify" style:justify-single-word="false" fo:text-indent="0cm" style:auto-text-indent="false"/>
      <style:text-properties fo:font-size="13pt" style:font-size-asian="13pt" style:font-size-complex="13pt"/>
    </style:style>
    <style:style style:name="P4" style:family="paragraph" style:parent-style-name="List_20_Paragraph">
      <style:paragraph-properties fo:margin-left="3.81cm" fo:margin-right="0cm" fo:text-align="justify" style:justify-single-word="false" fo:text-indent="0cm" style:auto-text-indent="false"/>
      <style:text-properties fo:font-size="13pt" style:font-size-asian="13pt" style:font-size-complex="13pt"/>
    </style:style>
    <style:style style:name="P5"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20bc69" officeooo:paragraph-rsid="0020bc69" style:font-size-asian="13pt" style:font-size-complex="13pt"/>
    </style:style>
    <style:style style:name="P6"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20bc69" officeooo:paragraph-rsid="0028577d" style:font-size-asian="13pt" style:font-size-complex="13pt"/>
    </style:style>
    <style:style style:name="P7"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20bc69" officeooo:paragraph-rsid="0029f36c" style:font-size-asian="13pt" style:font-size-complex="13pt"/>
    </style:style>
    <style:style style:name="P8"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3b830a" officeooo:paragraph-rsid="003b830a" style:font-size-asian="13pt" style:font-size-complex="13pt"/>
    </style:style>
    <style:style style:name="P9"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3b830a" officeooo:paragraph-rsid="003ec7de" style:font-size-asian="13pt" style:font-size-complex="13pt"/>
    </style:style>
    <style:style style:name="P10"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3b830a" officeooo:paragraph-rsid="003f262e" style:font-size-asian="13pt" style:font-size-complex="13pt"/>
    </style:style>
    <style:style style:name="P11"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font-size="13pt" officeooo:rsid="001a756d" officeooo:paragraph-rsid="003f262e" style:font-size-asian="13pt" style:font-size-complex="13pt"/>
    </style:style>
    <style:style style:name="P12" style:family="paragraph" style:parent-style-name="List_20_Paragraph" style:list-style-name="WWNum1">
      <style:paragraph-properties fo:text-align="justify" style:justify-single-word="false"/>
      <style:text-properties fo:font-size="13pt" officeooo:rsid="001af584" officeooo:paragraph-rsid="001af584" style:font-size-asian="13pt" style:font-size-complex="13pt"/>
    </style:style>
    <style:style style:name="P13" style:family="paragraph" style:parent-style-name="List_20_Paragraph" style:list-style-name="WWNum1">
      <style:paragraph-properties fo:text-align="justify" style:justify-single-word="false"/>
      <style:text-properties fo:font-size="13pt" style:font-size-asian="13pt" style:font-size-complex="13pt"/>
    </style:style>
    <style:style style:name="P14" style:family="paragraph" style:parent-style-name="List_20_Paragraph" style:list-style-name="WWNum1">
      <style:paragraph-properties fo:margin-top="0cm" fo:margin-bottom="0.282cm" style:contextual-spacing="true" fo:text-align="justify" style:justify-single-word="false"/>
      <style:text-properties fo:font-size="13pt" style:font-size-asian="13pt" style:font-size-complex="13pt"/>
    </style:style>
    <style:style style:name="P15" style:family="paragraph" style:parent-style-name="List_20_Paragraph" style:list-style-name="WWNum1">
      <style:paragraph-properties fo:margin-top="0cm" fo:margin-bottom="0.282cm" style:contextual-spacing="true" fo:text-align="justify" style:justify-single-word="false"/>
      <style:text-properties fo:font-size="13pt" officeooo:rsid="0043f63c" officeooo:paragraph-rsid="0043f63c" style:font-size-asian="13pt" style:font-size-complex="13pt"/>
    </style:style>
    <style:style style:name="P16" style:family="paragraph" style:parent-style-name="List_20_Paragraph" style:list-style-name="WWNum1">
      <style:paragraph-properties fo:margin-top="0cm" fo:margin-bottom="0.282cm" style:contextual-spacing="true" fo:text-align="justify" style:justify-single-word="false"/>
      <style:text-properties fo:font-size="13pt" officeooo:rsid="0020bc69" officeooo:paragraph-rsid="0020bc69" style:font-size-asian="13pt" style:font-size-complex="13pt"/>
    </style:style>
    <style:style style:name="P17" style:family="paragraph" style:parent-style-name="List_20_Paragraph" style:list-style-name="L1">
      <style:paragraph-properties fo:margin-top="0cm" fo:margin-bottom="0.282cm" style:contextual-spacing="true" fo:text-align="justify" style:justify-single-word="false"/>
      <style:text-properties fo:font-size="13pt" officeooo:rsid="003b830a" officeooo:paragraph-rsid="003b830a" style:font-size-asian="13pt" style:font-size-complex="13pt"/>
    </style:style>
    <style:style style:name="P18" style:family="paragraph" style:parent-style-name="List_20_Paragraph" style:list-style-name="WWNum1">
      <style:paragraph-properties fo:text-align="justify" style:justify-single-word="false"/>
    </style:style>
    <style:style style:name="T1" style:family="text">
      <style:text-properties fo:font-size="13pt" style:font-size-asian="13pt" style:font-size-complex="13pt"/>
    </style:style>
    <style:style style:name="T2" style:family="text">
      <style:text-properties officeooo:rsid="001de364"/>
    </style:style>
    <style:style style:name="T3" style:family="text">
      <style:text-properties officeooo:rsid="001e3713"/>
    </style:style>
    <style:style style:name="T4" style:family="text">
      <style:text-properties officeooo:rsid="001f3062"/>
    </style:style>
    <style:style style:name="T5" style:family="text">
      <style:text-properties officeooo:rsid="002177a5"/>
    </style:style>
    <style:style style:name="T6" style:family="text">
      <style:text-properties officeooo:rsid="00232400"/>
    </style:style>
    <style:style style:name="T7" style:family="text">
      <style:text-properties officeooo:rsid="0028577d"/>
    </style:style>
    <style:style style:name="T8" style:family="text">
      <style:text-properties officeooo:rsid="0029f36c"/>
    </style:style>
    <style:style style:name="T9" style:family="text">
      <style:text-properties officeooo:rsid="002b3b18"/>
    </style:style>
    <style:style style:name="T10" style:family="text">
      <style:text-properties officeooo:rsid="002e6b01"/>
    </style:style>
    <style:style style:name="T11" style:family="text">
      <style:text-properties officeooo:rsid="002ff5fc"/>
    </style:style>
    <style:style style:name="T12" style:family="text">
      <style:text-properties officeooo:rsid="00326e47"/>
    </style:style>
    <style:style style:name="T13" style:family="text">
      <style:text-properties officeooo:rsid="00335643"/>
    </style:style>
    <style:style style:name="T14" style:family="text">
      <style:text-properties officeooo:rsid="00349389"/>
    </style:style>
    <style:style style:name="T15" style:family="text">
      <style:text-properties officeooo:rsid="0037e806"/>
    </style:style>
    <style:style style:name="T16" style:family="text">
      <style:text-properties officeooo:rsid="003b3f7a"/>
    </style:style>
    <style:style style:name="T17" style:family="text">
      <style:text-properties officeooo:rsid="003db661"/>
    </style:style>
    <style:style style:name="T18" style:family="text">
      <style:text-properties officeooo:rsid="003ec7de"/>
    </style:style>
    <style:style style:name="T19" style:family="text">
      <style:text-properties officeooo:rsid="003f262e"/>
    </style:style>
    <style:style style:name="T20" style:family="text">
      <style:text-properties officeooo:rsid="003785e5"/>
    </style:style>
    <style:style style:name="T21" style:family="text">
      <style:text-properties officeooo:rsid="003f3385"/>
    </style:style>
    <style:style style:name="T22" style:family="text">
      <style:text-properties officeooo:rsid="00420536"/>
    </style:style>
    <style:style style:name="T23" style:family="text">
      <style:text-properties officeooo:rsid="004292b3"/>
    </style:style>
    <style:style style:name="T24" style:family="text">
      <style:text-properties officeooo:rsid="0044eab8"/>
    </style:style>
    <style:style style:name="T25" style:family="text">
      <style:text-properties officeooo:rsid="00467267"/>
    </style:style>
    <style:style style:name="T26" style:family="text">
      <style:text-properties officeooo:rsid="00484740"/>
    </style:style>
    <style:style style:name="T27" style:family="text">
      <style:text-properties officeooo:rsid="0049aa07"/>
    </style:style>
    <style:style style:name="T28" style:family="text">
      <style:text-properties officeooo:rsid="004b90a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5687528" text:style-name="WWNum1">
        <text:list-item>
          <text:p text:style-name="P12">Inspirations : </text:p>
          <text:list>
            <text:list-item>
              <text:p text:style-name="P12">Les jeux Fenoxo (TF, grossesse, inceste, de nombreuses espèces de monstres, <text:span text:style-name="T4">monde corrompu</text:span>.)</text:p>
            </text:list-item>
            <text:list-item>
              <text:p text:style-name="P12">Lilith’s Throne (<text:span text:style-name="T2">TF très en profondeur, </text:span>possibilité d’avoir des enfants et d’en faire des compagnons de combat.)</text:p>
            </text:list-item>
            <text:list-item>
              <text:p text:style-name="P12">Book Of Lust (Possibilité d’engrosser avec des « agents » qui iront chasser d’autres PNJs pour le compte du joueur et lui ramener des ressources, <text:span text:style-name="T3">possibilité de voir à travers les yeux d’autres PNJs où qu’ils soient et d’en prendre le contrôle</text:span>.)</text:p>
            </text:list-item>
          </text:list>
        </text:list-item>
      </text:list>
      <text:p text:style-name="P1"/>
      <text:list xml:id="list24835796025150" text:continue-numbering="true" text:style-name="WWNum1">
        <text:list-item>
          <text:p text:style-name="P13">Idée de scénario :</text:p>
          <text:list>
            <text:list-item>
              <text:p text:style-name="P13">Un homme se réveille d’un état comateux sur une plage/dans des ruines/un monde inconnu, sans aucun souvenir des récents événements l’ayant conduit ici. Il découvre que les humains ont disparu, remplacés par des animorphes, des animaux anthropomorphes capables de raison et de parole, formant des petites communautés tribales un peu partout sur le nouveau continent, ainsi que des animutants, des animaux ayant dangereusement mutés pour développer une force/intelligence/adaptabilité immense (ex : un lézard ayant muté en dragon). Le joueur doit découvrir ce qui lui est arrivé ainsi qu’à sa civilisation disparue, et espérer trouver un moyen de rentrer chez lui.</text:p>
            </text:list-item>
          </text:list>
        </text:list-item>
      </text:list>
      <text:p text:style-name="P3"><text:s/></text:p>
      <text:list xml:id="list24835534212190" text:continue-numbering="true" text:style-name="WWNum1">
        <text:list-item>
          <text:list>
            <text:list-item>
              <text:p text:style-name="P13">Sa quête l’amène à découvrir la vérité sur ce monde. Plusieurs idées peuvent marcher :</text:p>
              <text:list>
                <text:list-item>
                  <text:p text:style-name="P13">Il travaillait dans un laboratoire étudiant les failles dimensionnelles, des trous dans l’espace-temps reliant différentes dimensions entre elles. Un accident de laboratoire le transporte de force dans le monde des animorphes, où ceux-ci sont victimes de nombreuses failles instables se déclenchant un peu partout sur le territoire, et dont l’intensité et la violence se décuplent à chaque instance, transportant humains et technologies humains dans leur monde, menaçant de faire fusionner ou s’écrouler les deux mondes. Le joueur doit réparer son erreur en stabilisant les failles afin de sauver leurs deux mondes et rentrer chez lui.</text:p>
                </text:list-item>
              </text:list>
            </text:list-item>
          </text:list>
        </text:list-item>
      </text:list>
      <text:p text:style-name="P4"><text:s/></text:p>
      <text:list xml:id="list24835734375692" text:continue-numbering="true" text:style-name="WWNum1">
        <text:list-item>
          <text:list>
            <text:list-item>
              <text:list>
                <text:list-item>
                  <text:p text:style-name="P18"><text:span text:style-name="T1">Idem, mais au lieu de failles dimensionnelles, le protag voyage dans le temps vers le futur, où l’espèce humaine a (presque ?) complètement disparu, remplacé par les animorphes au fil des </text:span><text:soft-page-break/><text:span text:style-name="T1">évolutions, ne laissant au fil des millénaires aucune trace ou presque de la civilisation humaine. Les animorphes sont des animaux normaux ayant rapidement évolué au fil des millénaires (naturellement ou sous l’effet d’un agent chimique créé par les humains ?)</text:span></text:p>
                </text:list-item>
              </text:list>
            </text:list-item>
          </text:list>
        </text:list-item>
      </text:list>
      <text:p text:style-name="P4"><text:s/></text:p>
      <text:list xml:id="list24835338977808" text:continue-numbering="true" text:style-name="WWNum1">
        <text:list-item>
          <text:list>
            <text:list-item>
              <text:list>
                <text:list-item>
                  <text:p text:style-name="P14">Le protag travaillait dans un laboratoire étudiant les effets de nombreuses expérience ésotériques et dangereuses, notamment d’un nouvel agent chimique sur les animaux, espérant décupler leur intelligence pour ensuite le tester sur des humains. L’opération a mal tourné, libérant l’agent dans l’air et contaminant la planète entière. Le protag se réfugie dans un caisson de stase, résultat fructueux d’une autre de leurs expériences, lui permettant de survivre isolé pendant plusieurs décennies sans vieillir. Il se réveille 100 ans plus tard, lorsque le caisson tombe à court d’énergie. L’agent mutagène a fait disparaître la quasi-totalité des humains et muter de nombreuses espèces animales, terrestres comme marines. Pour de nombreux animorphes, l’événement est vu comme un moment lointain dans leurs mémoires : la majeure partie des animaux ne vivant que jusqu’à 20 ou 30 ans, de nombreuses générations se sont succédées et ont oublié cet événement, bien que 100 ans ne paraisse pas bcp pour un humain (pour comparer, cet événement remonterait à environ 500 ans pour un humains, donc proche de la fin de l’empire byzantin).</text:p>
                  <text:p text:style-name="P14"><text:s/></text:p>
                </text:list-item>
              </text:list>
            </text:list-item>
            <text:list-item>
              <text:p text:style-name="P15">Autre idée : Ces scientifiques recherchaient un ancien temple signalant la disparition d’une ancienne civilisation. En ouvrant le caveau, ils libèrent une malédiction qui transforment les animaux en animorphes et permet aux humains de muter en consommant des produits infectés par cette malédiction. <text:span text:style-name="T24">Cette malédiction a été créer par une race ancienne d’animorphes en guerre avec les humains. Après la victoire es humains, les animorphes ont conçu ce sort pour revenir à la vie et reprendre le contrôle de la planète.</text:span></text:p>
            </text:list-item>
          </text:list>
        </text:list-item>
      </text:list>
      <text:p text:style-name="P2"/>
      <text:list xml:id="list24836115029208" text:continue-numbering="true" text:style-name="WWNum1">
        <text:list-item>
          <text:p text:style-name="P16">Idée retenue :</text:p>
        </text:list-item>
      </text:list>
      <text:p text:style-name="P5"/>
      <text:p text:style-name="P6"><text:tab/>Le PP <text:span text:style-name="T14">(que le joueur sera libre de </text:span><text:span text:style-name="T15">nommer, appelé X pour nos besoins</text:span><text:span text:style-name="T14">)</text:span> travaillait avec quelques uns de ses amis scientifiques les plus loyaux et ambitieux sur le plus grand projet de leur carrière : Découvrir le secret de l’immortalité. Ils ont pour <text:soft-page-break/>cela conçu un agent chimique capable d’augmenter les capacités physiques et intellectuelles du sujet, un produit qui s’est malheureusement révélé inconcluant sur les quelques animaux de leur laboratoire, dont une tortue (qui sera un PNJ que le joueur rencontrera par la suite, <text:span text:style-name="T7">ayant vécu suffisamment longtemps pour se souvenir de X</text:span>). </text:p>
      <text:p text:style-name="P6"/>
      <text:p text:style-name="P6"><text:tab/><text:span text:style-name="T9">Leur projet sera par la suite frappé de malchance en malchance, leurs fonds diminuant de plus en plus et des dissensions naissant au sein de groupe, X voulant continuer à tester le produit sur des animaux, et Y, son amie de longue date, désirant secrètement acquérir la clé de l’immortalité et saboter le projet pour en acquérir la propriété. Elle influencera fortement X pour l’inciter à combiner des produits dangereux à l’agent, et pour pratiquer un test de dernière chance sur elle, l’équipe de pouvant plus se permettre de délayer le projet plus longtemps</text:span>.</text:p>
      <text:p text:style-name="P5"/>
      <text:p text:style-name="P7"><text:tab/>Malheureusement, l’expérience <text:span text:style-name="T5">tourne au drame quand Y se découvre avoir développé des capacités surhumaines, </text:span><text:span text:style-name="T10">mais aussi perdu la raison, l’agent ayant vraisemblablement augmenté sa libido et interféré avec sa capacité de jugement, la faisant</text:span><text:span text:style-name="T5"> lib</text:span><text:span text:style-name="T10">é</text:span><text:span text:style-name="T5">r</text:span><text:span text:style-name="T10">er</text:span><text:span text:style-name="T5"> l’agent chimique dans l’air </text:span><text:span text:style-name="T11">dans le but de contaminer le plus de personnes possible</text:span><text:span text:style-name="T5">. Très volatile et capable de se multiplier à grand V, l’agent se répand alors rapidement dans l’atmosphère, infectant tous les êtres vivants sur son passage </text:span><text:span text:style-name="T13">et faisant muter la quasi-totalité des animaux et une grande partie des végétaux, plus résistants à son influence</text:span><text:span text:style-name="T5">. </text:span></text:p>
      <text:p text:style-name="P7"/>
      <text:p text:style-name="P7"><text:span text:style-name="T5"><text:tab/>Seul X parvient à en échapper indemne, en s’enfermant dans un caisson de stase, résultat fructueux d’une autre de leurs expériences, lui permettant de survivre isolé pendant plusieurs décennies sans vieillir. <text:s/>Il se réveille </text:span><text:span text:style-name="T16">2</text:span><text:span text:style-name="T5">00 ans plus tard </text:span><text:span text:style-name="T8">dans les ruines de son laboratoire</text:span><text:span text:style-name="T5">, lorsque le caisson tombe à court d’énergie. Le joueur doit </text:span><text:span text:style-name="T6">alors comprendre</text:span><text:span text:style-name="T5"> ce qui lui est arrivé ainsi qu’à sa civilisation disparue, et espérer trouver un moyen de r</text:span><text:span text:style-name="T6">amener les choses à la normale, </text:span><text:span text:style-name="T12">et surtout survivre dans ce nouveau monde hostile</text:span><text:span text:style-name="T5">.</text:span></text:p>
      <text:p text:style-name="P7"/>
      <text:p text:style-name="P7"/>
      <text:list xml:id="list1147656053" text:style-name="L1">
        <text:list-item>
          <text:p text:style-name="P17">Idées de mécaniques de jeu : </text:p>
        </text:list-item>
      </text:list>
      <text:p text:style-name="P8"/>
      <text:p text:style-name="P9"><text:tab/>Les fétiches principaux sont les filles-monstres (à la Teraurge, où les filles-monstres sont plus monstres que filles), la grossesse et la naissance. <text:span text:style-name="T18">Le joueur pourra choisir d’être un homme ou une femme et donner un nom et assigner des stats de base à son personnage.</text:span></text:p>
      <text:p text:style-name="P9"/>
      <text:p text:style-name="P10"><text:tab/>Le <text:span text:style-name="T17">jeu serait un RPG au tour par tour où le joueur pourrait former une équipe de monstres à qui il aurait donné naissance. </text:span><text:span text:style-name="T18">Pour </text:span><text:span text:style-name="T19">ce faire, il (ou un de ses enfants) </text:span><text:soft-page-break/><text:span text:style-name="T19">doit avoir des rapports sexuels avec des monstres en combat. S</text:span><text:span text:style-name="T20">i le </text:span><text:span text:style-name="T19">perso</text:span><text:span text:style-name="T20"> est un </text:span><text:span text:style-name="T19">mâle</text:span><text:span text:style-name="T20">, il engrossera les PNJs à coup sûr ; si c’est une femelle, il sera capable de donner naissance à des enfants venant d’oeufs non-fertilisés (en les fertilisant lui-mêm</text:span><text:span text:style-name="T21">e</text:span><text:span text:style-name="T20">) ou par rapport sexuel avec des PNJs femelles, humains comme animorphes </text:span><text:span text:style-name="T22">(ou des hommes humains, si le perso est une femelle)</text:span><text:span text:style-name="T20">.</text:span></text:p>
      <text:p text:style-name="P10"/>
      <text:p text:style-name="P10"><text:tab/><text:span text:style-name="T23">Le joueur peut emporter jusqu’à 3 monstres dans son équipe à la fois, les autres étant automatiquement déposes à sa planque. Pour avoir un rapport avec un ennemi, le joueur doit assigner un personnage à cet ennemi ; le personnage et l’ennemi sont retirés du combat et ne pourrons plus interagir avec les autres PNJs. Pour obtenir un enfant de ce combat, le joueur doit ensuite le gagner avec ses membres restants. </text:span></text:p>
      <text:p text:style-name="P11"/>
      <text:p text:style-name="P11"><text:tab/><text:span text:style-name="T25">L’argent n’aurait que peu de valeur dans ce monde et </text:span><text:span text:style-name="T26">seulement</text:span><text:span text:style-name="T25"> dans certaines sociétés précises ; le sexe étant quelque chose de plus nécessaire et omniprésent, même les plus désespérés ne craignent pas de se vendre en échange de ressources, </text:span><text:span text:style-name="T27">contrairement au monde normal où c’est vu comme humiliant </text:span><text:span text:style-name="T28">voire dangereux</text:span><text:span text:style-name="T2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7T03:58:00</meta:creation-date>
    <meta:initial-creator>Clement Guichard</meta:initial-creator>
    <dc:language>fr-FR</dc:language>
    <dc:date>2022-12-30T02:48:34.488000000</dc:date>
    <meta:editing-cycles>51</meta:editing-cycles>
    <meta:editing-duration>PT2H14M37S</meta:editing-duration>
    <meta:generator>LibreOffice/7.3.3.2$Windows_X86_64 LibreOffice_project/d1d0ea68f081ee2800a922cac8f79445e4603348</meta:generator>
    <meta:document-statistic meta:table-count="0" meta:image-count="0" meta:object-count="0" meta:page-count="4" meta:paragraph-count="25" meta:word-count="1271" meta:character-count="7847" meta:non-whitespace-character-count="6593"/>
    <meta:user-defined meta:name="AppVersion">15.0000</meta:user-defined>
    <meta:template xlink:type="simple" xlink:actuate="onRequest" xlink:title="Normal.dotm" xlink:href=""/>
  </office:meta>
</office:document-meta>
</file>