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3b830a" officeooo:paragraph-rsid="003b830a" style:font-size-asian="13pt" style:font-size-complex="13pt"/>
    </style:style>
    <style:style style:name="P2"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3b830a" officeooo:paragraph-rsid="0077bcf0" style:font-size-asian="13pt" style:font-size-complex="13pt"/>
    </style:style>
    <style:style style:name="P3"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697598" officeooo:paragraph-rsid="00697598" style:font-size-asian="13pt" style:font-size-complex="13pt"/>
    </style:style>
    <style:style style:name="P4"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697598" officeooo:paragraph-rsid="006d41f7" style:font-size-asian="13pt" style:font-size-complex="13pt"/>
    </style:style>
    <style:style style:name="P5"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697598" officeooo:paragraph-rsid="006f9671" style:font-size-asian="13pt" style:font-size-complex="13pt"/>
    </style:style>
    <style:style style:name="P6"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6c1d0d" officeooo:paragraph-rsid="006d41f7" style:font-size-asian="13pt" style:font-size-complex="13pt"/>
    </style:style>
    <style:style style:name="P7"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664f6e" officeooo:paragraph-rsid="006d41f7" style:font-size-asian="13pt" style:font-size-complex="13pt"/>
    </style:style>
    <style:style style:name="P8"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84c655" officeooo:paragraph-rsid="0084c655" style:font-size-asian="13pt" style:font-size-complex="13pt"/>
    </style:style>
    <style:style style:name="P9"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71880f" officeooo:paragraph-rsid="0077bcf0" style:font-size-asian="13pt" style:font-size-complex="13pt"/>
    </style:style>
    <style:style style:name="P10"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71880f" officeooo:paragraph-rsid="0074e7a6" style:font-size-asian="13pt" style:font-size-complex="13pt"/>
    </style:style>
    <style:style style:name="P11"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font-size="13pt" officeooo:rsid="002177a5" officeooo:paragraph-rsid="008692ce" style:font-size-asian="13pt" style:font-size-complex="13pt"/>
    </style:style>
    <style:style style:name="P12"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font-size="13pt" officeooo:rsid="0020bc69" officeooo:paragraph-rsid="008692ce" style:font-size-asian="13pt" style:font-size-complex="13pt"/>
    </style:style>
    <style:style style:name="P13"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font-size="13pt" officeooo:rsid="0020bc69" officeooo:paragraph-rsid="008a8568" style:font-size-asian="13pt" style:font-size-complex="13pt"/>
    </style:style>
    <style:style style:name="P14"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font-size="13pt" officeooo:rsid="008a8568" officeooo:paragraph-rsid="008a8568" style:font-size-asian="13pt" style:font-size-complex="13pt"/>
    </style:style>
    <style:style style:name="P15"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bbcb44" officeooo:paragraph-rsid="0074e7a6" style:font-size-asian="13pt" style:font-size-complex="13pt"/>
    </style:style>
    <style:style style:name="P16"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officeooo:paragraph-rsid="0077bcf0"/>
    </style:style>
    <style:style style:name="P17"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officeooo:rsid="00705748" officeooo:paragraph-rsid="0077bcf0"/>
    </style:style>
    <style:style style:name="P18"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officeooo:rsid="0071880f" officeooo:paragraph-rsid="0074e7a6"/>
    </style:style>
    <style:style style:name="P19" style:family="paragraph" style:parent-style-name="List_20_Paragraph" style:list-style-name="L1">
      <style:paragraph-properties fo:margin-left="0cm" fo:margin-right="0cm" fo:margin-top="0cm" fo:margin-bottom="0.282cm" style:contextual-spacing="true" fo:text-align="justify" style:justify-single-word="false" fo:text-indent="0cm" style:auto-text-indent="false"/>
      <style:text-properties fo:font-size="13pt" officeooo:rsid="003b830a" officeooo:paragraph-rsid="003b830a" style:font-size-asian="13pt" style:font-size-complex="13pt"/>
    </style:style>
    <style:style style:name="P20" style:family="paragraph" style:parent-style-name="List_20_Paragraph" style:list-style-name="L1">
      <style:paragraph-properties fo:margin-top="0cm" fo:margin-bottom="0.282cm" style:contextual-spacing="true" fo:text-align="justify" style:justify-single-word="false"/>
      <style:text-properties fo:font-size="13pt" officeooo:rsid="005117ad" officeooo:paragraph-rsid="005117ad" style:font-size-asian="13pt" style:font-size-complex="13pt"/>
    </style:style>
    <style:style style:name="P21" style:family="paragraph" style:parent-style-name="List_20_Paragraph" style:list-style-name="L4">
      <style:paragraph-properties fo:margin-top="0cm" fo:margin-bottom="0.282cm" style:contextual-spacing="true" fo:text-align="justify" style:justify-single-word="false"/>
      <style:text-properties fo:font-size="13pt" officeooo:rsid="00bd66a5" officeooo:paragraph-rsid="00bd66a5" style:font-size-asian="13pt" style:font-size-complex="13pt"/>
    </style:style>
    <style:style style:name="P22" style:family="paragraph" style:parent-style-name="List_20_Paragraph" style:list-style-name="L4">
      <style:paragraph-properties fo:margin-top="0cm" fo:margin-bottom="0.282cm" style:contextual-spacing="true" fo:text-align="justify" style:justify-single-word="false"/>
      <style:text-properties fo:font-size="13pt" officeooo:rsid="00bd66a5" officeooo:paragraph-rsid="00c10f42" style:font-size-asian="13pt" style:font-size-complex="13pt"/>
    </style:style>
    <style:style style:name="P23" style:family="paragraph" style:parent-style-name="List_20_Paragraph" style:list-style-name="L4">
      <style:paragraph-properties fo:margin-top="0cm" fo:margin-bottom="0.282cm" style:contextual-spacing="true" fo:text-align="justify" style:justify-single-word="false"/>
      <style:text-properties fo:font-size="13pt" officeooo:rsid="00be6800" officeooo:paragraph-rsid="00be6800" style:font-size-asian="13pt" style:font-size-complex="13pt"/>
    </style:style>
    <style:style style:name="P24" style:family="paragraph" style:parent-style-name="List_20_Paragraph" style:list-style-name="L4">
      <style:paragraph-properties fo:margin-top="0cm" fo:margin-bottom="0.282cm" style:contextual-spacing="true" fo:text-align="justify" style:justify-single-word="false"/>
      <style:text-properties fo:font-size="13pt" officeooo:rsid="00be6800" officeooo:paragraph-rsid="00c10f42" style:font-size-asian="13pt" style:font-size-complex="13pt"/>
    </style:style>
    <style:style style:name="P25" style:family="paragraph" style:parent-style-name="List_20_Paragraph" style:list-style-name="L4">
      <style:paragraph-properties fo:margin-top="0cm" fo:margin-bottom="0.282cm" style:contextual-spacing="true" fo:text-align="justify" style:justify-single-word="false"/>
      <style:text-properties fo:font-size="13pt" officeooo:rsid="00c2f9ba" officeooo:paragraph-rsid="00c2f9ba" style:font-size-asian="13pt" style:font-size-complex="13pt"/>
    </style:style>
    <style:style style:name="P26" style:family="paragraph" style:parent-style-name="List_20_Paragraph" style:list-style-name="L3">
      <style:paragraph-properties fo:margin-left="0cm" fo:margin-right="0cm" fo:margin-top="0cm" fo:margin-bottom="0.282cm" style:contextual-spacing="true" fo:text-align="justify" style:justify-single-word="false" fo:text-indent="0cm" style:auto-text-indent="false"/>
      <style:text-properties fo:font-size="13pt" officeooo:rsid="0077bcf0" officeooo:paragraph-rsid="0077bcf0" style:font-size-asian="13pt" style:font-size-complex="13pt"/>
    </style:style>
    <style:style style:name="P27" style:family="paragraph" style:parent-style-name="List_20_Paragraph" style:list-style-name="L5">
      <style:paragraph-properties fo:margin-top="0cm" fo:margin-bottom="0.282cm" style:contextual-spacing="true" fo:text-align="justify" style:justify-single-word="false"/>
      <style:text-properties fo:font-size="13pt" officeooo:rsid="0084c655" officeooo:paragraph-rsid="0084c655" style:font-size-asian="13pt" style:font-size-complex="13pt"/>
    </style:style>
    <style:style style:name="P28" style:family="paragraph" style:parent-style-name="List_20_Paragraph" style:list-style-name="L2">
      <style:paragraph-properties fo:margin-top="0cm" fo:margin-bottom="0.282cm" style:contextual-spacing="true" fo:text-align="justify" style:justify-single-word="false"/>
      <style:text-properties officeooo:paragraph-rsid="006d41f7"/>
    </style:style>
    <style:style style:name="P29" style:family="paragraph" style:parent-style-name="List_20_Paragraph" style:list-style-name="L3">
      <style:paragraph-properties fo:margin-top="0cm" fo:margin-bottom="0.282cm" style:contextual-spacing="true" fo:text-align="justify" style:justify-single-word="false"/>
      <style:text-properties officeooo:paragraph-rsid="006d41f7"/>
    </style:style>
    <style:style style:name="P30" style:family="paragraph" style:parent-style-name="List_20_Paragraph" style:list-style-name="L2">
      <style:paragraph-properties fo:margin-top="0cm" fo:margin-bottom="0.282cm" style:contextual-spacing="true" fo:text-align="justify" style:justify-single-word="false"/>
      <style:text-properties officeooo:rsid="005fedf0" officeooo:paragraph-rsid="006d41f7"/>
    </style:style>
    <style:style style:name="P31" style:family="paragraph" style:parent-style-name="List_20_Paragraph" style:list-style-name="L2">
      <style:paragraph-properties fo:margin-top="0cm" fo:margin-bottom="0.282cm" style:contextual-spacing="true" fo:text-align="justify" style:justify-single-word="false"/>
      <style:text-properties officeooo:rsid="00631f60" officeooo:paragraph-rsid="006d41f7"/>
    </style:style>
    <style:style style:name="P32" style:family="paragraph" style:parent-style-name="List_20_Paragraph" style:list-style-name="L3">
      <style:paragraph-properties fo:margin-top="0cm" fo:margin-bottom="0.282cm" style:contextual-spacing="true" fo:text-align="justify" style:justify-single-word="false"/>
      <style:text-properties officeooo:rsid="006f9671" officeooo:paragraph-rsid="00c60918"/>
    </style:style>
    <style:style style:name="P33" style:family="paragraph" style:parent-style-name="List_20_Paragraph" style:list-style-name="L3">
      <style:paragraph-properties fo:margin-top="0cm" fo:margin-bottom="0.282cm" style:contextual-spacing="true" fo:text-align="justify" style:justify-single-word="false"/>
      <style:text-properties officeooo:rsid="006f9671" officeooo:paragraph-rsid="00c3c6a8"/>
    </style:style>
    <style:style style:name="P34" style:family="paragraph" style:parent-style-name="List_20_Paragraph" style:list-style-name="L3">
      <style:paragraph-properties fo:margin-top="0cm" fo:margin-bottom="0.282cm" style:contextual-spacing="true" fo:text-align="justify" style:justify-single-word="false"/>
      <style:text-properties officeooo:rsid="0071880f" officeooo:paragraph-rsid="00c60918"/>
    </style:style>
    <style:style style:name="P35" style:family="paragraph" style:parent-style-name="List_20_Paragraph" style:list-style-name="L3">
      <style:paragraph-properties fo:margin-top="0cm" fo:margin-bottom="0.282cm" style:contextual-spacing="true" fo:text-align="justify" style:justify-single-word="false"/>
      <style:text-properties officeooo:rsid="0071880f" officeooo:paragraph-rsid="0074e7a6"/>
    </style:style>
    <style:style style:name="T1" style:family="text">
      <style:text-properties fo:font-size="13pt" style:font-size-asian="13pt" style:font-size-complex="13pt"/>
    </style:style>
    <style:style style:name="T2" style:family="text">
      <style:text-properties fo:font-size="13pt" officeooo:rsid="0054f915" style:font-size-asian="13pt" style:font-size-complex="13pt"/>
    </style:style>
    <style:style style:name="T3" style:family="text">
      <style:text-properties fo:font-size="13pt" officeooo:rsid="00562050" style:font-size-asian="13pt" style:font-size-complex="13pt"/>
    </style:style>
    <style:style style:name="T4" style:family="text">
      <style:text-properties fo:font-size="13pt" officeooo:rsid="0057b57f" style:font-size-asian="13pt" style:font-size-complex="13pt"/>
    </style:style>
    <style:style style:name="T5" style:family="text">
      <style:text-properties fo:font-size="13pt" officeooo:rsid="005aa02f" style:font-size-asian="13pt" style:font-size-complex="13pt"/>
    </style:style>
    <style:style style:name="T6" style:family="text">
      <style:text-properties fo:font-size="13pt" officeooo:rsid="005baade" style:font-size-asian="13pt" style:font-size-complex="13pt"/>
    </style:style>
    <style:style style:name="T7" style:family="text">
      <style:text-properties fo:font-size="13pt" officeooo:rsid="005cba2e" style:font-size-asian="13pt" style:font-size-complex="13pt"/>
    </style:style>
    <style:style style:name="T8" style:family="text">
      <style:text-properties fo:font-size="13pt" officeooo:rsid="005deefe" style:font-size-asian="13pt" style:font-size-complex="13pt"/>
    </style:style>
    <style:style style:name="T9" style:family="text">
      <style:text-properties fo:font-size="13pt" officeooo:rsid="0061e7eb" style:font-size-asian="13pt" style:font-size-complex="13pt"/>
    </style:style>
    <style:style style:name="T10" style:family="text">
      <style:text-properties fo:font-size="13pt" officeooo:rsid="00627cb7" style:font-size-asian="13pt" style:font-size-complex="13pt"/>
    </style:style>
    <style:style style:name="T11" style:family="text">
      <style:text-properties fo:font-size="13pt" officeooo:rsid="00637a95" style:font-size-asian="13pt" style:font-size-complex="13pt"/>
    </style:style>
    <style:style style:name="T12" style:family="text">
      <style:text-properties fo:font-size="13pt" officeooo:rsid="0063ba6a" style:font-size-asian="13pt" style:font-size-complex="13pt"/>
    </style:style>
    <style:style style:name="T13" style:family="text">
      <style:text-properties fo:font-size="13pt" officeooo:rsid="0064b42d" style:font-size-asian="13pt" style:font-size-complex="13pt"/>
    </style:style>
    <style:style style:name="T14" style:family="text">
      <style:text-properties fo:font-size="13pt" officeooo:rsid="0066d898" style:font-size-asian="13pt" style:font-size-complex="13pt"/>
    </style:style>
    <style:style style:name="T15" style:family="text">
      <style:text-properties fo:font-size="13pt" officeooo:rsid="00697598" style:font-size-asian="13pt" style:font-size-complex="13pt"/>
    </style:style>
    <style:style style:name="T16" style:family="text">
      <style:text-properties fo:font-size="13pt" officeooo:rsid="003b830a" style:font-size-asian="13pt" style:font-size-complex="13pt"/>
    </style:style>
    <style:style style:name="T17" style:family="text">
      <style:text-properties fo:font-size="13pt" officeooo:rsid="00664f6e" style:font-size-asian="13pt" style:font-size-complex="13pt"/>
    </style:style>
    <style:style style:name="T18" style:family="text">
      <style:text-properties fo:font-size="13pt" officeooo:rsid="006c1d0d" style:font-size-asian="13pt" style:font-size-complex="13pt"/>
    </style:style>
    <style:style style:name="T19" style:family="text">
      <style:text-properties fo:font-size="13pt" officeooo:rsid="006d41f7" style:font-size-asian="13pt" style:font-size-complex="13pt"/>
    </style:style>
    <style:style style:name="T20" style:family="text">
      <style:text-properties fo:font-size="13pt" officeooo:rsid="006e0dc7" style:font-size-asian="13pt" style:font-size-complex="13pt"/>
    </style:style>
    <style:style style:name="T21" style:family="text">
      <style:text-properties fo:font-size="13pt" officeooo:rsid="001d502a" style:font-size-asian="13pt" style:font-size-complex="13pt"/>
    </style:style>
    <style:style style:name="T22" style:family="text">
      <style:text-properties fo:font-size="13pt" officeooo:rsid="001e545f" style:font-size-asian="13pt" style:font-size-complex="13pt"/>
    </style:style>
    <style:style style:name="T23" style:family="text">
      <style:text-properties fo:font-size="13pt" officeooo:rsid="00724e06" style:font-size-asian="13pt" style:font-size-complex="13pt"/>
    </style:style>
    <style:style style:name="T24" style:family="text">
      <style:text-properties fo:font-size="13pt" officeooo:rsid="00735f76" style:font-size-asian="13pt" style:font-size-complex="13pt"/>
    </style:style>
    <style:style style:name="T25" style:family="text">
      <style:text-properties fo:font-size="13pt" officeooo:rsid="0074e7a6" style:font-size-asian="13pt" style:font-size-complex="13pt"/>
    </style:style>
    <style:style style:name="T26" style:family="text">
      <style:text-properties fo:font-size="13pt" officeooo:rsid="00756221" style:font-size-asian="13pt" style:font-size-complex="13pt"/>
    </style:style>
    <style:style style:name="T27" style:family="text">
      <style:text-properties fo:font-size="13pt" officeooo:rsid="0075bd40" style:font-size-asian="13pt" style:font-size-complex="13pt"/>
    </style:style>
    <style:style style:name="T28" style:family="text">
      <style:text-properties fo:font-size="13pt" officeooo:rsid="006aac90" style:font-size-asian="13pt" style:font-size-complex="13pt"/>
    </style:style>
    <style:style style:name="T29" style:family="text">
      <style:text-properties fo:font-size="13pt" officeooo:rsid="00523e81" style:font-size-asian="13pt" style:font-size-complex="13pt"/>
    </style:style>
    <style:style style:name="T30" style:family="text">
      <style:text-properties fo:font-size="13pt" officeooo:rsid="005325ec" style:font-size-asian="13pt" style:font-size-complex="13pt"/>
    </style:style>
    <style:style style:name="T31" style:family="text">
      <style:text-properties fo:font-size="13pt" officeooo:rsid="005117ad" style:font-size-asian="13pt" style:font-size-complex="13pt"/>
    </style:style>
    <style:style style:name="T32" style:family="text">
      <style:text-properties fo:font-size="13pt" officeooo:rsid="0071880f" style:font-size-asian="13pt" style:font-size-complex="13pt"/>
    </style:style>
    <style:style style:name="T33" style:family="text">
      <style:text-properties fo:font-size="13pt" officeooo:rsid="0077bcf0" style:font-size-asian="13pt" style:font-size-complex="13pt"/>
    </style:style>
    <style:style style:name="T34" style:family="text">
      <style:text-properties fo:font-size="13pt" officeooo:rsid="008013fa" style:font-size-asian="13pt" style:font-size-complex="13pt"/>
    </style:style>
    <style:style style:name="T35" style:family="text">
      <style:text-properties fo:font-size="13pt" officeooo:rsid="0081fcb7" style:font-size-asian="13pt" style:font-size-complex="13pt"/>
    </style:style>
    <style:style style:name="T36" style:family="text">
      <style:text-properties fo:font-size="13pt" officeooo:rsid="008718a6" style:font-size-asian="13pt" style:font-size-complex="13pt"/>
    </style:style>
    <style:style style:name="T37" style:family="text">
      <style:text-properties fo:font-size="13pt" officeooo:rsid="008a7eb0" style:font-size-asian="13pt" style:font-size-complex="13pt"/>
    </style:style>
    <style:style style:name="T38" style:family="text">
      <style:text-properties fo:font-size="13pt" officeooo:rsid="00bb0184" style:font-size-asian="13pt" style:font-size-complex="13pt"/>
    </style:style>
    <style:style style:name="T39" style:family="text">
      <style:text-properties fo:font-size="13pt" officeooo:rsid="00bbcb44" style:font-size-asian="13pt" style:font-size-complex="13pt"/>
    </style:style>
    <style:style style:name="T40" style:family="text">
      <style:text-properties fo:font-size="13pt" officeooo:rsid="00be6800" style:font-size-asian="13pt" style:font-size-complex="13pt"/>
    </style:style>
    <style:style style:name="T41" style:family="text">
      <style:text-properties fo:font-size="13pt" officeooo:rsid="00705748" style:font-size-asian="13pt" style:font-size-complex="13pt"/>
    </style:style>
    <style:style style:name="T42" style:family="text">
      <style:text-properties fo:font-size="13pt" officeooo:rsid="00c3c6a8" style:font-size-asian="13pt" style:font-size-complex="13pt"/>
    </style:style>
    <style:style style:name="T43" style:family="text">
      <style:text-properties fo:font-size="13pt" officeooo:rsid="00c41204" style:font-size-asian="13pt" style:font-size-complex="13pt"/>
    </style:style>
    <style:style style:name="T44" style:family="text">
      <style:text-properties fo:font-size="13pt" officeooo:rsid="00c60918" style:font-size-asian="13pt" style:font-size-complex="13pt"/>
    </style:style>
    <style:style style:name="T45" style:family="text">
      <style:text-properties fo:font-size="13pt" officeooo:rsid="00e3f153" style:font-size-asian="13pt" style:font-size-complex="13pt"/>
    </style:style>
    <style:style style:name="T46" style:family="text">
      <style:text-properties fo:font-size="13pt" officeooo:rsid="00e4706d" style:font-size-asian="13pt" style:font-size-complex="13pt"/>
    </style:style>
    <style:style style:name="T47" style:family="text">
      <style:text-properties fo:font-size="13pt" officeooo:rsid="00e5a634" style:font-size-asian="13pt" style:font-size-complex="13pt"/>
    </style:style>
    <style:style style:name="T48" style:family="text">
      <style:text-properties fo:font-size="13pt" officeooo:rsid="00e6e16d" style:font-size-asian="13pt" style:font-size-complex="13pt"/>
    </style:style>
    <style:style style:name="T49" style:family="text">
      <style:text-properties fo:font-size="13pt" officeooo:rsid="00e76f85" style:font-size-asian="13pt" style:font-size-complex="13pt"/>
    </style:style>
    <style:style style:name="T50" style:family="text">
      <style:text-properties fo:font-size="13pt" officeooo:rsid="00e9c50a" style:font-size-asian="13pt" style:font-size-complex="13pt"/>
    </style:style>
    <style:style style:name="T51" style:family="text">
      <style:text-properties fo:font-size="13pt" fo:font-weight="bold" officeooo:rsid="008718a6" style:font-size-asian="13pt" style:font-weight-asian="bold" style:font-size-complex="13pt" style:font-weight-complex="bold"/>
    </style:style>
    <style:style style:name="T52" style:family="text">
      <style:text-properties fo:font-size="13pt" fo:font-weight="bold" officeooo:rsid="00d53ca3" style:font-size-asian="13pt" style:font-weight-asian="bold" style:font-size-complex="13pt" style:font-weight-complex="bold"/>
    </style:style>
    <style:style style:name="T53" style:family="text">
      <style:text-properties fo:font-size="13pt" fo:font-weight="bold" officeooo:rsid="00d6aa30" style:font-size-asian="13pt" style:font-weight-asian="bold" style:font-size-complex="13pt" style:font-weight-complex="bold"/>
    </style:style>
    <style:style style:name="T54" style:family="text">
      <style:text-properties fo:font-size="13pt" fo:font-weight="bold" officeooo:rsid="00dd7620" style:font-size-asian="13pt" style:font-weight-asian="bold" style:font-size-complex="13pt" style:font-weight-complex="bold"/>
    </style:style>
    <style:style style:name="T55" style:family="text">
      <style:text-properties fo:font-size="13pt" fo:font-style="normal" fo:font-weight="bold" officeooo:rsid="008718a6" style:font-size-asian="13pt" style:font-style-asian="normal" style:font-weight-asian="bold" style:font-size-complex="13pt" style:font-style-complex="normal" style:font-weight-complex="bold"/>
    </style:style>
    <style:style style:name="T56" style:family="text">
      <style:text-properties officeooo:rsid="002177a5"/>
    </style:style>
    <style:style style:name="T57" style:family="text">
      <style:text-properties officeooo:rsid="00232400"/>
    </style:style>
    <style:style style:name="T58" style:family="text">
      <style:text-properties officeooo:rsid="0029f36c"/>
    </style:style>
    <style:style style:name="T59" style:family="text">
      <style:text-properties officeooo:rsid="002e6b01"/>
    </style:style>
    <style:style style:name="T60" style:family="text">
      <style:text-properties officeooo:rsid="002ff5fc"/>
    </style:style>
    <style:style style:name="T61" style:family="text">
      <style:text-properties officeooo:rsid="00335643"/>
    </style:style>
    <style:style style:name="T62" style:family="text">
      <style:text-properties officeooo:rsid="003b3f7a"/>
    </style:style>
    <style:style style:name="T63" style:family="text">
      <style:text-properties officeooo:rsid="004e0e8d"/>
    </style:style>
    <style:style style:name="T64" style:family="text">
      <style:text-properties officeooo:rsid="004e711e"/>
    </style:style>
    <style:style style:name="T65" style:family="text">
      <style:text-properties officeooo:rsid="006d41f7"/>
    </style:style>
    <style:style style:name="T66" style:family="text">
      <style:text-properties officeooo:rsid="006f9671"/>
    </style:style>
    <style:style style:name="T67" style:family="text">
      <style:text-properties officeooo:rsid="001be644"/>
    </style:style>
    <style:style style:name="T68" style:family="text">
      <style:text-properties officeooo:rsid="00788c58"/>
    </style:style>
    <style:style style:name="T69" style:family="text">
      <style:text-properties officeooo:rsid="007a7c87"/>
    </style:style>
    <style:style style:name="T70" style:family="text">
      <style:text-properties officeooo:rsid="0081fcb7"/>
    </style:style>
    <style:style style:name="T71" style:family="text">
      <style:text-properties officeooo:rsid="00845706"/>
    </style:style>
    <style:style style:name="T72" style:family="text">
      <style:text-properties officeooo:rsid="008692ce"/>
    </style:style>
    <style:style style:name="T73" style:family="text">
      <style:text-properties officeooo:rsid="00890365"/>
    </style:style>
    <style:style style:name="T74" style:family="text">
      <style:text-properties officeooo:rsid="008a8568"/>
    </style:style>
    <style:style style:name="T75" style:family="text">
      <style:text-properties officeooo:rsid="008c12f5"/>
    </style:style>
    <style:style style:name="T76" style:family="text">
      <style:text-properties officeooo:rsid="00ada3d4"/>
    </style:style>
    <style:style style:name="T77" style:family="text">
      <style:text-properties officeooo:rsid="00af6fbd"/>
    </style:style>
    <style:style style:name="T78" style:family="text">
      <style:text-properties officeooo:rsid="00b000c3"/>
    </style:style>
    <style:style style:name="T79" style:family="text">
      <style:text-properties officeooo:rsid="00b04827"/>
    </style:style>
    <style:style style:name="T80" style:family="text">
      <style:text-properties officeooo:rsid="00b19231"/>
    </style:style>
    <style:style style:name="T81" style:family="text">
      <style:text-properties officeooo:rsid="00b2e14b"/>
    </style:style>
    <style:style style:name="T82" style:family="text">
      <style:text-properties officeooo:rsid="00b323aa"/>
    </style:style>
    <style:style style:name="T83" style:family="text">
      <style:text-properties officeooo:rsid="00b4ced4"/>
    </style:style>
    <style:style style:name="T84" style:family="text">
      <style:text-properties officeooo:rsid="00b77d2e"/>
    </style:style>
    <style:style style:name="T85" style:family="text">
      <style:text-properties officeooo:rsid="00bd66a5"/>
    </style:style>
    <style:style style:name="T86" style:family="text">
      <style:text-properties officeooo:rsid="00be6800"/>
    </style:style>
    <style:style style:name="T87" style:family="text">
      <style:text-properties officeooo:rsid="00c10f42"/>
    </style:style>
    <style:style style:name="T88" style:family="text">
      <style:text-properties officeooo:rsid="00c326f3"/>
    </style:style>
    <style:style style:name="T89" style:family="text">
      <style:text-properties officeooo:rsid="00c7a8ef"/>
    </style:style>
    <style:style style:name="T90" style:family="text">
      <style:text-properties officeooo:rsid="00ca2b8b"/>
    </style:style>
    <style:style style:name="T91" style:family="text">
      <style:text-properties officeooo:rsid="00d025db"/>
    </style:style>
    <style:style style:name="T92" style:family="text">
      <style:text-properties officeooo:rsid="00d20aba"/>
    </style:style>
    <style:style style:name="T93" style:family="text">
      <style:text-properties officeooo:rsid="00d3b8b7"/>
    </style:style>
    <style:style style:name="T94" style:family="text">
      <style:text-properties officeooo:rsid="00d4d50d"/>
    </style:style>
    <style:style style:name="T95" style:family="text">
      <style:text-properties officeooo:rsid="00e8729d"/>
    </style:style>
    <style:style style:name="T96" style:family="text">
      <style:text-properties officeooo:rsid="00ecfc3d"/>
    </style:style>
    <style:style style:name="T97" style:family="text">
      <style:text-properties fo:color="#127622" loext:opacity="100%" fo:font-size="13pt" officeooo:rsid="006e0dc7" style:font-size-asian="13pt" style:font-size-complex="13pt"/>
    </style:style>
    <style:style style:name="T98" style:family="text">
      <style:text-properties fo:color="#127622" loext:opacity="100%" fo:font-size="13pt" officeooo:rsid="00bbcb44" style:font-size-asian="13pt" style:font-size-complex="13pt"/>
    </style:style>
    <style:style style:name="T99" style:family="text">
      <style:text-properties officeooo:rsid="00ef6ec5"/>
    </style:style>
    <style:style style:name="T100" style:family="text">
      <style:text-properties officeooo:rsid="00f05b3a"/>
    </style:style>
    <style:style style:name="T101" style:family="text">
      <style:text-properties officeooo:rsid="00f134b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05102001" text:style-name="L1">
        <text:list-header>
          <text:p text:style-name="P19"><text:span text:style-name="T63">Brouillon de scénario </text:span><text:span text:style-name="T64">(Agent 18, animorphes)</text:span> : </text:p>
        </text:list-header>
      </text:list>
      <text:p text:style-name="P1"/>
      <text:list xml:id="list182938575110221" text:continue-numbering="true" text:style-name="L1">
        <text:list-item>
          <text:p text:style-name="P20">Avant le début du jeu :</text:p>
        </text:list-item>
      </text:list>
      <text:p text:style-name="P2"><text:tab/></text:p>
      <text:p text:style-name="P16"><text:span text:style-name="T16"><text:tab/></text:span><text:span text:style-name="T15">Le protagoniste, X, est recruté avec d’autres scientifiques d’élite par le gouvernement </text:span><text:span text:style-name="T28">français</text:span><text:span text:style-name="T15"> pour c</text:span><text:span text:style-name="T29">oncevoir un agent </text:span><text:span text:style-name="T30">chimique</text:span><text:span text:style-name="T29"> capable d’augmenter les capacités physiques et intellectuelles d’un sujet, et à terme, t</text:span><text:span text:style-name="T31">rouver le secret de l’immortalité : </text:span><text:span text:style-name="T15">L’agent 18</text:span><text:span text:style-name="T31">.</text:span></text:p>
      <text:p text:style-name="P3"/>
      <text:p text:style-name="P5"><text:tab/>Malgré de nouvelles prouesses technologiques, le projet ne portera pas ses fruits et le gouvernement décidera d’abandonner le projet. Réunissant la plupart de ses confrères rêvant encore de voir naître ce projet, X et eux <text:span text:style-name="T66">iront</text:span><text:span text:style-name="T67"> jusqu’à voler du matériel et dossier confidentiels et à vendre leurs propres biens pour financer leurs opérations</text:span>, recherchant l’agent 18 dans le plus grand secret dans un laboratoire caché dans le sud de la France <text:span text:style-name="T65">en expérimentant sur :</text:span></text:p>
      <text:p text:style-name="P4"><text:s/></text:p>
      <text:list xml:id="list2695753249" text:style-name="L2">
        <text:list-item>
          <text:p text:style-name="P28"><text:span text:style-name="T51">A</text:span><text:span text:style-name="T52">nita</text:span><text:span text:style-name="T36">, </text:span><text:span text:style-name="T4">U</text:span><text:span text:style-name="T2">ne tortue </text:span><text:span text:style-name="T6">géante de Galapagos</text:span><text:span text:style-name="T2">, réputée pour </text:span><text:span text:style-name="T6">vivre jusqu’à 200 ans, sa résistance aux cancers </text:span><text:span text:style-name="T7">et infections, </text:span><text:span text:style-name="T8">et son excellente mémoire</text:span><text:span text:style-name="T2"> ; </text:span></text:p>
        </text:list-item>
        <text:list-item>
          <text:p text:style-name="P28"><text:span text:style-name="T51">B</text:span><text:span text:style-name="T52">lanco</text:span><text:span text:style-name="T36">, </text:span><text:span text:style-name="T4">U</text:span><text:span text:style-name="T2">n rat-taupe nu, réputé pour </text:span><text:span text:style-name="T6">vivre jusqu’à 30 ans,</text:span><text:span text:style-name="T2"> et sa résistance aux maladies, </text:span><text:span text:style-name="T3">cancers et dégénérescences nerveuses,</text:span><text:span text:style-name="T4"> son insensibilité à la douleur, </text:span><text:span text:style-name="T5">et sa capacité à survivre sans oxygène pendant 18 minutes sans séquelles</text:span><text:span text:style-name="T4"> </text:span><text:span text:style-name="T2">; </text:span></text:p>
        </text:list-item>
        <text:list-item>
          <text:p text:style-name="P30"><text:span text:style-name="T51">C</text:span><text:span text:style-name="T53">harlotte</text:span><text:span text:style-name="T36">, </text:span><text:span text:style-name="T2">U</text:span><text:span text:style-name="T1">ne Méduse Immortelle, capable de régénérer ses cellules </text:span><text:span text:style-name="T10">jusqu’à</text:span><text:span text:style-name="T1"> </text:span><text:span text:style-name="T9">revenir à un stade de polype</text:span><text:span text:style-name="T1"> et être biologiquement immortelle ;</text:span></text:p>
        </text:list-item>
        <text:list-item>
          <text:p text:style-name="P31"><text:span text:style-name="T51">D</text:span><text:span text:style-name="T54">ragmar</text:span><text:span text:style-name="T36">, </text:span><text:span text:style-name="T50">et p</text:span><text:span text:style-name="T12">lusieurs espèces de lézards</text:span><text:span text:style-name="T1">, capable</text:span><text:span text:style-name="T12">s</text:span><text:span text:style-name="T1"> de su</text:span><text:span text:style-name="T35">pp</text:span><text:span text:style-name="T1">orter le gel de </text:span><text:span text:style-name="T12">leurs</text:span><text:span text:style-name="T1"> organes et de repousser </text:span><text:span text:style-name="T13">leur</text:span><text:span text:style-name="T1"> queu</text:span><text:span text:style-name="T11">e rapidement</text:span><text:span text:style-name="T1"> ;</text:span></text:p>
        </text:list-item>
        <text:list-item>
          <text:p text:style-name="P31"><text:span text:style-name="T55">Emmie</text:span><text:span text:style-name="T36">, </text:span><text:span text:style-name="T17">Un perroquet, qui bien que n’étant pas un sujet de test sera lui aussi exposé à l’agent 18 </text:span><text:span text:style-name="T14">et changé en harpie. On l’ajoute juste pour avoir un oiseau dans cette équipe d’animorphes, ce qui nous fait 1 animal par élément + la tortue comme chef.</text:span></text:p>
        </text:list-item>
      </text:list>
      <text:p text:style-name="P7"/>
      <text:p text:style-name="P6"><text:tab/>Cependant, ces scientifiques n’ont pas tous rejoint cette entreprise pour les mêmes raisons : </text:p>
      <text:p text:style-name="P6"/>
      <text:list xml:id="list1378899562" text:style-name="L3">
        <text:list-item>
          <text:p text:style-name="P29"><text:span text:style-name="T18">Les raisons de X seront dictées par le joueur : </text:span><text:span text:style-name="T20">Désir de faire progresser l’humanité </text:span><text:span text:style-name="T39">et de se venger de leurs supérieurs qui leur ont coupé l’herbe sous le pied ;</text:span><text:span text:style-name="T97"> </text:span><text:span text:style-name="T98">mais aussi</text:span><text:span text:style-name="T97"> usage personnel, gloire et richesse ou amusement</text:span><text:span text:style-name="T18"> </text:span><text:span text:style-name="T24">(</text:span><text:span text:style-name="T40">A</text:span><text:span text:style-name="T24">)</text:span><text:span text:style-name="T18">;</text:span></text:p>
        </text:list-item>
        <text:list-item>
          <text:p text:style-name="P32"><text:span text:style-name="T45">Yveline</text:span><text:span text:style-name="T41">, une amie proche </text:span><text:span text:style-name="T1">de X</text:span><text:span text:style-name="T41">, avide de gloire et fortune </text:span><text:span text:style-name="T43">qui désire l’agent pour son usage personnel</text:span><text:span text:style-name="T41"> </text:span><text:span text:style-name="T24">(</text:span><text:span text:style-name="T40">B</text:span><text:span text:style-name="T24">)</text:span><text:span text:style-name="T41"> ;</text:span></text:p>
        </text:list-item>
        <text:list-item>
          <text:p text:style-name="P34"><text:span text:style-name="T44">Z</text:span><text:span text:style-name="T46">oé</text:span><text:span text:style-name="T41">, </text:span><text:span text:style-name="T25">qui n’est pas un</text:span><text:span text:style-name="T47">e</text:span><text:span text:style-name="T25"> scientifique mais participe à la maintenance des machines </text:span><text:span text:style-name="T38">et aide X à prendre soin des animaux</text:span><text:span text:style-name="T25"> ; </text:span><text:span text:style-name="T47">elle</text:span><text:span text:style-name="T26"> n</text:span><text:span text:style-name="T37">e comprend pas </text:span><text:soft-page-break/><text:span text:style-name="T37">vraiment comment le projet fonctionne</text:span><text:span text:style-name="T26"> mais est</text:span><text:span text:style-name="T25"> reconnaissant envers X de lui avoir donné un but à son existence </text:span><text:span text:style-name="T27">en le faisant membre d’un projet aussi incroyable</text:span><text:span text:style-name="T25"> (</text:span><text:span text:style-name="T40">C</text:span><text:span text:style-name="T25">)</text:span><text:span text:style-name="T41"> ;</text:span></text:p>
        </text:list-item>
        <text:list-item>
          <text:p text:style-name="P33"><text:span text:style-name="T48">Vincent</text:span><text:span text:style-name="T44">,</text:span><text:span text:style-name="T19"> </text:span><text:span text:style-name="T1">un ami proche </text:span><text:span text:style-name="T42">lui</text:span><text:span text:style-name="T41"> aussi</text:span><text:span text:style-name="T1">, le fait pour soigner sa fille d’une maladie incurable </text:span><text:span text:style-name="T24">(</text:span><text:span text:style-name="T40">D</text:span><text:span text:style-name="T24">)</text:span><text:span text:style-name="T1">;</text:span></text:p>
        </text:list-item>
        <text:list-item>
          <text:p text:style-name="P35"><text:span text:style-name="T44">W</text:span><text:span text:style-name="T49">illiam</text:span><text:span text:style-name="T1">, </text:span><text:span text:style-name="T23">le propriétaire du perroquet</text:span><text:span text:style-name="T1">, qui n’avait rejoint le projet que par curiosité et amusement, plutôt indifférent aux implications sur leur monde qu’aurait la réussite de leur projet </text:span><text:span text:style-name="T24">(</text:span><text:span text:style-name="T40">E</text:span><text:span text:style-name="T24">)</text:span><text:span text:style-name="T1"> ;</text:span></text:p>
        </text:list-item>
      </text:list>
      <text:p text:style-name="P10"/>
      <text:p text:style-name="P18"><text:span text:style-name="T1"><text:tab/></text:span><text:span text:style-name="T38">Leurs motivations reflètent </text:span><text:span text:style-name="T39">celles des animorphes que deviendront les sujets de tests du groupe : </text:span></text:p>
      <text:p text:style-name="P15"><text:tab/></text:p>
      <text:list xml:id="list3281369391" text:style-name="L4">
        <text:list-item>
          <text:p text:style-name="P21">A<text:span text:style-name="T100">nita</text:span> cherche à se venger des humains qui lui ont fait subir ces expériences et on ruiné son monde ;</text:p>
        </text:list-item>
        <text:list-item>
          <text:p text:style-name="P22">B, <text:span text:style-name="T99">le descendant de Blanco</text:span>,<text:span text:style-name="T86"> qui n’est intéressé que par l’argent et le pouvoir que lui donne sa position d’homme de main de A ;</text:span> </text:p>
        </text:list-item>
        <text:list-item>
          <text:p text:style-name="P23">C<text:span text:style-name="T100">harlotte</text:span>, <text:span text:style-name="T87">qui est répugnée par la guerre entre humains et animorphes, mais suit A car elle est sa dernière amie et donne un but à son existence ; </text:span></text:p>
        </text:list-item>
        <text:list-item>
          <text:p text:style-name="P24">D, <text:span text:style-name="T100">descendante de Dragmar</text:span>, <text:span text:style-name="T85">qui ne cherche </text:span><text:span text:style-name="T96">qu’</text:span><text:span text:style-name="T85">à protéger les siens ;</text:span></text:p>
        </text:list-item>
        <text:list-item>
          <text:p text:style-name="P25">E, <text:span text:style-name="T100">descendante d’Emmie</text:span>, qui ne suit les traces de son ancêtre et les ordres de A que par amusement du chaos que leurs actions engendrent partout sur le pays, <text:span text:style-name="T88">indifférente aux conséquences néfastes de leurs actes</text:span>.</text:p>
        </text:list-item>
      </text:list>
      <text:list xml:id="list182939762151446" text:continue-list="list1378899562" text:style-name="L3">
        <text:list-item>
          <text:list>
            <text:list-header>
              <text:p text:style-name="P26"/>
            </text:list-header>
          </text:list>
        </text:list-item>
      </text:list>
      <text:p text:style-name="P17"><text:span text:style-name="T33"><text:tab/></text:span><text:span text:style-name="T32">Leurs objectifs divergents causeront de nombreuses dissensions au sein de l’équipe : </text:span><text:span text:style-name="T21">Y, malgré son amitié avec ses collègues, restait au fond d’elle une femme arriviste qui, voyant que le projet avait </text:span><text:span text:style-name="T32">de moins en moins</text:span><text:span text:style-name="T21"> de chances de se conclure </text:span><text:span text:style-name="T32">au fil du temps, </text:span><text:span text:style-name="T21">se décida à sabot</text:span><text:span text:style-name="T32">er</text:span><text:span text:style-name="T21"> le projet en expérimentant avec des produits plus </text:span><text:span text:style-name="T22">efficaces mais </text:span><text:span text:style-name="T21">dangereux </text:span><text:span text:style-name="T32">afin d’en accélérer le dévelo</text:span><text:span text:style-name="T34">pp</text:span><text:span text:style-name="T32">ement, dans le but d’en acquérir le crédit et d’obtenir la notoriété dont elle a toujours rêvé au sein de la communauté scientifique.</text:span></text:p>
      <text:p text:style-name="P9"/>
      <text:p text:style-name="P12"><text:tab/><text:span text:style-name="T69">L</text:span>’expérience <text:span text:style-name="T56">tourne au drame quand Y </text:span><text:span text:style-name="T68">ingère l’agent 18 et perd</text:span><text:span text:style-name="T59"> sa capacité de jugement, la faisant</text:span><text:span text:style-name="T56"> lib</text:span><text:span text:style-name="T59">é</text:span><text:span text:style-name="T56">r</text:span><text:span text:style-name="T59">er</text:span><text:span text:style-name="T56"> l’agent chimique dans l’air </text:span><text:span text:style-name="T60">dans le but de contaminer le plus de personnes possible</text:span><text:span text:style-name="T56">. Très volatile et capable de se multiplier à grand V, l’agent se répand alors rapidement dans l’atmosphère, infectant tous les êtres vivants sur son passage </text:span><text:span text:style-name="T61">et faisant muter la quasi-totalité des animaux et une grande partie des végétaux, plus résistants à son influence</text:span><text:span text:style-name="T56">. </text:span><text:span text:style-name="T73">Parmi le groupe de scientifiques, </text:span><text:span text:style-name="T89">s</text:span><text:span text:style-name="T56">eul X parvient à en écha</text:span><text:span text:style-name="T70">pp</text:span><text:span text:style-name="T56">er indemne, en s’enfermant dans un caisson de stase, résultat fructueux d’une autre de leurs expériences, lui permettant de survivre isolé pendant plusieurs décennies sans vieillir.</text:span></text:p>
      <text:p text:style-name="P12"><text:soft-page-break/><text:s/></text:p>
      <text:p text:style-name="P13"><text:tab/><text:span text:style-name="T74">Les animaux cobayes, quant à eux, sont devenus les premiers mutants de l’histoire, utilisant leurs nouveaux corps pour s’échapper de leurs cellules et comprendre ce qui leur était arrivé. Tentant de survivre dans ce monde plongé dans le chaos, ils sont horrifiés par la violence des nouvelles guerres entre humains et animorphes et décident de fonder une confrérie d’animorphes pour veiller les uns sur les autres et protéger leurs semblables des attaques des humains. </text:span></text:p>
      <text:p text:style-name="P13"/>
      <text:p text:style-name="P14"><text:tab/>Mais les décennies passent, et A, la chef de ce groupe, devient de plus en plus aigrie de son impuissance face à ces guerres sans fin et face au temps emportant ses amis les uns après les autres, rejetant sa colère sur les humains et blâmant X et ses collègues pour avoir causé la ruine de ce monde. A, se servant de ses quelques amis encore en vie et les progénitures des autres comme pions, se lance alors dans un projet ambitieux : Se venger de l’humanité en la réduisant en esclavage, faisant des animorphes les maîtres de ce nouveau monde.</text:p>
      <text:p text:style-name="P11"><text:s text:c="2"/></text:p>
      <text:list xml:id="list1500900933" text:style-name="L5">
        <text:list-item>
          <text:p text:style-name="P27">Au début du jeu : </text:p>
        </text:list-item>
      </text:list>
      <text:p text:style-name="P8"/>
      <text:p text:style-name="P12"><text:span text:style-name="T72"><text:tab/>X</text:span><text:span text:style-name="T56"> se réveille </text:span><text:span text:style-name="T62">2</text:span><text:span text:style-name="T56">00 ans plus tard </text:span><text:span text:style-name="T58">dans les ruines de son laboratoire</text:span><text:span text:style-name="T56">, lorsque le caisson tombe à court d’énergie. </text:span><text:span text:style-name="T75">Ses camarades sont morts dans l’effondrement et les animaux qui y vivaient ont tous disparu.</text:span><text:span text:style-name="T56"> Le joueur doit </text:span><text:span text:style-name="T57">alors comprendre</text:span><text:span text:style-name="T56"> ce qui lui est arrivé ainsi qu’à sa civilisation disparue, e</text:span><text:span text:style-name="T71">n espérant</text:span><text:span text:style-name="T56"> trouver un moyen de r</text:span><text:span text:style-name="T57">amener les choses à la normale.</text:span></text:p>
      <text:p text:style-name="P12"/>
      <text:p text:style-name="P12"><text:tab/><text:span text:style-name="T76">X en apprend plus sur les animorphes, ce nouveau genre d’animaux anthropomorphes pullulant sur le globe, ainsi que la Nuit Noire, un événement apocalyptique à l’origine de leur apparition il y a 200 ans. Depuis cet événement, les humains et animorphes sont enfermés dans un conflit sans fin, les deux camps désespérant y trouver une issue.</text:span></text:p>
      <text:p text:style-name="P12"/>
      <text:p text:style-name="P12"><text:tab/><text:span text:style-name="T77">X apprend aussi l’apparition d’un groupuscule animorphe apparu très peu de temps après </text:span><text:span text:style-name="T78">la Nuit Noire : Le groupuscule de A, la tortue dont il s’occupait au laboratoire. </text:span><text:span text:style-name="T79">Devenue folle après la perte de ses amis et les années de maltraitance au laboratoire, elle </text:span><text:span text:style-name="T80">a concocté un plan secret pour prendre sa revanche sur l’humanité : Concevoir un autre agent chimique </text:span><text:span text:style-name="T95">et le répandre dans l’air afin de</text:span><text:span text:style-name="T80"> </text:span><text:span text:style-name="T90">rendre stérile les humains, </text:span><text:span text:style-name="T95">les condamnant ainsi à l’extinction</text:span><text:span text:style-name="T80">, </text:span><text:span text:style-name="T95">et de faire resurgir les instincts primaux des animorphes afin de les renvoyer à l’état bestial et restaurer leur compatibilité avec les animutants, faisant disparaître les animorphes comme les monde les connaît alors</text:span><text:span text:style-name="T80">. </text:span><text:span text:style-name="T81">X découvre que Y, toujours vivante, est der</text:span><text:span text:style-name="T101">r</text:span><text:span text:style-name="T81">ière leur création, enrôlée de force </text:span><text:soft-page-break/><text:span text:style-name="T81">par A pour travailler sur ces armes en expérimentant sur des humains et animorphes rebelles.</text:span></text:p>
      <text:p text:style-name="P12"/>
      <text:p text:style-name="P12"><text:tab/><text:span text:style-name="T82">Pour arrêter le plan de A, X doit traverser le pays et casser les opérations criminelles de ses hommes de main dans toutes les régions. La plupart de ces derniers, les descendants des animorphes originaux amis de A, ont également leurs propres plans que X devra arrêter, ou bien leurs propres raisons de l’avoir rejointe, que X devra résoudre afin de les faire changer de camp. </text:span><text:span text:style-name="T83">Chacun de ces membres représente un des membres de l’équipe de X avant la Nuit Noire (par exemple : C, sans compréhension de ce qui l’entoure mais heureuse d’avoir un but </text:span><text:span text:style-name="T84">comme </text:span><text:span text:style-name="T91">Z</text:span><text:span text:style-name="T83">, ou D, qui se bat pour protéger sa famille et son peuple </text:span><text:span text:style-name="T84">comme </text:span><text:span text:style-name="T91">V</text:span><text:span text:style-name="T83">.)</text:span></text:p>
      <text:p text:style-name="P12"/>
      <text:p text:style-name="P12"><text:tab/><text:span text:style-name="T82">En parallèle à cette quête principale, X aura aussi pour mission d’arrêter les groupuscules humains </text:span><text:span text:style-name="T92">et animorphes</text:span><text:span text:style-name="T82"> bataillant pour le contrôle du territoire, notamment deux sectes idéologiquement opposées </text:span><text:span text:style-name="T94">dans chaque camp</text:span><text:span text:style-name="T82">, prônant tour à tour la suprématie des animorphes ou leur extermination </text:span><text:span text:style-name="T93">(du côté des humains), ou tour à tour l’isolation des animorphes vàv des hommes ou l’esclavage de l’humanité (du côté des animorphes)</text:span><text:span text:style-name="T8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7T03:58:00</meta:creation-date>
    <meta:initial-creator>Clement Guichard</meta:initial-creator>
    <dc:language>fr-FR</dc:language>
    <dc:date>2024-11-15T18:29:37.951000000</dc:date>
    <meta:editing-cycles>200</meta:editing-cycles>
    <meta:editing-duration>PT8H16M24S</meta:editing-duration>
    <meta:generator>LibreOffice/7.3.3.2$Windows_X86_64 LibreOffice_project/d1d0ea68f081ee2800a922cac8f79445e4603348</meta:generator>
    <meta:document-statistic meta:table-count="0" meta:image-count="0" meta:object-count="0" meta:page-count="4" meta:paragraph-count="37" meta:word-count="1417" meta:character-count="8369" meta:non-whitespace-character-count="6974"/>
    <meta:user-defined meta:name="AppVersion">15.0000</meta:user-defined>
    <meta:template xlink:type="simple" xlink:actuate="onRequest" xlink:title="Normal.dotm" xlink:href=""/>
  </office:meta>
</office:document-meta>
</file>