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Gras" style:font-family-generic="swiss" style:font-pitch="variable"/>
    <style:font-face style:name="Calibri2" svg:font-family="Calibri" style:font-adornments="Italique" style:font-family-generic="swiss" style:font-pitch="variable"/>
    <style:font-face style:name="Calibri3" svg:font-family="Calibri" style:font-adornments="Italique gras" style:font-family-generic="swiss" style:font-pitch="variable"/>
    <style:font-face style:name="Calibri4"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06f63" officeooo:paragraph-rsid="00106f63"/>
    </style:style>
    <style:style style:name="P2" style:family="paragraph" style:parent-style-name="Standard">
      <style:text-properties officeooo:rsid="00106f63" officeooo:paragraph-rsid="001c0023"/>
    </style:style>
    <style:style style:name="P3" style:family="paragraph" style:parent-style-name="Standard">
      <style:text-properties officeooo:rsid="00106f63" officeooo:paragraph-rsid="00331381"/>
    </style:style>
    <style:style style:name="P4" style:family="paragraph" style:parent-style-name="Standard">
      <style:paragraph-properties fo:line-height="115%"/>
      <style:text-properties officeooo:rsid="00106f63" officeooo:paragraph-rsid="001c0023"/>
    </style:style>
    <style:style style:name="P5" style:family="paragraph" style:parent-style-name="Text_20_body">
      <style:text-properties officeooo:rsid="001da3c2" officeooo:paragraph-rsid="001da3c2"/>
    </style:style>
    <style:style style:name="P6" style:family="paragraph" style:parent-style-name="Text_20_body">
      <style:text-properties officeooo:rsid="0021c3ff" officeooo:paragraph-rsid="00331381"/>
    </style:style>
    <style:style style:name="P7" style:family="paragraph" style:parent-style-name="Standard">
      <style:paragraph-properties fo:line-height="115%"/>
      <style:text-properties style:font-name="Calibri" fo:font-size="14pt" officeooo:rsid="0006ac9e" officeooo:paragraph-rsid="001ce4dc"/>
    </style:style>
    <style:style style:name="P8" style:family="paragraph" style:parent-style-name="Title">
      <style:text-properties officeooo:rsid="0073d68b" officeooo:paragraph-rsid="0073d68b"/>
    </style:style>
    <style:style style:name="P9" style:family="paragraph" style:parent-style-name="Heading_20_1">
      <style:text-properties officeooo:rsid="001c0023" officeooo:paragraph-rsid="001c0023"/>
    </style:style>
    <style:style style:name="P10" style:family="paragraph" style:parent-style-name="Heading_20_1">
      <style:text-properties officeooo:rsid="001c0023" officeooo:paragraph-rsid="00331381"/>
    </style:style>
    <style:style style:name="P11" style:family="paragraph" style:parent-style-name="Heading_20_1">
      <style:text-properties officeooo:rsid="00331381" officeooo:paragraph-rsid="00331381"/>
    </style:style>
    <style:style style:name="P12" style:family="paragraph" style:parent-style-name="Text_20_body" style:list-style-name="L1">
      <style:text-properties officeooo:paragraph-rsid="00647eee"/>
    </style:style>
    <style:style style:name="P13" style:family="paragraph" style:parent-style-name="Text_20_body">
      <style:text-properties officeooo:rsid="0021c3ff" officeooo:paragraph-rsid="00786ccd"/>
    </style:style>
    <style:style style:name="P14" style:family="paragraph" style:parent-style-name="Text_20_body">
      <style:text-properties officeooo:paragraph-rsid="0025df61"/>
    </style:style>
    <style:style style:name="P15" style:family="paragraph" style:parent-style-name="Text_20_body">
      <style:text-properties officeooo:rsid="007ef580" officeooo:paragraph-rsid="007ef580"/>
    </style:style>
    <style:style style:name="T1" style:family="text">
      <style:text-properties fo:font-size="13pt" style:font-size-asian="13pt" style:font-size-complex="13pt"/>
    </style:style>
    <style:style style:name="T2" style:family="text">
      <style:text-properties fo:font-size="13pt" officeooo:rsid="007c4612" style:font-size-asian="13pt" style:font-size-complex="13pt"/>
    </style:style>
    <style:style style:name="T3" style:family="text">
      <style:text-properties fo:font-size="13pt" officeooo:rsid="007d922c" style:font-size-asian="13pt" style:font-size-complex="13pt"/>
    </style:style>
    <style:style style:name="T4" style:family="text">
      <style:text-properties fo:font-size="13pt" officeooo:rsid="007fb1c3" style:font-size-asian="13pt" style:font-size-complex="13pt"/>
    </style:style>
    <style:style style:name="T5" style:family="text">
      <style:text-properties fo:font-size="13pt" officeooo:rsid="0080ec9a" style:font-size-asian="13pt" style:font-size-complex="13pt"/>
    </style:style>
    <style:style style:name="T6" style:family="text">
      <style:text-properties fo:font-size="13pt" officeooo:rsid="0081e314" style:font-size-asian="13pt" style:font-size-complex="13pt"/>
    </style:style>
    <style:style style:name="T7" style:family="text">
      <style:text-properties fo:font-size="13pt" officeooo:rsid="0083c586" style:font-size-asian="13pt" style:font-size-complex="13pt"/>
    </style:style>
    <style:style style:name="T8" style:family="text">
      <style:text-properties fo:font-size="13pt" officeooo:rsid="00841d4b" style:font-size-asian="13pt" style:font-size-complex="13pt"/>
    </style:style>
    <style:style style:name="T9" style:family="text">
      <style:text-properties fo:font-size="13pt" officeooo:rsid="0084fe95" style:font-size-asian="13pt" style:font-size-complex="13pt"/>
    </style:style>
    <style:style style:name="T10" style:family="text">
      <style:text-properties fo:font-size="13pt" officeooo:rsid="0086b02b" style:font-size-asian="13pt" style:font-size-complex="13pt"/>
    </style:style>
    <style:style style:name="T11" style:family="text">
      <style:text-properties fo:font-size="13pt" officeooo:rsid="00888fa0" style:font-size-asian="13pt" style:font-size-complex="13pt"/>
    </style:style>
    <style:style style:name="T12" style:family="text">
      <style:text-properties fo:font-size="13pt" officeooo:rsid="0088b22d" style:font-size-asian="13pt" style:font-size-complex="13pt"/>
    </style:style>
    <style:style style:name="T13" style:family="text">
      <style:text-properties fo:font-weight="bold" officeooo:rsid="00294043" style:font-weight-asian="bold" style:font-weight-complex="bold"/>
    </style:style>
    <style:style style:name="T14" style:family="text">
      <style:text-properties fo:font-weight="bold" officeooo:rsid="008b558f" style:font-weight-asian="bold" style:font-weight-complex="bold"/>
    </style:style>
    <style:style style:name="T15" style:family="text">
      <style:text-properties officeooo:rsid="005d0bd0"/>
    </style:style>
    <style:style style:name="T16" style:family="text">
      <style:text-properties officeooo:rsid="0073d68b"/>
    </style:style>
    <style:style style:name="T17" style:family="text">
      <style:text-properties officeooo:rsid="007651a8"/>
    </style:style>
    <style:style style:name="T18" style:family="text">
      <style:text-properties officeooo:rsid="007691af"/>
    </style:style>
    <style:style style:name="T19" style:family="text">
      <style:text-properties officeooo:rsid="0077a3a4"/>
    </style:style>
    <style:style style:name="T20" style:family="text">
      <style:text-properties officeooo:rsid="00786ccd"/>
    </style:style>
    <style:style style:name="T21" style:family="text">
      <style:text-properties officeooo:rsid="00794d00"/>
    </style:style>
    <style:style style:name="T22" style:family="text">
      <style:text-properties officeooo:rsid="007a6420"/>
    </style:style>
    <style:style style:name="T23" style:family="text">
      <style:text-properties officeooo:rsid="008965df"/>
    </style:style>
    <style:style style:name="T24" style:family="text">
      <style:text-properties officeooo:rsid="008b24d4"/>
    </style:style>
    <style:style style:name="T25" style:family="text">
      <style:text-properties officeooo:rsid="00294043"/>
    </style:style>
    <style:style style:name="T26" style:family="text">
      <style:text-properties officeooo:rsid="008b9b68"/>
    </style:style>
    <style:style style:name="T27" style:family="text">
      <style:text-properties officeooo:rsid="008d1df9"/>
    </style:style>
    <style:style style:name="T28" style:family="text">
      <style:text-properties officeooo:rsid="008efe4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Blanco</text:p>
      <text:p text:style-name="P1"/>
      <text:h text:style-name="P9" text:outline-level="1"><text:bookmark-start text:name="__RefHeading___Toc715_3530950101"/>Rôle dans l’histoire<text:bookmark-end text:name="__RefHeading___Toc715_3530950101"/></text:h>
      <text:p text:style-name="P4"/>
      <text:p text:style-name="P7"><text:tab/><text:span text:style-name="T16">Blanco était l’un des cinq premiers animorphes a avoir existé. Aux côtés d’Anita, il était un des membres de la Patte Blanche et organisait les commerces entre tribus animorphes. </text:span><text:span text:style-name="T17">Dans le jeu, il n’est référencé que par quelques PNJs, notamment des animorphes ayant vécu ou entendu parler de « l’âge d’or » des animorphes, l’époque ou la Patte Blanche était encore une organisation bienveillante cherchant à rassembler tous les peuples animorphes sous un but commun, la paix.</text:span></text:p>
      <text:h text:style-name="P10" text:outline-level="1"><text:bookmark-start text:name="__RefHeading___Toc715_3530950102"/>Description physique<text:bookmark-end text:name="__RefHeading___Toc715_3530950102"/></text:h>
      <text:p text:style-name="P3"/>
      <text:p text:style-name="P6"><text:tab/><text:span text:style-name="T18">Blanco était un rat-taupe nu, une espèce réputée pour son extrême longévité comparée aux autres espèces de rongeurs, son insensibilité à la douleur, sa résistance aux maladies et sa capacités à survivre plusieurs minutes sans oxygène. La particularité de Blanco par rapport aux autres animorphes de son époque était qu’il souffrait d’une mutation faisant de lui un des rares mâles de son monde ; incapable de se reproduire avec des animorphes <text:s/></text:span><text:span text:style-name="T19">ou animutant </text:span><text:span text:style-name="T18">cependant.</text:span></text:p>
      <text:h text:style-name="P11" text:outline-level="1"><text:bookmark-start text:name="__RefHeading___Toc715_35309501021"/>Personnalité<text:bookmark-end text:name="__RefHeading___Toc715_35309501021"/></text:h>
      <text:p text:style-name="P3"/>
      <text:p text:style-name="P13"><text:tab/><text:span text:style-name="T20">De son vivant, Blanco était un être doux et généreux, n’hésitant pas à partager ses gains avec ses proches et ses amis, des qualités qui lui ont valu une réputation d’honnête marchand auprès des communautés animorphes. </text:span></text:p>
      <text:p text:style-name="P13"><text:span text:style-name="T20"><text:tab/>Très conscient de son corps et de sa mutation, il était très pudique et portait souvent des vêtements pour masquer son pénis, chose que peu d’animorphes faisaient à moins d’interagir avec des humains. Même si ses amis étaient compréhensifs de son mal-être, il n’a jamais vraiment surmonté cette différence </text:span><text:span text:style-name="T21">qui lui ont valu des moqueries de certains animorphes. En conséquence, il se sentait plus proche des hommes, qui partageaient son intérêt pour les nombres et le commerce. </text:span><text:span text:style-name="T22">Très curieux, il n’hésitait pas à se cultiver en économie et en mathématiques, et fut l’un des rares animorphes à savoir lire et écrire.</text:span></text:p>
      <text:h text:style-name="P10" text:outline-level="1"><text:bookmark-start text:name="__RefHeading___Toc715_35309501011"/><text:soft-page-break/>Passé<text:bookmark-end text:name="__RefHeading___Toc715_35309501011"/></text:h>
      <text:p text:style-name="P2"/>
      <text:p text:style-name="P14"><text:tab/> <text:span text:style-name="T2">Tout comme Anita, Blanco était un des sujets de test des expériences de X et ses collègues ; </text:span><text:span text:style-name="T3">c</text:span><text:span text:style-name="T2">ependant, dû à son insensibilité à la douleur, il n’en garde pas un si mauvais souvenir comparé à Anita.</text:span></text:p>
      <text:p text:style-name="P15"><text:span text:style-name="T2"><text:tab/>A</text:span><text:span text:style-name="T1">près que ses amis et lui aient fondé la Patte Blanche, Blanco s’est immédiatement mis à l’ouvrage pour raffermir les liens entre les diverses communautés animorphes à travers le pays, </text:span><text:span text:style-name="T4">établissant des routes de commerce pour mettre fin au tribalisme qui montaient ces groupes les uns contre les autres au lieu de combattre les humains. </text:span><text:span text:style-name="T5">Grâce à ses actions, bon nombre de conflits entre tribus animorphes ont disparu, et certains humains ont même pris goût à commercer nourriture et matières premières avec eux sous l’égide du rat-taupe ; </text:span><text:span text:style-name="T6">c’est ainsi qu’il rencontra sa partenaire humaine et eut sa première portée.</text:span></text:p>
      <text:p text:style-name="P15"><text:span text:style-name="T5"><text:tab/></text:span><text:span text:style-name="T6">Blanco éleva s</text:span><text:span text:style-name="T7">es enfants</text:span><text:span text:style-name="T6"> dans une opulence </text:span><text:span text:style-name="T7">raisonnable, leur transmettant son savoir et son amour des nombres. Mais certains d’entre eux, corrompus par le spectre de la richesse qui dansait devant leurs yeux, en voulaient toujours plus, allant jusqu’à établir des trafics d’armes et matières illégales pour engranger un maximum de fortune, jetant régulièrement de l’huile sur le feu du conflit entre humains et animorphes. </text:span><text:span text:style-name="T8">D’autres convoitaient sa place de maître du marché, désirant hériter de son rôle et de sa fortune.</text:span></text:p>
      <text:p text:style-name="P15"><text:span text:style-name="T8"><text:tab/>Ainsi, après que Blanco fut assassiné dans de mystérieuses circonstances, </text:span><text:span text:style-name="T9">ses enfants reprirent le flambeau de son empire commercial, et n’eurent aucun remord à s’étendre dans des domaines illégaux, voire immoraux, comme le trafic d’organes ou d’êtres vivants, humains comme animorphes. Ses quelques enfants encore loyaux furent eux aussi tués ou vendus en esclavage, </text:span><text:span text:style-name="T10">et les propres enfants de ces traîtres n’eurent aucun mal à faire de même avec leurs prédécesseurs, créant un cercle vicieux d’alliances et de trahisons ou chacun cherche à s’élever au-dessus des autres et prendre le contrôle de leurs organisations.</text:span></text:p>
      <text:p text:style-name="P15"><text:span text:style-name="T10"><text:tab/></text:span><text:span text:style-name="T11">Cependant Anita, ayant bien compris que le vent tournait, a décidé de garder quelques-uns de ces enfants dans son cercle d’influence afin de profiter de leurs gains et leur permettre de continuer leurs opérations en toute impunité, </text:span><text:span text:style-name="T12">consciente que certains d’entre eux convoitaient également sa position.</text:span></text:p>
      <text:h text:style-name="P9" text:outline-level="1"><text:bookmark-start text:name="__RefHeading___Toc715_353095010111"/>Interactions avec le joueur<text:bookmark-end text:name="__RefHeading___Toc715_353095010111"/></text:h>
      <text:p text:style-name="P2"/>
      <text:p text:style-name="P5"><text:tab/><text:span text:style-name="T15">Le joueur </text:span><text:span text:style-name="T23">ne rencontrera pas Blanco pendant l’histoire du jeu, mais verra ou entendra de nombreuses références à ce personnage, souvent liées à l’âge d’or des animorphes et au changement radical d’objectif que la Patte Blanche a adopté quelques </text:span><text:soft-page-break/><text:span text:style-name="T23">décennies plus tard. </text:span><text:span text:style-name="T24">Blanco est l’un des nombreux PNJs qui serviront à étayer la thèse que les humains et animorphes peuvent vivre en harmonie, si tant est que les deux camps mettent leurs différends de côté et trouvent un intérêt commun (comme dans ce cas, le commerce.)</text:span></text:p>
      <text:h text:style-name="P9" text:outline-level="1"><text:bookmark-start text:name="__RefHeading___Toc715_3530950101111"/>Relations avec les autres personnages<text:bookmark-end text:name="__RefHeading___Toc715_3530950101111"/></text:h>
      <text:p text:style-name="P2"/>
      <text:list xml:id="list3334829255" text:style-name="L1">
        <text:list-item>
          <text:p text:style-name="P12"><text:span text:style-name="T14">Anita</text:span><text:span text:style-name="T13"> (et </text:span><text:span text:style-name="T14">les autres ancêtres</text:span><text:span text:style-name="T13">)</text:span><text:span text:style-name="T25"> : </text:span><text:span text:style-name="T26">Blanco chérissait ses camarades de galère comme ses propres sœurs. </text:span><text:span text:style-name="T27">Bien qu’il ne fut plus en vie pour assister à la descente infernale d’Anita, il a toujours veillé à ce que ses camarades se battent du bon côté de la morale et aident ceux dans le besoin, </text:span><text:span text:style-name="T28">allant même jusqu’à jouer le rôle d’intermédiaire pour mettre fin aux dissensions dans le groupe</text:span><text:span text:style-name="T27">.</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Gras" style:font-family-generic="swiss" style:font-pitch="variable"/>
    <style:font-face style:name="Calibri2" svg:font-family="Calibri" style:font-adornments="Italique" style:font-family-generic="swiss" style:font-pitch="variable"/>
    <style:font-face style:name="Calibri3" svg:font-family="Calibri" style:font-adornments="Italique gras" style:font-family-generic="swiss" style:font-pitch="variable"/>
    <style:font-face style:name="Calibri4"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4" fo:font-family="Calibri" style:font-style-name="Normal" style:font-family-generic="swiss" style:font-pitch="variable" fo:font-size="13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4"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4"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00588c" loext:opacity="100%" style:font-name="Calibri4"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00588c" loext:opacity="100%" style:font-name="Calibri3"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1"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2"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8H16M23S</meta:editing-duration>
    <meta:editing-cycles>110</meta:editing-cycles>
    <meta:generator>LibreOffice/7.3.3.2$Windows_X86_64 LibreOffice_project/d1d0ea68f081ee2800a922cac8f79445e4603348</meta:generator>
    <meta:creation-date>2023-03-26T19:35:01.716000000</meta:creation-date>
    <dc:date>2023-04-01T19:56:25.818000000</dc:date>
    <meta:document-statistic meta:table-count="0" meta:image-count="0" meta:object-count="0" meta:page-count="3" meta:paragraph-count="18" meta:word-count="819" meta:character-count="5066" meta:non-whitespace-character-count="4253"/>
  </office:meta>
</office:document-meta>
</file>