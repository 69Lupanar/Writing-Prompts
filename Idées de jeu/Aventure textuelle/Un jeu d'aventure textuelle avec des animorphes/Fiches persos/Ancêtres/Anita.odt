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Gras" style:font-family-generic="swiss" style:font-pitch="variable"/>
    <style:font-face style:name="Calibri2" svg:font-family="Calibri" style:font-adornments="Italique" style:font-family-generic="swiss" style:font-pitch="variable"/>
    <style:font-face style:name="Calibri3" svg:font-family="Calibri" style:font-adornments="Italique gras" style:font-family-generic="swiss" style:font-pitch="variable"/>
    <style:font-face style:name="Calibri4"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06f63" officeooo:paragraph-rsid="00106f63"/>
    </style:style>
    <style:style style:name="P2" style:family="paragraph" style:parent-style-name="Standard">
      <style:text-properties officeooo:rsid="00106f63" officeooo:paragraph-rsid="001c0023"/>
    </style:style>
    <style:style style:name="P3" style:family="paragraph" style:parent-style-name="Standard">
      <style:text-properties officeooo:rsid="00106f63" officeooo:paragraph-rsid="00331381"/>
    </style:style>
    <style:style style:name="P4" style:family="paragraph" style:parent-style-name="Standard">
      <style:paragraph-properties fo:line-height="115%"/>
      <style:text-properties officeooo:rsid="00106f63" officeooo:paragraph-rsid="001c0023"/>
    </style:style>
    <style:style style:name="P5" style:family="paragraph" style:parent-style-name="Text_20_body">
      <style:text-properties officeooo:rsid="001da3c2" officeooo:paragraph-rsid="001da3c2"/>
    </style:style>
    <style:style style:name="P6" style:family="paragraph" style:parent-style-name="Text_20_body">
      <style:text-properties officeooo:rsid="0021c3ff" officeooo:paragraph-rsid="00331381"/>
    </style:style>
    <style:style style:name="P7" style:family="paragraph" style:parent-style-name="Standard">
      <style:paragraph-properties fo:line-height="115%"/>
      <style:text-properties style:font-name="Calibri" fo:font-size="14pt" officeooo:rsid="0006ac9e" officeooo:paragraph-rsid="001ce4dc"/>
    </style:style>
    <style:style style:name="P8" style:family="paragraph" style:parent-style-name="Title">
      <style:text-properties officeooo:rsid="003e7d49" officeooo:paragraph-rsid="003e7d49"/>
    </style:style>
    <style:style style:name="P9" style:family="paragraph" style:parent-style-name="Text_20_body">
      <style:text-properties officeooo:paragraph-rsid="0025df61"/>
    </style:style>
    <style:style style:name="P10" style:family="paragraph" style:parent-style-name="Text_20_body">
      <style:text-properties officeooo:paragraph-rsid="005c5980"/>
    </style:style>
    <style:style style:name="P11" style:family="paragraph" style:parent-style-name="Heading_20_1">
      <style:text-properties officeooo:rsid="001c0023" officeooo:paragraph-rsid="001c0023"/>
    </style:style>
    <style:style style:name="P12" style:family="paragraph" style:parent-style-name="Heading_20_1">
      <style:text-properties officeooo:rsid="001c0023" officeooo:paragraph-rsid="00331381"/>
    </style:style>
    <style:style style:name="P13" style:family="paragraph" style:parent-style-name="Heading_20_1">
      <style:text-properties officeooo:rsid="00331381" officeooo:paragraph-rsid="00331381"/>
    </style:style>
    <style:style style:name="P14" style:family="paragraph" style:parent-style-name="Text_20_body" style:list-style-name="L1"/>
    <style:style style:name="P15" style:family="paragraph" style:parent-style-name="Text_20_body" style:list-style-name="L1">
      <style:text-properties officeooo:rsid="00294043" officeooo:paragraph-rsid="00647eee"/>
    </style:style>
    <style:style style:name="P16" style:family="paragraph" style:parent-style-name="Text_20_body" style:list-style-name="L1">
      <style:text-properties officeooo:rsid="002d8da5" officeooo:paragraph-rsid="00647eee"/>
    </style:style>
    <style:style style:name="P17" style:family="paragraph" style:parent-style-name="Text_20_body">
      <style:text-properties officeooo:paragraph-rsid="00731fcc"/>
    </style:style>
    <style:style style:name="T1" style:family="text">
      <style:text-properties fo:font-size="13pt" officeooo:rsid="0027e887" style:font-size-asian="13pt" style:font-size-complex="13pt"/>
    </style:style>
    <style:style style:name="T2" style:family="text">
      <style:text-properties fo:font-size="13pt" officeooo:rsid="00529d71" style:font-size-asian="13pt" style:font-size-complex="13pt"/>
    </style:style>
    <style:style style:name="T3" style:family="text">
      <style:text-properties fo:font-size="13pt" officeooo:rsid="00545a8e" style:font-size-asian="13pt" style:font-size-complex="13pt"/>
    </style:style>
    <style:style style:name="T4" style:family="text">
      <style:text-properties fo:font-size="13pt" officeooo:rsid="0054b3a7" style:font-size-asian="13pt" style:font-size-complex="13pt"/>
    </style:style>
    <style:style style:name="T5" style:family="text">
      <style:text-properties fo:font-size="13pt" officeooo:rsid="00569028" style:font-size-asian="13pt" style:font-size-complex="13pt"/>
    </style:style>
    <style:style style:name="T6" style:family="text">
      <style:text-properties fo:font-size="13pt" officeooo:rsid="0059258b" style:font-size-asian="13pt" style:font-size-complex="13pt"/>
    </style:style>
    <style:style style:name="T7" style:family="text">
      <style:text-properties fo:font-size="13pt" officeooo:rsid="0059ed11" style:font-size-asian="13pt" style:font-size-complex="13pt"/>
    </style:style>
    <style:style style:name="T8" style:family="text">
      <style:text-properties fo:font-size="13pt" officeooo:rsid="005b4461" style:font-size-asian="13pt" style:font-size-complex="13pt"/>
    </style:style>
    <style:style style:name="T9" style:family="text">
      <style:text-properties fo:font-size="13pt" officeooo:rsid="005c5980" style:font-size-asian="13pt" style:font-size-complex="13pt"/>
    </style:style>
    <style:style style:name="T10" style:family="text">
      <style:text-properties fo:font-size="13pt" officeooo:rsid="004d4be2" style:font-size-asian="13pt" style:font-size-complex="13pt"/>
    </style:style>
    <style:style style:name="T11" style:family="text">
      <style:text-properties fo:font-size="13pt" officeooo:rsid="00731fcc" style:font-size-asian="13pt" style:font-size-complex="13pt"/>
    </style:style>
    <style:style style:name="T12" style:family="text">
      <style:text-properties fo:font-weight="bold" style:font-weight-asian="bold" style:font-weight-complex="bold"/>
    </style:style>
    <style:style style:name="T13" style:family="text">
      <style:text-properties fo:font-weight="bold" officeooo:rsid="00647eee" style:font-weight-asian="bold" style:font-weight-complex="bold"/>
    </style:style>
    <style:style style:name="T14" style:family="text">
      <style:text-properties fo:font-weight="bold" officeooo:rsid="0065a451" style:font-weight-asian="bold" style:font-weight-complex="bold"/>
    </style:style>
    <style:style style:name="T15" style:family="text">
      <style:text-properties officeooo:rsid="002d8da5"/>
    </style:style>
    <style:style style:name="T16" style:family="text">
      <style:text-properties officeooo:rsid="003ce7a5"/>
    </style:style>
    <style:style style:name="T17" style:family="text">
      <style:text-properties officeooo:rsid="003f91ba"/>
    </style:style>
    <style:style style:name="T18" style:family="text">
      <style:text-properties officeooo:rsid="0040ba04"/>
    </style:style>
    <style:style style:name="T19" style:family="text">
      <style:text-properties officeooo:rsid="0041cc0c"/>
    </style:style>
    <style:style style:name="T20" style:family="text">
      <style:text-properties officeooo:rsid="004308d7"/>
    </style:style>
    <style:style style:name="T21" style:family="text">
      <style:text-properties officeooo:rsid="0043c8e4"/>
    </style:style>
    <style:style style:name="T22" style:family="text">
      <style:text-properties officeooo:rsid="0044db8b"/>
    </style:style>
    <style:style style:name="T23" style:family="text">
      <style:text-properties officeooo:rsid="0044faab"/>
    </style:style>
    <style:style style:name="T24" style:family="text">
      <style:text-properties officeooo:rsid="004637f3"/>
    </style:style>
    <style:style style:name="T25" style:family="text">
      <style:text-properties officeooo:rsid="00491dfa"/>
    </style:style>
    <style:style style:name="T26" style:family="text">
      <style:text-properties officeooo:rsid="004a6424"/>
    </style:style>
    <style:style style:name="T27" style:family="text">
      <style:text-properties officeooo:rsid="004b64e5"/>
    </style:style>
    <style:style style:name="T28" style:family="text">
      <style:text-properties officeooo:rsid="004b9bc2"/>
    </style:style>
    <style:style style:name="T29" style:family="text">
      <style:text-properties officeooo:rsid="004d4be2"/>
    </style:style>
    <style:style style:name="T30" style:family="text">
      <style:text-properties officeooo:rsid="004e6cbf"/>
    </style:style>
    <style:style style:name="T31" style:family="text">
      <style:text-properties officeooo:rsid="00504159"/>
    </style:style>
    <style:style style:name="T32" style:family="text">
      <style:text-properties officeooo:rsid="00567ec9"/>
    </style:style>
    <style:style style:name="T33" style:family="text">
      <style:text-properties officeooo:rsid="00569028"/>
    </style:style>
    <style:style style:name="T34" style:family="text">
      <style:text-properties officeooo:rsid="0057d146"/>
    </style:style>
    <style:style style:name="T35" style:family="text">
      <style:text-properties officeooo:rsid="005d0bd0"/>
    </style:style>
    <style:style style:name="T36" style:family="text">
      <style:text-properties officeooo:rsid="006070ed"/>
    </style:style>
    <style:style style:name="T37" style:family="text">
      <style:text-properties officeooo:rsid="00608d55"/>
    </style:style>
    <style:style style:name="T38" style:family="text">
      <style:text-properties officeooo:rsid="0060ba3a"/>
    </style:style>
    <style:style style:name="T39" style:family="text">
      <style:text-properties officeooo:rsid="00615be1"/>
    </style:style>
    <style:style style:name="T40" style:family="text">
      <style:text-properties officeooo:rsid="0062e930"/>
    </style:style>
    <style:style style:name="T41" style:family="text">
      <style:text-properties officeooo:rsid="0065d4b6"/>
    </style:style>
    <style:style style:name="T42" style:family="text">
      <style:text-properties officeooo:rsid="00662f0c"/>
    </style:style>
    <style:style style:name="T43" style:family="text">
      <style:text-properties officeooo:rsid="0069db56"/>
    </style:style>
    <style:style style:name="T44" style:family="text">
      <style:text-properties officeooo:rsid="006ae5f9"/>
    </style:style>
    <style:style style:name="T45" style:family="text">
      <style:text-properties officeooo:rsid="006cb938"/>
    </style:style>
    <style:style style:name="T46" style:family="text">
      <style:text-properties officeooo:rsid="006eb25a"/>
    </style:style>
    <style:style style:name="T47" style:family="text">
      <style:text-properties officeooo:rsid="00704c63"/>
    </style:style>
    <style:style style:name="T48" style:family="text">
      <style:text-properties officeooo:rsid="007212fc"/>
    </style:style>
    <style:style style:name="T49" style:family="text">
      <style:text-properties officeooo:rsid="00726ddf"/>
    </style:style>
    <style:style style:name="T50" style:family="text">
      <style:text-properties officeooo:rsid="00731fc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nita</text:p>
      <text:p text:style-name="P1"/>
      <text:h text:style-name="P11" text:outline-level="1"><text:bookmark-start text:name="__RefHeading___Toc715_3530950101"/>Rôle dans l’histoire<text:bookmark-end text:name="__RefHeading___Toc715_3530950101"/></text:h>
      <text:p text:style-name="P4"/>
      <text:p text:style-name="P7"><text:tab/><text:span text:style-name="T16">Anita est l’antagoniste principale du jeu. </text:span><text:span text:style-name="T17">Après l’accident au laboratoire qui a conduit à l’événement appelé la « Nuit Noire », Anita, devenue une animorphe comme ses compagnons animaux, </text:span><text:span text:style-name="T18">a fondé la Patte Blanche pour venir en aide aux animorphes persécutés par les humains. Mais cette organisation autrefois bénéfique pour cette faction est devenue aujourd’hui un groupuscule terroriste hostile aux humains, que X devra affronter à de multiples reprises au cours de l’histoire du jeu. </text:span><text:span text:style-name="T19">Anita est le parallèle métaphorique de X ; là où le joueur brise le quatrième mur pour incarner X, Anita a brisé son propre « quatrième mur »  en acquérant <text:s/>conscience d’elle-même et des horreurs de son univers, ce qui lui a fait perdre la raison et voué son organisation à éliminer les humains de la surface de la Terre.</text:span></text:p>
      <text:h text:style-name="P12" text:outline-level="1"><text:bookmark-start text:name="__RefHeading___Toc715_3530950102"/>Description physique<text:bookmark-end text:name="__RefHeading___Toc715_3530950102"/></text:h>
      <text:p text:style-name="P3"/>
      <text:p text:style-name="P6"><text:tab/><text:span text:style-name="T21">A l’origine</text:span><text:span text:style-name="T20"> </text:span><text:span text:style-name="T21">une tortue géante des Galapagos, Anita est </text:span><text:span text:style-name="T20">l’aînée du groupe originel des 5 ancêtres des animorphes, </text:span><text:span text:style-name="T21">ayant plus de 300 ans au début du jeu. </text:span><text:span text:style-name="T22">Très âgée même pour son espèce, elle doit sa longévité aux effets de l’agent 18, qui ont eu également l’effet pervers de lui donner une apparence humanoïde et féminine, ainsi qu’un désir lascif difficile à contrôler, </text:span><text:span text:style-name="T23">comme le reste du commun des animorphes. </text:span><text:span text:style-name="T32">De nombreuses cicatrices sillonnent son corps, dues tout autant aux mauvais traitements qu’elle a subi par ses anciens propriétaires, que par les épreuves qu’elle a enduré les deux siècles suivants.</text:span></text:p>
      <text:p text:style-name="P6"><text:tab/><text:span text:style-name="T24">Bien que son âge et son espèce lui refusent une condition physique apte au combat, Anita compense son faible physique par une exceptionnelle intelligence, la rendant non seulement capable de lire et écrire – un phénomène déjà rare chez les animorphes – mais aussi capable des mêmes prouesses scientifiques que les humains les plus intelligents, à savoir concevoir et manier des machines, créer des outils et s’en servir pour créer des armes et agents chimiques.</text:span></text:p>
      <text:h text:style-name="P13" text:outline-level="1"><text:bookmark-start text:name="__RefHeading___Toc715_35309501021"/>Personnalité<text:bookmark-end text:name="__RefHeading___Toc715_35309501021"/></text:h>
      <text:p text:style-name="P3"/>
      <text:p text:style-name="P6"><text:tab/><text:span text:style-name="T25">Anita est une vieille animorphe névrosée, usée par les guerres et le chaos qui règnent en maître sur le pays depuis la Nuit Noire apparue 200 ans plus tôt. </text:span><text:span text:style-name="T26">Initialement, </text:span><text:soft-page-break/><text:span text:style-name="T26">Anita était terrorisée lors de sa prise de conscience, abandonnée par ses maîtres dans un monde dont elle ne savait rien, sans repère ni personne pour la guider. Les seules <text:s/>personnes l’ayant épaulé toutes ces années furent ses quatre camarades de galère, les autres sujets de tests envers lesquels elle développa une obsession maladive, cherchant à garder le contrôle de leur petit groupe de peur de les perdre. Mais les années passèrent et le temps emporta ses anciens camarades un à un, laissant Anita définitivement seule dans ce nouveau monde. Elle commença alors à haïr les humains, et fit de cette haine sa seule boussole pour l’empêcher de sombrer.</text:span></text:p>
      <text:p text:style-name="P6"><text:tab/><text:span text:style-name="T27">Elle trouve cependant un réconfort auprès des animutants, dont elle réussit à apprivoiser certains membres malgré leur agressivité, </text:span><text:span text:style-name="T28">retrouvant en eux une partie de son innocence perdue. En réalité, elle se sent plus proche d’eux que de ses semblables animorphes, qui ont décidé de s’éloigner de ses vues extrêmes pour adopter des comportements plus humains, </text:span><text:span text:style-name="T29">ce qui creusa davantage le fossé </text:span><text:span text:style-name="T30">idéologique</text:span><text:span text:style-name="T29"> entre eux et elle.</text:span></text:p>
      <text:h text:style-name="P12" text:outline-level="1"><text:bookmark-start text:name="__RefHeading___Toc715_35309501011"/>Passé<text:bookmark-end text:name="__RefHeading___Toc715_35309501011"/></text:h>
      <text:p text:style-name="P2"/>
      <text:p text:style-name="P9"><text:tab/> <text:span text:style-name="T31">Anita était autrefois un </text:span><text:span text:style-name="T33">animal normal, </text:span><text:span text:style-name="T34">utilisé</text:span><text:span text:style-name="T33"> comme</text:span><text:span text:style-name="T31"> sujet de test pour les expériences de X et ses collègues, visant à utiliser son ADN pour rallonger son espérance de vie et décupler ses capacités physiques comme mentales</text:span><text:span text:style-name="T1">. </text:span><text:span text:style-name="T2">Si l’agent 18 aura atteint ce but, Anita </text:span><text:span text:style-name="T3">aura dû subir de nombreux</text:span><text:span text:style-name="T2"> mauvais traitements </text:span><text:span text:style-name="T3">par</text:span><text:span text:style-name="T2"> ses propriétaires </text:span><text:span text:style-name="T4">pour y parvenir,</text:span><text:span text:style-name="T2"> lors des dernières années précédant la Nuit Noire.</text:span></text:p>
      <text:p text:style-name="P10"><text:span text:style-name="T2"><text:tab/></text:span><text:span text:style-name="T5">Peu après l’accident du laboratoire qui a libéré Anita et ses compagnons, </text:span><text:span text:style-name="T6">celle-ci a gagné conscience d’elle-même ainsi que ses attributs animorphes suite à son exposition à l’agent 18. </text:span><text:span text:style-name="T7">Découvrant le chaos qui s’est abattu sur son monde après la Nuit Noire, les cinq ancêtres décidèrent de fonder la Patte Blanche, un groupuscule autrefois bienveillant destiné à protéger les animorphes des abus des humains, et à fonder les bases d’une société où les animorphes pourraient vivre en paix. </text:span><text:span text:style-name="T8">Mais les années de guerre et leur méfiance des humains ont engendré une haine tenace chez les cinq ancêtres qui les poussa à utiliser les nouvelles forces de la Patte Blanche comme arme de vengeance contre les humains, en orchestrant des réseaux de trafic d’armes et d’humains dans le but de prendre le contrôle du pays et de soumettre les humains aux animorphes.</text:span></text:p>
      <text:p text:style-name="P17"><text:span text:style-name="T8"><text:tab/></text:span><text:span text:style-name="T9">La disparition de ses camarades aux affres du temps et des combats ne fit que nourrir l’amertume d’Anita davantage, la poussant jusqu’à développer un plan pour se débarrasser des humains et des animorphes : Un autre agent, destiner à stériliser les humains et faire muter les animorphes pour les changer en animutants, dénués de conscience ou d’émotions autre que leurs instincts primaires de chasse et reproduction.</text:span><text:span text:style-name="T7"> </text:span><text:span text:style-name="T11">Bien qu’elle n’apprécie pas les humains, elle n’aura aucun problème à s’accoupler avec eux </text:span><text:soft-page-break/><text:span text:style-name="T11">pour avoir des enfants, qu’elle utilise comme sujets de test pour son agent mutagène.</text:span></text:p>
      <text:h text:style-name="P11" text:outline-level="1"><text:bookmark-start text:name="__RefHeading___Toc715_353095010111"/>Interactions avec le joueur<text:bookmark-end text:name="__RefHeading___Toc715_353095010111"/></text:h>
      <text:p text:style-name="P2"/>
      <text:p text:style-name="P5"><text:tab/><text:span text:style-name="T35">Le joueur rencontrera Anita assez tard dans l’histoire, une fois que les tenants et aboutissants de l’histoire seront établis (quels factions sont en jeu, leur rôle, la menace qui plane sur le pay</text:span><text:span text:style-name="T36">s, </text:span><text:span text:style-name="T37">etc.</text:span><text:span text:style-name="T38">) </text:span><text:span text:style-name="T39">et que le joueur ait déjà eu à faire avec quelques-uns de ses subalternes. </text:span><text:span text:style-name="T40">Elle sera le boss final du jeu que X devra battre pour empêcher la propagation de son agent dans l’air et éviter ainsi l’extinction de l’humanité et des animorphes.</text:span></text:p>
      <text:h text:style-name="P11" text:outline-level="1"><text:bookmark-start text:name="__RefHeading___Toc715_3530950101111"/>Relations avec les autres personnages<text:bookmark-end text:name="__RefHeading___Toc715_3530950101111"/></text:h>
      <text:p text:style-name="P2"/>
      <text:list xml:id="list4050179008" text:style-name="L1">
        <text:list-item>
          <text:p text:style-name="P15"><text:span text:style-name="T13">X</text:span><text:span text:style-name="T12"> (et ses collègues scientifiques)</text:span> : <text:span text:style-name="T41">De tous ses anciens propriétaires, X est le seul auquel Anita a pu pardonner les mauvais traitements qu’elle a subi, puisque X était le seul à prendre soin de ses sujets de test et veiller à ce qu’ils souffrent le moins possible. Évidemment surprise de le voir en vie, elle tentera d’abord de le faire abattre, ne le reconnaissant pas à leur première retrouvaille. Puis elle tentera de le convaincre de l’aider à produire son agent mutagène et, voyant son refus, se résignera à le faire capturer pour l’asservir de force, puis le faire tuer lorsqu’il s’avère être une menace pour ses plans.</text:span></text:p>
        </text:list-item>
        <text:list-item>
          <text:p text:style-name="P16"><text:span text:style-name="T13">Yveline</text:span> : <text:span text:style-name="T42">Surprise de la revoir en vie après des décennies d’errance, Anita captura </text:span><text:span text:style-name="T43">sa fille, Annette,</text:span><text:span text:style-name="T42"> </text:span><text:span text:style-name="T43">afin de forcer Yveline</text:span><text:span text:style-name="T42"> à travailler pour elle sur l’agent mutagène anti-humains </text:span><text:span text:style-name="T43">en échange de sa liberté. Pendant sa servitude</text:span><text:span text:style-name="T42">, </text:span><text:span text:style-name="T43">Anita</text:span><text:span text:style-name="T42"> en profita pour ne lui épargner aucun mauvais traitement en représailles des souffrances qu’elle a elle-même endurée encore animal.</text:span></text:p>
        </text:list-item>
        <text:list-item>
          <text:p text:style-name="P16"><text:span text:style-name="T14">L</text:span><text:span text:style-name="T13">es </text:span><text:span text:style-name="T14">4</text:span><text:span text:style-name="T13"> autres ancêtres</text:span> : <text:span text:style-name="T44">Les 4 autres ancêtres sont devenues les amis les plus proches d’Anita par circonstance, étant les seuls survivants de l’accident et les premiers animorphes au monde. </text:span><text:span text:style-name="T45">Malgré leur longévité plus élevée que la normale, aucun n’a été épargné par les affres du temps, à l’exception d’Anita qui survécut miraculeusement trois siècles jusqu’au début du jeu. De tous ses amis, seule Charlotte est encore en vie, dû à sa capacité de régénérer les cellules de son corps au prix de ses souvenirs. Aujourd’hui amnésique, elle n’est plus d’aucun réconfort ni aide à Anita, qui se sert d’elle comme </text:span><text:span text:style-name="T46">un</text:span><text:span text:style-name="T45"> pion mais ne s’est jamais résolue à la tuer, effrayée à l’idée d’être définitivement seule dans ce monde.</text:span></text:p>
        </text:list-item>
        <text:list-item>
          <text:p text:style-name="P14"><text:span text:style-name="T13">Les </text:span><text:span text:style-name="T14">4</text:span><text:span text:style-name="T13"> descendants :</text:span><text:span text:style-name="T15"> </text:span><text:span text:style-name="T47">Malgré ses efforts, Anita ne retrouvera jamais en leurs descendants la complicité qu’elle avait avec ses 4 camarades. De plus, aucun ne partage vraiment ses idées ni ses valeurs, chacun s’occupant uniquement de ses objectifs personnels. </text:span><text:span text:style-name="T48">Elle préfère garder une distance professionnelle entre eux, se </text:span><text:soft-page-break/><text:span text:style-name="T48">lamentant de temps à autre de leur manque de dévouement à leur cause </text:span><text:span text:style-name="T49">et leur vision court-termiste des événements</text:span><text:span text:style-name="T48">. </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Gras" style:font-family-generic="swiss" style:font-pitch="variable"/>
    <style:font-face style:name="Calibri2" svg:font-family="Calibri" style:font-adornments="Italique" style:font-family-generic="swiss" style:font-pitch="variable"/>
    <style:font-face style:name="Calibri3" svg:font-family="Calibri" style:font-adornments="Italique gras" style:font-family-generic="swiss" style:font-pitch="variable"/>
    <style:font-face style:name="Calibri4"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4" fo:font-family="Calibri"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4"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4"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00588c" loext:opacity="100%" style:font-name="Calibri4"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00588c" loext:opacity="100%" style:font-name="Calibri3"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1"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2"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7H34M19S</meta:editing-duration>
    <meta:editing-cycles>84</meta:editing-cycles>
    <meta:generator>LibreOffice/7.3.3.2$Windows_X86_64 LibreOffice_project/d1d0ea68f081ee2800a922cac8f79445e4603348</meta:generator>
    <meta:creation-date>2023-03-26T19:35:01.716000000</meta:creation-date>
    <dc:date>2023-04-01T19:49:45.599000000</dc:date>
    <meta:document-statistic meta:table-count="0" meta:image-count="0" meta:object-count="0" meta:page-count="4" meta:paragraph-count="20" meta:word-count="1267" meta:character-count="7701" meta:non-whitespace-character-count="6442"/>
  </office:meta>
</office:document-meta>
</file>