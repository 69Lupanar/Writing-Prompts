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text-properties officeooo:rsid="00106f63" officeooo:paragraph-rsid="001c0023"/>
    </style:style>
    <style:style style:name="P3" style:family="paragraph" style:parent-style-name="Standard">
      <style:text-properties officeooo:rsid="00106f63" officeooo:paragraph-rsid="00331381"/>
    </style:style>
    <style:style style:name="P4" style:family="paragraph" style:parent-style-name="Standard">
      <style:paragraph-properties fo:line-height="115%"/>
      <style:text-properties officeooo:rsid="00106f63" officeooo:paragraph-rsid="001c0023"/>
    </style:style>
    <style:style style:name="P5" style:family="paragraph" style:parent-style-name="Text_20_body">
      <style:text-properties officeooo:rsid="001da3c2" officeooo:paragraph-rsid="001da3c2"/>
    </style:style>
    <style:style style:name="P6" style:family="paragraph" style:parent-style-name="Text_20_body">
      <style:text-properties officeooo:rsid="0021c3ff" officeooo:paragraph-rsid="00786ccd"/>
    </style:style>
    <style:style style:name="P7" style:family="paragraph" style:parent-style-name="Standard">
      <style:paragraph-properties fo:line-height="115%"/>
      <style:text-properties style:font-name="Calibri" fo:font-size="14pt" officeooo:rsid="0006ac9e" officeooo:paragraph-rsid="001ce4dc"/>
    </style:style>
    <style:style style:name="P8" style:family="paragraph" style:parent-style-name="Title">
      <style:text-properties officeooo:rsid="009089d6" officeooo:paragraph-rsid="009089d6"/>
    </style:style>
    <style:style style:name="P9" style:family="paragraph" style:parent-style-name="Text_20_body">
      <style:text-properties officeooo:paragraph-rsid="00331381"/>
    </style:style>
    <style:style style:name="P10" style:family="paragraph" style:parent-style-name="Heading_20_1">
      <style:text-properties officeooo:rsid="001c0023" officeooo:paragraph-rsid="001c0023"/>
    </style:style>
    <style:style style:name="P11" style:family="paragraph" style:parent-style-name="Heading_20_1">
      <style:text-properties officeooo:rsid="001c0023" officeooo:paragraph-rsid="00331381"/>
    </style:style>
    <style:style style:name="P12" style:family="paragraph" style:parent-style-name="Heading_20_1">
      <style:text-properties officeooo:rsid="00331381" officeooo:paragraph-rsid="00331381"/>
    </style:style>
    <style:style style:name="P13" style:family="paragraph" style:parent-style-name="Text_20_body" style:list-style-name="L1">
      <style:text-properties officeooo:paragraph-rsid="00647eee"/>
    </style:style>
    <style:style style:name="P14" style:family="paragraph" style:parent-style-name="Text_20_body">
      <style:text-properties officeooo:paragraph-rsid="0025df61"/>
    </style:style>
    <style:style style:name="P15" style:family="paragraph" style:parent-style-name="Text_20_body" style:list-style-name="L1">
      <style:text-properties officeooo:rsid="00bc6c93" officeooo:paragraph-rsid="00bc6c93"/>
    </style:style>
    <style:style style:name="P16" style:family="paragraph" style:parent-style-name="Text_20_body" style:list-style-name="L1">
      <style:text-properties officeooo:rsid="00be0411" officeooo:paragraph-rsid="00be0411"/>
    </style:style>
    <style:style style:name="T1" style:family="text">
      <style:text-properties fo:font-size="13pt" officeooo:rsid="00afd25c" style:font-size-asian="13pt" style:font-size-complex="13pt"/>
    </style:style>
    <style:style style:name="T2" style:family="text">
      <style:text-properties fo:font-size="13pt" officeooo:rsid="00b10226" style:font-size-asian="13pt" style:font-size-complex="13pt"/>
    </style:style>
    <style:style style:name="T3" style:family="text">
      <style:text-properties fo:font-size="13pt" officeooo:rsid="00b29476" style:font-size-asian="13pt" style:font-size-complex="13pt"/>
    </style:style>
    <style:style style:name="T4" style:family="text">
      <style:text-properties fo:font-size="13pt" officeooo:rsid="00b3bc82" style:font-size-asian="13pt" style:font-size-complex="13pt"/>
    </style:style>
    <style:style style:name="T5" style:family="text">
      <style:text-properties fo:font-size="13pt" officeooo:rsid="00b4b9dc" style:font-size-asian="13pt" style:font-size-complex="13pt"/>
    </style:style>
    <style:style style:name="T6" style:family="text">
      <style:text-properties fo:font-size="13pt" officeooo:rsid="00b69776" style:font-size-asian="13pt" style:font-size-complex="13pt"/>
    </style:style>
    <style:style style:name="T7" style:family="text">
      <style:text-properties fo:font-size="13pt" officeooo:rsid="00b7d0c7" style:font-size-asian="13pt" style:font-size-complex="13pt"/>
    </style:style>
    <style:style style:name="T8" style:family="text">
      <style:text-properties fo:font-size="13pt" officeooo:rsid="00b8a48c" style:font-size-asian="13pt" style:font-size-complex="13pt"/>
    </style:style>
    <style:style style:name="T9" style:family="text">
      <style:text-properties fo:font-weight="bold" style:font-weight-asian="bold" style:font-weight-complex="bold"/>
    </style:style>
    <style:style style:name="T10" style:family="text">
      <style:text-properties fo:font-weight="bold" officeooo:rsid="00294043" style:font-weight-asian="bold" style:font-weight-complex="bold"/>
    </style:style>
    <style:style style:name="T11" style:family="text">
      <style:text-properties fo:font-weight="bold" officeooo:rsid="008b558f" style:font-weight-asian="bold" style:font-weight-complex="bold"/>
    </style:style>
    <style:style style:name="T12" style:family="text">
      <style:text-properties officeooo:rsid="005d0bd0"/>
    </style:style>
    <style:style style:name="T13" style:family="text">
      <style:text-properties officeooo:rsid="0073d68b"/>
    </style:style>
    <style:style style:name="T14" style:family="text">
      <style:text-properties officeooo:rsid="00294043"/>
    </style:style>
    <style:style style:name="T15" style:family="text">
      <style:text-properties officeooo:rsid="008b9b68"/>
    </style:style>
    <style:style style:name="T16" style:family="text">
      <style:text-properties officeooo:rsid="008d1df9"/>
    </style:style>
    <style:style style:name="T17" style:family="text">
      <style:text-properties officeooo:rsid="008efe41"/>
    </style:style>
    <style:style style:name="T18" style:family="text">
      <style:text-properties officeooo:rsid="009089d6"/>
    </style:style>
    <style:style style:name="T19" style:family="text">
      <style:text-properties officeooo:rsid="0090b8e4"/>
    </style:style>
    <style:style style:name="T20" style:family="text">
      <style:text-properties officeooo:rsid="0091705b"/>
    </style:style>
    <style:style style:name="T21" style:family="text">
      <style:text-properties officeooo:rsid="0091e096"/>
    </style:style>
    <style:style style:name="T22" style:family="text">
      <style:text-properties officeooo:rsid="00927d1d"/>
    </style:style>
    <style:style style:name="T23" style:family="text">
      <style:text-properties officeooo:rsid="0094357c"/>
    </style:style>
    <style:style style:name="T24" style:family="text">
      <style:text-properties officeooo:rsid="0021c3ff"/>
    </style:style>
    <style:style style:name="T25" style:family="text">
      <style:text-properties fo:font-style="italic"/>
    </style:style>
    <style:style style:name="T26" style:family="text">
      <style:text-properties fo:font-style="normal" style:font-style-asian="normal" style:font-style-complex="normal"/>
    </style:style>
    <style:style style:name="T27" style:family="text">
      <style:text-properties fo:font-style="normal" officeooo:rsid="0094357c" style:font-style-asian="normal" style:font-style-complex="normal"/>
    </style:style>
    <style:style style:name="T28" style:family="text">
      <style:text-properties fo:font-style="normal" officeooo:rsid="009571bf" style:font-style-asian="normal" style:font-style-complex="normal"/>
    </style:style>
    <style:style style:name="T29" style:family="text">
      <style:text-properties fo:font-style="normal" officeooo:rsid="0096e066" style:font-style-asian="normal" style:font-style-complex="normal"/>
    </style:style>
    <style:style style:name="T30" style:family="text">
      <style:text-properties fo:font-style="normal" officeooo:rsid="009722fa" style:font-style-asian="normal" style:font-style-complex="normal"/>
    </style:style>
    <style:style style:name="T31" style:family="text">
      <style:text-properties fo:font-style="normal" officeooo:rsid="0098ceff" style:font-style-asian="normal" style:font-style-complex="normal"/>
    </style:style>
    <style:style style:name="T32" style:family="text">
      <style:text-properties fo:font-style="normal" officeooo:rsid="009ba5b8" style:font-style-asian="normal" style:font-style-complex="normal"/>
    </style:style>
    <style:style style:name="T33" style:family="text">
      <style:text-properties fo:font-style="normal" officeooo:rsid="009d17ff" style:font-style-asian="normal" style:font-style-complex="normal"/>
    </style:style>
    <style:style style:name="T34" style:family="text">
      <style:text-properties fo:font-style="normal" officeooo:rsid="009f26ea" style:font-style-asian="normal" style:font-style-complex="normal"/>
    </style:style>
    <style:style style:name="T35" style:family="text">
      <style:text-properties fo:font-style="normal" officeooo:rsid="009f479f" style:font-style-asian="normal" style:font-style-complex="normal"/>
    </style:style>
    <style:style style:name="T36" style:family="text">
      <style:text-properties fo:font-style="normal" officeooo:rsid="00a936eb" style:font-style-asian="normal" style:font-style-complex="normal"/>
    </style:style>
    <style:style style:name="T37" style:family="text">
      <style:text-properties fo:font-style="normal" officeooo:rsid="00aa0c8f" style:font-style-asian="normal" style:font-style-complex="normal"/>
    </style:style>
    <style:style style:name="T38" style:family="text">
      <style:text-properties officeooo:rsid="00a06048"/>
    </style:style>
    <style:style style:name="T39" style:family="text">
      <style:text-properties officeooo:rsid="00a18bb6"/>
    </style:style>
    <style:style style:name="T40" style:family="text">
      <style:text-properties officeooo:rsid="00a2f0c3"/>
    </style:style>
    <style:style style:name="T41" style:family="text">
      <style:text-properties officeooo:rsid="00a4e942"/>
    </style:style>
    <style:style style:name="T42" style:family="text">
      <style:text-properties officeooo:rsid="00a4fe23"/>
    </style:style>
    <style:style style:name="T43" style:family="text">
      <style:text-properties officeooo:rsid="00a6167f"/>
    </style:style>
    <style:style style:name="T44" style:family="text">
      <style:text-properties officeooo:rsid="00a7788d"/>
    </style:style>
    <style:style style:name="T45" style:family="text">
      <style:text-properties officeooo:rsid="00abaae1"/>
    </style:style>
    <style:style style:name="T46" style:family="text">
      <style:text-properties officeooo:rsid="00ac4514"/>
    </style:style>
    <style:style style:name="T47" style:family="text">
      <style:text-properties officeooo:rsid="00acbc5b"/>
    </style:style>
    <style:style style:name="T48" style:family="text">
      <style:text-properties officeooo:rsid="00ad2ef6"/>
    </style:style>
    <style:style style:name="T49" style:family="text">
      <style:text-properties officeooo:rsid="00ad3932"/>
    </style:style>
    <style:style style:name="T50" style:family="text">
      <style:text-properties officeooo:rsid="00ae98bb"/>
    </style:style>
    <style:style style:name="T51" style:family="text">
      <style:text-properties officeooo:rsid="00afd25c"/>
    </style:style>
    <style:style style:name="T52" style:family="text">
      <style:text-properties officeooo:rsid="00ba2c19"/>
    </style:style>
    <style:style style:name="T53" style:family="text">
      <style:text-properties officeooo:rsid="00bae237"/>
    </style:style>
    <style:style style:name="T54"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rlotte</text:p>
      <text:p text:style-name="P1"/>
      <text:h text:style-name="P10" text:outline-level="1"><text:bookmark-start text:name="__RefHeading___Toc715_3530950101"/>Rôle dans l’histoire<text:bookmark-end text:name="__RefHeading___Toc715_3530950101"/></text:h>
      <text:p text:style-name="P4"/>
      <text:p text:style-name="P7"><text:tab/><text:span text:style-name="T18">Charlotte</text:span><text:span text:style-name="T13"> était l’un des cinq premiers animorphes a avoir existé, </text:span><text:span text:style-name="T19">et avec Anita, la seule des cinq ancêtres a être encore en vie lors des événements du jeu</text:span><text:span text:style-name="T13">. </text:span><text:span text:style-name="T18">D’abord une antagoniste à X, elle se rangera dans son camp après leur rencontre et l’aidera à arrêter les plans d’Anita et la guerre majeure entre humains et animorphes. </text:span><text:span text:style-name="T19">Dans la hiérar</text:span><text:span text:style-name="T20">chie de la Patte Blanche, </text:span><text:span text:style-name="T21">elle est en charge d</text:span><text:span text:style-name="T22">e l’</text:span><text:span text:style-name="T21">administr</text:span><text:span text:style-name="T22">ation</text:span><text:span text:style-name="T21"> les différentes factions marines sous le contrôle du groupuscule.</text:span></text:p>
      <text:h text:style-name="P11" text:outline-level="1"><text:bookmark-start text:name="__RefHeading___Toc715_3530950102"/>Description physique<text:bookmark-end text:name="__RefHeading___Toc715_3530950102"/></text:h>
      <text:p text:style-name="P3"/>
      <text:p text:style-name="P9"><text:span text:style-name="T24"><text:tab/></text:span><text:span text:style-name="T23">Charlotte est une </text:span><text:bookmark text:name="firstHeading"/><text:span text:style-name="T25">Turritopsis dohrnii</text:span><text:span text:style-name="T26">,</text:span><text:span text:style-name="T25"> </text:span><text:span text:style-name="T27">une race de méduse capable de régénérer ses cellules en retournant à une phase de maturité sexuelle immature ; elle est donc capable de rajeunir indéfiniment, demeurant effectivement immortelle. </text:span><text:span text:style-name="T28">Cependant, ce rajeunissement se réalise au prix de son développement physique et mental, ses anciennes cellules étant remplacées par de nouvelles cellules vierges, y compris celles régissant son cerveau. Par conséquent, chaque rajeunissement que Charlotte entreprend se réalise au prix de ses souvenirs, faisant de ce phénomène une sorte de réincarnation où Charlotte devient essentiellement une nouvelle personne, avec un psyché et une personnalité <text:s/>similaires aux anciens, mais sans conserver les souvenirs de ses anciennes vies.</text:span></text:p>
      <text:p text:style-name="P9"><text:span text:style-name="T28"><text:tab/></text:span><text:span text:style-name="T29">Physiquement, Charlotte conserve la plupart des propriété</text:span><text:span text:style-name="T30">s</text:span><text:span text:style-name="T29"> d’une méduse normale, à savoi</text:span><text:span text:style-name="T34">r</text:span><text:span text:style-name="T33"> un</text:span><text:span text:style-name="T29"> corps composé essentiellement d’eau et des tentacules capable</text:span><text:span text:style-name="T31">s</text:span><text:span text:style-name="T29"> d’inoculer un venin dont elle peut contrôle le dosage pour le rendre paralysant, voire mortel. Cependant, ses attributs d’animorphe lui permettent de marcher sur terre pendant plusieurs heures sans besoin d’eau, et lui octroient la capacité de parler et raisonner comme un humain. Étant un animorphe, ses facultés de combat sont également principalement orientées vers le plaisir sexuel, Charlotte pouvant convertir son venin en puissant aphrodisiaque pour attirer les hommes </text:span><text:span text:style-name="T32">ou les faire jouir en un instant</text:span><text:span text:style-name="T29">.</text:span></text:p>
      <text:p text:style-name="P9"><text:span text:style-name="T29"><text:tab/></text:span><text:span text:style-name="T34">Charlotte </text:span><text:span text:style-name="T36">est très grande </text:span><text:span text:style-name="T37">pour une animorphe,</text:span><text:span text:style-name="T36"> et</text:span><text:span text:style-name="T34"> ne possède pas d’yeux, mais est capable de se repérer dans son environnement grâce à ses tentacules qui lui envoient un message électrique au contact d’un objet. Elle est également résistante à la plupart des armes blanches, et peut facilement survivre et se régénérer d’une blessure d’arme à feu, mais reste très vulnérable aux maladies et la pollution, </text:span><text:span text:style-name="T35">et vit donc dans un palais sous-</text:span><text:soft-page-break/><text:span text:style-name="T35">marin où l’eau est continuellement filtrée pour la garder en bonne santé.</text:span></text:p>
      <text:h text:style-name="P12" text:outline-level="1"><text:bookmark-start text:name="__RefHeading___Toc715_35309501021"/>Personnalité<text:bookmark-end text:name="__RefHeading___Toc715_35309501021"/></text:h>
      <text:p text:style-name="P3"/>
      <text:p text:style-name="P6"><text:tab/><text:span text:style-name="T38">Charlotte est une animorphe très stoïque, </text:span><text:span text:style-name="T39">que rien ne semble pouvoir perturber, accordant plus de valeur à la logique et à la maîtrise de soi qu’à la frivolité des émotions. Sa nature pragmatique lui permettent de garder son sang-froid dans les situations sous pression </text:span><text:span text:style-name="T40">et de prendre les décisions difficiles.</text:span></text:p>
      <text:p text:style-name="P6"><text:tab/><text:span text:style-name="T42">S</text:span><text:span text:style-name="T41">ous son air froid et parfois méprisant, Charlotte souffre en réalité d’une profonde solitude. </text:span><text:span text:style-name="T42">Si elle n’a pas encore eu d’enfants (n’appréciant pas </text:span><text:span text:style-name="T47">assez</text:span><text:span text:style-name="T42"> les humains </text:span><text:span text:style-name="T47">pour être en contact régulier avec eux</text:span><text:span text:style-name="T42">), Charlotte dévoue beaucoup de son temps et son énergie à ses filles adoptives, à qui elle enseign</text:span><text:span text:style-name="T43">e </text:span><text:span text:style-name="T42">la politique dans le but de l’assister dans sa direction de leur royaume. </text:span><text:span text:style-name="T44">Cependant, aucune d’entre elle</text:span><text:span text:style-name="T45">s</text:span><text:span text:style-name="T44"> ne parvient à atténuer la détresse qu’elle ressent avant chacune de ses réincarnations, une phénomène lui volant tous ses souvenirs, incluant les noms et moments heureux passés avec ses filles. </text:span><text:span text:style-name="T46">En conséquence, elle s’est rapidement distancée de ses filles, ne gardant avec elle</text:span><text:span text:style-name="T48">s</text:span><text:span text:style-name="T46"> qu’une relation protocolaire ; </text:span><text:span text:style-name="T49">une raison de plus pour laquelle elle ne veut pas non plus d’enfants biologiques, craignant que l</text:span><text:span text:style-name="T50">e </text:span><text:span text:style-name="T51">chagrin</text:span><text:span text:style-name="T49"> ne s’empire avec ses vrais enfants</text:span><text:span text:style-name="T46">.</text:span></text:p>
      <text:h text:style-name="P11" text:outline-level="1"><text:bookmark-start text:name="__RefHeading___Toc715_35309501011"/>Passé<text:bookmark-end text:name="__RefHeading___Toc715_35309501011"/></text:h>
      <text:p text:style-name="P2"/>
      <text:p text:style-name="P14"><text:tab/> <text:span text:style-name="T51">Tout comme le reste</text:span><text:span text:style-name="T1"> des ancêtres, Charlotte était un des sujets de test étudiés par X ses amis dans le but de découvrir le secret de l’immortalité ; et les propriétés régénératrices de la méduse, bien que destructrices, étaient le sujet principal de leurs recherches. Mais contrairement à ses compagnons d’infortune, Charlotte n’a aucun souvenir de ces événements, son passé n’étant à ses yeux qu’un noir flou ponctué de brefs moments d’éclaircie quand Anita lui rendait visite, ou quand sa réincarnation se produisait. </text:span><text:span text:style-name="T2"><text:s/>N’ayant eu plus personne pour lui rappeler son passé depuis qu’Anita a mis en route ses plans, Charlotte a été laissée aux soins de ses filles adoptives, incapable de s’occuper d’elle-même ou de diriger </text:span><text:span text:style-name="T3">une armée</text:span><text:span text:style-name="T2">, </text:span><text:span text:style-name="T3">forcée de déléguer la gestion du pays à ces dernières.</text:span></text:p>
      <text:p text:style-name="P14"><text:span text:style-name="T3"><text:tab/></text:span><text:span text:style-name="T4">Les seuls moments de bonheur dans la vie de Charlotte sont les rares visites d’Anita après chaque réincarnation, dont le but est de ramener la nouvelle Charlotte sous son contrôle en lui insufflant ses idéologies anti-humaines </text:span><text:span text:style-name="T5">et lui rappelant leur but de se venger des humains qui leur ont fait du tort. Mais la fille-méduse, n’ayant aucun souvenir des humains à l’exception des nombreuses guerres qui ont fait rage entre eux et les animorphes, souhaite plus que tout mettre un terme à ces conflits, </text:span><text:span text:style-name="T6">sa vie n’ayant été rythmée que par les innombrables batailles et complots dans lesquels elle a été impliquée </text:span><text:soft-page-break/><text:span text:style-name="T6">malgré elle.</text:span><text:span text:style-name="T5"> </text:span><text:span text:style-name="T6">Elle sait malheureusement ce</text:span><text:span text:style-name="T5"> souhait impossible, dû à sa condition et son manque de pouvoir effectif au sein d’une hiérarchie dont elle n’est que la façade, ses fonctions ayant été distribuées à ses subordonnées plus loyales à Anita. </text:span><text:span text:style-name="T7">Malgré tout, elle reste reconnaissante à </text:span><text:span text:style-name="T8">son amie</text:span><text:span text:style-name="T7"> pour ne pas l’avoir abandonnée après toutes ces années et pour avoir donné un but à son existence, aussi macabre soit-il.</text:span></text:p>
      <text:h text:style-name="P10" text:outline-level="1"><text:bookmark-start text:name="__RefHeading___Toc715_353095010111"/>Interactions avec le joueur<text:bookmark-end text:name="__RefHeading___Toc715_353095010111"/></text:h>
      <text:p text:style-name="P2"/>
      <text:p text:style-name="P5"><text:tab/><text:span text:style-name="T12">Le joueur </text:span><text:span text:style-name="T52">rencontrera Charlotte lorsqu’il aura accès aux niveaux aquatiques du jeu </text:span><text:span text:style-name="T53">et devra la battre en tant que boss du niveau. D’abord hostile envers lui, elle lui expliquera son désir de mettre fin à la guerre et l’aidera à contrecarrer les plans d’Anita. Une fois son royaume libéré de son influence, elle acceptera des relations sexuelles avec X dans le but de lui donner un enfant pour l’aider dans sa quête.</text:span></text:p>
      <text:h text:style-name="P10" text:outline-level="1"><text:bookmark-start text:name="__RefHeading___Toc715_3530950101111"/>Relations avec les autres personnages<text:bookmark-end text:name="__RefHeading___Toc715_3530950101111"/></text:h>
      <text:p text:style-name="P2"/>
      <text:list xml:id="list3116635744" text:style-name="L1">
        <text:list-item>
          <text:p text:style-name="P16"><text:span text:style-name="T9">X</text:span><text:span text:style-name="T11"> </text:span><text:span text:style-name="T9">(et ses collègues scientifiques)</text:span><text:span text:style-name="T54"> : </text:span></text:p>
        </text:list-item>
        <text:list-item>
          <text:p text:style-name="P13"><text:span text:style-name="T11">Anita</text:span><text:span text:style-name="T10"> (et </text:span><text:span text:style-name="T11">les autres ancêtres</text:span><text:span text:style-name="T10">)</text:span><text:span text:style-name="T14"> : </text:span><text:span text:style-name="T15">Blanco chérissait ses camarades de galère comme ses propres sœurs. </text:span><text:span text:style-name="T16">Bien qu’il ne fut plus en vie pour assister à la descente infernale d’Anita, il a toujours veillé à ce que ses camarades se battent du bon côté de la morale et aident ceux dans le besoin, </text:span><text:span text:style-name="T17">allant même jusqu’à jouer le rôle d’intermédiaire pour mettre fin aux dissensions dans le groupe</text:span><text:span text:style-name="T16">.</text:span> </text:p>
        </text:list-item>
        <text:list-item>
          <text:p text:style-name="P15"><text:span text:style-name="T9">Ses filles adoptives</text:span> :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Gras" style:font-family-generic="swiss" style:font-pitch="variable"/>
    <style:font-face style:name="Calibri2" svg:font-family="Calibri" style:font-adornments="Italique" style:font-family-generic="swiss" style:font-pitch="variable"/>
    <style:font-face style:name="Calibri3" svg:font-family="Calibri" style:font-adornments="Italique 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4"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4"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4"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4"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3"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2"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H59M48S</meta:editing-duration>
    <meta:editing-cycles>153</meta:editing-cycles>
    <meta:generator>LibreOffice/7.3.3.2$Windows_X86_64 LibreOffice_project/d1d0ea68f081ee2800a922cac8f79445e4603348</meta:generator>
    <meta:creation-date>2023-03-26T19:35:01.716000000</meta:creation-date>
    <dc:date>2023-04-03T20:44:07.673000000</dc:date>
    <meta:document-statistic meta:table-count="0" meta:image-count="0" meta:object-count="0" meta:page-count="3" meta:paragraph-count="19" meta:word-count="1029" meta:character-count="6404" meta:non-whitespace-character-count="5382"/>
  </office:meta>
</office:document-meta>
</file>