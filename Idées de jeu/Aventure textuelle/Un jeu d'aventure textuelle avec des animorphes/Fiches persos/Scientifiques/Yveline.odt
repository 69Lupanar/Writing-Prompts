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ad316"/>
    </style:style>
    <style:style style:name="P3" style:family="paragraph" style:parent-style-name="Standard">
      <style:text-properties officeooo:rsid="00106f63" officeooo:paragraph-rsid="001c0023"/>
    </style:style>
    <style:style style:name="P4" style:family="paragraph" style:parent-style-name="Standard">
      <style:text-properties officeooo:rsid="00106f63" officeooo:paragraph-rsid="003b9db8"/>
    </style:style>
    <style:style style:name="P5" style:family="paragraph" style:parent-style-name="Text_20_body">
      <style:text-properties officeooo:rsid="0021c3ff" officeooo:paragraph-rsid="0021c3ff"/>
    </style:style>
    <style:style style:name="P6" style:family="paragraph" style:parent-style-name="Text_20_body">
      <style:text-properties officeooo:rsid="0021c3ff" officeooo:paragraph-rsid="003b9db8"/>
    </style:style>
    <style:style style:name="P7" style:family="paragraph" style:parent-style-name="Text_20_body">
      <style:text-properties officeooo:paragraph-rsid="0025df61"/>
    </style:style>
    <style:style style:name="P8" style:family="paragraph" style:parent-style-name="Standard">
      <style:text-properties style:font-name="Calibri3" fo:font-size="13pt" officeooo:rsid="0038b87c" officeooo:paragraph-rsid="001c0023"/>
    </style:style>
    <style:style style:name="P9" style:family="paragraph" style:parent-style-name="Standard">
      <style:paragraph-properties fo:line-height="115%"/>
      <style:text-properties style:font-name="Calibri3" fo:font-size="13pt" officeooo:rsid="0038b87c" officeooo:paragraph-rsid="001ce4dc" style:font-size-asian="13pt" style:font-size-complex="13pt"/>
    </style:style>
    <style:style style:name="P10" style:family="paragraph" style:parent-style-name="Text_20_body">
      <style:text-properties officeooo:rsid="001da3c2" officeooo:paragraph-rsid="001da3c2"/>
    </style:style>
    <style:style style:name="P11" style:family="paragraph" style:parent-style-name="Title">
      <style:text-properties officeooo:rsid="005672db" officeooo:paragraph-rsid="005672db"/>
    </style:style>
    <style:style style:name="P12" style:family="paragraph" style:parent-style-name="Heading_20_1">
      <style:text-properties officeooo:rsid="001c0023" officeooo:paragraph-rsid="001c0023"/>
    </style:style>
    <style:style style:name="P13" style:family="paragraph" style:parent-style-name="Heading_20_1">
      <style:text-properties officeooo:rsid="001c0023" officeooo:paragraph-rsid="003b9db8"/>
    </style:style>
    <style:style style:name="P14" style:family="paragraph" style:parent-style-name="Heading_20_1">
      <style:text-properties officeooo:rsid="00331381" officeooo:paragraph-rsid="003b9db8"/>
    </style:style>
    <style:style style:name="P15" style:family="paragraph" style:parent-style-name="Text_20_body" style:list-style-name="L1">
      <style:text-properties officeooo:rsid="00294043" officeooo:paragraph-rsid="004cca01"/>
    </style:style>
    <style:style style:name="P16" style:family="paragraph" style:parent-style-name="Text_20_body" style:list-style-name="L1">
      <style:text-properties officeooo:rsid="002d8da5" officeooo:paragraph-rsid="004cca01"/>
    </style:style>
    <style:style style:name="T1" style:family="text">
      <style:text-properties fo:font-size="13pt" officeooo:rsid="004107af" style:font-size-asian="13pt" style:font-size-complex="13pt"/>
    </style:style>
    <style:style style:name="T2" style:family="text">
      <style:text-properties fo:font-size="13pt" officeooo:rsid="0041dcb2" style:font-size-asian="13pt" style:font-size-complex="13pt"/>
    </style:style>
    <style:style style:name="T3" style:family="text">
      <style:text-properties fo:font-size="13pt" officeooo:rsid="0042bc9c" style:font-size-asian="13pt" style:font-size-complex="13pt"/>
    </style:style>
    <style:style style:name="T4" style:family="text">
      <style:text-properties fo:font-size="13pt" officeooo:rsid="0043205b" style:font-size-asian="13pt" style:font-size-complex="13pt"/>
    </style:style>
    <style:style style:name="T5" style:family="text">
      <style:text-properties fo:font-size="13pt" officeooo:rsid="00451317" style:font-size-asian="13pt" style:font-size-complex="13pt"/>
    </style:style>
    <style:style style:name="T6" style:family="text">
      <style:text-properties fo:font-size="13pt" officeooo:rsid="00473a64" style:font-size-asian="13pt" style:font-size-complex="13pt"/>
    </style:style>
    <style:style style:name="T7" style:family="text">
      <style:text-properties fo:font-size="13pt" officeooo:rsid="00487660" style:font-size-asian="13pt" style:font-size-complex="13pt"/>
    </style:style>
    <style:style style:name="T8" style:family="text">
      <style:text-properties fo:font-weight="bold" style:font-weight-asian="bold" style:font-weight-complex="bold"/>
    </style:style>
    <style:style style:name="T9" style:family="text">
      <style:text-properties fo:font-weight="bold" officeooo:rsid="004cca01" style:font-weight-asian="bold" style:font-weight-complex="bold"/>
    </style:style>
    <style:style style:name="T10" style:family="text">
      <style:text-properties fo:font-weight="bold" officeooo:rsid="004f2d63" style:font-weight-asian="bold" style:font-weight-complex="bold"/>
    </style:style>
    <style:style style:name="T11" style:family="text">
      <style:text-properties fo:font-weight="bold" officeooo:rsid="00502e26" style:font-weight-asian="bold" style:font-weight-complex="bold"/>
    </style:style>
    <style:style style:name="T12" style:family="text">
      <style:text-properties officeooo:rsid="0038b87c"/>
    </style:style>
    <style:style style:name="T13" style:family="text">
      <style:text-properties officeooo:rsid="003a5168"/>
    </style:style>
    <style:style style:name="T14" style:family="text">
      <style:text-properties officeooo:rsid="003d4c60"/>
    </style:style>
    <style:style style:name="T15" style:family="text">
      <style:text-properties officeooo:rsid="004033cb"/>
    </style:style>
    <style:style style:name="T16" style:family="text">
      <style:text-properties officeooo:rsid="00405f75"/>
    </style:style>
    <style:style style:name="T17" style:family="text">
      <style:text-properties officeooo:rsid="0049718e"/>
    </style:style>
    <style:style style:name="T18" style:family="text">
      <style:text-properties officeooo:rsid="004a1ce8"/>
    </style:style>
    <style:style style:name="T19" style:family="text">
      <style:text-properties officeooo:rsid="004a956c"/>
    </style:style>
    <style:style style:name="T20" style:family="text">
      <style:text-properties officeooo:rsid="004ae209"/>
    </style:style>
    <style:style style:name="T21" style:family="text">
      <style:text-properties officeooo:rsid="004d8f02"/>
    </style:style>
    <style:style style:name="T22" style:family="text">
      <style:text-properties officeooo:rsid="00502e26"/>
    </style:style>
    <style:style style:name="T23" style:family="text">
      <style:text-properties officeooo:rsid="0051db7c"/>
    </style:style>
    <style:style style:name="T24" style:family="text">
      <style:text-properties officeooo:rsid="00533fdd"/>
    </style:style>
    <style:style style:name="T25" style:family="text">
      <style:text-properties officeooo:rsid="0054c86a"/>
    </style:style>
    <style:style style:name="T26" style:family="text">
      <style:text-properties officeooo:rsid="00550bc6"/>
    </style:style>
    <style:style style:name="T27" style:family="text">
      <style:text-properties officeooo:rsid="005672db"/>
    </style:style>
    <style:style style:name="T28" style:family="text">
      <style:text-properties officeooo:rsid="00586e62"/>
    </style:style>
    <style:style style:name="T29" style:family="text">
      <style:text-properties officeooo:rsid="00596824"/>
    </style:style>
    <style:style style:name="T30" style:family="text">
      <style:text-properties officeooo:rsid="0059f2b8"/>
    </style:style>
    <style:style style:name="T31" style:family="text">
      <style:text-properties officeooo:rsid="0059f9ad"/>
    </style:style>
    <style:style style:name="T32" style:family="text">
      <style:text-properties officeooo:rsid="005bc8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Yveline</text:p>
      <text:p text:style-name="P1"/>
      <text:h text:style-name="P12" text:outline-level="1"><text:bookmark-start text:name="__RefHeading___Toc715_3530950101"/>Rôle dans l’histoire<text:bookmark-end text:name="__RefHeading___Toc715_3530950101"/></text:h>
      <text:p text:style-name="P8"/>
      <text:p text:style-name="P9"><text:tab/><text:span text:style-name="T27">Yveline</text:span> est une scientifique au service de la Patte Blanche depuis des décennies, capturée par les hommes de main d’Anita et forcée de travailler pour eux contre son gré. A l’origine une des scientifiques à l’origine de l’agent 18, Anita compte utiliser ses compétences et son savoir pour concevoir un autre agent chimique capable de stériliser les humains, condamnant ainsi l’humanité à l’extinction, et capable de débiliter les animorphes pour les ramener à l’état sauvage, effaçant le peu d’humanité qu’ils ont gagné via l’agent 18. Elle aidera cependant X et ses alliés à renverser la Patte Blanche et leur fournissant des infos sur leurs opérations et en sabotant l’agent chimique d’Anita. <text:span text:style-name="T28">Elle est le parallèle métaphorique de Blanco <text:s/></text:span><text:span text:style-name="T30">(l’ancêtre et son descendant)</text:span><text:span text:style-name="T28">, intéressé uniquement par la gloire et la richesse, et prêt à faire souffrir les autres pour son intérêt personnel.</text:span></text:p>
      <text:h text:style-name="P12" text:outline-level="1"><text:bookmark-start text:name="__RefHeading___Toc715_3530950102"/>Description physique<text:bookmark-end text:name="__RefHeading___Toc715_3530950102"/></text:h>
      <text:p text:style-name="P2"/>
      <text:p text:style-name="P5"><text:tab/><text:span text:style-name="T12">Avant le début du jeu, Yveline était une femme sans traits particuliers. Les années passées sur le projet Agent 18 ont aspiré son énergie, laissant derrière elles une femme épuisée et aigrie par ses échecs. Suite à l’accident du laboratoire, qui a conduit Yveline à errer à travers le pays pendant des décennies, ses traits tirés et son teint cireux se sont exacerbés avec la solitude et le désespoir, </text:span><text:span text:style-name="T13">quand bien même les effets secondaires de l’agent 18 ont embelli son corps et ajouté de la rondeur à ses contours.</text:span></text:p>
      <text:h text:style-name="P14" text:outline-level="1"><text:bookmark-start text:name="__RefHeading___Toc715_35309501021"/>Personnalité<text:bookmark-end text:name="__RefHeading___Toc715_35309501021"/></text:h>
      <text:p text:style-name="P4"/>
      <text:p text:style-name="P6"><text:tab/><text:span text:style-name="T14">Yveline est une personne arriviste, ayant initialement rejoint le programme pour profiter de la gloire et la postérité que concevoir l’agent lui offrirait. Les années d’échec ont blessé son orgueil et l’ont rendue frustrée, exacerban</text:span><text:span text:style-name="T15">t</text:span><text:span text:style-name="T14"> ses mauvais côtés au point de causer des dissensions au sein de l’équipe, culminant à l’accident qui causa la Nuit Noire.</text:span></text:p>
      <text:p text:style-name="P6"><text:tab/><text:span text:style-name="T15">Depuis qu’elle a tour perdu, Yveline nourrit un profond regret et porte constamment le deuil de ses camarades, la réalisation de son crime ayant complètement détruit sa confiance et sa fierté. Elle cherche depuis à réparer ses erreurs par tous les moyens, </text:span><text:span text:style-name="T16">maudissant le jour où elle a perdu la raison pour acquérir l’immortalité, cette bénédiction devenue à ses yeux une malédiction.</text:span></text:p>
      <text:h text:style-name="P13" text:outline-level="1"><text:bookmark-start text:name="__RefHeading___Toc715_35309501011"/><text:soft-page-break/>Passé<text:bookmark-end text:name="__RefHeading___Toc715_35309501011"/></text:h>
      <text:p text:style-name="P3"/>
      <text:p text:style-name="P7"><text:tab/> <text:span text:style-name="T1">Étant autrefois une amie proche de X, Yveline travaillait à ses côtés sur le projet d’immortalité du gouvernement, y compris après son abandon par ce dernier. </text:span><text:span text:style-name="T2">Mais si elle partageait son ambition, leurs idéaux et leurs objectifs divergents furent les sources de nombreuses dissensions au sein du groupe : Là où X désirait surtout le progrès de l’humanité, Yveline voyait en ce projet un désir plus personnel et gloire et de fortune, espérant que l’agent 18 lui permettrait d’inscrire son nom aux côtés des plus grandes scientifiques de l’histoire.</text:span></text:p>
      <text:p text:style-name="P7"><text:span text:style-name="T2"><text:tab/></text:span><text:span text:style-name="T3">Sentant son rêve lui échapper en voyant les nombreux problèmes qui entravaient le bon déroulement du projet, la jeune femme décida de prendre les choses en main en testant une variante instable de l’agent sur elle-même, alors que les tests sur animaux s’étaient révélés imprévisibles. L’agent 18 a fini par prendre temporairement le contrôle de son esprit, poussant sa libido au-delà de ses limites, la poussant à détruire le caisson de confinement de l’agent afin d’en absorber une plus grande quantité. Sa destruction causa une grande explosion qui tua les autres membres de leur équipe et l’effondrement de leur laboratoire.</text:span></text:p>
      <text:p text:style-name="P7"><text:span text:style-name="T3"><text:tab/>Croyant avoir tué tous ses anciens amis, Yveline passa plusieurs décennies à errer à travers le pays, constatant de ses propres yeux les </text:span><text:span text:style-name="T4">ravages causés à travers le monde par sa fièvre lascive. Sans plus aucun proche pour l’aider, les affres du temps ayant emporté le peu de famille qu’il lui restait, </text:span><text:span text:style-name="T5">elle sombra dans un profond désespoir avec pour compagnie son seul regret d’avoir trahi ses compagnons pour ses désirs personnels.</text:span></text:p>
      <text:p text:style-name="P7"><text:span text:style-name="T5"><text:tab/></text:span><text:span text:style-name="T6">C’est alors qu’elle fut capturé par les sbires de Blanco, l’homme de main d’Anita, et offerte à cette dernière comme servante. Reconnaissant la femme comme une de ses anciens tortionnaires, Anita décida d’utiliser son savoir pour concevoir un nouvel agent, cette fois destiné à mettre fin à l’humanité. </text:span><text:span text:style-name="T7">Contrainte et forcée, Yveline cherche cependant à réparer ses erreurs passées, et profitera de sa position pour espionner les opérations de la Patte Blanche et à fournir des renseignements aux humains, dans l’espoir de pouvoir l’arrêter avant qu’il ne soit trop tard.</text:span></text:p>
      <text:h text:style-name="P12" text:outline-level="1"><text:bookmark-start text:name="__RefHeading___Toc715_353095010111"/>Interactions avec le joueur<text:bookmark-end text:name="__RefHeading___Toc715_353095010111"/></text:h>
      <text:p text:style-name="P3"/>
      <text:p text:style-name="P10"><text:tab/><text:span text:style-name="T17">Le joueur rencontrera Yveline à quelques reprises à travers le jeu, </text:span><text:span text:style-name="T18">d’abord dans un rêve où X se rappelle ses souvenirs </text:span><text:span text:style-name="T19">(sert de mise en scène avant leur 1è rencontre </text:span><text:span text:style-name="T29">et son parallèle avec Blanco</text:span><text:span text:style-name="T19">)</text:span><text:span text:style-name="T18">, puis de rares fois dans la nature avant de la voir sous l’emprise d’Anita, où elle essaiera d’aider le joueur à renverser la Patte Blanche. </text:span><text:span text:style-name="T20">Elle donnera des objectifs au joueur et lui indiquera des emplacements ou astuces pour trouver des objets ou des animorphes/animutants à ajouter à sa collection.</text:span></text:p>
      <text:h text:style-name="P12" text:outline-level="1"><text:bookmark-start text:name="__RefHeading___Toc715_3530950101111"/><text:soft-page-break/>Relations avec les autres personnages<text:bookmark-end text:name="__RefHeading___Toc715_3530950101111"/></text:h>
      <text:p text:style-name="P3"/>
      <text:list xml:id="list2768094836" text:style-name="L1">
        <text:list-item>
          <text:p text:style-name="P15"><text:span text:style-name="T9">X</text:span><text:span text:style-name="T8"> (et ses collègues scientifiques)</text:span> : <text:span text:style-name="T21">Yveline était une amie proche du protagoniste ; malgré leurs différences idéologiques, elle l’a assisté jusqu’au bout sur le projet Agent 18 et le voyait comme son égal sur tout ce qui touchait de près ou de loin à la biologie et la chimie. Même si leurs objectifs divergeaient, elle avait toujours eu du respect pour le travail de X et les valeurs que l’individu incarnait.</text:span></text:p>
        </text:list-item>
        <text:list-item>
          <text:p text:style-name="P16"><text:span text:style-name="T8">Anita </text:span><text:span text:style-name="T11">(et les autres ancêtres)</text:span> : <text:span text:style-name="T22">Les relations entre Yveline et les 5 ancêtres ont toujours été mauvaises, y compris à l’époque pré-Nuit Noire, où le bien-être de ses sujets de tests importait peu à la jeune femme, qui n’hésitait pas à pousser leurs corps et leurs esprits dans leurs dernières limites en échange de résultats concluants. Ce mauvais traitement a conduit les ancêtres à lui vouer une haine tenace, qu’ils ont pu déchaîner sur elle lorsqu’elle fut capturée et mise à leurs services.</text:span></text:p>
        </text:list-item>
        <text:list-item>
          <text:p text:style-name="P16"><text:span text:style-name="T9">Ann</text:span><text:span text:style-name="T10">ette</text:span> : <text:span text:style-name="T22">Si Yveline n’aime pas les animaux, et voie les animorphes comme une aberration de la nature, la naissance d’Annette, sa fille animorphe issue d’un viol, </text:span><text:span text:style-name="T23">a fait naître chez elle son instinct maternel qui la poussa à la cacher d’Anita et ses sbires, craignant qu’</text:span><text:span text:style-name="T24">ils ne la modèle</text:span><text:span text:style-name="T31">nt</text:span><text:span text:style-name="T24"> à leur image une fois adulte. </text:span><text:span text:style-name="T25">Déterminée à protéger sa fille contre le monde hostile dont elle est aussi la génitrice, Yveline </text:span><text:span text:style-name="T32">l’élèvera</text:span><text:span text:style-name="T25"> en secret à l’aide d’un ami animorphe qui cherche lui aussi à se venger de la Patte Blanche. </text:span><text:span text:style-name="T26">La loyauté de lui voue sa fille est égale à l’amour qu’Yveline lui porte, c’est pourquoi Annette est chagrinée de laisser sa mère entre leurs griffes, tandis qu’elle rassemble des alliés dans le but de tenir tête aux plans d’Anita.</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6M16S</meta:editing-duration>
    <meta:editing-cycles>65</meta:editing-cycles>
    <meta:generator>LibreOffice/7.3.3.2$Windows_X86_64 LibreOffice_project/d1d0ea68f081ee2800a922cac8f79445e4603348</meta:generator>
    <meta:creation-date>2023-03-26T19:35:01.716000000</meta:creation-date>
    <dc:date>2023-04-01T14:16:55.016000000</dc:date>
    <meta:document-statistic meta:table-count="0" meta:image-count="0" meta:object-count="0" meta:page-count="3" meta:paragraph-count="19" meta:word-count="1092" meta:character-count="6615" meta:non-whitespace-character-count="5534"/>
  </office:meta>
</office:document-meta>
</file>