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6f63" officeooo:paragraph-rsid="00106f63"/>
    </style:style>
    <style:style style:name="P2" style:family="paragraph" style:parent-style-name="Standard">
      <style:text-properties officeooo:rsid="00106f63" officeooo:paragraph-rsid="001ad316"/>
    </style:style>
    <style:style style:name="P3" style:family="paragraph" style:parent-style-name="Standard">
      <style:text-properties officeooo:rsid="00106f63" officeooo:paragraph-rsid="001c0023"/>
    </style:style>
    <style:style style:name="P4" style:family="paragraph" style:parent-style-name="Standard">
      <style:text-properties officeooo:rsid="00106f63" officeooo:paragraph-rsid="003b9db8"/>
    </style:style>
    <style:style style:name="P5" style:family="paragraph" style:parent-style-name="Text_20_body">
      <style:text-properties officeooo:rsid="0021c3ff" officeooo:paragraph-rsid="0021c3ff"/>
    </style:style>
    <style:style style:name="P6" style:family="paragraph" style:parent-style-name="Standard">
      <style:text-properties style:font-name="Calibri3" fo:font-size="13pt" officeooo:rsid="0038b87c" officeooo:paragraph-rsid="001c0023"/>
    </style:style>
    <style:style style:name="P7" style:family="paragraph" style:parent-style-name="Standard">
      <style:paragraph-properties fo:line-height="115%"/>
      <style:text-properties style:font-name="Calibri3" fo:font-size="13pt" officeooo:rsid="0038b87c" officeooo:paragraph-rsid="001ce4dc" style:font-size-asian="13pt" style:font-size-complex="13pt"/>
    </style:style>
    <style:style style:name="P8" style:family="paragraph" style:parent-style-name="Text_20_body">
      <style:text-properties officeooo:rsid="001da3c2" officeooo:paragraph-rsid="001da3c2"/>
    </style:style>
    <style:style style:name="P9" style:family="paragraph" style:parent-style-name="Text_20_body">
      <style:text-properties officeooo:paragraph-rsid="005df2f4"/>
    </style:style>
    <style:style style:name="P10" style:family="paragraph" style:parent-style-name="Title">
      <style:text-properties officeooo:rsid="00682ee4" officeooo:paragraph-rsid="00682ee4"/>
    </style:style>
    <style:style style:name="P11" style:family="paragraph" style:parent-style-name="Heading_20_1">
      <style:text-properties officeooo:rsid="001c0023" officeooo:paragraph-rsid="001c0023"/>
    </style:style>
    <style:style style:name="P12" style:family="paragraph" style:parent-style-name="Heading_20_1">
      <style:text-properties officeooo:rsid="001c0023" officeooo:paragraph-rsid="003b9db8"/>
    </style:style>
    <style:style style:name="P13" style:family="paragraph" style:parent-style-name="Heading_20_1">
      <style:text-properties officeooo:rsid="00331381" officeooo:paragraph-rsid="003b9db8"/>
    </style:style>
    <style:style style:name="P14" style:family="paragraph" style:parent-style-name="Text_20_body" style:list-style-name="L1">
      <style:text-properties officeooo:rsid="00294043" officeooo:paragraph-rsid="004cca01"/>
    </style:style>
    <style:style style:name="P15" style:family="paragraph" style:parent-style-name="Text_20_body">
      <style:text-properties officeooo:rsid="0021c3ff" officeooo:paragraph-rsid="006fbea3"/>
    </style:style>
    <style:style style:name="T1" style:family="text">
      <style:text-properties fo:font-size="13pt" officeooo:rsid="0073c914" style:font-size-asian="13pt" style:font-size-complex="13pt"/>
    </style:style>
    <style:style style:name="T2" style:family="text">
      <style:text-properties fo:font-weight="bold" style:font-weight-asian="bold" style:font-weight-complex="bold"/>
    </style:style>
    <style:style style:name="T3" style:family="text">
      <style:text-properties fo:font-weight="bold" officeooo:rsid="004cca01" style:font-weight-asian="bold" style:font-weight-complex="bold"/>
    </style:style>
    <style:style style:name="T4" style:family="text">
      <style:text-properties officeooo:rsid="0049718e"/>
    </style:style>
    <style:style style:name="T5" style:family="text">
      <style:text-properties officeooo:rsid="006197c3"/>
    </style:style>
    <style:style style:name="T6" style:family="text">
      <style:text-properties officeooo:rsid="006853d7"/>
    </style:style>
    <style:style style:name="T7" style:family="text">
      <style:text-properties officeooo:rsid="006a4b89"/>
    </style:style>
    <style:style style:name="T8" style:family="text">
      <style:text-properties officeooo:rsid="006c27a7"/>
    </style:style>
    <style:style style:name="T9" style:family="text">
      <style:text-properties officeooo:rsid="006dbbbb"/>
    </style:style>
    <style:style style:name="T10" style:family="text">
      <style:text-properties officeooo:rsid="006e2e94"/>
    </style:style>
    <style:style style:name="T11" style:family="text">
      <style:text-properties officeooo:rsid="006e757d"/>
    </style:style>
    <style:style style:name="T12" style:family="text">
      <style:text-properties officeooo:rsid="006eb2b0"/>
    </style:style>
    <style:style style:name="T13" style:family="text">
      <style:text-properties officeooo:rsid="006f2a5b"/>
    </style:style>
    <style:style style:name="T14" style:family="text">
      <style:text-properties officeooo:rsid="006f45ad"/>
    </style:style>
    <style:style style:name="T15" style:family="text">
      <style:text-properties officeooo:rsid="006fbea3"/>
    </style:style>
    <style:style style:name="T16" style:family="text">
      <style:text-properties officeooo:rsid="0071a149"/>
    </style:style>
    <style:style style:name="T17" style:family="text">
      <style:text-properties officeooo:rsid="0075c4d6"/>
    </style:style>
    <style:style style:name="T18" style:family="text">
      <style:text-properties officeooo:rsid="00775533"/>
    </style:style>
    <style:style style:name="T19" style:family="text">
      <style:text-properties officeooo:rsid="0078174e"/>
    </style:style>
    <style:style style:name="T20" style:family="text">
      <style:text-properties officeooo:rsid="00788112"/>
    </style:style>
    <style:style style:name="T21" style:family="text">
      <style:text-properties officeooo:rsid="007a05e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Vincent</text:p>
      <text:p text:style-name="P1"/>
      <text:h text:style-name="P11" text:outline-level="1"><text:bookmark-start text:name="__RefHeading___Toc715_3530950101"/>Rôle dans l’histoire<text:bookmark-end text:name="__RefHeading___Toc715_3530950101"/></text:h>
      <text:p text:style-name="P6"/>
      <text:p text:style-name="P7"><text:tab/><text:span text:style-name="T6">Vincent était un des associés de X, </text:span><text:span text:style-name="T8">et plus précisément le porte-parole de l’équipe lorsqu’ils travaillaient encore pour le gouvernement.</text:span><text:span text:style-name="T6"> </text:span><text:span text:style-name="T8">P</text:span><text:span text:style-name="T6">lus un chercheur et un théoricien qu’un véritable pratiquant, </text:span><text:span text:style-name="T8">il laissait</text:span><text:span text:style-name="T6"> la plupart des opérations à X et Yveline, </text:span><text:span text:style-name="T9">se contentant de rechercher et récupérer de nouvelles espèces d’animaux pour leurs études</text:span><text:span text:style-name="T6">. </text:span><text:span text:style-name="T7">Il est le parallèle métaphorique de Dragmar I et VII, </text:span><text:span text:style-name="T10">ayant rejoint ce projet</text:span><text:span text:style-name="T7"> uniquement </text:span><text:span text:style-name="T10">pour</text:span><text:span text:style-name="T7"> sauver la vie de sa fille mourante, atteinte d’une maladie incurable.</text:span></text:p>
      <text:h text:style-name="P11" text:outline-level="1"><text:bookmark-start text:name="__RefHeading___Toc715_3530950102"/>Description physique<text:bookmark-end text:name="__RefHeading___Toc715_3530950102"/></text:h>
      <text:p text:style-name="P2"/>
      <text:p text:style-name="P5"><text:tab/><text:span text:style-name="T8">Vincent était un </text:span><text:span text:style-name="T14">homme encore dans la force de l’âge</text:span><text:span text:style-name="T8">, dont même X reconnaissait le charme naturel</text:span><text:span text:style-name="T11">. </text:span><text:span text:style-name="T12">Il n’avait pas de trait distinctif particulier, hormis </text:span><text:span text:style-name="T13">des cheveux et </text:span><text:span text:style-name="T12">une barbe grisonnant</text:span><text:span text:style-name="T13">s</text:span><text:span text:style-name="T12"> due au stress de son travail, la lourdeur de ses responsabilités, et les affres du temps le rattrapant peu à peu.</text:span></text:p>
      <text:h text:style-name="P13" text:outline-level="1"><text:bookmark-start text:name="__RefHeading___Toc715_35309501021"/>Personnalité<text:bookmark-end text:name="__RefHeading___Toc715_35309501021"/></text:h>
      <text:p text:style-name="P4"/>
      <text:p text:style-name="P15"><text:tab/><text:span text:style-name="T14">Vincent était </text:span><text:span text:style-name="T15">un homme charismatique et charmant avec un réel</text:span><text:span text:style-name="T8"> talent d’orateur, </text:span><text:span text:style-name="T11">ce qui lui valait souvent le rôle de négociateur pour obtenir de nouveaux cobayes ou fonds auprès du gouvernement. </text:span><text:span text:style-name="T16">Au sein de son équipe, il était un homme terre-à-terre qui mettait souvent fin aux conflits lorsque des dissensions émergeaient entre Yveline et d’autres membres. Dans le privé, Vincent était un père aimant envers sa fille unique, atteinte d’une maladie incurable qui lui retirait peu à peu toute son énergie de vivre. Motivé uniquement par le bien-être de sa fille, X reconnaissait que Vincent devait avoir les intentions les plus nobles du groupe.</text:span></text:p>
      <text:h text:style-name="P12" text:outline-level="1"><text:bookmark-start text:name="__RefHeading___Toc715_35309501011"/>Passé<text:bookmark-end text:name="__RefHeading___Toc715_35309501011"/></text:h>
      <text:p text:style-name="P3"/>
      <text:p text:style-name="P9"><text:tab/> <text:span text:style-name="T1">Autrefois un homme marié, Vincent a vu sa femme partir de la même maladie qui a depuis infecté sa fille, la contraignant à vivre à l’hôpital. Désemparé de voir sa fille finir ses jours ainsi, il accepta sans hésiter la proposition du gouvernement de l’engager au sein de l’équipe de X pour travailler sur le projet Agent 18, jouant le rôle de coordinateur et de négociateur pour l’obtention de fonds et matériel.</text:span></text:p>
      <text:h text:style-name="P11" text:outline-level="1"><text:bookmark-start text:name="__RefHeading___Toc715_353095010111"/><text:soft-page-break/>Interactions avec le joueur<text:bookmark-end text:name="__RefHeading___Toc715_353095010111"/></text:h>
      <text:p text:style-name="P3"/>
      <text:p text:style-name="P8"><text:tab/><text:span text:style-name="T4">Le joueur </text:span><text:span text:style-name="T5">ne verra </text:span><text:span text:style-name="T17">Vincent</text:span><text:span text:style-name="T5"> au cours d’un rêve-souvenir du protagoniste, où celui relate une discussion importante avec </text:span><text:span text:style-name="T18">lui</text:span><text:span text:style-name="T5"> quelques jours avant la Nuit Noire. Le joueur y verra </text:span><text:span text:style-name="T17">Vincent épuisé à son bureau, </text:span><text:span text:style-name="T19">une pile de documents d’un côté et la photo de sa fille de l’autre. Le joueur apprendra les motivations de Vincent à rejoindre le projet, et celui-ci demandera au protagoniste la même question. Le joueur pourra répondre une réponse similaire à un de ses quatre collègues, mais il répondra aussi que c’est par vengeance envers ses supérieurs de l’avoir empêché d’accomplir cet exploit pour l’humanité, le gouvernement souhaitant de servir de l’agent pour leurs petites personnes.</text:span></text:p>
      <text:h text:style-name="P11" text:outline-level="1"><text:bookmark-start text:name="__RefHeading___Toc715_3530950101111"/>Relations avec les autres personnages<text:bookmark-end text:name="__RefHeading___Toc715_3530950101111"/></text:h>
      <text:p text:style-name="P3"/>
      <text:list xml:id="list3133031065" text:style-name="L1">
        <text:list-item>
          <text:p text:style-name="P14"><text:span text:style-name="T3">X</text:span><text:span text:style-name="T2"> (et ses collègues scientifiques)</text:span> : <text:span text:style-name="T20">Vincent était relativement proche de tout le monde, une qualité nécessaire en tant que coordinateur du projet. </text:span><text:span text:style-name="T21">Il ne passait pas vraiment de temps avec les sujets de tests en dehors de leurs expériences, laissant leur entretien à X et Zoé. Vincent était celui qui désamorçait les conflits, notamment entre X et Yveline, et sera aussi celui qui manquera le plus à X depuis la mort de ses amis lors de la Nuit Noir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3H43M4S</meta:editing-duration>
    <meta:editing-cycles>95</meta:editing-cycles>
    <meta:generator>LibreOffice/7.3.3.2$Windows_X86_64 LibreOffice_project/d1d0ea68f081ee2800a922cac8f79445e4603348</meta:generator>
    <meta:creation-date>2023-03-26T19:35:01.716000000</meta:creation-date>
    <dc:date>2023-04-01T09:38:10.934000000</dc:date>
    <meta:document-statistic meta:table-count="0" meta:image-count="0" meta:object-count="0" meta:page-count="2" meta:paragraph-count="13" meta:word-count="515" meta:character-count="3139" meta:non-whitespace-character-count="2632"/>
  </office:meta>
</office:document-meta>
</file>