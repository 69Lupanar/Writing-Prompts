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text-properties officeooo:rsid="00106f63" officeooo:paragraph-rsid="001c0023"/>
    </style:style>
    <style:style style:name="P3" style:family="paragraph" style:parent-style-name="Standard">
      <style:text-properties officeooo:rsid="00106f63" officeooo:paragraph-rsid="00331381"/>
    </style:style>
    <style:style style:name="P4" style:family="paragraph" style:parent-style-name="Standard">
      <style:text-properties style:font-name="Calibri" fo:font-size="14pt" officeooo:rsid="0006ac9e" officeooo:paragraph-rsid="001ce4dc"/>
    </style:style>
    <style:style style:name="P5" style:family="paragraph" style:parent-style-name="Text_20_body">
      <style:text-properties officeooo:rsid="001da3c2" officeooo:paragraph-rsid="001da3c2"/>
    </style:style>
    <style:style style:name="P6" style:family="paragraph" style:parent-style-name="Text_20_body">
      <style:text-properties officeooo:paragraph-rsid="0025df61"/>
    </style:style>
    <style:style style:name="P7" style:family="paragraph" style:parent-style-name="Text_20_body">
      <style:text-properties officeooo:paragraph-rsid="0026f128"/>
    </style:style>
    <style:style style:name="P8" style:family="paragraph" style:parent-style-name="Title">
      <style:text-properties officeooo:rsid="001ce4dc" officeooo:paragraph-rsid="001ce4dc"/>
    </style:style>
    <style:style style:name="P9" style:family="paragraph" style:parent-style-name="Text_20_body">
      <style:text-properties officeooo:rsid="0021c3ff" officeooo:paragraph-rsid="00331381"/>
    </style:style>
    <style:style style:name="P10" style:family="paragraph" style:parent-style-name="Text_20_body">
      <style:text-properties fo:font-size="13pt" officeooo:rsid="0026f128" officeooo:paragraph-rsid="0026f128" style:font-size-asian="13pt" style:font-size-complex="13pt"/>
    </style:style>
    <style:style style:name="P11" style:family="paragraph" style:parent-style-name="Heading_20_1">
      <style:text-properties officeooo:rsid="001c0023" officeooo:paragraph-rsid="001c0023"/>
    </style:style>
    <style:style style:name="P12" style:family="paragraph" style:parent-style-name="Heading_20_1">
      <style:text-properties officeooo:rsid="001c0023" officeooo:paragraph-rsid="00331381"/>
    </style:style>
    <style:style style:name="P13" style:family="paragraph" style:parent-style-name="Heading_20_1">
      <style:text-properties officeooo:rsid="00331381" officeooo:paragraph-rsid="00331381"/>
    </style:style>
    <style:style style:name="P14" style:family="paragraph" style:parent-style-name="Text_20_body" style:list-style-name="L1">
      <style:text-properties officeooo:rsid="00294043" officeooo:paragraph-rsid="002d8da5"/>
    </style:style>
    <style:style style:name="P15" style:family="paragraph" style:parent-style-name="Text_20_body" style:list-style-name="L1">
      <style:text-properties officeooo:rsid="002d8da5" officeooo:paragraph-rsid="002d8da5"/>
    </style:style>
    <style:style style:name="T1" style:family="text">
      <style:text-properties officeooo:rsid="001da3c2"/>
    </style:style>
    <style:style style:name="T2" style:family="text">
      <style:text-properties officeooo:rsid="001e1ee4"/>
    </style:style>
    <style:style style:name="T3" style:family="text">
      <style:text-properties officeooo:rsid="001f4d8e"/>
    </style:style>
    <style:style style:name="T4" style:family="text">
      <style:text-properties officeooo:rsid="002084c8"/>
    </style:style>
    <style:style style:name="T5" style:family="text">
      <style:text-properties officeooo:rsid="00214b23"/>
    </style:style>
    <style:style style:name="T6" style:family="text">
      <style:text-properties officeooo:rsid="0021bcd9"/>
    </style:style>
    <style:style style:name="T7" style:family="text">
      <style:text-properties officeooo:rsid="0021c3ff"/>
    </style:style>
    <style:style style:name="T8" style:family="text">
      <style:text-properties officeooo:rsid="00226b45"/>
    </style:style>
    <style:style style:name="T9" style:family="text">
      <style:text-properties officeooo:rsid="00245390"/>
    </style:style>
    <style:style style:name="T10" style:family="text">
      <style:text-properties officeooo:rsid="0025df61"/>
    </style:style>
    <style:style style:name="T11" style:family="text">
      <style:text-properties officeooo:rsid="0026f128"/>
    </style:style>
    <style:style style:name="T12" style:family="text">
      <style:text-properties fo:font-size="13pt" officeooo:rsid="00523e81" style:font-size-asian="13pt" style:font-size-complex="13pt"/>
    </style:style>
    <style:style style:name="T13" style:family="text">
      <style:text-properties fo:font-size="13pt" officeooo:rsid="0026f128" style:font-size-asian="13pt" style:font-size-complex="13pt"/>
    </style:style>
    <style:style style:name="T14" style:family="text">
      <style:text-properties fo:font-size="13pt" officeooo:rsid="002789e6" style:font-size-asian="13pt" style:font-size-complex="13pt"/>
    </style:style>
    <style:style style:name="T15" style:family="text">
      <style:text-properties fo:font-size="13pt" officeooo:rsid="0027e887" style:font-size-asian="13pt" style:font-size-complex="13pt"/>
    </style:style>
    <style:style style:name="T16" style:family="text">
      <style:text-properties fo:font-weight="bold" style:font-weight-asian="bold" style:font-weight-complex="bold"/>
    </style:style>
    <style:style style:name="T17" style:family="text">
      <style:text-properties officeooo:rsid="002a94de"/>
    </style:style>
    <style:style style:name="T18" style:family="text">
      <style:text-properties officeooo:rsid="002c726f"/>
    </style:style>
    <style:style style:name="T19" style:family="text">
      <style:text-properties officeooo:rsid="002d8da5"/>
    </style:style>
    <style:style style:name="T20" style:family="text">
      <style:text-properties officeooo:rsid="002f6315"/>
    </style:style>
    <style:style style:name="T21" style:family="text">
      <style:text-properties officeooo:rsid="00306b58"/>
    </style:style>
    <style:style style:name="T22" style:family="text">
      <style:text-properties officeooo:rsid="00324119"/>
    </style:style>
    <style:style style:name="T23" style:family="text">
      <style:text-properties officeooo:rsid="0034fc1f"/>
    </style:style>
    <style:style style:name="T24" style:family="text">
      <style:text-properties officeooo:rsid="0036e385"/>
    </style:style>
    <style:style style:name="T25" style:family="text">
      <style:text-properties officeooo:rsid="00388599"/>
    </style:style>
    <style:style style:name="T26" style:family="text">
      <style:text-properties officeooo:rsid="003a7506"/>
    </style:style>
    <style:style style:name="T27" style:family="text">
      <style:text-properties officeooo:rsid="003b750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X</text:p>
      <text:p text:style-name="P1"/>
      <text:h text:style-name="P11" text:outline-level="1"><text:bookmark-start text:name="__RefHeading___Toc715_3530950101"/>Rôle dans l’histoire<text:bookmark-end text:name="__RefHeading___Toc715_3530950101"/></text:h>
      <text:p text:style-name="P2"/>
      <text:p text:style-name="P4"><text:tab/>X est le protagoniste du jeu, <text:span text:style-name="T1">renommable par le joueur. </text:span><text:span text:style-name="T4">Se réveillant dans un caisson de stase 200 ans dans le futur, son objectif est de découvrir ce qui lui est arrivé et survivre dans ce nouveau monde hostile. D’abord uniquement intéressé par sa propre survie, ses pas l’entraîne</text:span><text:span text:style-name="T5">ro</text:span><text:span text:style-name="T4">nt dans </text:span><text:span text:style-name="T5">la guerre</text:span><text:span text:style-name="T4"> entre animorphes et humains </text:span><text:span text:style-name="T5">qui fait rage depuis la Nuit Noire</text:span><text:span text:style-name="T4">, </text:span><text:span text:style-name="T5">avec au cœur de ce conflit la Patte Blanche, un groupuscule mystérieux aux intentions obscures, </text:span><text:span text:style-name="T6">que X devra arrêter pour empêcher un nouveau cataclysme de frapper la Terre. </text:span><text:span text:style-name="T24">Il </text:span><text:span text:style-name="T27">est le</text:span><text:span text:style-name="T24"> parallèle </text:span><text:span text:style-name="T27">métaphorique de</text:span><text:span text:style-name="T24"> Anita, qui a perdu la raison après avoir acquis conscience de son univers et d’elle-même, et a été témoin de la brutalité de son nouveau monde, </text:span><text:span text:style-name="T25">ayant en quelque sorte « brisé » son propre quatrième mur, tout comme le joueur brise le quatrième mur pour incarner </text:span><text:span text:style-name="T26">le protagoniste</text:span><text:span text:style-name="T24">.</text:span></text:p>
      <text:h text:style-name="P12" text:outline-level="1"><text:bookmark-start text:name="__RefHeading___Toc715_3530950102"/>Description physique<text:bookmark-end text:name="__RefHeading___Toc715_3530950102"/></text:h>
      <text:p text:style-name="P3"/>
      <text:p text:style-name="P9"><text:tab/>Étant l’incarnation du joueur, celui-ci sera en mesure de personnaliser ses traits physiques comme sa taille, couleur de peau, cheveux, etc.</text:p>
      <text:p text:style-name="P9"><text:tab/><text:span text:style-name="T8">Le joueur pourra également déterminer son sexe, ce qui déterminera avec qui des animorphes ou des animutants X pourra concevoir des enfants (bien que X est capable d’avoir des relations sexuelles avec les deux espèces.)</text:span></text:p>
      <text:h text:style-name="P13" text:outline-level="1"><text:bookmark-start text:name="__RefHeading___Toc715_35309501021"/>Personnalité<text:bookmark-end text:name="__RefHeading___Toc715_35309501021"/></text:h>
      <text:p text:style-name="P3"/>
      <text:p text:style-name="P9"><text:tab/>Étant l’incarnation du joueur, celui-ci sera en mesure de <text:span text:style-name="T23">prendre lui-même les décisions affectant le cours des événements, incluant ses réponses aux questions que lui poseront les PBJs concernant le personnage lui-même. Le joueur pourra ainsi choisir la personnalité que X devra adopter, et pourra toujours changer de direction pour son personnage en cours d’aventure.</text:span></text:p>
      <text:h text:style-name="P12" text:outline-level="1"><text:bookmark-start text:name="__RefHeading___Toc715_35309501011"/>Passé<text:bookmark-end text:name="__RefHeading___Toc715_35309501011"/></text:h>
      <text:p text:style-name="P2"/>
      <text:p text:style-name="P6"><text:tab/> <text:span text:style-name="T7">Étant l’incarnation du joueur, celui-ci </text:span><text:span text:style-name="T9">sera en mesure de déterminer une partie de son passé, lui permettant de lui attribuer des statistiques dépendant de son passé ; par </text:span><text:soft-page-break/><text:span text:style-name="T9">exemple, un passé de littéraire pour augmenter son intelligence, un passé de politique pour augmenter ses capacités de persuasion, </text:span><text:span text:style-name="T10">ou un passé de soldat pour augmenter sa force ou son endurance.</text:span></text:p>
      <text:p text:style-name="P7"><text:tab/><text:span text:style-name="T9">Quelque soit ses traits, toutes les variantes de X partagent le même passé récent menant aux événements du jeu : </text:span><text:span text:style-name="T11">Avant le début du jeu, X était un scientifique travaillant pour le gouvernement sur un projet visant à découvrir le secret de l’immortalité. Après plusieurs tentatives infructueuses, le projet fut abandonné, mais X et quelques-uns de ses plus fidèles amis parvinrent à voler du matériel et continuer leurs recherches dans le plus grand secret, dans un petit laboratoire caché dans le sud du pays. Rebaptisé agent 18, leur dernière création allait devenir un agent chimique supposé </text:span><text:span text:style-name="T12">augmenter les capacités physiques et intellectuelles d’un sujet, </text:span><text:span text:style-name="T13">et à terme, lui accorder l’immortalité.</text:span></text:p>
      <text:p text:style-name="P10"><text:tab/>Mais leurs fonds fondant à vue d’œil, de nombreuses dissensions éclatèrent au sein du groupe, certains désespérant de voir le projet se réaliser un jour. L’un des collègues de X, Yveline, désireuse d’obtenir la postérité éternelle que lui accorderait ce projet s’il venait à terme, décida de s’injecter une forte dose de l’agent alors que les tests sur animaux avaient donné des résultats imprévisibles. </text:p>
      <text:p text:style-name="P7"><text:span text:style-name="T13"><text:tab/>Yveline, devenue folle suite à l’injection, tenta de détruire le caisson de confinement de l’agent afin d’en absorber une plus grande quantité, causant un accident qui détruisit une grande partie du laboratoire, tua les camarades de X et libéra l’agent dans l’air, contaminant </text:span><text:span text:style-name="T14">peu à peu </text:span><text:span text:style-name="T13">la planète entière. X parvint à temps à s’enfermer dans un caisson de stase, le protégeant des effets néfastes de l’agent </text:span><text:span text:style-name="T15">et le plongeant dans un sommeil profond pendant les 200 prochaines années.</text:span></text:p>
      <text:h text:style-name="P11" text:outline-level="1"><text:bookmark-start text:name="__RefHeading___Toc715_353095010111"/>Interactions avec le joueur<text:bookmark-end text:name="__RefHeading___Toc715_353095010111"/></text:h>
      <text:p text:style-name="P2"/>
      <text:p text:style-name="P5"><text:tab/>Étant le personnage contrô<text:span text:style-name="T2">lé</text:span> par le joueur, celui-ci à la possibilité de changer presque toutes ses caractéristiques pour créer un personnage le plus proche de ses fantaisies, lui permettant de s’incarner en lui pour améliorer son immersion dans l’univers du jeu. <text:span text:style-name="T3">Au cours de l’histoire, le joueur sera capable de prendre des décisions et des réponses aux questions selon ses désirs, ses choix impactant le monde et les personnages autour de lui.</text:span></text:p>
      <text:h text:style-name="P11" text:outline-level="1"><text:bookmark-start text:name="__RefHeading___Toc715_3530950101111"/>Relations avec les autres personnages<text:bookmark-end text:name="__RefHeading___Toc715_3530950101111"/></text:h>
      <text:p text:style-name="P2"/>
      <text:list xml:id="list2544204140" text:style-name="L1">
        <text:list-item>
          <text:p text:style-name="P14"><text:span text:style-name="T16">Yveline (et ses collègues scientifiques)</text:span> : Bien que X s’entendait bien avec tous ses collègues, c’était Yveline dont il se sentait le plus proche, ce qui n’a rendu sa trahison que plus douloureuse. <text:span text:style-name="T17">Cependant, il tentera malgré tout de l’aider à se tirer des griffes d’Anita quand il apprendra sa capture par la Patte Blanche. </text:span><text:span text:style-name="T18">D’abord </text:span><text:soft-page-break/><text:span text:style-name="T18">surpris de la voir en vie après 200 ans, il se rend compte que l’agent 18 a fonctionné sur elle, lui accordant la vie éternelle qu’il désirait atteindre après tout ce temps, mais ne ressent que de la peine en voyant ce que cette immortalité a fait endurer à son ami</text:span><text:span text:style-name="T19">e</text:span><text:span text:style-name="T18">.</text:span></text:p>
        </text:list-item>
        <text:list-item>
          <text:p text:style-name="P15"><text:span text:style-name="T16">Anita</text:span> : <text:span text:style-name="T20">X était avec Zoé l’éleveur des animaux du laboratoire, veillant les garder en bonne santé après chaque expérimentation sur leurs corps. </text:span><text:span text:style-name="T21">X n’avait pas de lien particulier avec le moindre d’entre eux, mais Anita elle-même reconnaîtra qu’il traitait bien ses pensionnaires, malgré les expériences horribles qu’ils leur faisaient subir. </text:span><text:span text:style-name="T22">Dès leurs retrouvailles, X sera en constant conflit avec Anita, cherchant à arrêter ses plans par tous les moyens pour protéger l’humanité et les animorphes de ses plan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4"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4"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4"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4"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3"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1"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2"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4M49S</meta:editing-duration>
    <meta:editing-cycles>32</meta:editing-cycles>
    <meta:generator>LibreOffice/7.3.3.2$Windows_X86_64 LibreOffice_project/d1d0ea68f081ee2800a922cac8f79445e4603348</meta:generator>
    <meta:creation-date>2023-03-26T19:35:01.716000000</meta:creation-date>
    <dc:date>2023-03-29T20:55:40.413000000</dc:date>
    <meta:document-statistic meta:table-count="0" meta:image-count="0" meta:object-count="0" meta:page-count="3" meta:paragraph-count="18" meta:word-count="846" meta:character-count="5223" meta:non-whitespace-character-count="4386"/>
  </office:meta>
</office:document-meta>
</file>