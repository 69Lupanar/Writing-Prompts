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ad316"/>
    </style:style>
    <style:style style:name="P3" style:family="paragraph" style:parent-style-name="Standard">
      <style:text-properties officeooo:rsid="00106f63" officeooo:paragraph-rsid="001c0023"/>
    </style:style>
    <style:style style:name="P4" style:family="paragraph" style:parent-style-name="Standard">
      <style:text-properties officeooo:rsid="00106f63" officeooo:paragraph-rsid="003b9db8"/>
    </style:style>
    <style:style style:name="P5" style:family="paragraph" style:parent-style-name="Text_20_body">
      <style:text-properties officeooo:rsid="0021c3ff" officeooo:paragraph-rsid="0021c3ff"/>
    </style:style>
    <style:style style:name="P6" style:family="paragraph" style:parent-style-name="Text_20_body">
      <style:text-properties officeooo:rsid="0021c3ff" officeooo:paragraph-rsid="003b9db8"/>
    </style:style>
    <style:style style:name="P7" style:family="paragraph" style:parent-style-name="Standard">
      <style:text-properties style:font-name="Calibri3" fo:font-size="13pt" officeooo:rsid="0038b87c" officeooo:paragraph-rsid="001c0023"/>
    </style:style>
    <style:style style:name="P8" style:family="paragraph" style:parent-style-name="Standard">
      <style:paragraph-properties fo:line-height="115%"/>
      <style:text-properties style:font-name="Calibri3" fo:font-size="13pt" officeooo:rsid="0038b87c" officeooo:paragraph-rsid="001ce4dc" style:font-size-asian="13pt" style:font-size-complex="13pt"/>
    </style:style>
    <style:style style:name="P9" style:family="paragraph" style:parent-style-name="Text_20_body">
      <style:text-properties officeooo:rsid="001da3c2" officeooo:paragraph-rsid="001da3c2"/>
    </style:style>
    <style:style style:name="P10" style:family="paragraph" style:parent-style-name="Title">
      <style:text-properties officeooo:rsid="00563ce1" officeooo:paragraph-rsid="00563ce1"/>
    </style:style>
    <style:style style:name="P11" style:family="paragraph" style:parent-style-name="Text_20_body">
      <style:text-properties officeooo:paragraph-rsid="005df2f4"/>
    </style:style>
    <style:style style:name="P12" style:family="paragraph" style:parent-style-name="Heading_20_1">
      <style:text-properties officeooo:rsid="001c0023" officeooo:paragraph-rsid="001c0023"/>
    </style:style>
    <style:style style:name="P13" style:family="paragraph" style:parent-style-name="Heading_20_1">
      <style:text-properties officeooo:rsid="001c0023" officeooo:paragraph-rsid="003b9db8"/>
    </style:style>
    <style:style style:name="P14" style:family="paragraph" style:parent-style-name="Heading_20_1">
      <style:text-properties officeooo:rsid="00331381" officeooo:paragraph-rsid="003b9db8"/>
    </style:style>
    <style:style style:name="P15" style:family="paragraph" style:parent-style-name="Text_20_body" style:list-style-name="L1">
      <style:text-properties officeooo:rsid="00294043" officeooo:paragraph-rsid="004cca01"/>
    </style:style>
    <style:style style:name="T1" style:family="text">
      <style:text-properties fo:font-size="13pt" officeooo:rsid="005d7c6e" style:font-size-asian="13pt" style:font-size-complex="13pt"/>
    </style:style>
    <style:style style:name="T2" style:family="text">
      <style:text-properties fo:font-size="13pt" officeooo:rsid="005df2f4" style:font-size-asian="13pt" style:font-size-complex="13pt"/>
    </style:style>
    <style:style style:name="T3" style:family="text">
      <style:text-properties fo:font-size="13pt" officeooo:rsid="005fd1fa" style:font-size-asian="13pt" style:font-size-complex="13pt"/>
    </style:style>
    <style:style style:name="T4" style:family="text">
      <style:text-properties fo:font-size="13pt" officeooo:rsid="00609b52" style:font-size-asian="13pt" style:font-size-complex="13pt"/>
    </style:style>
    <style:style style:name="T5" style:family="text">
      <style:text-properties fo:font-size="13pt" officeooo:rsid="0064326e" style:font-size-asian="13pt" style:font-size-complex="13pt"/>
    </style:style>
    <style:style style:name="T6" style:family="text">
      <style:text-properties fo:font-weight="bold" style:font-weight-asian="bold" style:font-weight-complex="bold"/>
    </style:style>
    <style:style style:name="T7" style:family="text">
      <style:text-properties fo:font-weight="bold" officeooo:rsid="004cca01" style:font-weight-asian="bold" style:font-weight-complex="bold"/>
    </style:style>
    <style:style style:name="T8" style:family="text">
      <style:text-properties officeooo:rsid="0049718e"/>
    </style:style>
    <style:style style:name="T9" style:family="text">
      <style:text-properties officeooo:rsid="00563ce1"/>
    </style:style>
    <style:style style:name="T10" style:family="text">
      <style:text-properties officeooo:rsid="0057f9ef"/>
    </style:style>
    <style:style style:name="T11" style:family="text">
      <style:text-properties officeooo:rsid="00598451"/>
    </style:style>
    <style:style style:name="T12" style:family="text">
      <style:text-properties officeooo:rsid="005b3e4b"/>
    </style:style>
    <style:style style:name="T13" style:family="text">
      <style:text-properties officeooo:rsid="005b884a"/>
    </style:style>
    <style:style style:name="T14" style:family="text">
      <style:text-properties officeooo:rsid="005bfbfe"/>
    </style:style>
    <style:style style:name="T15" style:family="text">
      <style:text-properties officeooo:rsid="005d7c6e"/>
    </style:style>
    <style:style style:name="T16" style:family="text">
      <style:text-properties officeooo:rsid="005d8e3a"/>
    </style:style>
    <style:style style:name="T17" style:family="text">
      <style:text-properties officeooo:rsid="006197c3"/>
    </style:style>
    <style:style style:name="T18" style:family="text">
      <style:text-properties officeooo:rsid="00662acb"/>
    </style:style>
    <style:style style:name="T19" style:family="text">
      <style:text-properties officeooo:rsid="00676cd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Zoé</text:p>
      <text:p text:style-name="P1"/>
      <text:h text:style-name="P12" text:outline-level="1"><text:bookmark-start text:name="__RefHeading___Toc715_3530950101"/>Rôle dans l’histoire<text:bookmark-end text:name="__RefHeading___Toc715_3530950101"/></text:h>
      <text:p text:style-name="P7"/>
      <text:p text:style-name="P8"><text:tab/><text:span text:style-name="T10">Zoé</text:span> <text:span text:style-name="T9">était une </text:span><text:span text:style-name="T10">des associées de X, une</text:span><text:span text:style-name="T9"> </text:span><text:span text:style-name="T10">mécanicienne chargée de l’entretien et bon fonctionnement des machines, ainsi que de l’élevage des animaux sujets de test avec l’aide du protagoniste. </text:span><text:span text:style-name="T11">Elle </text:span><text:span text:style-name="T12">est le</text:span><text:span text:style-name="T11"> parallèle </text:span><text:span text:style-name="T12">métaphorique de</text:span><text:span text:style-name="T11"> Charlotte, </text:span><text:span text:style-name="T13">qui ignore les tenants et aboutissants des grandes choses qui se trament autour d’elle, mais apprécie tout de même le but qui lui a été donnée et souhaite atteindre la paix que leur promettent leurs amis.</text:span></text:p>
      <text:h text:style-name="P12" text:outline-level="1"><text:bookmark-start text:name="__RefHeading___Toc715_3530950102"/>Description physique<text:bookmark-end text:name="__RefHeading___Toc715_3530950102"/></text:h>
      <text:p text:style-name="P2"/>
      <text:p text:style-name="P5"><text:tab/><text:span text:style-name="T14">Zoé était une fille noire des bas quartiers, sans distinction physique particulière autre qu’être plus forte et corpulente que la moyenne, ce qui lui l’a toute désignée pour les travaux manuels dont avaient besoin le groupe.</text:span></text:p>
      <text:h text:style-name="P14" text:outline-level="1"><text:bookmark-start text:name="__RefHeading___Toc715_35309501021"/>Personnalité<text:bookmark-end text:name="__RefHeading___Toc715_35309501021"/></text:h>
      <text:p text:style-name="P4"/>
      <text:p text:style-name="P6"><text:tab/><text:span text:style-name="T15">Zoé était une fille des bas quartiers, sans diplôme ni aucune distinction honorifique, ni aucun réseau pour l’aider à gravir les échelons. Mais son esprit curieux et sa détermination ont très vite attiré l’œil de X et ses amis, qui ont accepté de l’intégrer à leur groupe pour continuer le projet. Même si la jeune femme sait qu’elle ne gagnera pas grand-chose de leur aventure, elle se sent reconnaissante envers eux pour lui avoir donné cette chance de marquer l’histoire à leurs côtés, </text:span><text:span text:style-name="T16">et de faire en sorte d’être souvenue par les générations futures.</text:span></text:p>
      <text:h text:style-name="P13" text:outline-level="1"><text:bookmark-start text:name="__RefHeading___Toc715_35309501011"/>Passé<text:bookmark-end text:name="__RefHeading___Toc715_35309501011"/></text:h>
      <text:p text:style-name="P3"/>
      <text:p text:style-name="P11"><text:tab/> <text:span text:style-name="T1">Zoé était une fille des bas quartiers, sans diplôme ni aucune distinction honorifique, ni aucun réseau pour l’aider à gravir les échelons, </text:span><text:span text:style-name="T2">n’ayant réussi qu’à décrocher un emploi de concierge au laboratoire où travaillaient X et ses collègues avant leur licenciement. Le soir de leur départ, alors que Zoé se lamentait de sa vie sans avenir, elle assista au cambriolage du laboratoire par le groupe de scientifiques, et leur proposa son aide sans réfléchir aux conséquences de ses actes. </text:span><text:span text:style-name="T3">Dès lors, elle les assista en tant que mécanicienne et vétérinaire pour les sujets de tests, montrant son utilité dès qu’elle le </text:span><text:soft-page-break/><text:span text:style-name="T3">pouvait, craignant d’être à nouveau écartée du groupe. Même si elle se demand</text:span><text:span text:style-name="T4">ait</text:span><text:span text:style-name="T3"> parfois comment l’histoire aurait changé si elle avait alerté la sécurité au lieu de les aider, elle leur </text:span><text:span text:style-name="T4">fut</text:span><text:span text:style-name="T3"> extrêmement reconnaissante de lui avoir donné un but à sa vie et n’</text:span><text:span text:style-name="T4">aurait changé</text:span><text:span text:style-name="T3"> le cours de l’histoire pour rien au monde. </text:span><text:span text:style-name="T5">Comme les autres scientifiques à l’exception de X et Yveline, Zoé mourra dans l’accident qui aura détruit le laboratoire et libéré l’agent 18 dans la nature.</text:span></text:p>
      <text:h text:style-name="P12" text:outline-level="1"><text:bookmark-start text:name="__RefHeading___Toc715_353095010111"/>Interactions avec le joueur<text:bookmark-end text:name="__RefHeading___Toc715_353095010111"/></text:h>
      <text:p text:style-name="P3"/>
      <text:p text:style-name="P9"><text:tab/><text:span text:style-name="T8">Le joueur </text:span><text:span text:style-name="T17">ne verra Zoé au cours d’un rêve-souvenir du protagoniste, où celui relate une discussion importante avec elle quelques jours avant la Nuit Noire. Le joueur y verra Zoé réparer une machine avant d’aider X à nourrir Charlotte dans son bassin, pendant que la jeune femme réitère sa gratitude envers le reste de l’équipe et fait part au protagoniste de ses rêves et du cours de sa vie depuis qu’elle les a rejoint.</text:span></text:p>
      <text:h text:style-name="P12" text:outline-level="1"><text:bookmark-start text:name="__RefHeading___Toc715_3530950101111"/>Relations avec les autres personnages<text:bookmark-end text:name="__RefHeading___Toc715_3530950101111"/></text:h>
      <text:p text:style-name="P3"/>
      <text:list xml:id="list1603268329" text:style-name="L1">
        <text:list-item>
          <text:p text:style-name="P15"><text:span text:style-name="T7">X</text:span><text:span text:style-name="T6"> (et ses collègues scientifiques)</text:span> : <text:span text:style-name="T18">Zoé n’était pas très proche des autres scientifiques que X, car c’était avec lui qu’elle passait le plus de temps à nourrir et soigner les animaux du laboratoire. </text:span><text:span text:style-name="T19">Elle leur vouait néanmoins une loyauté totale, obéissant sans se poser de questions ni vraiment comprendre les implications de leur potentielle réussit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57M30S</meta:editing-duration>
    <meta:editing-cycles>76</meta:editing-cycles>
    <meta:generator>LibreOffice/7.3.3.2$Windows_X86_64 LibreOffice_project/d1d0ea68f081ee2800a922cac8f79445e4603348</meta:generator>
    <meta:creation-date>2023-03-26T19:35:01.716000000</meta:creation-date>
    <dc:date>2023-03-29T21:47:16.456000000</dc:date>
    <meta:document-statistic meta:table-count="0" meta:image-count="0" meta:object-count="0" meta:page-count="2" meta:paragraph-count="13" meta:word-count="532" meta:character-count="3213" meta:non-whitespace-character-count="2689"/>
  </office:meta>
</office:document-meta>
</file>