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ad316"/>
    </style:style>
    <style:style style:name="P3" style:family="paragraph" style:parent-style-name="Standard">
      <style:text-properties officeooo:rsid="00106f63" officeooo:paragraph-rsid="001c0023"/>
    </style:style>
    <style:style style:name="P4" style:family="paragraph" style:parent-style-name="Standard">
      <style:text-properties officeooo:rsid="00106f63" officeooo:paragraph-rsid="003b9db8"/>
    </style:style>
    <style:style style:name="P5" style:family="paragraph" style:parent-style-name="Standard">
      <style:text-properties style:font-name="Calibri3" fo:font-size="13pt" officeooo:rsid="0038b87c" officeooo:paragraph-rsid="001c0023"/>
    </style:style>
    <style:style style:name="P6" style:family="paragraph" style:parent-style-name="Standard">
      <style:paragraph-properties fo:line-height="115%"/>
      <style:text-properties style:font-name="Calibri3" fo:font-size="13pt" officeooo:rsid="0038b87c" officeooo:paragraph-rsid="001ce4dc" style:font-size-asian="13pt" style:font-size-complex="13pt"/>
    </style:style>
    <style:style style:name="P7" style:family="paragraph" style:parent-style-name="Text_20_body">
      <style:text-properties officeooo:rsid="001da3c2" officeooo:paragraph-rsid="001da3c2"/>
    </style:style>
    <style:style style:name="P8" style:family="paragraph" style:parent-style-name="Text_20_body">
      <style:text-properties officeooo:paragraph-rsid="005df2f4"/>
    </style:style>
    <style:style style:name="P9" style:family="paragraph" style:parent-style-name="Title">
      <style:text-properties officeooo:rsid="007a9e9d" officeooo:paragraph-rsid="007a9e9d"/>
    </style:style>
    <style:style style:name="P10" style:family="paragraph" style:parent-style-name="Text_20_body">
      <style:text-properties officeooo:rsid="0021c3ff" officeooo:paragraph-rsid="007b34ec"/>
    </style:style>
    <style:style style:name="P11" style:family="paragraph" style:parent-style-name="Text_20_body">
      <style:text-properties officeooo:rsid="0021c3ff" officeooo:paragraph-rsid="007d7941"/>
    </style:style>
    <style:style style:name="P12" style:family="paragraph" style:parent-style-name="Heading_20_1">
      <style:text-properties officeooo:rsid="001c0023" officeooo:paragraph-rsid="001c0023"/>
    </style:style>
    <style:style style:name="P13" style:family="paragraph" style:parent-style-name="Heading_20_1">
      <style:text-properties officeooo:rsid="001c0023" officeooo:paragraph-rsid="003b9db8"/>
    </style:style>
    <style:style style:name="P14" style:family="paragraph" style:parent-style-name="Heading_20_1">
      <style:text-properties officeooo:rsid="00331381" officeooo:paragraph-rsid="003b9db8"/>
    </style:style>
    <style:style style:name="P15" style:family="paragraph" style:parent-style-name="Text_20_body" style:list-style-name="L1">
      <style:text-properties officeooo:rsid="00294043" officeooo:paragraph-rsid="004cca01"/>
    </style:style>
    <style:style style:name="P16" style:family="paragraph" style:parent-style-name="Text_20_body" style:list-style-name="L1">
      <style:text-properties officeooo:rsid="008fce4b" officeooo:paragraph-rsid="008fce4b"/>
    </style:style>
    <style:style style:name="T1" style:family="text">
      <style:text-properties fo:font-size="13pt" officeooo:rsid="00877c75" style:font-size-asian="13pt" style:font-size-complex="13pt"/>
    </style:style>
    <style:style style:name="T2" style:family="text">
      <style:text-properties fo:font-weight="bold" style:font-weight-asian="bold" style:font-weight-complex="bold"/>
    </style:style>
    <style:style style:name="T3" style:family="text">
      <style:text-properties fo:font-weight="bold" officeooo:rsid="004cca01" style:font-weight-asian="bold" style:font-weight-complex="bold"/>
    </style:style>
    <style:style style:name="T4" style:family="text">
      <style:text-properties officeooo:rsid="0049718e"/>
    </style:style>
    <style:style style:name="T5" style:family="text">
      <style:text-properties officeooo:rsid="006197c3"/>
    </style:style>
    <style:style style:name="T6" style:family="text">
      <style:text-properties officeooo:rsid="00775533"/>
    </style:style>
    <style:style style:name="T7" style:family="text">
      <style:text-properties officeooo:rsid="007a9e9d"/>
    </style:style>
    <style:style style:name="T8" style:family="text">
      <style:text-properties officeooo:rsid="007b0ba4"/>
    </style:style>
    <style:style style:name="T9" style:family="text">
      <style:text-properties officeooo:rsid="007b34ec"/>
    </style:style>
    <style:style style:name="T10" style:family="text">
      <style:text-properties officeooo:rsid="007bf889"/>
    </style:style>
    <style:style style:name="T11" style:family="text">
      <style:text-properties officeooo:rsid="007e5d42"/>
    </style:style>
    <style:style style:name="T12" style:family="text">
      <style:text-properties officeooo:rsid="007fc844"/>
    </style:style>
    <style:style style:name="T13" style:family="text">
      <style:text-properties officeooo:rsid="0081b3c7"/>
    </style:style>
    <style:style style:name="T14" style:family="text">
      <style:text-properties officeooo:rsid="0085a7b7"/>
    </style:style>
    <style:style style:name="T15" style:family="text">
      <style:text-properties officeooo:rsid="00896e72"/>
    </style:style>
    <style:style style:name="T16" style:family="text">
      <style:text-properties officeooo:rsid="008af00c"/>
    </style:style>
    <style:style style:name="T17" style:family="text">
      <style:text-properties officeooo:rsid="008bbf6e"/>
    </style:style>
    <style:style style:name="T18" style:family="text">
      <style:text-properties officeooo:rsid="008cc6ae"/>
    </style:style>
    <style:style style:name="T19" style:family="text">
      <style:text-properties officeooo:rsid="008dcd32"/>
    </style:style>
    <style:style style:name="T20" style:family="text">
      <style:text-properties officeooo:rsid="008fa6b9"/>
    </style:style>
    <style:style style:name="T21" style:family="text">
      <style:text-properties officeooo:rsid="0091170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illiam</text:p>
      <text:p text:style-name="P1"/>
      <text:h text:style-name="P12" text:outline-level="1"><text:bookmark-start text:name="__RefHeading___Toc715_3530950101"/>Rôle dans l’histoire<text:bookmark-end text:name="__RefHeading___Toc715_3530950101"/></text:h>
      <text:p text:style-name="P5"/>
      <text:p text:style-name="P6"><text:tab/><text:span text:style-name="T7">William était l’un des associés de X. Il jouait le rôle de gestionnaire des ressources de l’équipe, passant des commandes d’animaux et matériel au gouvernement et gérant le budget et les consommations de l’équipe. </text:span><text:span text:style-name="T8">Contrairement aux autres membres de l’équipe, William ne les a pas rejoint par injustice personnelle ou désir de faire progresser l’humanité, mais par simple curiosité pour le projet, désireux de voir les conséquences que l’Agent 18 aurait sur leur monde, sans imaginer ni se soucier de la catastrophe que la libération de l’agent 18 finira par causer.</text:span></text:p>
      <text:h text:style-name="P12" text:outline-level="1"><text:bookmark-start text:name="__RefHeading___Toc715_3530950102"/>Description physique<text:bookmark-end text:name="__RefHeading___Toc715_3530950102"/></text:h>
      <text:p text:style-name="P2"/>
      <text:p text:style-name="P10"><text:tab/><text:span text:style-name="T9">William était un petit homme potelé avec un début de calvitie. Ni repoussant ni attractif, il était cependant un homme très gentil avec les sujets de test quand il avait la chance de les approcher, </text:span><text:span text:style-name="T10">passant parfois plusieurs heures à joueur avec eux et leur remonter le moral, une activité qui le taxait de toute son énergie, lui qui n’était pas habitué à pratiquer le moindre sport.</text:span></text:p>
      <text:h text:style-name="P14" text:outline-level="1"><text:bookmark-start text:name="__RefHeading___Toc715_35309501021"/>Personnalité<text:bookmark-end text:name="__RefHeading___Toc715_35309501021"/></text:h>
      <text:p text:style-name="P4"/>
      <text:p text:style-name="P11"><text:tab/><text:span text:style-name="T9">Ni repoussant ni attractif, </text:span><text:span text:style-name="T11">il compensait son apparence par une vivacité d’esprit et un humour que certains qualifieraient de cynique, mais qui cachent en réalité une vraie gentillesse envers les autres </text:span><text:span text:style-name="T9">; mais surtout </text:span><text:span text:style-name="T11">envers les animaux du laboratoire et</text:span><text:span text:style-name="T9"> son perroquet de compagnie, Pivert, un perroquet femelle vert. </text:span><text:span text:style-name="T12">Sans réel intérêt personnel dans ce projet, William était plus décontracté que ses camarades, </text:span><text:span text:style-name="T14">ne prenant aucun parti dans les disputes et</text:span><text:span text:style-name="T12"> aidant souvent Vincent à redescendre les tensions entre les membres de l’équi</text:span><text:span text:style-name="T13">pe.</text:span></text:p>
      <text:h text:style-name="P13" text:outline-level="1"><text:bookmark-start text:name="__RefHeading___Toc715_35309501011"/>Passé<text:bookmark-end text:name="__RefHeading___Toc715_35309501011"/></text:h>
      <text:p text:style-name="P3"/>
      <text:p text:style-name="P8"><text:tab/> <text:span text:style-name="T1">William n’aime pas beaucoup parler de son passé, ayant plus de goût pour l’instant présent que de ressasser les erreurs du passé qui l’ont conduit à accepter de rejoindre ce projet.</text:span></text:p>
      <text:h text:style-name="P12" text:outline-level="1"><text:bookmark-start text:name="__RefHeading___Toc715_353095010111"/><text:soft-page-break/>Interactions avec le joueur<text:bookmark-end text:name="__RefHeading___Toc715_353095010111"/></text:h>
      <text:p text:style-name="P3"/>
      <text:p text:style-name="P7"><text:tab/><text:span text:style-name="T4">Le joueur </text:span><text:span text:style-name="T5">ne verra </text:span><text:span text:style-name="T15">William</text:span><text:span text:style-name="T5"> au cours d’un rêve-souvenir du protagoniste, où celui relate une discussion importante avec </text:span><text:span text:style-name="T6">lui</text:span><text:span text:style-name="T5"> quelques jours avant la Nuit Noire. Le joueur y verra </text:span><text:span text:style-name="T15">William en train de s’amuser à apprendre de nouveaux mots à Pivert, </text:span><text:span text:style-name="T16">qui répétera </text:span><text:span text:style-name="T15">notamment « Ellajyx », un nom qui aux dires de X sonne comme un nom de prostituée (ce sera le nom que Pivert se donnera après être devenue une animorphe ; </text:span><text:span text:style-name="T16">il se trouve que Pivert a vu William mater un porno avec une actrice nom</text:span><text:span text:style-name="T17">m</text:span><text:span text:style-name="T16">ée ainsi</text:span><text:span text:style-name="T15">).</text:span></text:p>
      <text:p text:style-name="P7"><text:tab/><text:span text:style-name="T18">Lors de leur discussion, William détaillera un peu plus ses motivations à rejoindre le groupe et les raisons de sa curiosité. </text:span><text:span text:style-name="T20">X se demandera alors une fois son rêve fini ce que William penserait du nouveau monde qu’il avait aidé à créer.</text:span></text:p>
      <text:h text:style-name="P12" text:outline-level="1"><text:bookmark-start text:name="__RefHeading___Toc715_3530950101111"/>Relations avec les autres personnages<text:bookmark-end text:name="__RefHeading___Toc715_3530950101111"/></text:h>
      <text:p text:style-name="P3"/>
      <text:list xml:id="list2643518530" text:style-name="L1">
        <text:list-item>
          <text:p text:style-name="P15"><text:span text:style-name="T3">X</text:span><text:span text:style-name="T2"> (et ses collègues scientifiques)</text:span> : <text:span text:style-name="T19">William n’ayant pas vraiment de raison personnelle à aider ses collègues à la création de l’agent 18, il n’était pas vraiment proche de quiconque dans le groupe, préférant passer son temps avec les animaux. </text:span><text:span text:style-name="T20">Cependant, il faisait de son mieux pour aider Vincent à calmer les dissensions, et son aide pour gérer les maigres ressources de l’équipe fut cruciale pour mener à bien le projet.</text:span> </text:p>
        </text:list-item>
        <text:list-item>
          <text:p text:style-name="P16"><text:span text:style-name="T2">Pivert</text:span> : <text:span text:style-name="T21">William tenait énormément à son perroquet de compagnie, auquel il dévouait tout son temps libre et son affection. Quand il mourra lors de l’accident dans le laboratoire, Pivert, maintenant une animorphe, éveillera ses nouveaux sens et émotions lascives en violant le corps mort de son ancien maître, ayant développé un fétiche pour les personnes en surpoids, qui sera transmis à ses descendances en plus d’un fétiche de dominatio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H36M52S</meta:editing-duration>
    <meta:editing-cycles>116</meta:editing-cycles>
    <meta:generator>LibreOffice/7.3.3.2$Windows_X86_64 LibreOffice_project/d1d0ea68f081ee2800a922cac8f79445e4603348</meta:generator>
    <meta:creation-date>2023-03-26T19:35:01.716000000</meta:creation-date>
    <dc:date>2023-04-01T10:35:24.866000000</dc:date>
    <meta:document-statistic meta:table-count="0" meta:image-count="0" meta:object-count="0" meta:page-count="2" meta:paragraph-count="15" meta:word-count="564" meta:character-count="3399" meta:non-whitespace-character-count="2844"/>
  </office:meta>
</office:document-meta>
</file>