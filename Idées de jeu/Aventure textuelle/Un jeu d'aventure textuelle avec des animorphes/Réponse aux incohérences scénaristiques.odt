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756d" officeooo:paragraph-rsid="001a756d"/>
    </style:style>
    <style:style style:name="P2" style:family="paragraph" style:parent-style-name="Standard">
      <style:text-properties officeooo:rsid="001a756d" officeooo:paragraph-rsid="001ce58f"/>
    </style:style>
    <style:style style:name="P3" style:family="paragraph" style:parent-style-name="Standard">
      <style:text-properties officeooo:rsid="001a756d" officeooo:paragraph-rsid="0024792d"/>
    </style:style>
    <style:style style:name="P4" style:family="paragraph" style:parent-style-name="Standard">
      <style:text-properties officeooo:rsid="001a756d" officeooo:paragraph-rsid="002c5f12"/>
    </style:style>
    <style:style style:name="P5" style:family="paragraph" style:parent-style-name="Standard">
      <style:text-properties officeooo:rsid="001a756d" officeooo:paragraph-rsid="002e7402"/>
    </style:style>
    <style:style style:name="P6" style:family="paragraph" style:parent-style-name="Standard">
      <style:text-properties officeooo:rsid="001a756d" officeooo:paragraph-rsid="00360ab4"/>
    </style:style>
    <style:style style:name="P7" style:family="paragraph" style:parent-style-name="Standard">
      <style:text-properties officeooo:paragraph-rsid="00106f63"/>
    </style:style>
    <style:style style:name="P8" style:family="paragraph" style:parent-style-name="Standard">
      <style:text-properties officeooo:paragraph-rsid="001ce58f"/>
    </style:style>
    <style:style style:name="P9" style:family="paragraph" style:parent-style-name="Standard">
      <style:text-properties officeooo:paragraph-rsid="0024792d"/>
    </style:style>
    <style:style style:name="P10" style:family="paragraph" style:parent-style-name="Standard">
      <style:text-properties officeooo:paragraph-rsid="002c5f12"/>
    </style:style>
    <style:style style:name="P11" style:family="paragraph" style:parent-style-name="Standard">
      <style:text-properties officeooo:paragraph-rsid="00360ab4"/>
    </style:style>
    <style:style style:name="P12" style:family="paragraph" style:parent-style-name="Heading_20_1" style:list-style-name="">
      <style:text-properties officeooo:rsid="0019bb49" officeooo:paragraph-rsid="0019bb49"/>
    </style:style>
    <style:style style:name="P13" style:family="paragraph" style:parent-style-name="Heading_20_1" style:list-style-name="">
      <style:text-properties officeooo:rsid="0019bb49" officeooo:paragraph-rsid="001ce58f"/>
    </style:style>
    <style:style style:name="P14" style:family="paragraph" style:parent-style-name="Heading_20_1" style:list-style-name="">
      <style:text-properties officeooo:rsid="0019bb49" officeooo:paragraph-rsid="002c5f12"/>
    </style:style>
    <style:style style:name="P15" style:family="paragraph" style:parent-style-name="Heading_20_1" style:list-style-name="">
      <style:text-properties officeooo:rsid="0019bb49" officeooo:paragraph-rsid="0024792d"/>
    </style:style>
    <style:style style:name="P16" style:family="paragraph" style:parent-style-name="Heading_20_1" style:list-style-name="">
      <style:text-properties officeooo:rsid="0019bb49" officeooo:paragraph-rsid="00360ab4"/>
    </style:style>
    <style:style style:name="T1" style:family="text">
      <style:text-properties officeooo:rsid="001be644"/>
    </style:style>
    <style:style style:name="T2" style:family="text">
      <style:text-properties officeooo:rsid="001d502a"/>
    </style:style>
    <style:style style:name="T3" style:family="text">
      <style:text-properties officeooo:rsid="001e545f"/>
    </style:style>
    <style:style style:name="T4" style:family="text">
      <style:text-properties officeooo:rsid="001f5e9f"/>
    </style:style>
    <style:style style:name="T5" style:family="text">
      <style:text-properties officeooo:rsid="00210a89"/>
    </style:style>
    <style:style style:name="T6" style:family="text">
      <style:text-properties officeooo:rsid="0022f058"/>
    </style:style>
    <style:style style:name="T7" style:family="text">
      <style:text-properties officeooo:rsid="002352a9"/>
    </style:style>
    <style:style style:name="T8" style:family="text">
      <style:text-properties officeooo:rsid="0024792d"/>
    </style:style>
    <style:style style:name="T9" style:family="text">
      <style:text-properties officeooo:rsid="00250ab4"/>
    </style:style>
    <style:style style:name="T10" style:family="text">
      <style:text-properties officeooo:rsid="0025c7ba"/>
    </style:style>
    <style:style style:name="T11" style:family="text">
      <style:text-properties officeooo:rsid="0025d9ac"/>
    </style:style>
    <style:style style:name="T12" style:family="text">
      <style:text-properties officeooo:rsid="0027b35e"/>
    </style:style>
    <style:style style:name="T13" style:family="text">
      <style:text-properties officeooo:rsid="0028c5bb"/>
    </style:style>
    <style:style style:name="T14" style:family="text">
      <style:text-properties officeooo:rsid="00293444"/>
    </style:style>
    <style:style style:name="T15" style:family="text">
      <style:text-properties officeooo:rsid="0029d29f"/>
    </style:style>
    <style:style style:name="T16" style:family="text">
      <style:text-properties officeooo:rsid="002c5f12"/>
    </style:style>
    <style:style style:name="T17" style:family="text">
      <style:text-properties officeooo:rsid="002d4977"/>
    </style:style>
    <style:style style:name="T18" style:family="text">
      <style:text-properties officeooo:rsid="002e7402"/>
    </style:style>
    <style:style style:name="T19" style:family="text">
      <style:text-properties officeooo:rsid="002edfa2"/>
    </style:style>
    <style:style style:name="T20" style:family="text">
      <style:text-properties officeooo:rsid="003050bd"/>
    </style:style>
    <style:style style:name="T21" style:family="text">
      <style:text-properties officeooo:rsid="0032b7ba"/>
    </style:style>
    <style:style style:name="T22" style:family="text">
      <style:text-properties officeooo:rsid="0034266b"/>
    </style:style>
    <style:style style:name="T23" style:family="text">
      <style:text-properties officeooo:rsid="00360ab4"/>
    </style:style>
    <style:style style:name="T24" style:family="text">
      <style:text-properties officeooo:rsid="00360f68"/>
    </style:style>
    <style:style style:name="T25" style:family="text">
      <style:text-properties officeooo:rsid="003785e5"/>
    </style:style>
    <style:style style:name="T26" style:family="text">
      <style:text-properties officeooo:rsid="0039968e"/>
    </style:style>
    <style:style style:name="T27" style:family="text">
      <style:text-properties officeooo:rsid="003a3254"/>
    </style:style>
    <style:style style:name="T28" style:family="text">
      <style:text-properties officeooo:rsid="003bd0f0"/>
    </style:style>
    <style:style style:name="T29" style:family="text">
      <style:text-properties officeooo:rsid="003d1a0d"/>
    </style:style>
    <style:style style:name="T30" style:family="text">
      <style:text-properties officeooo:rsid="003e0bc2"/>
    </style:style>
    <style:style style:name="T31" style:family="text">
      <style:text-properties officeooo:rsid="003e2330"/>
    </style:style>
    <style:style style:name="T32" style:family="text">
      <style:text-properties officeooo:rsid="003e3fbb"/>
    </style:style>
    <style:style style:name="T33" style:family="text">
      <style:text-properties officeooo:rsid="004013fb"/>
    </style:style>
    <style:style style:name="T34" style:family="text">
      <style:text-properties officeooo:rsid="00419b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start text:name="__RefHeading___Toc715_353095010"/>Pourquoi X et ses collègues travaillaient sur l’Agent 18 ?<text:bookmark-end text:name="__RefHeading___Toc715_353095010"/></text:h>
      <text:p text:style-name="P7"/>
      <text:p text:style-name="P1"><text:tab/>Le petit groupe de scientifiques cherchaient la clé de l’immortalité pour diverses raisons personnelles : X voulait faire avancer l’humanité, Y espérait s’approprier cette découverte pour obtenir gloire et richesse, et d’autres comme <text:span text:style-name="T31">V</text:span> espérait découvrir un moyen de soigner leur fille atteinte d’une maladie incurable (<text:span text:style-name="T31">V</text:span> n’apparaîtra que dans un souvenir destiné à étoffer les personnalités du petit groupe, mais son idée sera reflétée dans d’autres personnages au fil du jeu).</text:p>
      <text:p text:style-name="P1"/>
      <text:p text:style-name="P1"><text:tab/><text:span text:style-name="T1">Mais faute de fonds et d’un refus du gouvernement local de les aider à poursuivre cette chimère </text:span><text:span text:style-name="T26">suite à une tentative précédente ratée</text:span><text:span text:style-name="T1">, le petit groupe d’amis travaillera sur ce projet dans le plus grand secret, allant jusqu’à voler du matériel et dossier confidentiels et à vendre leurs propres biens pour financer leurs opérations.</text:span></text:p>
      <text:p text:style-name="P1"/>
      <text:p text:style-name="P1"/>
      <text:h text:style-name="P13" text:outline-level="1"><text:bookmark-start text:name="__RefHeading___Toc715_3530950101"/>Pourquoi <text:span text:style-name="T2">Y a-t-elle trahi ses camarades et libéré l’Agent 18</text:span> ?<text:bookmark-end text:name="__RefHeading___Toc715_3530950101"/></text:h>
      <text:p text:style-name="P8"/>
      <text:p text:style-name="P2"><text:tab/><text:span text:style-name="T2">Y, malgré son amitié avec ses collègues, restait au fond d’elle une femme arriviste qui espérait profiter de ce projet pour gagner en notoriété et propulser sa carrière au sommet pour rejoindre les élites scientifiques du monde. Mais voyant que le projet avait peu de chances de se conclure et qu’il lui restait peu de temps pour le sauver, elle se décida à prendre les choses en main et à détourner le projet de sa direction initiale pour créer un agent capable d’augmenter les capacités physiques et mentales d’un humain. C’est pour cela qu’elle a saboté le projet en expérimentant avec des produits plus </text:span><text:span text:style-name="T3">efficaces mais </text:span><text:span text:style-name="T2">dangereux, </text:span><text:span text:style-name="T3">avant de tester</text:span><text:span text:style-name="T2"> </text:span><text:span text:style-name="T5">une version « </text:span><text:span text:style-name="T7">enrichie </text:span><text:span text:style-name="T5">» </text:span><text:span text:style-name="T6">du</text:span><text:span text:style-name="T2"> produit sur elle-même, </text:span><text:span text:style-name="T3">les animaux n’étant plus des sujets concluants</text:span><text:span text:style-name="T2">.</text:span></text:p>
      <text:p text:style-name="P2"/>
      <text:p text:style-name="P2"><text:tab/><text:span text:style-name="T4">Malheureusement pour elle, si le test parvient à lui faire gagner des capacités surhumaines et la vie éternelle, l’agent lui fit perdre la raison et décupla sa libido, la poussant à le libérer dans l’air </text:span><text:span text:style-name="T32">dans le but d’essayer d’en absorber le plus possible, résultant en la contamination du monde entier</text:span><text:span text:style-name="T4">. Abasourdie par les conséquences de son crime, elle passera le siècle suivant à errer à travers le </text:span><text:span text:style-name="T33">pays</text:span><text:span text:style-name="T4">, reconstruisant son labo dans l’espoir vain de trouver un remède à cet agent. Ironiquement, bien qu’elle ait atteint l’immortalité qu’elle désirait, son deuil de ses anciens amis et la solitude due à la mort inévitable de ses proches ont fait de sa bénédiction une malédiction.</text:span></text:p>
      <text:p text:style-name="P2"/>
      <text:p text:style-name="P4"/>
      <text:p text:style-name="P4"/>
      <text:h text:style-name="P14" text:outline-level="1"><text:bookmark-start text:name="__RefHeading___Toc715_353095010111"/>Pourquoi <text:span text:style-name="T14">X n’a pas été influencé par l’Agent 18</text:span> ?<text:bookmark-end text:name="__RefHeading___Toc715_353095010111"/></text:h>
      <text:p text:style-name="P10"/>
      <text:p text:style-name="P4"><text:tab/><text:span text:style-name="T14">Au moment de l’incident dans leur laboratoire, X </text:span><text:span text:style-name="T27">a pu être épargné</text:span><text:span text:style-name="T24"> </text:span><text:span text:style-name="T27">d</text:span><text:span text:style-name="T24">es effets de </text:span><text:soft-page-break/><text:span text:style-name="T24">l’agent en s’</text:span><text:span text:style-name="T14">enferm</text:span><text:span text:style-name="T24">ant</text:span><text:span text:style-name="T14"> dans une capsule de stase dans un de leurs sous-sols. Cette capsule était le résultat d’une autre de leurs expériences dans le cadre de leurs recherches sur l’immortalité, et a permis d’enfermer hermétiquement X pendant tout ce temps, le protégeant des effets de l’agent 18. Ce virus a fini par disparaître, faute d’individus à infecter encore épargnés de son influence, et a muté au fil des ans pour devenir </text:span><text:span text:style-name="T15">inactif et </text:span><text:span text:style-name="T14">complètement inoffensif.</text:span></text:p>
      <text:p text:style-name="P4"/>
      <text:p text:style-name="P4"><text:tab/><text:span text:style-name="T25">Même si X n’a pas muté aussi fortement que Y, </text:span><text:span text:style-name="T28">son temps passé dans le nouveau monde </text:span><text:span text:style-name="T29">lui</text:span><text:span text:style-name="T25"> a quand même </text:span><text:span text:style-name="T30">fait </text:span><text:span text:style-name="T25">gagn</text:span><text:span text:style-name="T30">er</text:span><text:span text:style-name="T25"> un gain en fertilité immense en fonction de son sexe ; si le joueur est un homme, il engrossera les PNJs à coup sûr ; si c’est une femelle, il sera capable de donner naissance à des enfants venant d’oeufs non-fertilisés (en les fertilisant lui-même) ou par rapport sexuel avec des PNJs femelles, humains comme animorphes.</text:span></text:p>
      <text:p text:style-name="P4"/>
      <text:p text:style-name="P4"/>
      <text:h text:style-name="P14" text:outline-level="1"><text:bookmark-start text:name="__RefHeading___Toc715_3530950101111"/><text:span text:style-name="T16">De quoi se souviennent l’humanité et les animorphes de l’accident</text:span> ?<text:bookmark-end text:name="__RefHeading___Toc715_3530950101111"/></text:h>
      <text:p text:style-name="P10"/>
      <text:p text:style-name="P5"><text:tab/><text:span text:style-name="T17">L’incident dans le labo de X et ses collègues est appelé par l’humanité la « Nuit Noire ». Il s’agit du jour où le virus s’est multiplié à vitesse grand V dans l’air, créant un nuage sombre qui a rapidement recouvert la planète entière, affectant tout individu l’ayant respiré. Si aucun humain n’est encore en vie depuis cet événement il y a 200 ans, cette histoire tournée en légende par les habitants de ce monde est relayée de génération en génération, </text:span><text:span text:style-name="T20">contant les premiers conflits entre humains et animorphes et l’effondrement de bon nombre de gouvernements à travers le monde ;</text:span><text:span text:style-name="T17"> certains </text:span><text:span text:style-name="T21">fous </text:span><text:span text:style-name="T17">y voyant là la première </text:span><text:span text:style-name="T21">étape du progrès destinée à remplacer les </text:span><text:span text:style-name="T22">plus faibles par ceux</text:span><text:span text:style-name="T21"> plus aptes à survivre les épreuves futures</text:span><text:span text:style-name="T17">, d’autres une punition divine venue purger l’humanité de sa dépravation. </text:span></text:p>
      <text:p text:style-name="P5"/>
      <text:p text:style-name="P5"><text:span text:style-name="T18"><text:tab/>Les animorphes, eux, n’en pensent pas grand-chose ; ils sont conscients de l’existence de la Nuit Noire, mais comme les humains, n’en connaissent pas la cause et n’en saisissent pas vraiment toutes les implications. Ils savent que les animorphes sont « juste apparus du jour au lendemain », </text:span><text:span text:style-name="T19">mais n’ayant pas d’histoire enregistrée avant cela (les animorphes ne sachant pour la plupart ni lire ni écrire), ils n’ont aucun moyen de connaître le passé de leur espèce autre que d’après les écrits et racontars des humains.</text:span></text:p>
      <text:p text:style-name="P3"/>
      <text:p text:style-name="P3"/>
      <text:h text:style-name="P15" text:outline-level="1"><text:bookmark-start text:name="__RefHeading___Toc715_35309501011"/>Pourquoi <text:span text:style-name="T8">les humains et animorphes sont en conflit</text:span> ?<text:bookmark-end text:name="__RefHeading___Toc715_35309501011"/></text:h>
      <text:p text:style-name="P9"/>
      <text:p text:style-name="P3"><text:tab/><text:span text:style-name="T9">Bien qu’ils ne soient pas constamment en guerre, les humains et animorphes ont en générale de très mauvaises relations. La dépendance des animorphes au sperme humain ont conduit à de nombreux abus de la part des humains, ces derniers le</text:span><text:span text:style-name="T10">s affamant </text:span><text:soft-page-break/><text:span text:style-name="T10">et montant le prix de cette denrée pour les forcer à se soumettre à l’esclavage</text:span><text:span text:style-name="T9">. Les animorphes, par rancune, font de même avec les humains, </text:span><text:span text:style-name="T34">chassant</text:span><text:span text:style-name="T9"> les hommes comme </text:span><text:span text:style-name="T34">des proies et les gardant comme</text:span><text:span text:style-name="T9"> vache à lait ou pour leur propre amusement, et ne gardant les femmes que pour garder la population humaine stable.</text:span></text:p>
      <text:p text:style-name="P3"/>
      <text:p text:style-name="P3"><text:tab/><text:span text:style-name="T11">La dépendance des animorphes au sperme humain et sa surconsommation a causé un grand déséquilibre démographique, les animorphes surpassant de loin les humains et le nombre de femmes humaines déclinant de plus en plus, les animorphes préférant les tuer car ne voyant en elles aucune autre utilité que comme du bétail. </text:span><text:span text:style-name="T12">Cela a causé une grande paranoïa chez les femmes humaines, ce qui a vu l’apparition de nombreuses sociétés matriarcales </text:span><text:span text:style-name="T13">et cultes de la pensée</text:span><text:span text:style-name="T12"> réprimant les relations avec les animorphes, voire prônant leur extermination.</text:span></text:p>
      <text:p text:style-name="P3"/>
      <text:h text:style-name="P16" text:outline-level="1"><text:bookmark-start text:name="__RefHeading___Toc715_353095010112"/>Pourquoi <text:span text:style-name="T8">les </text:span><text:span text:style-name="T23">animorphes sont-ils tous femelles</text:span> ?<text:bookmark-end text:name="__RefHeading___Toc715_353095010112"/></text:h>
      <text:p text:style-name="P11"/>
      <text:p text:style-name="P6"><text:tab/><text:span text:style-name="T23">Il n’y a pas d’explication définitive donnée en jeu, mais les quelques scientifiques PNJs que le joueur rencontre théorisent que les animorphes sont supposés être la forme « finale » qu’était censé créer l’agent 18, pensant que l’agent était destiné à leur offrir des attributs humains. Les animutants, eux, seraient plus résistants à l’agent ou auraient développé une « allergie » au virus, les faisant muter et devenir plus violents et bestiaux. A noter que seuls les femelles ont pu obtenir ces atouts humains ; certains animutants sont des femelles, mais tous les animaux mâles ont muté en animutan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H34M34S</meta:editing-duration>
    <meta:editing-cycles>45</meta:editing-cycles>
    <meta:generator>LibreOffice/7.3.3.2$Windows_X86_64 LibreOffice_project/d1d0ea68f081ee2800a922cac8f79445e4603348</meta:generator>
    <meta:creation-date>2022-08-17T22:38:28.169000000</meta:creation-date>
    <dc:title>Format de texte</dc:title>
    <dc:date>2023-03-25T21:24:25.958000000</dc:date>
    <meta:document-statistic meta:table-count="0" meta:image-count="0" meta:object-count="0" meta:page-count="3" meta:paragraph-count="17" meta:word-count="1096" meta:character-count="6595" meta:non-whitespace-character-count="5504"/>
    <meta:template xlink:type="simple" xlink:actuate="onRequest" xlink:title="Format de texte" xlink:href="../../../../../../AppData/Roaming/LibreOffice/4/user/template/Format%20de%20texte1.ott" meta:date="2022-08-17T22:38:27.886000000"/>
  </office:meta>
</office:document-meta>
</file>