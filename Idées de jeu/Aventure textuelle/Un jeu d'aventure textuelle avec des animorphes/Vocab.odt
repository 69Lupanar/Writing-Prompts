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3e65" officeooo:paragraph-rsid="001a3e65"/>
    </style:style>
    <style:style style:name="P2" style:family="paragraph" style:parent-style-name="Text_20_body">
      <style:text-properties officeooo:rsid="001a3e65" officeooo:paragraph-rsid="001d509f"/>
    </style:style>
    <style:style style:name="P3" style:family="paragraph" style:parent-style-name="Text_20_body">
      <style:text-properties officeooo:paragraph-rsid="0036ca13"/>
    </style:style>
    <style:style style:name="P4" style:family="paragraph" style:parent-style-name="Heading_20_1" style:list-style-name="">
      <style:text-properties officeooo:rsid="001a3e65" officeooo:paragraph-rsid="001a3e65"/>
    </style:style>
    <style:style style:name="P5" style:family="paragraph" style:parent-style-name="Heading_20_1" style:list-style-name="">
      <style:text-properties officeooo:rsid="001a3e65" officeooo:paragraph-rsid="001d509f"/>
    </style:style>
    <style:style style:name="P6" style:family="paragraph" style:parent-style-name="Heading_20_1" style:list-style-name="">
      <style:text-properties officeooo:rsid="001a3e65" officeooo:paragraph-rsid="0039f075"/>
    </style:style>
    <style:style style:name="P7" style:family="paragraph" style:parent-style-name="Text_20_body">
      <style:text-properties officeooo:rsid="001a3e65" officeooo:paragraph-rsid="0039f075"/>
    </style:style>
    <style:style style:name="P8" style:family="paragraph" style:parent-style-name="Text_20_body">
      <style:text-properties officeooo:paragraph-rsid="0039f075"/>
    </style:style>
    <style:style style:name="P9" style:family="paragraph" style:parent-style-name="Text_20_body">
      <style:text-properties officeooo:paragraph-rsid="003a1ace"/>
    </style:style>
    <style:style style:name="T1" style:family="text">
      <style:text-properties officeooo:rsid="001a3e65"/>
    </style:style>
    <style:style style:name="T2" style:family="text">
      <style:text-properties fo:font-size="13pt" officeooo:rsid="002177a5" style:font-size-asian="13pt" style:font-size-complex="13pt"/>
    </style:style>
    <style:style style:name="T3" style:family="text">
      <style:text-properties fo:font-size="13pt" officeooo:rsid="001a8641" style:font-size-asian="13pt" style:font-size-complex="13pt"/>
    </style:style>
    <style:style style:name="T4" style:family="text">
      <style:text-properties fo:font-size="13pt" officeooo:rsid="001ac8f6" style:font-size-asian="13pt" style:font-size-complex="13pt"/>
    </style:style>
    <style:style style:name="T5" style:family="text">
      <style:text-properties fo:font-size="13pt" officeooo:rsid="001c97f0" style:font-size-asian="13pt" style:font-size-complex="13pt"/>
    </style:style>
    <style:style style:name="T6" style:family="text">
      <style:text-properties fo:font-size="13pt" officeooo:rsid="001d509f" style:font-size-asian="13pt" style:font-size-complex="13pt"/>
    </style:style>
    <style:style style:name="T7" style:family="text">
      <style:text-properties fo:font-size="13pt" officeooo:rsid="001a3e65" style:font-size-asian="13pt" style:font-size-complex="13pt"/>
    </style:style>
    <style:style style:name="T8" style:family="text">
      <style:text-properties fo:font-size="13pt" officeooo:rsid="00263e13" style:font-size-asian="13pt" style:font-size-complex="13pt"/>
    </style:style>
    <style:style style:name="T9" style:family="text">
      <style:text-properties fo:font-size="13pt" officeooo:rsid="002812c2" style:font-size-asian="13pt" style:font-size-complex="13pt"/>
    </style:style>
    <style:style style:name="T10" style:family="text">
      <style:text-properties fo:font-size="13pt" officeooo:rsid="0034ed79" style:font-size-asian="13pt" style:font-size-complex="13pt"/>
    </style:style>
    <style:style style:name="T11" style:family="text">
      <style:text-properties fo:font-size="13pt" officeooo:rsid="0036a634" style:font-size-asian="13pt" style:font-size-complex="13pt"/>
    </style:style>
    <style:style style:name="T12" style:family="text">
      <style:text-properties fo:font-size="13pt" officeooo:rsid="0036ca13" style:font-size-asian="13pt" style:font-size-complex="13pt"/>
    </style:style>
    <style:style style:name="T13" style:family="text">
      <style:text-properties fo:font-size="13pt" officeooo:rsid="00380c5f" style:font-size-asian="13pt" style:font-size-complex="13pt"/>
    </style:style>
    <style:style style:name="T14" style:family="text">
      <style:text-properties fo:font-size="13pt" officeooo:rsid="003a1ace" style:font-size-asian="13pt" style:font-size-complex="13pt"/>
    </style:style>
    <style:style style:name="T15" style:family="text">
      <style:text-properties fo:font-size="13pt" officeooo:rsid="003b4bbd" style:font-size-asian="13pt" style:font-size-complex="13pt"/>
    </style:style>
    <style:style style:name="T16" style:family="text">
      <style:text-properties fo:font-size="13pt" officeooo:rsid="0041319c" style:font-size-asian="13pt" style:font-size-complex="13pt"/>
    </style:style>
    <style:style style:name="T17" style:family="text">
      <style:text-properties fo:font-size="13pt" officeooo:rsid="00432d70" style:font-size-asian="13pt" style:font-size-complex="13pt"/>
    </style:style>
    <style:style style:name="T18" style:family="text">
      <style:text-properties fo:font-size="13pt" officeooo:rsid="00450dfc" style:font-size-asian="13pt" style:font-size-complex="13pt"/>
    </style:style>
    <style:style style:name="T19" style:family="text">
      <style:text-properties fo:font-size="13pt" officeooo:rsid="0046bf40" style:font-size-asian="13pt" style:font-size-complex="13pt"/>
    </style:style>
    <style:style style:name="T20" style:family="text">
      <style:text-properties officeooo:rsid="002edeef"/>
    </style:style>
    <style:style style:name="T21" style:family="text">
      <style:text-properties officeooo:rsid="002f0ed7"/>
    </style:style>
    <style:style style:name="T22" style:family="text">
      <style:text-properties officeooo:rsid="0039ef0c"/>
    </style:style>
    <style:style style:name="T23" style:family="text">
      <style:text-properties officeooo:rsid="0039f0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Agent 18 : </text:h>
      <text:p text:style-name="P1"/>
      <text:p text:style-name="P1"><text:tab/>L’agent 18 est le nom de l’agent chimique défectueux créé par X et ses collègues scientifiques dans le but de découvrir le secret de l’immortalité. L’agent 18 a été relâché dans la nature par Y, la première humaine contaminée par cet agent, et s’est répandu en un éclair sur toute la surface du globe, infectant humains comme animaux <text:span text:style-name="T22">et</text:span> végétaux. <text:span text:style-name="T20">Même si l’expérience n’a pas permis de débloquer l’immortalité chez ces sujets infectés, les animorphes et animutants ont cependant vu leur espérance de vie grandement augmenter, certains individus qu’une race quelconque pouvant vivre aussi longtemps q</text:span><text:span text:style-name="T21">u’un humain.</text:span></text:p>
      <text:h text:style-name="P5" text:outline-level="1"><text:bookmark-start text:name="__RefHeading___Toc715_353095010"/>Animorphes <text:s/>:<text:bookmark-end text:name="__RefHeading___Toc715_353095010"/></text:h>
      <text:p text:style-name="P2"/>
      <text:p text:style-name="P3"><text:span text:style-name="T1"><text:tab/>Les animorphes sont </text:span><text:span text:style-name="T2">des animaux anthropomorphes </text:span><text:span text:style-name="T10">ex</text:span><text:span text:style-name="T11">c</text:span><text:span text:style-name="T10">lusivement femelles, </text:span><text:span text:style-name="T2">capables de raison et de parole, </text:span><text:span text:style-name="T7">issus de mutations suite à leur exposition à l’agent 18. Les animorphes ont des apparences aussi nombreuses qu’ils sont de comportements différents, de la société en autarcie aux petites communautés tribales chassant et cueillant dans l’ombre. Les animorphes se nourrissent en grande partie de sperme humain indispensable à leur survie, et en dépendent également pour se reproduire, </text:span><text:span text:style-name="T3">causant une relation compliquée avec les humains, ces derniers ne les voyant au mieux que comme des serviteurs, au pire que comme des animaux dangereux à abattre.</text:span></text:p>
      <text:p text:style-name="P3"><text:span text:style-name="T3"><text:tab/></text:span><text:span text:style-name="T4">Les animorphes sont très peu à vivre en communion avec les humains, certains préférant pour diverses raisons (peur, rancune, etc.) de former des tribus </text:span><text:span text:style-name="T5">exclusivement animorphes </text:span><text:span text:style-name="T4">un peu partout sur le continent. </text:span><text:span text:style-name="T6">Cependant, </text:span><text:span text:style-name="T8">le fait que tous les animorphes soient des femelles (donc incapables de se re</text:span><text:span text:style-name="T9">pro</text:span><text:span text:style-name="T8">duire entre e</text:span><text:span text:style-name="T9">u</text:span><text:span text:style-name="T8">x), </text:span><text:span text:style-name="T9">et</text:span><text:span text:style-name="T6"> leur libido décuplée par l’agent 18 les pousse régulièrement à chercher un homme mâle pour s’accoupler, résultant en des affrontements, viols et enlèvements, dégradant davantage les relations entre les deux camps.</text:span></text:p>
      <text:p text:style-name="P8"><text:span text:style-name="T6"><text:tab/></text:span><text:span text:style-name="T12">Les animorphes ont cependant gardé leur instinct de survie et de combat, et sont capables de tenir tête à plusieurs humains à la fois. Cela est renforcé par le fait que certains de leurs attributs animaux ont été exacerbés par l’agent 18, leur conférant des capacités surhumaines que de nombreux animaux normaux n’auraient pas été en mesure d’accomplir : Par exemple, un animorphe tatou pourrait avoir une cuirasse impénétrable, <text:s/>une araignée ou un cobra pourrait lâcher du venin corrosif ou hautement venimeux, un lézard pourrait cracher du feu, </text:span><text:span text:style-name="T13">un requin pourrait nager à de grandes vitesses et lâcher des trombes d’eau sur ses ennemis</text:span><text:span text:style-name="T12">, etc.</text:span></text:p>
      <text:h text:style-name="P6" text:outline-level="1"><text:bookmark-start text:name="__RefHeading___Toc715_3530950101"/><text:soft-page-break/>Anim<text:span text:style-name="T23">utants</text:span> <text:s/>:<text:bookmark-end text:name="__RefHeading___Toc715_3530950101"/></text:h>
      <text:p text:style-name="P7"/>
      <text:p text:style-name="P9"><text:span text:style-name="T7"><text:tab/>Les </text:span><text:span text:style-name="T14">animutants sont des animaux quasi-exclusivement mâles au côté bestial exacerbé </text:span><text:span text:style-name="T7">suite à leur exposition à l’agent 18. </text:span><text:span text:style-name="T14">Comme les animorphes, les animutants ont des formes et comportements variés, mais se différencient de leurs homologues par une incapacité de parler et une capacité de raisonnement limitée, inhibée par leur libido surdévelopée et leurs instincts primaux </text:span><text:span text:style-name="T15">qui régissent complètement leur comportement. Pour ces raisons, les animutants sont le plus souvent des caricatures </text:span><text:span text:style-name="T16">primales et</text:span><text:span text:style-name="T15"> sauvages des animaux qu’ils représentent : La plupart d’entre eux vivent en autarcie ou en petites meutes et sont très territoriaux, n’acceptant pas la présence d’un autre mâle sur leur territoire, humain ou non, et passent le plus clair de leur temps à chasser des humains, soit pour se nourrir des hommes ou se reproduire avec les femmes.</text:span></text:p>
      <text:p text:style-name="P9"><text:span text:style-name="T15"><text:tab/>Tout comme les animorphes, les animutants sont dépendants des fluides humains pour se nourrir. Il arrive que certains rares animaux femelles aient pu muter en animutants, ou que certains animutants naissent femelles, mais cette espèce reste mâle dans sa quasi-totalité et nécessite des humains du sexe opposé pour se reproduire. La reproduction entre animorphes et animutants semble impossible, aucune des deux espèces n’étant physiquement attiré à l’autre et toute tentative de reproduction forcée s’est soldée par un échec, leurs gènes ne semblant se transmettre que via des accouplements avec des humains.</text:span></text:p>
      <text:p text:style-name="P9"><text:span text:style-name="T15"><text:tab/></text:span><text:span text:style-name="T17">Extrêmement violents et puissants, humains comme animorphes préfèrent se tenir à l’écart de ces créatures. Certains animutants moins belliqueux sont utilisés par les deux camps comme monture, mais la plupart sont juste chassés pour leur viande ou d’autres matières première comme leur fourrure ou leur os, </text:span><text:span text:style-name="T18">et peu ont de bonnes opinions à leur sujet. Il arrive parfois qu’un animutant exhibe une personnalité plus complexe, comme s’enticher d’une humaine ou mimiquer des gestes humains, et la plupart son</text:span><text:span text:style-name="T19">t</text:span><text:span text:style-name="T18"> capables d’une loyauté sans faille envers leur génitrice, </text:span><text:span text:style-name="T19">mais leurs capacités mentales s’arrêtent là</text:span><text:span text:style-name="T1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H9M50S</meta:editing-duration>
    <meta:editing-cycles>47</meta:editing-cycles>
    <meta:generator>LibreOffice/7.3.3.2$Windows_X86_64 LibreOffice_project/d1d0ea68f081ee2800a922cac8f79445e4603348</meta:generator>
    <meta:creation-date>2022-08-17T22:40:04.450000000</meta:creation-date>
    <dc:title>Format de texte</dc:title>
    <dc:date>2023-03-26T07:48:23.605000000</dc:date>
    <meta:document-statistic meta:table-count="0" meta:image-count="0" meta:object-count="0" meta:page-count="2" meta:paragraph-count="10" meta:word-count="702" meta:character-count="4540" meta:non-whitespace-character-count="3837"/>
    <meta:template xlink:type="simple" xlink:actuate="onRequest" xlink:title="Format de texte" xlink:href="../../../../../../AppData/Roaming/LibreOffice/4/user/template/Format%20de%20texte1.ott" meta:date="2022-08-17T22:40:04.310000000"/>
  </office:meta>
</office:document-meta>
</file>