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f574" officeooo:paragraph-rsid="0017f574"/>
    </style:style>
    <style:style style:name="P2" style:family="paragraph" style:parent-style-name="Text_20_body" style:list-style-name="L1">
      <style:text-properties officeooo:paragraph-rsid="0017f574"/>
    </style:style>
    <style:style style:name="P3" style:family="paragraph" style:parent-style-name="Text_20_body" style:list-style-name="L1">
      <style:text-properties officeooo:rsid="0017f574" officeooo:paragraph-rsid="0017f574"/>
    </style:style>
    <style:style style:name="T1" style:family="text">
      <style:text-properties officeooo:rsid="0017f57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ien jeu textuel fait pour une game jam, malheureusement abandonné.</text:p>
      <text:p text:style-name="P1">Idées :</text:p>
      <text:list text:style-name="L1">
        <text:list-item>
          <text:p text:style-name="P2"><text:span text:style-name="T1">Le PP est une amazone vivant dans un village reculé de la jungle. Après que de plus en plus de femmes du village disparaissent mystérieusement, des éclaireuses à leur recherche ont découvert un temple émanant une aura magique inquiétante. Emportant avec elle les meilleures guerrières du village, le PP a été sélectionné par la doyenne pour mener l’enquête. Cependant, un éboulement à l’entrée du temple la sépare de son équipe, la forçant à explorer le temple seule, ses soldates ayant été emportées sous terre par une force mystique.</text:span></text:p>
        </text:list-item>
        <text:list-item>
          <text:p text:style-name="P3">Le PP découvrira au fil de son enquête que le temple n’est pas un simple temple, semblant bien plus grand à l’intérieur qu’à l’extérieur, et offrant des biomes ne pouvant pas exister dans les environs, comme une plage / montagne / etc. Il y aura aussi des créatures férales cherchant à baiser le PP, créatures et projections spectrales créées par la force mystique vivant dans le temple.</text:p>
        </text:list-item>
        <text:list-item>
          <text:p text:style-name="P3">A la fin du jeu, le PP découvre ses guerrières et les femmes disparues baisées par les créatures du temple dans un rituel pour apaiser une déesse ancienne, en colère d’avoir été abandonnée au fil des ans. Le PP parvient à négocier leur retour au village en échange de la vénérer et de baiser aussi souvent que possible. Le jeu se termine sur une scène d’orgie au village où tout le monde baise tout le monde, humaines comme créatures, et le PP devient la championne de la dées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M53S</meta:editing-duration>
    <meta:editing-cycles>2</meta:editing-cycles>
    <meta:generator>LibreOffice/25.2.4.3$Windows_X86_64 LibreOffice_project/33e196637044ead23f5c3226cde09b47731f7e27</meta:generator>
    <meta:creation-date>2025-07-12T05:32:33.651442600</meta:creation-date>
    <dc:title>Format de texte</dc:title>
    <dc:date>2025-07-12T05:38:26.816124700</dc:date>
    <meta:document-statistic meta:table-count="0" meta:image-count="0" meta:object-count="0" meta:page-count="1" meta:paragraph-count="5" meta:word-count="258" meta:character-count="1480" meta:non-whitespace-character-count="1230"/>
    <meta:template xlink:type="simple" xlink:actuate="onRequest" xlink:title="Format de texte" xlink:href="file:///C:/Users/Clément/AppData/Roaming/LibreOffice/4/user/template/Format%20de%20texte1.ott" meta:date="2025-07-12T05:32:33.557239800"/>
  </office:meta>
</office:document-meta>
</file>