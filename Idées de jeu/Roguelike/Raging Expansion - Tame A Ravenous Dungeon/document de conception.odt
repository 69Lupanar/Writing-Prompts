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paragraph-rsid="00228e31"/>
    </style:style>
    <style:style style:name="P2" style:family="paragraph" style:parent-style-name="Standard">
      <style:paragraph-properties fo:line-height="115%"/>
      <style:text-properties officeooo:paragraph-rsid="002353f3"/>
    </style:style>
    <style:style style:name="P3" style:family="paragraph" style:parent-style-name="Standard">
      <style:paragraph-properties fo:line-height="115%"/>
      <style:text-properties officeooo:rsid="00106f63" officeooo:paragraph-rsid="00106f63"/>
    </style:style>
    <style:style style:name="P4" style:family="paragraph" style:parent-style-name="Standard">
      <style:text-properties officeooo:rsid="00106f63" officeooo:paragraph-rsid="00106f63"/>
    </style:style>
    <style:style style:name="P5" style:family="paragraph" style:parent-style-name="Standard">
      <style:paragraph-properties fo:line-height="115%"/>
      <style:text-properties officeooo:rsid="002ff308" officeooo:paragraph-rsid="001ddcea"/>
    </style:style>
    <style:style style:name="P6" style:family="paragraph" style:parent-style-name="Standard">
      <style:paragraph-properties fo:line-height="115%"/>
      <style:text-properties officeooo:rsid="002ff308" officeooo:paragraph-rsid="00228e31"/>
    </style:style>
    <style:style style:name="P7" style:family="paragraph" style:parent-style-name="Standard">
      <style:paragraph-properties fo:line-height="115%"/>
      <style:text-properties officeooo:rsid="002ff308" officeooo:paragraph-rsid="002353f3"/>
    </style:style>
    <style:style style:name="P8" style:family="paragraph" style:parent-style-name="Subtitle">
      <style:text-properties officeooo:rsid="001c3694" officeooo:paragraph-rsid="001c3694"/>
    </style:style>
    <style:style style:name="P9" style:family="paragraph" style:parent-style-name="Title">
      <style:text-properties officeooo:rsid="001c3694" officeooo:paragraph-rsid="001c3694"/>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line-height="115%"/>
      <style:text-properties officeooo:rsid="001cac03" officeooo:paragraph-rsid="001ddcea"/>
    </style:style>
    <style:style style:name="P12" style:family="paragraph" style:parent-style-name="Heading_20_1">
      <style:paragraph-properties fo:line-height="115%"/>
      <style:text-properties officeooo:rsid="001ddcea" officeooo:paragraph-rsid="00228e31"/>
    </style:style>
    <style:style style:name="P13" style:family="paragraph" style:parent-style-name="Heading_20_1">
      <style:paragraph-properties fo:line-height="115%"/>
      <style:text-properties officeooo:rsid="00228e31" officeooo:paragraph-rsid="00228e31"/>
    </style:style>
    <style:style style:name="P14" style:family="paragraph" style:parent-style-name="Heading_20_1">
      <style:paragraph-properties fo:line-height="115%"/>
      <style:text-properties officeooo:rsid="002353f3" officeooo:paragraph-rsid="002353f3"/>
    </style:style>
    <style:style style:name="P15" style:family="paragraph" style:parent-style-name="Standard" style:list-style-name="L1">
      <style:paragraph-properties fo:line-height="115%"/>
      <style:text-properties officeooo:rsid="001cac03" officeooo:paragraph-rsid="001ddcea"/>
    </style:style>
    <style:style style:name="P16" style:family="paragraph" style:parent-style-name="Standard" style:list-style-name="L1">
      <style:paragraph-properties fo:line-height="115%"/>
      <style:text-properties officeooo:rsid="001cac03" officeooo:paragraph-rsid="00228e31"/>
    </style:style>
    <style:style style:name="P17" style:family="paragraph" style:parent-style-name="Standard" style:list-style-name="L1">
      <style:paragraph-properties fo:line-height="115%"/>
      <style:text-properties officeooo:rsid="001cac03" officeooo:paragraph-rsid="002353f3"/>
    </style:style>
    <style:style style:name="P18" style:family="paragraph" style:parent-style-name="Standard" style:list-style-name="L1">
      <style:paragraph-properties fo:line-height="115%"/>
      <style:text-properties officeooo:rsid="0033b36c" officeooo:paragraph-rsid="001ddcea"/>
    </style:style>
    <style:style style:name="P19" style:family="paragraph" style:parent-style-name="Standard" style:list-style-name="L1">
      <style:paragraph-properties fo:line-height="115%"/>
      <style:text-properties officeooo:paragraph-rsid="00228e31"/>
    </style:style>
    <style:style style:name="P20" style:family="paragraph" style:parent-style-name="Standard" style:list-style-name="L1">
      <style:paragraph-properties fo:line-height="115%"/>
      <style:text-properties officeooo:paragraph-rsid="002882aa"/>
    </style:style>
    <style:style style:name="P21" style:family="paragraph" style:parent-style-name="Standard" style:list-style-name="L1">
      <style:paragraph-properties fo:line-height="115%"/>
      <style:text-properties officeooo:rsid="0036b2fa" officeooo:paragraph-rsid="001ddcea"/>
    </style:style>
    <style:style style:name="P22" style:family="paragraph" style:parent-style-name="Standard" style:list-style-name="L1">
      <style:paragraph-properties fo:line-height="115%"/>
      <style:text-properties officeooo:rsid="0037fe8d" officeooo:paragraph-rsid="00228e31"/>
    </style:style>
    <style:style style:name="P23" style:family="paragraph" style:parent-style-name="Standard" style:list-style-name="L1">
      <style:paragraph-properties fo:line-height="115%"/>
      <style:text-properties officeooo:rsid="002353f3" officeooo:paragraph-rsid="002353f3"/>
    </style:style>
    <style:style style:name="P24" style:family="paragraph" style:parent-style-name="Standard" style:list-style-name="L1">
      <style:paragraph-properties fo:line-height="115%"/>
      <style:text-properties officeooo:rsid="0024fb60" officeooo:paragraph-rsid="0024fb60"/>
    </style:style>
    <style:style style:name="P25" style:family="paragraph" style:parent-style-name="Standard" style:list-style-name="L1">
      <style:paragraph-properties fo:line-height="115%"/>
      <style:text-properties officeooo:rsid="001f52a0" officeooo:paragraph-rsid="00228e31"/>
    </style:style>
    <style:style style:name="P26" style:family="paragraph" style:parent-style-name="Standard" style:list-style-name="L1">
      <style:paragraph-properties fo:line-height="115%"/>
      <style:text-properties officeooo:rsid="00208e98" officeooo:paragraph-rsid="00228e31"/>
    </style:style>
    <style:style style:name="P27" style:family="paragraph" style:parent-style-name="Standard" style:list-style-name="L1">
      <style:paragraph-properties fo:line-height="115%"/>
      <style:text-properties officeooo:rsid="003a8ce6" officeooo:paragraph-rsid="00228e31"/>
    </style:style>
    <style:style style:name="P28" style:family="paragraph" style:parent-style-name="Standard" style:list-style-name="L1">
      <style:paragraph-properties fo:line-height="115%"/>
      <style:text-properties officeooo:rsid="0020a54b" officeooo:paragraph-rsid="00228e31"/>
    </style:style>
    <style:style style:name="P29" style:family="paragraph" style:parent-style-name="Standard" style:list-style-name="L1">
      <style:paragraph-properties fo:line-height="115%"/>
      <style:text-properties officeooo:rsid="0042e539" officeooo:paragraph-rsid="002882aa"/>
    </style:style>
    <style:style style:name="P30" style:family="paragraph" style:parent-style-name="Standard" style:list-style-name="L1">
      <style:paragraph-properties fo:line-height="115%"/>
      <style:text-properties officeooo:rsid="00228e31" officeooo:paragraph-rsid="00228e31"/>
    </style:style>
    <style:style style:name="P31" style:family="paragraph" style:parent-style-name="Standard" style:list-style-name="L1">
      <style:paragraph-properties fo:line-height="115%"/>
      <style:text-properties officeooo:rsid="0040d7dd" officeooo:paragraph-rsid="002353f3"/>
    </style:style>
    <style:style style:name="P32" style:family="paragraph" style:parent-style-name="Standard" style:list-style-name="L1">
      <style:paragraph-properties fo:line-height="115%"/>
      <style:text-properties officeooo:rsid="001fad5b" officeooo:paragraph-rsid="002353f3"/>
    </style:style>
    <style:style style:name="P33" style:family="paragraph" style:parent-style-name="Standard" style:list-style-name="L1">
      <style:paragraph-properties fo:line-height="115%"/>
      <style:text-properties officeooo:rsid="0025a980" officeooo:paragraph-rsid="0025a980"/>
    </style:style>
    <style:style style:name="T1" style:family="text">
      <style:text-properties officeooo:rsid="0035af97"/>
    </style:style>
    <style:style style:name="T2" style:family="text">
      <style:text-properties officeooo:rsid="0033b36c"/>
    </style:style>
    <style:style style:name="T3" style:family="text">
      <style:text-properties officeooo:rsid="003593df"/>
    </style:style>
    <style:style style:name="T4" style:family="text">
      <style:text-properties officeooo:rsid="001ddcea"/>
    </style:style>
    <style:style style:name="T5" style:family="text">
      <style:text-properties officeooo:rsid="0037fe8d"/>
    </style:style>
    <style:style style:name="T6" style:family="text">
      <style:text-properties officeooo:rsid="003ad6c7"/>
    </style:style>
    <style:style style:name="T7" style:family="text">
      <style:text-properties officeooo:rsid="003c7d67"/>
    </style:style>
    <style:style style:name="T8" style:family="text">
      <style:text-properties officeooo:rsid="001f52a0"/>
    </style:style>
    <style:style style:name="T9" style:family="text">
      <style:text-properties officeooo:rsid="0038d0d9"/>
    </style:style>
    <style:style style:name="T10" style:family="text">
      <style:text-properties officeooo:rsid="003a8ce6"/>
    </style:style>
    <style:style style:name="T11" style:family="text">
      <style:text-properties officeooo:rsid="002130fd"/>
    </style:style>
    <style:style style:name="T12" style:family="text">
      <style:text-properties officeooo:rsid="00228e31"/>
    </style:style>
    <style:style style:name="T13" style:family="text">
      <style:text-properties officeooo:rsid="00374f7b"/>
    </style:style>
    <style:style style:name="T14" style:family="text">
      <style:text-properties officeooo:rsid="0040ff2d"/>
    </style:style>
    <style:style style:name="T15" style:family="text">
      <style:text-properties officeooo:rsid="0020e274"/>
    </style:style>
    <style:style style:name="T16" style:family="text">
      <style:text-properties officeooo:rsid="003e0b98"/>
    </style:style>
    <style:style style:name="T17" style:family="text">
      <style:text-properties officeooo:rsid="0040d7dd"/>
    </style:style>
    <style:style style:name="T18" style:family="text">
      <style:text-properties officeooo:rsid="00446406"/>
    </style:style>
    <style:style style:name="T19" style:family="text">
      <style:text-properties officeooo:rsid="0020c7d1"/>
    </style:style>
    <style:style style:name="T20" style:family="text">
      <style:text-properties officeooo:rsid="001fad5b"/>
    </style:style>
    <style:style style:name="T21" style:family="text">
      <style:text-properties officeooo:rsid="0023b388"/>
    </style:style>
    <style:style style:name="T22" style:family="text">
      <style:text-properties officeooo:rsid="0024fb60"/>
    </style:style>
    <style:style style:name="T23" style:family="text">
      <style:text-properties officeooo:rsid="0025a980"/>
    </style:style>
    <style:style style:name="T24" style:family="text">
      <style:text-properties officeooo:rsid="002752eb"/>
    </style:style>
    <style:style style:name="T25" style:family="text">
      <style:text-properties officeooo:rsid="0020a54b"/>
    </style:style>
    <style:style style:name="T26" style:family="text">
      <style:text-properties officeooo:rsid="0042e539"/>
    </style:style>
    <style:style style:name="T27" style:family="text">
      <style:text-properties officeooo:rsid="002882a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aging Expansion – Tame A Ravenous Dungeon</text:p>
      <text:p text:style-name="P4"/>
      <text:p text:style-name="P8">Document de conceptio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715_353095010" text:style-name="Index_20_Link" text:visited-style-name="Index_20_Link">L’univers<text:tab/>1</text:a></text:p>
          <text:p text:style-name="P10"><text:a xlink:type="simple" xlink:href="#__RefHeading___Toc715_3530950101" text:style-name="Index_20_Link" text:visited-style-name="Index_20_Link">Gameplay ppal<text:tab/>1</text:a></text:p>
          <text:p text:style-name="P10"><text:a xlink:type="simple" xlink:href="#__RefHeading___Toc715_35309501013" text:style-name="Index_20_Link" text:visited-style-name="Index_20_Link">Combat<text:tab/>2</text:a></text:p>
          <text:p text:style-name="P10"><text:a xlink:type="simple" xlink:href="#__RefHeading___Toc715_353095010131" text:style-name="Index_20_Link" text:visited-style-name="Index_20_Link">Les dieux<text:tab/>3</text:a></text:p>
        </text:index-body>
      </text:table-of-content>
      <text:p text:style-name="P3"/>
      <text:p text:style-name="P3"/>
      <text:h text:style-name="P11" text:outline-level="1"><text:bookmark-start text:name="__RefHeading___Toc715_353095010"/>L’univers<text:bookmark-end text:name="__RefHeading___Toc715_353095010"/></text:h>
      <text:p text:style-name="P5"/>
      <text:list xml:id="list3720283177" text:style-name="L1">
        <text:list-item>
          <text:p text:style-name="P15">Monde médiéval fantaisie.</text:p>
        </text:list-item>
        <text:list-item>
          <text:p text:style-name="P15">P<text:span text:style-name="T2">lusieurs dieux représentant différents fétiches.</text:span></text:p>
        </text:list-item>
        <text:list-item>
          <text:p text:style-name="P18">Les dieux sont entrés en guerre il y a très longtemps contre un autre dieu, causant son bannissement dans le Grotto qui lui sert de prison.</text:p>
        </text:list-item>
        <text:list-item>
          <text:p text:style-name="P18">Le Grotto est peuplé de nombreuses créatures, certaines natives au donjon et d’autres venant de la surface.</text:p>
        </text:list-item>
        <text:list-item>
          <text:p text:style-name="P15"><text:span text:style-name="T3">Certaines de </text:span><text:span text:style-name="T1">c</text:span><text:span text:style-name="T3">es créatures sont des émissaires de leurs dieux respectifs, gardant des chambres fortes contenant des objets précieux </text:span>ou servant juste de gardiens du Grotto, empêchant les intrus d’atteindre la prison du dieu banni<text:span text:style-name="T3">.</text:span></text:p>
        </text:list-item>
        <text:list-item>
          <text:p text:style-name="P21">Le perso ppal n’est intéressé que par baiser les habitants du Grotto.</text:p>
        </text:list-item>
      </text:list>
      <text:p text:style-name="P1"/>
      <text:h text:style-name="P12" text:outline-level="1"><text:bookmark-start text:name="__RefHeading___Toc715_3530950101"/>Gameplay ppal<text:bookmark-end text:name="__RefHeading___Toc715_3530950101"/></text:h>
      <text:p text:style-name="P6"/>
      <text:list xml:id="list213351233281093" text:continue-numbering="true" text:style-name="L1">
        <text:list-item>
          <text:p text:style-name="P16"><text:span text:style-name="T4">R</text:span><text:span text:style-name="T5">oguelike dungeon crawler </text:span><text:span text:style-name="T6">avec mort permanente causant la suppression du fichier de sauvegarde </text:span><text:span text:style-name="T7">en cas d’échec.</text:span></text:p>
        </text:list-item>
        <text:list-item>
          <text:p text:style-name="P19"><text:span text:style-name="T6">M</text:span><text:span text:style-name="T5">ouvement de case en base dans 8 directions sur une grille.</text:span></text:p>
        </text:list-item>
        <text:list-item>
          <text:p text:style-name="P22">Chaque niveau est généré procéduralement. </text:p>
        </text:list-item>
        <text:list-item>
          <text:p text:style-name="P22">Le but est d’arriver au dernier niveau et de battre le boss.</text:p>
        </text:list-item>
        <text:list-item>
          <text:p text:style-name="P23">Avant de lancer une partie, le joueur peut choisir son nom, sexe, espèce, classe <text:span text:style-name="T22">et </text:span><text:soft-page-break/><text:span text:style-name="T22">religion</text:span>.</text:p>
          <text:list>
            <text:list-item>
              <text:p text:style-name="P23">Son espèce détermine ses stats et aptitudes de base, et ses capacités naturelles si elle en offre.</text:p>
            </text:list-item>
            <text:list-item>
              <text:p text:style-name="P23">Sa classe influence sur ses stats de base et détermine son équipement et sorts de départ s<text:span text:style-name="T21">i elle en offre.</text:span></text:p>
            </text:list-item>
            <text:list-item>
              <text:p text:style-name="P24">Sa religion lui permet d’avoir un temps d’avance avec le dieu de son choix, et de l’obtenir dès le début de la partie au lieu d’avoir à le chercher dans le Grotto. Avoir une religion n’est pas obligatoire et rend le début du jeu plus facile.</text:p>
            </text:list-item>
          </text:list>
        </text:list-item>
        <text:list-item>
          <text:p text:style-name="P19"><text:span text:style-name="T9">Système d’objets et d’inventaire : </text:span><text:span text:style-name="T8">Le joueur peut ramasser et utiliser des objets pendant sa quête.</text:span></text:p>
          <text:list>
            <text:list-item>
              <text:p text:style-name="P25">Des consommables, à usage limité, qui peuvent avoir différents effets: <text:s/>Infliger des dégâts comme des munitions ou soigner le joueur comme des potions.</text:p>
            </text:list-item>
            <text:list-item>
              <text:p text:style-name="P25">Des équipables, à usage illimité, qui occupent un emplacement d’équipement sur le joueur, dont le nombre dépend de son espèce. Ces équipables offrent de la protection au joueur, et/ou des bonus/malus à ses stats, et/ou résistances à certains types d’attaques, et/ou lui permettent d’attaquer les ennemis de différentes façons (pour les armes).</text:p>
            </text:list-item>
            <text:list-item>
              <text:p text:style-name="P26">Des objets-clés, qui n’ont pas d’effet particulier mais qui peuvent permettre au joueur d’accéder à des endroits verrouillés ou changer le comportement de certaines factions ennemies à son égard.</text:p>
            </text:list-item>
          </text:list>
        </text:list-item>
        <text:list-item>
          <text:p text:style-name="P27">Système de magie : Le joueur peut utiliser des sorts pendant et hors combat.</text:p>
          <text:list>
            <text:list-item>
              <text:p text:style-name="P28">Tous les sorts ont 1 ou plusieurs « écoles de magie », qui indiquent leur type et quel genre d’effets ces sorts peuvent avoir.</text:p>
            </text:list-item>
            <text:list-item>
              <text:p text:style-name="P28">Tous les sorts ont une chance d’échouer, qui ne diminue qu’en s’entraînant dans leurs écoles correspondantes.</text:p>
            </text:list-item>
          </text:list>
        </text:list-item>
        <text:list-item>
          <text:p text:style-name="P20"><text:span text:style-name="T25">Système de talents : Similaire au système de magie, le joueur a plusieurs « écoles » déterminant son efficacité au combat. Entraîner ses talents, magiques ou non, ne peut se faire qu’en utilisant régulièrement des attaques/sorts/etc liés à ce talent.</text:span></text:p>
        </text:list-item>
        <text:list-item>
          <text:p text:style-name="P29">Les ennemis ont des traits affectant leur efficacité au combat : </text:p>
          <text:list>
            <text:list-item>
              <text:p text:style-name="P29">Certains peuvent être aveugles, sourds <text:span text:style-name="T11">ou sans odorat</text:span>, <text:span text:style-name="T11">les empêchant respectivement de voir, entendre ou sentir l’odeur du joueur.</text:span> </text:p>
            </text:list-item>
          </text:list>
        </text:list-item>
        <text:list-item>
          <text:p text:style-name="P29"><text:span text:style-name="T11">Certains</text:span> ont des capacités naturelles <text:span text:style-name="T11">propres à leur espèce</text:span>, <text:span text:style-name="T11">indépendantes de leurs talents physiques ou magiques.</text:span></text:p>
        </text:list-item>
        <text:list-item>
          <text:p text:style-name="P20"><text:span text:style-name="T27">Système de mutation</text:span><text:span text:style-name="T26"> : </text:span><text:span text:style-name="T27">Le joueur peut gagner ou perdre certains traits physiques en buvant certaines potions. Ces traits lui conférent certains avantages, mais peuvent se révéler être des faiblesses dans certaines situations (Par exemple, une vision accrue augmente son champ de vision ou lui permet de voir l’invisible, mais le rend plus susceptible à l’aveuglement.) </text:span></text:p>
        </text:list-item>
      </text:list>
      <text:h text:style-name="P13" text:outline-level="1"><text:bookmark-start text:name="__RefHeading___Toc715_35309501013"/><text:soft-page-break/>Combat<text:bookmark-end text:name="__RefHeading___Toc715_35309501013"/></text:h>
      <text:p text:style-name="P6"/>
      <text:list xml:id="list213350661478599" text:continue-numbering="true" text:style-name="L1">
        <text:list-item>
          <text:p text:style-name="P16"><text:span text:style-name="T13">I</text:span><text:span text:style-name="T15">nspiré de Lilith’s Throne, </text:span><text:span text:style-name="T14">DCSS</text:span><text:span text:style-name="T15"> et CoC : </text:span><text:span text:style-name="T10">Combat tour par tour, le joueur peut utiliser des objets et sorts et changer d’arme pendant un combat.</text:span></text:p>
        </text:list-item>
        <text:list-item>
          <text:p text:style-name="P16"><text:span text:style-name="T14">Le joueur et les monstres possèdent des aptitudes déterminant leur efficacité à manier armes et armures, et à utiliser leurs capacités, similaire à DCSS. Battre des ennemis permet au joueur d’augmenter ses compétences dans les talents concernés.</text:span></text:p>
        </text:list-item>
        <text:list-item>
          <text:p text:style-name="P27">Les combats se déroulent dans le même niveau que le jeu ppal (pas d’écran à part).</text:p>
        </text:list-item>
        <text:list-item>
          <text:p text:style-name="P16"><text:span text:style-name="T10">Le joueur a une </text:span><text:span text:style-name="T6">jauge</text:span><text:span text:style-name="T10"> de points de vie et une </text:span><text:span text:style-name="T6">jauge de libido. Si ses PV tombent à zéro, </text:span><text:span text:style-name="T16">il perd la partie. La jauge de libido peut être utilisée pour certains sorts. Si la jauge est remplie à 100% le perso du joueur est forcé de se masturber pendant plusieurs tours, l’empêchant de se défendre des attaques des monstres. Ces derniers peuvent alors l’attaquer ou le violer.</text:span></text:p>
        </text:list-item>
        <text:list-item>
          <text:p text:style-name="P30">En addition aux capacités de combat, le joueur et la plupart des monstres ont une capacité de séduction, leur permettant de faire monter la jauge de libido de leur adversaire.</text:p>
        </text:list-item>
        <text:list-item>
          <text:p text:style-name="P30"><text:span text:style-name="T17">Chaque monstre possède lui aussi une jauge de libido, que le joueur peut remplir par des sorts ou d’autres capacités destinées à exciter l’adversaire. Quand leur jauge est rempli</text:span>e<text:span text:style-name="T17">, les créatures sont forcées de se masturber comme pour le joueur, lui permettant de les attaquer impunément pendant quelques tours.</text:span></text:p>
        </text:list-item>
        <text:list-item>
          <text:p text:style-name="P31">Cette jauge réduit aussi leur chance de refuser les avances du joueur, lui permettant de coucher avec les monstres sans avoir à les battre. S’il réussit, il a une chance de recruter ce monstre comme allié jusqu’à sa mort. <text:span text:style-name="T18">Cette chance augmente avec la libido du joueur, ce qui donne une aspect risque-récompense à la chose, où le joueur peut risquer d’être paralysé par une libido trop forte en échange de gagner un allié.</text:span></text:p>
        </text:list-item>
        <text:list-item>
          <text:p text:style-name="P31"><text:span text:style-name="T12">Tout comme la masturbation, u</text:span>ne scène de sexe dure plusieurs tours en jeu. Le joueur doit donc s’assurer que les alentours soient sûrs avant de baiser un ennemi.</text:p>
        </text:list-item>
      </text:list>
      <text:p text:style-name="P2"/>
      <text:h text:style-name="P14" text:outline-level="1"><text:bookmark-start text:name="__RefHeading___Toc715_353095010131"/>Les dieux<text:bookmark-end text:name="__RefHeading___Toc715_353095010131"/></text:h>
      <text:p text:style-name="P7"/>
      <text:list xml:id="list213351488298779" text:continue-numbering="true" text:style-name="L1">
        <text:list-item>
          <text:p text:style-name="P32">Système de dieux inspiré de celui de DCSS.</text:p>
        </text:list-item>
        <text:list-item>
          <text:p text:style-name="P32">Les descriptions des dons des dieux seront explicites pour faciliter leur compréhension.</text:p>
        </text:list-item>
        <text:list-item>
          <text:p text:style-name="P17"><text:span text:style-name="T20">Les dieux seront représentées par des personnalités célèbres ra</text:span><text:span text:style-name="T19">t</text:span><text:span text:style-name="T20">tachées à leur fétiche particulier (Sade pour le sadisme, un allemand scato, etc.)</text:span></text:p>
        </text:list-item>
        <text:list-item>
          <text:p text:style-name="P24">Chaque <text:span text:style-name="T23">dieu fonctionne sur un système de piété : Le joueur peut gagner les faveurs </text:span><text:soft-page-break/><text:span text:style-name="T23">de son dieu en réalisant des actions conformes à ses restrictions, et en perdre en allant à l’encontre de sa volonté.</text:span></text:p>
        </text:list-item>
        <text:list-item>
          <text:p text:style-name="P33">Plus le joueur gagne en piété, plus son dieu lui offre différentes capacités divines.</text:p>
        </text:list-item>
        <text:list-item>
          <text:p text:style-name="P33">Réduire sa piété à 0 force l’excommunication du joueur. Puis, pendant une durée dépendant du dieu en question, celui-ci va punir le joueur avec diverses sortes d’épreuves : Combattre une horde d’ennemis, voir ses stats drainées, <text:span text:style-name="T24">certaines de </text:span>ses capacités inutilisables, etc...</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6M9S</meta:editing-duration>
    <meta:editing-cycles>16</meta:editing-cycles>
    <meta:generator>LibreOffice/7.3.3.2$Windows_X86_64 LibreOffice_project/d1d0ea68f081ee2800a922cac8f79445e4603348</meta:generator>
    <meta:creation-date>2023-12-02T16:54:25.174000000</meta:creation-date>
    <dc:date>2024-02-27T21:33:49.252000000</dc:date>
    <meta:document-statistic meta:table-count="0" meta:image-count="0" meta:object-count="0" meta:page-count="4" meta:paragraph-count="51" meta:word-count="1087" meta:character-count="6409" meta:non-whitespace-character-count="5407"/>
  </office:meta>
</office:document-meta>
</file>