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officeooo:rsid="001bf8a1" officeooo:paragraph-rsid="001bf8a1"/>
    </style:style>
    <style:style style:name="P2" style:family="paragraph" style:parent-style-name="Standard">
      <style:paragraph-properties fo:line-height="115%"/>
      <style:text-properties officeooo:rsid="002e92ad" officeooo:paragraph-rsid="001fad5b"/>
    </style:style>
    <style:style style:name="P3" style:family="paragraph" style:parent-style-name="Standard">
      <style:paragraph-properties fo:line-height="115%"/>
      <style:text-properties officeooo:rsid="002f31d9" officeooo:paragraph-rsid="002f31d9"/>
    </style:style>
    <style:style style:name="P4" style:family="paragraph" style:parent-style-name="Standard">
      <style:paragraph-properties fo:line-height="115%"/>
      <style:text-properties officeooo:rsid="003593df" officeooo:paragraph-rsid="003593df"/>
    </style:style>
    <style:style style:name="P5" style:family="paragraph" style:parent-style-name="Standard" style:list-style-name="L1">
      <style:paragraph-properties fo:line-height="115%"/>
      <style:text-properties officeooo:rsid="002ff308" officeooo:paragraph-rsid="0031bbde"/>
    </style:style>
    <style:style style:name="P6" style:family="paragraph" style:parent-style-name="Standard" style:list-style-name="L1">
      <style:paragraph-properties fo:line-height="115%"/>
      <style:text-properties officeooo:rsid="0033b36c" officeooo:paragraph-rsid="0033b36c"/>
    </style:style>
    <style:style style:name="P7" style:family="paragraph" style:parent-style-name="Standard" style:list-style-name="L1">
      <style:paragraph-properties fo:line-height="115%"/>
      <style:text-properties officeooo:rsid="003593df" officeooo:paragraph-rsid="003593df"/>
    </style:style>
    <style:style style:name="P8" style:family="paragraph" style:parent-style-name="Standard" style:list-style-name="L1">
      <style:paragraph-properties fo:line-height="115%"/>
      <style:text-properties officeooo:rsid="0036b2fa" officeooo:paragraph-rsid="0036b2fa"/>
    </style:style>
    <style:style style:name="P9" style:family="paragraph" style:parent-style-name="Standard" style:list-style-name="L1">
      <style:paragraph-properties fo:line-height="115%"/>
      <style:text-properties officeooo:rsid="002f31d9" officeooo:paragraph-rsid="002f31d9"/>
    </style:style>
    <style:style style:name="P10" style:family="paragraph" style:parent-style-name="Standard">
      <style:paragraph-properties fo:line-height="115%"/>
      <style:text-properties officeooo:rsid="002f31d9" officeooo:paragraph-rsid="002f31d9"/>
    </style:style>
    <style:style style:name="P11" style:family="paragraph" style:parent-style-name="Standard" style:list-style-name="L1">
      <style:paragraph-properties fo:line-height="115%"/>
      <style:text-properties officeooo:rsid="001fad5b" officeooo:paragraph-rsid="0036b2fa"/>
    </style:style>
    <style:style style:name="P12" style:family="paragraph" style:parent-style-name="Standard" style:list-style-name="L1">
      <style:paragraph-properties fo:line-height="115%"/>
      <style:text-properties officeooo:rsid="003248b6" officeooo:paragraph-rsid="003248b6"/>
    </style:style>
    <style:style style:name="P13" style:family="paragraph" style:parent-style-name="Standard" style:list-style-name="L1">
      <style:paragraph-properties fo:line-height="115%"/>
      <style:text-properties officeooo:rsid="0020e274" officeooo:paragraph-rsid="00374f7b"/>
    </style:style>
    <style:style style:name="P14" style:family="paragraph" style:parent-style-name="Standard" style:list-style-name="L2">
      <style:paragraph-properties fo:line-height="115%"/>
      <style:text-properties officeooo:rsid="00219d9d" officeooo:paragraph-rsid="00219d9d"/>
    </style:style>
    <style:style style:name="P15" style:family="paragraph" style:parent-style-name="Standard" style:list-style-name="L2">
      <style:paragraph-properties fo:line-height="115%"/>
      <style:text-properties officeooo:rsid="00219d9d" officeooo:paragraph-rsid="001e2e18"/>
    </style:style>
    <style:style style:name="P16" style:family="paragraph" style:parent-style-name="Standard" style:list-style-name="L1">
      <style:paragraph-properties fo:line-height="115%"/>
      <style:text-properties officeooo:rsid="00219d9d" officeooo:paragraph-rsid="00374f7b"/>
    </style:style>
    <style:style style:name="P17" style:family="paragraph" style:parent-style-name="Standard" style:list-style-name="L2">
      <style:paragraph-properties fo:line-height="115%"/>
      <style:text-properties officeooo:rsid="0022ae5f" officeooo:paragraph-rsid="0022ae5f"/>
    </style:style>
    <style:style style:name="P18" style:family="paragraph" style:parent-style-name="Standard" style:list-style-name="L1">
      <style:paragraph-properties fo:line-height="115%"/>
      <style:text-properties officeooo:rsid="00374f7b" officeooo:paragraph-rsid="00374f7b"/>
    </style:style>
    <style:style style:name="P19" style:family="paragraph" style:parent-style-name="Standard" style:list-style-name="L1">
      <style:paragraph-properties fo:line-height="115%"/>
      <style:text-properties officeooo:rsid="0037fe8d" officeooo:paragraph-rsid="0037fe8d"/>
    </style:style>
    <style:style style:name="P20" style:family="paragraph" style:parent-style-name="Standard" style:list-style-name="L1">
      <style:paragraph-properties fo:line-height="115%"/>
      <style:text-properties officeooo:rsid="0037fe8d" officeooo:paragraph-rsid="003ad6c7"/>
    </style:style>
    <style:style style:name="P21" style:family="paragraph" style:parent-style-name="Standard" style:list-style-name="L1">
      <style:paragraph-properties fo:line-height="115%"/>
      <style:text-properties officeooo:rsid="0038d0d9" officeooo:paragraph-rsid="0038d0d9"/>
    </style:style>
    <style:style style:name="P22" style:family="paragraph" style:parent-style-name="Standard" style:list-style-name="L1">
      <style:paragraph-properties fo:line-height="115%"/>
      <style:text-properties officeooo:rsid="003a8ce6" officeooo:paragraph-rsid="003a8ce6"/>
    </style:style>
    <style:style style:name="P23" style:family="paragraph" style:parent-style-name="Standard" style:list-style-name="L1">
      <style:paragraph-properties fo:line-height="115%"/>
      <style:text-properties officeooo:rsid="003f862d" officeooo:paragraph-rsid="003f862d"/>
    </style:style>
    <style:style style:name="P24" style:family="paragraph" style:parent-style-name="Standard" style:list-style-name="L1">
      <style:paragraph-properties fo:line-height="115%"/>
      <style:text-properties officeooo:rsid="0040d7dd" officeooo:paragraph-rsid="0040d7dd"/>
    </style:style>
    <style:style style:name="P25" style:family="paragraph" style:parent-style-name="Standard" style:list-style-name="L1">
      <style:paragraph-properties fo:line-height="115%"/>
      <style:text-properties officeooo:rsid="0040ff2d" officeooo:paragraph-rsid="0040ff2d"/>
    </style:style>
    <style:style style:name="P26" style:family="paragraph" style:parent-style-name="Standard" style:list-style-name="L1">
      <style:paragraph-properties fo:line-height="115%"/>
      <style:text-properties officeooo:rsid="0042e539" officeooo:paragraph-rsid="0042e539"/>
    </style:style>
    <style:style style:name="P27" style:family="paragraph" style:parent-style-name="Standard" style:list-style-name="L1">
      <style:paragraph-properties fo:line-height="115%"/>
      <style:text-properties officeooo:rsid="00463738" officeooo:paragraph-rsid="00463738"/>
    </style:style>
    <style:style style:name="P28" style:family="paragraph" style:parent-style-name="Standard" style:list-style-name="L1">
      <style:paragraph-properties fo:line-height="115%"/>
      <style:text-properties officeooo:rsid="00465616" officeooo:paragraph-rsid="00465616"/>
    </style:style>
    <style:style style:name="T1" style:family="text">
      <style:text-properties officeooo:rsid="0020c7d1"/>
    </style:style>
    <style:style style:name="T2" style:family="text">
      <style:text-properties officeooo:rsid="00245345"/>
    </style:style>
    <style:style style:name="T3" style:family="text">
      <style:text-properties officeooo:rsid="0035af97"/>
    </style:style>
    <style:style style:name="T4" style:family="text">
      <style:text-properties officeooo:rsid="00374f7b"/>
    </style:style>
    <style:style style:name="T5" style:family="text">
      <style:text-properties officeooo:rsid="0037fe8d"/>
    </style:style>
    <style:style style:name="T6" style:family="text">
      <style:text-properties officeooo:rsid="003a8ce6"/>
    </style:style>
    <style:style style:name="T7" style:family="text">
      <style:text-properties officeooo:rsid="003ad6c7"/>
    </style:style>
    <style:style style:name="T8" style:family="text">
      <style:text-properties officeooo:rsid="003c7d67"/>
    </style:style>
    <style:style style:name="T9" style:family="text">
      <style:text-properties officeooo:rsid="003e0b98"/>
    </style:style>
    <style:style style:name="T10" style:family="text">
      <style:text-properties officeooo:rsid="0040ff2d"/>
    </style:style>
    <style:style style:name="T11" style:family="text">
      <style:text-properties officeooo:rsid="0044640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ainstorming:</text:p>
      <text:p text:style-name="P1"/>
      <text:list xml:id="list1728032983" text:style-name="L1">
        <text:list-item>
          <text:p text:style-name="P5">L’univers :</text:p>
          <text:p text:style-name="P5"/>
          <text:list>
            <text:list-item>
              <text:p text:style-name="P6">Monde médiéval fantaisie.</text:p>
            </text:list-item>
            <text:list-item>
              <text:p text:style-name="P6">Plusieurs dieux représentant différents fétiches.</text:p>
            </text:list-item>
            <text:list-item>
              <text:p text:style-name="P6">Les dieux sont entrés en guerre il y a très longtemps contre un autre dieu, causant son bannissement dans le Grotto qui lui sert de prison.</text:p>
            </text:list-item>
            <text:list-item>
              <text:p text:style-name="P6">Le Grotto est peuplé de nombreuses créatures, certaines natives au donjon et d’autres venant de la surface.</text:p>
              <text:list>
                <text:list-item>
                  <text:p text:style-name="P7">Certaines de <text:span text:style-name="T3">c</text:span>es créatures sont des émissaires de leurs dieux respectifs, gardant des chambres fortes contenant des objets précieux.</text:p>
                </text:list-item>
              </text:list>
            </text:list-item>
            <text:list-item>
              <text:p text:style-name="P8">Le perso ppal n’est intéressé que par baiser les habitants du Grotto.</text:p>
            </text:list-item>
          </text:list>
        </text:list-item>
      </text:list>
      <text:p text:style-name="P4"/>
      <text:p text:style-name="P4"/>
      <text:list xml:id="list205223627256196" text:continue-numbering="true" text:style-name="L1">
        <text:list-item>
          <text:p text:style-name="P9">Gameplay principal : </text:p>
          <text:list>
            <text:list-item>
              <text:p text:style-name="P20">Roguelike dungeon crawler <text:span text:style-name="T7">avec mort permanente causant la suppression du fichier de sauvegarde </text:span><text:span text:style-name="T8">en cas d’échec</text:span><text:span text:style-name="T7">.</text:span></text:p>
            </text:list-item>
            <text:list-item>
              <text:p text:style-name="P20"><text:span text:style-name="T7">M</text:span>ouvement de case en base dans 8 directions sur une grille.</text:p>
            </text:list-item>
            <text:list-item>
              <text:p text:style-name="P19">Le but est d’arriver au dernier niveau et de battre le boss.</text:p>
            </text:list-item>
            <text:list-item>
              <text:p text:style-name="P19">Chaque niveau est généré procéduralement. </text:p>
            </text:list-item>
            <text:list-item>
              <text:p text:style-name="P21">Système d’objets et d’inventaire : Consommables, équipement et objets-clés.</text:p>
            </text:list-item>
            <text:list-item>
              <text:p text:style-name="P22">Système de magie : Le joueur peut utiliser des sorts pendant et hors combat.</text:p>
            </text:list-item>
            <text:list-item>
              <text:p text:style-name="P26">Les ennemis ont des traits affectant leur efficacité au combat : Certains peuvent être aveugles ou sourds, d’autres ont des capacités naturelles ou magiques, etc...</text:p>
              <text:list>
                <text:list-header>
                  <text:p text:style-name="P16"/>
                </text:list-header>
              </text:list>
            </text:list-item>
          </text:list>
        </text:list-item>
        <text:list-item>
          <text:p text:style-name="P18">Combat : </text:p>
          <text:list>
            <text:list-item>
              <text:p text:style-name="P13"><text:span text:style-name="T4">I</text:span>nspiré de Lilith’s Throne, <text:span text:style-name="T10">DCSS</text:span> et CoC : <text:span text:style-name="T6">Combat tour par tour, le joueur peut utiliser des objets et sorts et changer d’arme pendant un combat.</text:span></text:p>
            </text:list-item>
            <text:list-item>
              <text:p text:style-name="P25">Le joueur et les monstres possèdent des aptitudes déterminant leur efficacité à manier armes et armures, et à utiliser leurs capacités, similaire à DCSS. Battre des ennemis permet au joueur d’augmenter ses compétences dans les talents concernés.</text:p>
            </text:list-item>
            <text:list-item>
              <text:p text:style-name="P22">Les combats se déroulent dans le même niveau que le jeu ppal (pas d’écran à part).</text:p>
            </text:list-item>
            <text:list-item>
              <text:p text:style-name="P22">Le joueur a une <text:span text:style-name="T7">jauge</text:span> de points de vie et une <text:span text:style-name="T7">jauge de libido. Si ses PV tombent à zéro, </text:span><text:span text:style-name="T9">il perd la partie. La jauge de libido peut être utilisée pour certains sorts. Si la jauge est remplie à 100% le perso du joueur est forcé de se masturber pendant plusieurs tours, l’empêchant de se défendre des attaques des monstres. </text:span><text:soft-page-break/><text:span text:style-name="T9">Ces derniers peuvent alors l’attaquer ou le violer.</text:span></text:p>
              <text:p text:style-name="P13"/>
            </text:list-item>
          </text:list>
        </text:list-item>
        <text:list-item>
          <text:p text:style-name="P9">Le sexe : </text:p>
          <text:list>
            <text:list-item>
              <text:p text:style-name="P23">Le joueur peut baiser les créatures qu’il bat au combat. S’ensuit une scène dessinée du rapport sexuel, dont le contenu peut dépendre du gagnant, du perdant et des objets que le joueur possède, avant que le monstre ne soit retiré de la carte.</text:p>
            </text:list-item>
            <text:list-item>
              <text:p text:style-name="P24">Chaque monstre possède lui aussi une jauge de libido, que le joueur peut remplir par des sorts ou d’autres capacités destinées à exciter l’adversaire. Quand leur jauge est remplit, les créatures sont forcées de se masturber comme pour le joueur, lui permettant de les attaquer impunément pendant quelques tours.</text:p>
            </text:list-item>
            <text:list-item>
              <text:p text:style-name="P24">Cette jauge réduit aussi leur chance de refuser les avances du joueur, lui permettant de coucher avec les monstres sans avoir à les battre. S’il réussit, il a une chance de recruter ce monstre comme allié jusqu’à sa mort. <text:span text:style-name="T11">Cette chance augmente avec la libido du joueur, ce qui donne une aspect risque-récompense à la chose, où le joueur peut risquer d’être paralysé par une libido trop forte en échange de gagner un allié.</text:span></text:p>
            </text:list-item>
            <text:list-item>
              <text:p text:style-name="P24">Une scène de sexe dure plusieurs tours en jeu. Le joueur doit donc s’assurer que les alentours soient sûrs avant de baiser un ennemi.</text:p>
            </text:list-item>
          </text:list>
        </text:list-item>
      </text:list>
      <text:p text:style-name="P3"/>
      <text:p text:style-name="P3"/>
      <text:list xml:id="list205224366345345" text:continue-numbering="true" text:style-name="L1">
        <text:list-item>
          <text:p text:style-name="P9">Les dieux : </text:p>
          <text:p text:style-name="P9"/>
          <text:list>
            <text:list-item>
              <text:p text:style-name="P11">Système de dieux inspiré de celui de DCSS.</text:p>
            </text:list-item>
            <text:list-item>
              <text:p text:style-name="P11">Les descriptions des dons des dieux seront explicites pour faciliter leur compréhension.</text:p>
            </text:list-item>
            <text:list-item>
              <text:p text:style-name="P11">Les dieux seront représentées par des personnalités célèbres ra<text:span text:style-name="T1">t</text:span>tachées à leur fétiche particulier (Sade pour le sadisme, un allemand scato, etc.)</text:p>
              <text:p text:style-name="P11"/>
            </text:list-item>
          </text:list>
        </text:list-item>
        <text:list-item>
          <text:p text:style-name="P12">La magie :</text:p>
          <text:list>
            <text:list-item>
              <text:p text:style-name="P27">Utilise la jauge de libido pour lancer des sorts. Certains sorts peuvent augmenter ou diminuer cette jauge pour fonctionner. Certains sorts peuvent utiliser des PVs ou d’autres formes d’énergie.</text:p>
            </text:list-item>
            <text:list-item>
              <text:p text:style-name="P28">Les sorts ont une chance d’échec, dépendant de l’expérience du joueur dans l’école liée à ce sort. Échouer un sort peut avoir des effets négatifs dépendant du sort.</text:p>
            </text:list-item>
          </text:list>
        </text:list-item>
      </text:list>
      <text:p text:style-name="P2"/>
      <text:list xml:id="list591779927" text:style-name="L2">
        <text:list-item>
          <text:list>
            <text:list-item>
              <text:list>
                <text:list-header>
                  <text:p text:style-name="P15"/>
                  <text:p text:style-name="P14"/>
                </text:list-header>
              </text:list>
            </text:list-item>
          </text:list>
        </text:list-item>
        <text:list-item>
          <text:p text:style-name="P17">Le sexe : </text:p>
          <text:list>
            <text:list-item>
              <text:p text:style-name="P17"><text:soft-page-break/>Le joueur peut violer les ennemis qu’il a battu en combat, ou les inviter à baiser s’ils sont encore en vie <text:span text:style-name="T5">(l’ennemi a une jauge d’attirance que le joueur doit remplir pour le convaincre de baiser)</text:span>. Cela prend plusieurs tours et permet au joueur de baisser sa jauge de plaisir tout en ayant une chance d’engrosser l’ennemi, de l’inciter à joindre son équipe, ou les deux.</text:p>
            </text:list-item>
            <text:list-item>
              <text:p text:style-name="P17">Le joueur a une chance d’engrosser ses ennemis après les avoir baisé, ce qui lui permet d’ajouter des unités de combat à son équipe après plusieurs tours, si la mère est encore en vie. Si le joueur incarne une femme, <text:span text:style-name="T2">il pourra lui aussi porter un enfant (mais pourra toujours engrosser les ennemis comme si c’était un homme)</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4H20M25S</meta:editing-duration>
    <meta:editing-cycles>42</meta:editing-cycles>
    <meta:generator>LibreOffice/7.3.3.2$Windows_X86_64 LibreOffice_project/d1d0ea68f081ee2800a922cac8f79445e4603348</meta:generator>
    <meta:creation-date>2023-09-12T20:45:05.672000000</meta:creation-date>
    <dc:date>2023-11-29T20:52:22.491000000</dc:date>
    <meta:document-statistic meta:table-count="0" meta:image-count="0" meta:object-count="0" meta:page-count="3" meta:paragraph-count="43" meta:word-count="796" meta:character-count="4529" meta:non-whitespace-character-count="3805"/>
  </office:meta>
</office:document-meta>
</file>