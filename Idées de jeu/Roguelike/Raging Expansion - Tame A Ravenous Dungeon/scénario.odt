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26da9d" officeooo:paragraph-rsid="0026da9d"/>
    </style:style>
    <style:style style:name="P2" style:family="paragraph" style:parent-style-name="Standard">
      <style:paragraph-properties fo:line-height="115%"/>
      <style:text-properties officeooo:rsid="0026da9d" officeooo:paragraph-rsid="002715c4"/>
    </style:style>
    <style:style style:name="P3" style:family="paragraph" style:parent-style-name="Standard">
      <style:paragraph-properties fo:line-height="115%"/>
      <style:text-properties officeooo:rsid="0026da9d" officeooo:paragraph-rsid="0027e876"/>
    </style:style>
    <style:style style:name="P4" style:family="paragraph" style:parent-style-name="Standard">
      <style:paragraph-properties fo:line-height="115%"/>
      <style:text-properties officeooo:rsid="0027e876" officeooo:paragraph-rsid="0027e876"/>
    </style:style>
    <style:style style:name="P5" style:family="paragraph" style:parent-style-name="Standard" style:list-style-name="L1">
      <style:paragraph-properties fo:line-height="115%"/>
      <style:text-properties officeooo:rsid="0022a686" officeooo:paragraph-rsid="0027e876"/>
    </style:style>
    <style:style style:name="P6" style:family="paragraph" style:parent-style-name="Standard">
      <style:paragraph-properties fo:line-height="115%"/>
      <style:text-properties officeooo:rsid="0026da9d" officeooo:paragraph-rsid="0028d035"/>
    </style:style>
    <style:style style:name="P7" style:family="paragraph" style:parent-style-name="Standard">
      <style:paragraph-properties fo:line-height="115%"/>
      <style:text-properties officeooo:rsid="00255c1a" officeooo:paragraph-rsid="002c58d4"/>
    </style:style>
    <style:style style:name="T1" style:family="text">
      <style:text-properties officeooo:rsid="00230add"/>
    </style:style>
    <style:style style:name="T2" style:family="text">
      <style:text-properties officeooo:rsid="0024d97d"/>
    </style:style>
    <style:style style:name="T3" style:family="text">
      <style:text-properties officeooo:rsid="0022246d"/>
    </style:style>
    <style:style style:name="T4" style:family="text">
      <style:text-properties officeooo:rsid="0022a686"/>
    </style:style>
    <style:style style:name="T5" style:family="text">
      <style:text-properties officeooo:rsid="002715c4"/>
    </style:style>
    <style:style style:name="T6" style:family="text">
      <style:text-properties officeooo:rsid="0027fd01"/>
    </style:style>
    <style:style style:name="T7" style:family="text">
      <style:text-properties officeooo:rsid="0028d035"/>
    </style:style>
    <style:style style:name="T8" style:family="text">
      <style:text-properties officeooo:rsid="002c58d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énario : </text:p>
      <text:p text:style-name="P1"/>
      <text:p text:style-name="P6"><text:tab/><text:span text:style-name="T3">Il y a plusieurs années, un distorsion spatiale est apparue, causant l’apparition d’un Grotto, un </text:span><text:span text:style-name="T6">donjon à la structure en constant changement</text:span><text:span text:style-name="T3"> abritant des monstres effrayants. Bon nombre de héros et </text:span><text:span text:style-name="T6">bataillons</text:span><text:span text:style-name="T3"> ont été envoyées les éliminer, mais </text:span><text:span text:style-name="T6">nul n’a jamais atteint le fond de la grotte, et</text:span><text:span text:style-name="T3"> </text:span><text:span text:style-name="T5">peu sont</text:span><text:span text:style-name="T3"> revenu</text:span><text:span text:style-name="T5">s</text:span><text:span text:style-name="T3"> en vie </text:span><text:span text:style-name="T5">pour en conter les horreurs y vivant</text:span><text:span text:style-name="T3">. Cependant, </text:span><text:span text:style-name="T7">ces dernières semblant peu désireuses de s’aventurer à la surface, les années passèrent sans que le Grotto ne manifeste le moindre danger pour les habitants de la surface, et les expéditions finirent par cessé.</text:span></text:p>
      <text:p text:style-name="P6"/>
      <text:p text:style-name="P6"><text:span text:style-name="T7"><text:tab/>Aujourd’hui, l’endroit est devenu source de bon nombre de légendes et canulars, encourageant</text:span><text:span text:style-name="T3"> </text:span><text:span text:style-name="T7">moult</text:span><text:span text:style-name="T3"> aventuriers </text:span><text:span text:style-name="T7">à tenter leur chance à braver les dangers encore bien réels du Grotto,</text:span><text:span text:style-name="T3"> cherchant gloire et richesse dans les profondeurs du donjon ; </text:span><text:span text:style-name="T7">et</text:span><text:span text:style-name="T3"> commerçants cherchant à démarrer une nouvelle entreprise avec les autochtones. </text:span><text:span text:style-name="T2">Certains érudits débattent sur l’origine de ce Grotto et spéculent l’intervention des dieux, ou un conflit avec un dieu mineur dont les effets secondaires auraient déformé l’espace autour de l’entrée du donjon.</text:span></text:p>
      <text:p text:style-name="P2"/>
      <text:p text:style-name="P2"><text:span text:style-name="T4"><text:tab/>Mais le protagoniste, lui, n’est pas intéressé par tout cela : Ce qu’il désire, c’est forniquer avec toutes les créatures qu’il trouvera dans le Grotto, humanoïdes ou non, après avoir entendu des histoires de rares survivants ayant dépeint les êtres du donjon comme des êtres dangereux, mais libidineux et très variés en termes d’apparence et capacités sexuelles. </text:span><text:span text:style-name="T1">Atteindre le fond du Grotto et découvrir ses secrets n’est qu’un plus pour lui.</text:span></text:p>
      <text:p text:style-name="P2"/>
      <text:p text:style-name="P4">Explications : </text:p>
      <text:p text:style-name="P4"/>
      <text:p text:style-name="P2"><text:tab/>Les prémices des événements du jeu se veulent simples et servent juste d’excuse pour permettre au joueur de passer directement à l’action sans le bombarder d’exposition au préalable ; cependant, le jeu contient de nombreux éléments de lore pour expliquer la raison de l’existence du Grotto et les événements qui ont conduit à son apparition ; ainsi que de nombreux éléments laissés par d’autres personnages ayant arpenté le Grotto avant le joueur, détaillant leurs découvertes et leurs morts.</text:p>
      <text:list xml:id="list2645228021" text:style-name="L1">
        <text:list-header>
          <text:p text:style-name="P5"><text:s/></text:p>
        </text:list-header>
      </text:list>
      <text:p text:style-name="P7"><text:tab/>Au fur et à mesure de sa descente, le joueur en apprendra plus sur l’histoire du Grotto, notamment son origine, découvrant qu’il s’agissait d’une prison pour contenir un dieu banni ayant tenté de dominer ses semblables et contrôler le monde. <text:span text:style-name="T8">La plupart des monstres natifs au Grotto que le joueurs rencontrera sont des gardiens de cette prison, attaquant tout intrus cherchant à s’approcher de son sanctuaire, ce qui explique pourquoi aucun ne cherche à atteindre la surface. </text:span>Le joueur peut <text:span text:style-name="T8">aussi </text:span>y retrouver <text:span text:style-name="T8">les</text:span> membres <text:soft-page-break/><text:span text:style-name="T8">restés fidèles à ce dieu </text:span>dans l’antre de l’Église de la Perdition, <text:span text:style-name="T8">un culte banni de la surface et enfermé dans le Grotto pour avoir aidé ce dieu dans sa quête de domination.</text:span></text:p>
      <text:p text:style-name="P3"><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48M5S</meta:editing-duration>
    <meta:editing-cycles>17</meta:editing-cycles>
    <meta:generator>LibreOffice/7.3.3.2$Windows_X86_64 LibreOffice_project/d1d0ea68f081ee2800a922cac8f79445e4603348</meta:generator>
    <meta:creation-date>2023-07-27T20:30:06.034000000</meta:creation-date>
    <dc:date>2023-12-02T16:53:44.472000000</dc:date>
    <meta:document-statistic meta:table-count="0" meta:image-count="0" meta:object-count="0" meta:page-count="2" meta:paragraph-count="9" meta:word-count="448" meta:character-count="2778" meta:non-whitespace-character-count="2329"/>
  </office:meta>
</office:document-meta>
</file>