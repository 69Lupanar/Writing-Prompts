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b78ee" officeooo:paragraph-rsid="001b78ee"/>
    </style:style>
    <style:style style:name="P2" style:family="paragraph" style:parent-style-name="Standard">
      <style:paragraph-properties fo:line-height="115%"/>
      <style:text-properties officeooo:rsid="0022246d" officeooo:paragraph-rsid="0022246d"/>
    </style:style>
    <style:style style:name="P3" style:family="paragraph" style:parent-style-name="Standard">
      <style:paragraph-properties fo:line-height="115%"/>
      <style:text-properties officeooo:rsid="00258d06" officeooo:paragraph-rsid="00258d06"/>
    </style:style>
    <style:style style:name="P4" style:family="paragraph" style:parent-style-name="Standard">
      <style:paragraph-properties fo:line-height="115%"/>
      <style:text-properties officeooo:rsid="002e92ad" officeooo:paragraph-rsid="00289089"/>
    </style:style>
    <style:style style:name="P5" style:family="paragraph" style:parent-style-name="Standard">
      <style:paragraph-properties fo:line-height="115%"/>
      <style:text-properties officeooo:rsid="001fad5b" officeooo:paragraph-rsid="00289089"/>
    </style:style>
    <style:style style:name="P6" style:family="paragraph" style:parent-style-name="Standard" style:list-style-name="L1">
      <style:paragraph-properties fo:line-height="115%"/>
      <style:text-properties officeooo:rsid="001b78ee" officeooo:paragraph-rsid="001b78ee"/>
    </style:style>
    <style:style style:name="P7" style:family="paragraph" style:parent-style-name="Standard" style:list-style-name="L1">
      <style:paragraph-properties fo:line-height="115%"/>
      <style:text-properties officeooo:rsid="001eae93" officeooo:paragraph-rsid="001eae93"/>
    </style:style>
    <style:style style:name="P8" style:family="paragraph" style:parent-style-name="Standard" style:list-style-name="L1">
      <style:paragraph-properties fo:line-height="115%"/>
      <style:text-properties officeooo:rsid="00258d06" officeooo:paragraph-rsid="00258d06"/>
    </style:style>
    <style:style style:name="P9" style:family="paragraph" style:parent-style-name="Standard" style:list-style-name="L2">
      <style:paragraph-properties fo:line-height="115%"/>
      <style:text-properties officeooo:rsid="0020e274" officeooo:paragraph-rsid="00289089"/>
    </style:style>
    <style:style style:name="P10" style:family="paragraph" style:parent-style-name="Standard" style:list-style-name="L2">
      <style:paragraph-properties fo:line-height="115%"/>
      <style:text-properties officeooo:rsid="001dd3d4" officeooo:paragraph-rsid="00289089"/>
    </style:style>
    <style:style style:name="P11" style:family="paragraph" style:parent-style-name="Standard" style:list-style-name="L2">
      <style:paragraph-properties fo:line-height="115%"/>
      <style:text-properties officeooo:paragraph-rsid="00289089"/>
    </style:style>
    <style:style style:name="P12" style:family="paragraph" style:parent-style-name="Standard" style:list-style-name="L2">
      <style:paragraph-properties fo:line-height="115%"/>
      <style:text-properties officeooo:rsid="001e2e18" officeooo:paragraph-rsid="00289089"/>
    </style:style>
    <style:style style:name="P13" style:family="paragraph" style:parent-style-name="Standard" style:list-style-name="L2">
      <style:paragraph-properties fo:line-height="115%"/>
      <style:text-properties officeooo:rsid="0020894d" officeooo:paragraph-rsid="00289089"/>
    </style:style>
    <style:style style:name="P14" style:family="paragraph" style:parent-style-name="Standard" style:list-style-name="L2">
      <style:paragraph-properties fo:line-height="115%"/>
      <style:text-properties officeooo:rsid="002e92ad" officeooo:paragraph-rsid="00289089"/>
    </style:style>
    <style:style style:name="P15" style:family="paragraph" style:parent-style-name="Standard" style:list-style-name="L2">
      <style:paragraph-properties fo:line-height="115%"/>
      <style:text-properties officeooo:rsid="002a0d94" officeooo:paragraph-rsid="002a0d94"/>
    </style:style>
    <style:style style:name="P16" style:family="paragraph" style:parent-style-name="Standard" style:list-style-name="L3">
      <style:paragraph-properties fo:line-height="115%"/>
      <style:text-properties officeooo:rsid="0022246d" officeooo:paragraph-rsid="0022246d"/>
    </style:style>
    <style:style style:name="P17" style:family="paragraph" style:parent-style-name="Standard" style:list-style-name="L3">
      <style:paragraph-properties fo:line-height="115%"/>
      <style:text-properties officeooo:rsid="0022a686" officeooo:paragraph-rsid="0022a686"/>
    </style:style>
    <style:style style:name="P18" style:family="paragraph" style:parent-style-name="Standard" style:list-style-name="L3">
      <style:paragraph-properties fo:line-height="115%"/>
      <style:text-properties officeooo:rsid="00255c1a" officeooo:paragraph-rsid="00255c1a"/>
    </style:style>
    <style:style style:name="T1" style:family="text">
      <style:text-properties officeooo:rsid="001d70fe"/>
    </style:style>
    <style:style style:name="T2" style:family="text">
      <style:text-properties officeooo:rsid="00230add"/>
    </style:style>
    <style:style style:name="T3" style:family="text">
      <style:text-properties officeooo:rsid="0024d97d"/>
    </style:style>
    <style:style style:name="T4" style:family="text">
      <style:text-properties officeooo:rsid="0026c0d0"/>
    </style:style>
    <style:style style:name="T5" style:family="text">
      <style:text-properties officeooo:rsid="00289089"/>
    </style:style>
    <style:style style:name="T6" style:family="text">
      <style:text-properties officeooo:rsid="002a387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text:span text:style-name="T1">gameplay</text:span> :</text:p>
      <text:p text:style-name="P1"/>
      <text:list xml:id="list182852676" text:style-name="L1">
        <text:list-item>
          <text:p text:style-name="P6"><text:span text:style-name="T1">Gameplay inspiré de </text:span><text:span text:style-name="T6">Pokemon donjon mystère,</text:span><text:span text:style-name="T1"> Dungeon Craw</text:span><text:span text:style-name="T5">l</text:span><text:span text:style-name="T1"> Stone Soup et Rogue, mais sans la difficulté abusée de ces jeux.</text:span> </text:p>
          <text:p text:style-name="P6"/>
        </text:list-item>
        <text:list-item>
          <text:p text:style-name="P6">Un roguelike classique où le joueur peut prier à des dieux pour obtenir leurs pouvoirs, mais les dieux sont remplacés par des personnalités célèbres pour leur fétiche associé (ex: Sade pour le sadisme, dieu de la zoophilie, dieu des pieds, etc.) Certains ennemis seraient plus sensibles à certains fétiches que d’autres.</text:p>
          <text:p text:style-name="P6"><text:s/></text:p>
        </text:list-item>
        <text:list-item>
          <text:p text:style-name="P7">Il est possible de recruter des ennemis après les avoir porté à l’orgasme, et de concevoir des enfants qui serviront d’unités de combat alliés.</text:p>
          <text:p text:style-name="P7"><text:s/></text:p>
        </text:list-item>
        <text:list-item>
          <text:p text:style-name="P8">Le jeu pourrait être en temps réel à la Zelda 1, où <text:span text:style-name="T4">le joueur et les ennemis peuvent mener leurs actions n’importe quand.</text:span></text:p>
        </text:list-item>
      </text:list>
      <text:p text:style-name="P3"/>
      <text:p text:style-name="P3"/>
      <text:p text:style-name="P5">Inspirations :</text:p>
      <text:list xml:id="list135368939" text:style-name="L2">
        <text:list-header>
          <text:p text:style-name="P9"/>
        </text:list-header>
        <text:list-item>
          <text:p text:style-name="P10">Gameplay similaire à Dungeon Crawl Stone Soup, Rogue Fable 3 et l’original Rogue, mais sans les choix de game design qui rendent ces jeux frustrants :</text:p>
          <text:p text:style-name="P11"/>
          <text:list>
            <text:list-item>
              <text:p text:style-name="P10">La chance doit moins influencer le cours d’une partie, et doit moins jouer en défaveur du joueur :</text:p>
              <text:list>
                <text:list-item>
                  <text:p text:style-name="P10"><text:s/>Les événements aléatoires doivent être équilibrés entre positifs et négatifs, et les négatifs doivent être moins punitifs et ne jamais mener à une partie perdue d’avance. </text:p>
                </text:list-item>
                <text:list-item>
                  <text:p text:style-name="P10">Il faut inciter autant que possible le joueur à expérimenter avec des objets imprévisibles, comme les potions de mutation de DCSS.</text:p>
                </text:list-item>
                <text:list-item>
                  <text:p text:style-name="P12">Ne jamais générer des ennemis autour des escaliers; le joueur sera forcé de les ramener avec lui à l’étage et se prendra des coups gratuits s’il le fait.</text:p>
                </text:list-item>
                <text:list-item>
                  <text:p text:style-name="P12">Pas de mécaniques qui entravent complètement le joueur et l’empêchent de réaliser la moindre action tout en lui infligeant des malus (ex: Paralysie de Grinder dans DCSS)</text:p>
                </text:list-item>
                <text:list-item>
                  <text:p text:style-name="P13">Pas de zone sans porte avec des monstres trop forts à l’intérieur; les zones à risque seront clairement délimitées par des portes verrouillées ou des éléments de décor qui indiquent au joueur que des ennemis dangereux sont dans les environs.</text:p>
                </text:list-item>
              </text:list>
            </text:list-item>
            <text:list-item>
              <text:p text:style-name="P14">Le jeu doit encourager le joueur à utiliser différents styles de jeux au lieu de répéter les mêmes actions pour gagner :</text:p>
              <text:list>
                <text:list-item>
                  <text:p text:style-name="P14"><text:soft-page-break/>Dans DCSS, même si le jeu offre plusieurs personnages et vocations (guerrier, assassin, etc.), le jeu finit rapidement par tendre vers un build orienté mêlée et/ou esquive à longue distance, avec très peu de variations, et les ziggurats requièrent l’usage de magie pour avancer, ce qui va à l’encontre des builds axés mêlée et défense ; les assassins sont souvent relégués à des mages médiocres au lieu d’exploiter leur plein potentiel.</text:p>
                </text:list-item>
                <text:list-item>
                  <text:p text:style-name="P14">Le jeu devrait offrir des variantes de certains niveaux en fonction du choix du joueur; si le joueur est un guerrier, il préférera choisir des ennemis costauds mais avec peu de magie, tandis qu’un assassin ou un mage préféreront des ennemis faciles à tuer avec des défenses plus faibles, mais qui ont des capacités de mouvement et/ou de statut plus importantes.</text:p>
                </text:list-item>
              </text:list>
            </text:list-item>
            <text:list-item>
              <text:p text:style-name="P15">Quand possible, les mêmes règles doivent s’appliquer pour les joueurs et les monstres : </text:p>
              <text:list>
                <text:list-item>
                  <text:p text:style-name="P15">Dans DCSS, les résistances sont plus efficaces sur les monstres que le joueur, ce qui peut l’induire en erreur sur l’efficacité de ses attaques. Certaines mécaniques, comme les mutations, fonctionnent aussi différemment sur les ennemis.</text:p>
                </text:list-item>
              </text:list>
            </text:list-item>
          </text:list>
        </text:list-item>
      </text:list>
      <text:p text:style-name="P4"/>
      <text:p text:style-name="P4"/>
      <text:p text:style-name="P2">Idées de scénario : </text:p>
      <text:p text:style-name="P2"/>
      <text:list xml:id="list49199581" text:style-name="L3">
        <text:list-item>
          <text:p text:style-name="P16">Il y a plusieurs années, un distorsion spatiale est apparue, causant l’apparition d’un Grotto, une grotte en apparence sans fond abritant des monstres effrayants. Bon nombre de héros et armées ont été envoyées les éliminer, mais aucun n’est revenu en vie. Cependant, cela n’a pas découragé bon nombre d’aventuriers cherchant gloire et richesse dans les profondeurs du donjon, ni commerçants cherchant à démarrer une nouvelle entreprise avec les autochtones. <text:span text:style-name="T3">Certains érudits débattent sur l’origine de ce Grotto et spéculent l’intervention des dieux, ou un conflit avec un dieu mineur dont les effets secondaires auraient déformé l’espace autour de l’entrée du donjon.</text:span></text:p>
          <text:p text:style-name="P16"><text:s/></text:p>
        </text:list-item>
        <text:list-item>
          <text:p text:style-name="P17">Mais le protagoniste, lui, n’est pas intéressé par tout cela : Ce qu’il désire, c’est forniquer avec toutes les créatures qu’il trouvera dans le Grotto, humanoïdes ou non, après avoir entendu des histoires de rares survivants ayant dépeint les êtres du donjon comme des êtres dangereux, mais libidineux et très variés en termes d’apparence et capacités sexuelles. <text:span text:style-name="T2">Atteindre le fond du Grotto et découvrir ses secrets n’est qu’un plus pour lui.</text:span></text:p>
          <text:p text:style-name="P17"><text:s/></text:p>
        </text:list-item>
        <text:list-item>
          <text:p text:style-name="P18">Au fur et à mesure de sa descente, le joueur en apprendra plus sur l’histoire du Grotto, notamment son origine, découvrant qu’il s’agissait d’une prison pour <text:soft-page-break/>contenir un dieu banni ayant tenté de dominer ses semblables et contrôler le monde. Le joueur peut y retrouver ses membres dans l’antre de l’Église de la Perdition, ainsi que des membres des autres cultes agissant en tant que gardes de nombreux autels à son effigi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8M21S</meta:editing-duration>
    <meta:editing-cycles>16</meta:editing-cycles>
    <meta:generator>LibreOffice/7.3.3.2$Windows_X86_64 LibreOffice_project/d1d0ea68f081ee2800a922cac8f79445e4603348</meta:generator>
    <meta:creation-date>2023-07-27T20:30:06.034000000</meta:creation-date>
    <dc:date>2023-12-26T22:56:39.527000000</dc:date>
    <meta:document-statistic meta:table-count="0" meta:image-count="0" meta:object-count="0" meta:page-count="3" meta:paragraph-count="29" meta:word-count="787" meta:character-count="4679" meta:non-whitespace-character-count="3931"/>
  </office:meta>
</office:document-meta>
</file>