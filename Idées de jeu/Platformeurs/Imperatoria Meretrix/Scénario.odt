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T Serif" svg:font-family="'PT Serif',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cc0000" style:font-name="PT Serif" fo:font-size="10.3999996185303pt" fo:letter-spacing="normal" fo:font-style="normal" fo:font-weight="bold" officeooo:rsid="050fb6f5" officeooo:paragraph-rsid="050ca70e" style:font-size-asian="9pt" style:font-style-asian="italic" style:font-weight-asian="bold" style:font-size-complex="9pt" style:font-style-complex="italic" style:font-weight-complex="bold"/>
    </style:style>
    <style:style style:name="P2"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fo:font-weight="normal" officeooo:rsid="050ca70e" officeooo:paragraph-rsid="050ca70e" style:font-size-asian="9pt" style:font-style-asian="italic" style:font-weight-asian="bold" style:font-size-complex="9pt" style:font-style-complex="italic" style:font-weight-complex="bold"/>
    </style:style>
    <style:style style:name="P3"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fo:font-weight="normal" officeooo:rsid="0575f9da" officeooo:paragraph-rsid="0575f9da" style:font-size-asian="9pt" style:font-style-asian="italic" style:font-weight-asian="bold" style:font-size-complex="9pt" style:font-style-complex="italic" style:font-weight-complex="bold"/>
    </style:style>
    <style:style style:name="P4"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6e558e" officeooo:paragraph-rsid="051954c9" style:font-size-asian="9pt" style:font-style-asian="italic" style:font-weight-asian="bold" style:font-size-complex="9pt" style:font-style-complex="italic" style:font-weight-complex="bold"/>
    </style:style>
    <style:style style:name="P5"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770fbd" officeooo:paragraph-rsid="05770fbd" style:font-size-asian="9pt" style:font-style-asian="italic" style:font-weight-asian="bold" style:font-size-complex="9pt" style:font-style-complex="italic" style:font-weight-complex="bold"/>
    </style:style>
    <style:style style:name="P6"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7bd4ed" officeooo:paragraph-rsid="057bd4ed" style:font-size-asian="9pt" style:font-style-asian="italic" style:font-weight-asian="bold" style:font-size-complex="9pt" style:font-style-complex="italic" style:font-weight-complex="bold"/>
    </style:style>
    <style:style style:name="P7"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7bd4ed" officeooo:paragraph-rsid="057d1cdb" style:font-size-asian="9pt" style:font-style-asian="italic" style:font-weight-asian="bold" style:font-size-complex="9pt" style:font-style-complex="italic" style:font-weight-complex="bold"/>
    </style:style>
    <style:style style:name="P8"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7d660a" officeooo:paragraph-rsid="059c3107" style:font-size-asian="9pt" style:font-style-asian="italic" style:font-weight-asian="bold" style:font-size-complex="9pt" style:font-style-complex="italic" style:font-weight-complex="bold"/>
    </style:style>
    <style:style style:name="P9"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57d660a" officeooo:paragraph-rsid="059c940a" style:font-size-asian="9pt" style:font-style-asian="italic" style:font-weight-asian="bold" style:font-size-complex="9pt" style:font-style-complex="italic" style:font-weight-complex="bold"/>
    </style:style>
    <style:style style:name="P10"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officeooo:paragraph-rsid="057d1cdb"/>
    </style:style>
    <style:style style:name="P11" style:family="paragraph" style:parent-style-name="Standard">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000000" style:font-name="PT Serif" fo:font-size="10.3999996185303pt" fo:letter-spacing="normal" fo:font-style="normal" style:text-underline-style="none" fo:font-weight="normal" officeooo:rsid="008ff241" officeooo:paragraph-rsid="05770fbd" style:font-size-asian="9pt" style:font-style-asian="italic" style:font-weight-asian="bold" style:font-size-complex="9pt" style:font-style-complex="italic" style:font-weight-complex="bold"/>
    </style:style>
    <style:style style:name="P12" style:family="paragraph" style:parent-style-name="Standard">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5f3c82" style:font-name="PT Serif" fo:font-size="10.3999996185303pt" fo:letter-spacing="normal" fo:font-style="normal" style:text-underline-style="none" fo:font-weight="normal" officeooo:rsid="008ff241" officeooo:paragraph-rsid="05770fbd" style:font-size-asian="9pt" style:font-style-asian="italic" style:font-weight-asian="bold" style:font-size-complex="9pt" style:font-style-complex="italic" style:font-weight-complex="bold"/>
    </style:style>
    <style:style style:name="P13" style:family="paragraph" style:parent-style-name="Standard" style:list-style-name="L1">
      <style:text-properties fo:color="#5f3c82" officeooo:rsid="001d6ce4" officeooo:paragraph-rsid="05770fbd"/>
    </style:style>
    <style:style style:name="P14" style:family="paragraph" style:parent-style-name="Standard" style:list-style-name="L1">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5f3c82" style:font-name="PT Serif" fo:font-size="10.3999996185303pt" fo:letter-spacing="normal" fo:font-style="normal" style:text-underline-style="none" fo:font-weight="normal" officeooo:rsid="008ff241" officeooo:paragraph-rsid="05770fbd" style:font-size-asian="9pt" style:font-style-asian="italic" style:font-weight-asian="bold" style:font-size-complex="9pt" style:font-style-complex="italic" style:font-weight-complex="bold"/>
    </style:style>
    <style:style style:name="T1" style:family="text">
      <style:text-properties officeooo:rsid="051dd524"/>
    </style:style>
    <style:style style:name="T2" style:family="text">
      <style:text-properties officeooo:rsid="00900dbd"/>
    </style:style>
    <style:style style:name="T3" style:family="text">
      <style:text-properties officeooo:rsid="0093bdb3"/>
    </style:style>
    <style:style style:name="T4" style:family="text">
      <style:text-properties officeooo:rsid="0098379c"/>
    </style:style>
    <style:style style:name="T5" style:family="text">
      <style:text-properties officeooo:rsid="008def14"/>
    </style:style>
    <style:style style:name="T6" style:family="text">
      <style:text-properties officeooo:rsid="008cb7ef"/>
    </style:style>
    <style:style style:name="T7" style:family="text">
      <style:text-properties officeooo:rsid="0579a1d2"/>
    </style:style>
    <style:style style:name="T8" style:family="text">
      <style:text-properties officeooo:rsid="057d1cdb"/>
    </style:style>
    <style:style style:name="T9" style:family="text">
      <style:text-properties officeooo:rsid="057d660a"/>
    </style:style>
    <style:style style:name="T10" style:family="text">
      <style:text-properties officeooo:rsid="0582da37"/>
    </style:style>
    <style:style style:name="T11" style:family="text">
      <style:text-properties fo:color="#cc0000" fo:font-weight="bold"/>
    </style:style>
    <style:style style:name="T12" style:family="text">
      <style:text-properties fo:color="#cc0000" fo:font-weight="bold" officeooo:rsid="057d660a"/>
    </style:style>
    <style:style style:name="T13" style:family="text">
      <style:text-properties fo:color="#cc0000" fo:font-weight="bold" officeooo:rsid="059c940a"/>
    </style:style>
    <style:style style:name="T14" style:family="text">
      <style:text-properties fo:font-weight="bold"/>
    </style:style>
    <style:style style:name="T15" style:family="text">
      <style:text-properties fo:font-weight="bold" officeooo:rsid="057d1cdb"/>
    </style:style>
    <style:style style:name="T16" style:family="text">
      <style:text-properties fo:font-weight="bold" officeooo:rsid="059c940a"/>
    </style:style>
    <style:style style:name="T17" style:family="text">
      <style:text-properties officeooo:rsid="0587a8eb"/>
    </style:style>
    <style:style style:name="T18" style:family="text">
      <style:text-properties fo:font-variant="normal" fo:text-transform="none" fo:color="#cc0000" style:font-name="PT Serif" fo:font-size="10.3999996185303pt" fo:letter-spacing="normal" fo:font-style="normal" style:text-underline-style="none" fo:font-weight="bold" officeooo:rsid="057d660a" style:font-size-asian="9pt" style:font-style-asian="italic" style:font-weight-asian="bold" style:font-size-complex="9pt" style:font-style-complex="italic" style:font-weight-complex="bold"/>
    </style:style>
    <style:style style:name="T19" style:family="text">
      <style:text-properties fo:font-variant="normal" fo:text-transform="none" fo:color="#000000" style:font-name="PT Serif" fo:font-size="10.3999996185303pt" fo:letter-spacing="normal" fo:font-style="normal" style:text-underline-style="none" fo:font-weight="normal" officeooo:rsid="057d660a" style:font-size-asian="9pt" style:font-style-asian="italic" style:font-weight-asian="bold" style:font-size-complex="9pt" style:font-style-complex="italic" style:font-weight-complex="bold"/>
    </style:style>
    <style:style style:name="T20" style:family="text">
      <style:text-properties fo:font-variant="normal" fo:text-transform="none" fo:color="#000000" style:font-name="PT Serif" fo:font-size="10.3999996185303pt" fo:letter-spacing="normal" fo:font-style="normal" style:text-underline-style="none" fo:font-weight="normal" officeooo:rsid="057bd4ed" style:font-size-asian="9pt" style:font-style-asian="italic" style:font-weight-asian="bold" style:font-size-complex="9pt" style:font-style-complex="italic" style:font-weight-complex="bold"/>
    </style:style>
    <style:style style:name="T21" style:family="text">
      <style:text-properties fo:font-variant="normal" fo:text-transform="none" fo:color="#000000" style:font-name="PT Serif" fo:font-size="10.3999996185303pt" fo:letter-spacing="normal" fo:font-style="normal" style:text-underline-style="none" fo:font-weight="normal" officeooo:rsid="0581c006" style:font-size-asian="9pt" style:font-style-asian="italic" style:font-weight-asian="bold" style:font-size-complex="9pt" style:font-style-complex="italic" style:font-weight-complex="bold"/>
    </style:style>
    <style:style style:name="T22" style:family="text">
      <style:text-properties fo:font-variant="normal" fo:text-transform="none" fo:color="#000000" style:text-line-through-style="none" style:text-line-through-type="none" style:font-name="PT Serif" fo:font-size="10.3999996185303pt" fo:letter-spacing="normal" fo:font-style="normal" style:text-underline-style="none" fo:font-weight="normal" officeooo:rsid="0581c006" style:text-blinking="false" fo:background-color="#f8f9fa" loext:char-shading-value="0" style:font-size-asian="9pt" style:font-style-asian="italic" style:font-weight-asian="bold" style:font-size-complex="9pt" style:font-style-complex="italic" style:font-weight-complex="bold"/>
    </style:style>
    <style:style style:name="T23" style:family="text">
      <style:text-properties fo:font-variant="normal" fo:text-transform="none" fo:color="#000000" style:text-line-through-style="none" style:text-line-through-type="none" style:font-name="PT Serif" fo:font-size="10.3999996185303pt" fo:letter-spacing="normal" fo:font-style="normal" style:text-underline-style="none" fo:font-weight="normal" officeooo:rsid="0592ba4a" style:text-blinking="false" fo:background-color="#f8f9fa" loext:char-shading-value="0" style:font-size-asian="9pt" style:font-style-asian="italic" style:font-weight-asian="bold" style:font-size-complex="9pt" style:font-style-complex="italic" style:font-weight-complex="bold"/>
    </style:style>
    <style:style style:name="T24" style:family="text">
      <style:text-properties fo:font-variant="normal" fo:text-transform="none" fo:color="#000000" style:text-line-through-style="none" style:text-line-through-type="none" style:font-name="PT Serif" fo:font-size="10.3999996185303pt" fo:letter-spacing="normal" fo:font-style="normal" style:text-underline-style="none" fo:font-weight="normal" officeooo:rsid="05962b9b" style:text-blinking="false" fo:background-color="#f8f9fa" loext:char-shading-value="0" style:font-size-asian="9pt" style:font-style-asian="italic" style:font-weight-asian="bold" style:font-size-complex="9pt" style:font-style-complex="italic" style:font-weight-complex="bold"/>
    </style:style>
    <style:style style:name="T25" style:family="text">
      <style:text-properties fo:font-variant="normal" fo:text-transform="none" fo:color="#000000" style:text-line-through-style="none" style:text-line-through-type="none" style:font-name="PT Serif" fo:font-size="10.3999996185303pt" fo:letter-spacing="normal" fo:font-style="normal" style:text-underline-style="none" fo:font-weight="normal" officeooo:rsid="05981a33" style:text-blinking="false" fo:background-color="#f8f9fa" loext:char-shading-value="0" style:font-size-asian="9pt" style:font-style-asian="italic" style:font-weight-asian="bold" style:font-size-complex="9pt" style:font-style-complex="italic" style:font-weight-complex="bold"/>
    </style:style>
    <style:style style:name="T26" style:family="text">
      <style:text-properties fo:font-variant="normal" fo:text-transform="none" fo:color="#000000" style:text-line-through-style="none" style:text-line-through-type="none" style:font-name="PT Serif" fo:font-size="10.3999996185303pt" fo:letter-spacing="normal" fo:font-style="normal" style:text-underline-style="none" fo:font-weight="bold" officeooo:rsid="05981a33" style:text-blinking="false" fo:background-color="#f8f9fa" loext:char-shading-value="0" style:font-size-asian="9pt" style:font-style-asian="italic" style:font-weight-asian="bold" style:font-size-complex="9pt" style:font-style-complex="italic" style:font-weight-complex="bold"/>
    </style:style>
    <style:style style:name="T27" style:family="text">
      <style:text-properties officeooo:rsid="059c940a"/>
    </style:style>
    <style:style style:name="T28" style:family="text">
      <style:text-properties officeooo:rsid="05a1b7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8">Ancien s</text:span>cénario<text:span text:style-name="T1"> du jeu</text:span> :</text:p>
      <text:p text:style-name="P2"/>
      <text:p text:style-name="P3">Pour ce jeu, j’avais envie de faire une brève version 2D du jeu « Superbia-like » qui me trottait dans la tête depuis un moment : </text:p>
      <text:p text:style-name="P4"/>
      <text:list xml:id="list2826203296" text:style-name="L1">
        <text:list-header>
          <text:p text:style-name="P13">« (<text:span text:style-name="T5">Tout comme dans Superbia, l'histoire tourne autour d'une petite fille vivant dans un palais royal, qui se trouve être la princesse d'un "Multivers", une sorte d'agrégat de dimensions parallèles fusionnées en une seule. Extrêmement vulgaire, aguicheuse, provocante, bagarreuse, et surtout extrêmement psychotique, elle parcourt sans relâche le Multivers dans le seul but de retrouver son prince charmant qui tente désespérément de fuir son harcèlement constant pour l'épouser, et qui va jusqu'à employer l'aide de l'ennemi juré de la princesse – un monstre pédophile à la Bowser désirant le pouvoir, et surtout, la princesse – pour l'arrêter. </text:span></text:p>
          <text:p text:style-name="P13"><text:span text:style-name="T6">(Seulement, la princesse parvient toujours à vaincre facilement son ennemi et ses sbires, car elle peut se transformer en un monstre dégueulasse immense et surpuissant ; l'idée de ce monstre qui contraste complètement avec l'ambiance générale du jeu me vient d'un glitch imaginaire de mon autre jeu, Superbia, où les sprites de Superbia seraient distordues et donneraient l'apparence d'un monstre humaoïde énorme.</text:span>)</text:p>
          <text:p text:style-name="P13"/>
          <text:p text:style-name="P14">L'univers et l'ambiance seraient pour une fois assez déjantés, loin du sérieux des autres jeux ; le personnage principal <text:span text:style-name="T2">serait le portrait type d'une fillette vivant dans un conte de fées, portant une robe ample à la Superbia et une ombrelle (sans rester dans le Dark Gothique), et</text:span> s'amuserait en chemin <text:span text:style-name="T2">pour récupérer son prince en se mettant</text:span> en scène dans des situations décalées à plusieurs reprises, <text:span text:style-name="T3">dans un humour mêlant humour anglais et français (culture de l'absurde)</text:span> : Par exemple, quand elle sera à priori en danger (ex : Une armée ou un monstre géant lui fonce dessus), elle prendra un air faussement surpris avant de défoncer ses ennemis <text:span text:style-name="T2">sans le moindre effort</text:span>, soit avec sa force naturelle (elle possède une force surhumaine) soit <text:span text:style-name="T4">avec ses pouvoirs magiques, soit</text:span> en se transformant en monstre. »</text:p>
        </text:list-header>
      </text:list>
      <text:p text:style-name="P12"/>
      <text:p text:style-name="P11"/>
      <text:p text:style-name="P5">Le gameplay sera pas forcément aussi poussé dans ce scénario-là, mais les bases seront les mêmes: <text:span text:style-name="T7">Le joueur pourra se déplacer, sauter, attaquer selon un combo de coups, et avoir des transformations (je pense, vu que c’est ce qui rendra le tout intéressant). L’intérêt ici sera de faire en sorte que les contrôles soient aussi intuitives et agréables que possible : Elles devront être fluides, répondre instantanément aux commandes du joueur, et être simples (pas de combinaisons trop complexes pour des choses simples). Tout doit être fait pour que le joueur se sente à l’aise en contrôlant le personnage et en interagissant avec l’environnement : Pas de tutoriels (ou si impossible, les limiter autant que possible)</text:span></text:p>
      <text:p text:style-name="P5"/>
      <text:p text:style-name="P5"/>
      <text:p text:style-name="P5"/>
      <text:p text:style-name="P5"/>
      <text:p text:style-name="P5"/>
      <text:p text:style-name="P5"/>
      <text:p text:style-name="P5"/>
      <text:p text:style-name="P5"/>
      <text:p text:style-name="P6"><text:soft-page-break/>Liste des noms et prénoms pour le personnage principal (et accessoirement pour le jeu, mais je pense que le jeu sera éponyme. Comme le perso est une princesse, il faudra lui trouver un nom de noble. <text:span text:style-name="T10">Pour les autres noms qu’on a trouvé, on pourra toujours les donner aux persos secondaires</text:span>) :</text:p>
      <text:p text:style-name="P6"/>
      <text:p text:style-name="P7"><text:span text:style-name="T12">Prénoms</text:span><text:span text:style-name="T9"> : </text:span><text:span text:style-name="T14">Marie</text:span>, <text:span text:style-name="T14">Antoinette</text:span>, Blanche, <text:span text:style-name="T8">Jeanne, </text:span><text:span text:style-name="T15">Napoléone</text:span><text:span text:style-name="T8">, Anne, </text:span><text:span text:style-name="T15">Eléonore</text:span><text:span text:style-name="T8">, </text:span><text:span text:style-name="T15">Catherine</text:span><text:span text:style-name="T8">, Elizabeth, Louise, Marguerite (Maggie), Victoire, </text:span><text:span text:style-name="T15">Henriette</text:span><text:span text:style-name="T8">, Félicité, Charlotte, Sissi</text:span></text:p>
      <text:p text:style-name="P10"><text:span text:style-name="T18">Noms</text:span><text:span text:style-name="T19"> : de </text:span><text:span text:style-name="T20">Bourbon, </text:span><text:span text:style-name="T21">de Gaule, de Bourgogne, de Médicis, </text:span><text:span text:style-name="T22">de Lorraine-Vaudémont, </text:span><text:span text:style-name="T23">de Habsbourg, </text:span><text:span text:style-name="T24">de Castille, </text:span><text:span text:style-name="T26">de Gallicis</text:span><text:span text:style-name="T25"> (nom que j’ai trouvé à la place de « de Gaule », c’est le latin de « Gaule » mais ça permet de donner un nom au pays fictif du jeu.)</text:span></text:p>
      <text:p text:style-name="P8"><text:span text:style-name="T11">Titres</text:span> : <text:span text:style-name="T17">Impératrice, </text:span>Reine, <text:span text:style-name="T17">Régente</text:span>, <text:span text:style-name="T14">Dauphine</text:span><text:span text:style-name="T17">, </text:span>Princesse, Duchesse<text:span text:style-name="T17">, Marquise</text:span>, <text:span text:style-name="T17">Comtesse</text:span></text:p>
      <text:p text:style-name="P9"><text:span text:style-name="T13">Hiérarchie</text:span> : <text:span text:style-name="T16">Troisième du nom</text:span><text:span text:style-name="T27">, prétendante directe au trône (donc dauphine et non plus princesse) depuis que sa grande sœur, Seconde du nom, a abandonné son titre de dauphine en épousant le roi d’Angalis (l’équivalent fictif de l’Angleterre) et en devenant reine du pays sur ordre du roi et de la re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PT Serif" svg:font-family="'PT Serif',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8:03:37.290000000</meta:creation-date>
    <dc:date>2018-12-30T13:15:10.415000000</dc:date>
    <meta:editing-duration>P11DT12H23M29S</meta:editing-duration>
    <meta:editing-cycles>1198</meta:editing-cycles>
    <meta:generator>LibreOffice/5.3.7.2$Windows_X86_64 LibreOffice_project/6b8ed514a9f8b44d37a1b96673cbbdd077e24059</meta:generator>
    <meta:document-statistic meta:table-count="0" meta:image-count="0" meta:object-count="0" meta:page-count="2" meta:paragraph-count="12" meta:word-count="626" meta:character-count="3845" meta:non-whitespace-character-count="3230"/>
  </office:meta>
</office:document-meta>
</file>