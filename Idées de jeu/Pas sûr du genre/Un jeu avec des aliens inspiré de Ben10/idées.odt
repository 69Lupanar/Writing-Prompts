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rsid="001bdc6a" officeooo:paragraph-rsid="001bdc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piré de Ben10, le perso ppal trouve une Xenitrix (inspiré de l’Omnitrix) qui transforme le joueur en une espèce alien, lui permettant de parler la langue des aliens et de les baiser.</text:p>
      <text:p text:style-name="P1"/>
      <text:p text:style-name="P1">RPG? Beat’em up? V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M17S</meta:editing-duration>
    <meta:editing-cycles>2</meta:editing-cycles>
    <meta:generator>LibreOffice/7.3.3.2$Windows_X86_64 LibreOffice_project/d1d0ea68f081ee2800a922cac8f79445e4603348</meta:generator>
    <meta:creation-date>2024-04-30T20:25:25.546000000</meta:creation-date>
    <dc:date>2024-04-30T20:27:39.097000000</dc:date>
    <meta:document-statistic meta:table-count="0" meta:image-count="0" meta:object-count="0" meta:page-count="1" meta:paragraph-count="2" meta:word-count="36" meta:character-count="205" meta:non-whitespace-character-count="171"/>
  </office:meta>
</office:document-meta>
</file>